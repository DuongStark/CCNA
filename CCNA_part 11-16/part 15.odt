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png" manifest:media-type="image/pn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36.jpeg" manifest:media-type="image/jpeg"/>
  <manifest:file-entry manifest:full-path="media/image37.jpeg" manifest:media-type="image/jpeg"/>
  <manifest:file-entry manifest:full-path="media/image38.jpeg" manifest:media-type="image/jpeg"/>
  <manifest:file-entry manifest:full-path="media/image39.jpeg" manifest:media-type="image/jpeg"/>
  <manifest:file-entry manifest:full-path="media/image40.jpeg" manifest:media-type="image/jpeg"/>
  <manifest:file-entry manifest:full-path="media/image41.jpeg" manifest:media-type="image/jpeg"/>
  <manifest:file-entry manifest:full-path="media/image42.jpeg" manifest:media-type="image/jpeg"/>
  <manifest:file-entry manifest:full-path="media/image43.jpeg" manifest:media-type="image/jpeg"/>
  <manifest:file-entry manifest:full-path="media/image44.jpeg" manifest:media-type="image/jpeg"/>
  <manifest:file-entry manifest:full-path="media/image45.jpeg" manifest:media-type="image/jpeg"/>
  <manifest:file-entry manifest:full-path="media/image1.jpeg" manifest:media-type="image/jpeg"/>
  <manifest:file-entry manifest:full-path="media/image47.jpeg" manifest:media-type="image/jpeg"/>
  <manifest:file-entry manifest:full-path="media/image48.jpeg" manifest:media-type="image/jpeg"/>
  <manifest:file-entry manifest:full-path="media/image49.jpeg" manifest:media-type="image/jpeg"/>
  <manifest:file-entry manifest:full-path="media/image50.jpeg" manifest:media-type="image/jpeg"/>
  <manifest:file-entry manifest:full-path="media/image51.jpeg" manifest:media-type="image/jpeg"/>
  <manifest:file-entry manifest:full-path="media/image52.jpeg" manifest:media-type="image/jpeg"/>
  <manifest:file-entry manifest:full-path="media/image46.jpeg" manifest:media-type="image/jpeg"/>
  <manifest:file-entry manifest:full-path="media/image54.jpeg" manifest:media-type="image/jpeg"/>
  <manifest:file-entry manifest:full-path="media/image55.jpeg" manifest:media-type="image/jpeg"/>
  <manifest:file-entry manifest:full-path="media/image56.jpeg" manifest:media-type="image/jpeg"/>
  <manifest:file-entry manifest:full-path="media/image57.jpeg" manifest:media-type="image/jpeg"/>
  <manifest:file-entry manifest:full-path="media/image2.jpeg" manifest:media-type="image/jpeg"/>
  <manifest:file-entry manifest:full-path="media/image3.jpeg" manifest:media-type="image/jpeg"/>
  <manifest:file-entry manifest:full-path="media/image5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 style:parent-style-name="Normal" style:family="paragraph">
      <style:text-properties style:font-name="Times New Roman" style:font-name-complex="Times New Roman" fo:font-size="14pt" style:font-size-asian="14pt" style:font-size-complex="14pt"/>
    </style:style>
    <style:style style:name="T5" style:parent-style-name="DefaultParagraphFont" style:family="text">
      <style:text-properties style:font-name="Times New Roman" style:font-name-complex="Times New Roman" fo:font-size="14pt" style:font-size-asian="14pt" style:font-size-complex="14pt"/>
    </style:style>
    <style:style style:name="P6" style:parent-style-name="Normal" style:family="paragraph">
      <style:text-properties style:font-name="Times New Roman" style:font-name-complex="Times New Roman" fo:font-size="14pt" style:font-size-asian="14pt" style:font-size-complex="14pt"/>
    </style:style>
    <style:style style:name="P7" style:parent-style-name="Normal" style:family="paragraph">
      <style:text-properties style:font-name="Times New Roman" style:font-name-complex="Times New Roman" fo:font-size="14pt" style:font-size-asian="14pt" style:font-size-complex="14pt"/>
    </style:style>
    <style:style style:name="P8" style:parent-style-name="Normal" style:family="paragraph">
      <style:text-properties style:font-name="Times New Roman" style:font-name-complex="Times New Roman" fo:font-size="14pt" style:font-size-asian="14pt" style:font-size-complex="14pt"/>
    </style:style>
    <style:style style:name="T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 style:parent-style-name="DefaultParagraphFont" style:family="text">
      <style:text-properties style:font-name="Times New Roman" style:font-name-complex="Times New Roman" fo:font-size="14pt" style:font-size-asian="14pt" style:font-size-complex="14pt"/>
    </style:style>
    <style:style style:name="T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 style:parent-style-name="Normal" style:family="paragraph">
      <style:text-properties style:font-name="Times New Roman" style:font-name-complex="Times New Roman" fo:font-size="14pt" style:font-size-asian="14pt" style:font-size-complex="14pt"/>
    </style:style>
    <style:style style:name="T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 style:parent-style-name="Normal" style:family="paragraph">
      <style:text-properties style:font-name="Times New Roman" style:font-name-complex="Times New Roman" fo:font-size="14pt" style:font-size-asian="14pt" style:font-size-complex="14pt"/>
    </style:style>
    <style:style style:name="P16" style:parent-style-name="Normal" style:family="paragraph">
      <style:text-properties style:font-name="Times New Roman" style:font-name-complex="Times New Roman" fo:font-size="14pt" style:font-size-asian="14pt" style:font-size-complex="14pt"/>
    </style:style>
    <style:style style:name="P17" style:parent-style-name="Normal" style:family="paragraph">
      <style:text-properties style:font-name="Times New Roman" style:font-name-complex="Times New Roman" fo:font-size="14pt" style:font-size-asian="14pt" style:font-size-complex="14pt"/>
    </style:style>
    <style:style style:name="T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 style:parent-style-name="DefaultParagraphFont" style:family="text">
      <style:text-properties style:font-name="Times New Roman" style:font-name-complex="Times New Roman" fo:font-size="14pt" style:font-size-asian="14pt" style:font-size-complex="14pt"/>
    </style:style>
    <style:style style:name="T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1" style:parent-style-name="Normal" style:family="paragraph">
      <style:text-properties style:font-name="Times New Roman" style:font-name-complex="Times New Roman" fo:font-size="14pt" style:font-size-asian="14pt" style:font-size-complex="14pt"/>
    </style:style>
    <style:style style:name="T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4" style:parent-style-name="Normal" style:family="paragraph">
      <style:text-properties style:font-name="Times New Roman" style:font-name-complex="Times New Roman" fo:font-size="14pt" style:font-size-asian="14pt" style:font-size-complex="14pt"/>
    </style:style>
    <style:style style:name="P25" style:parent-style-name="Normal" style:family="paragraph">
      <style:text-properties style:font-name="Times New Roman" style:font-name-complex="Times New Roman" fo:font-size="14pt" style:font-size-asian="14pt" style:font-size-complex="14pt"/>
    </style:style>
    <style:style style:name="P26" style:parent-style-name="Normal" style:family="paragraph">
      <style:text-properties style:font-name="Times New Roman" style:font-name-complex="Times New Roman" fo:font-size="14pt" style:font-size-asian="14pt" style:font-size-complex="14pt"/>
    </style:style>
    <style:style style:name="P27" style:parent-style-name="Normal" style:family="paragraph">
      <style:text-properties style:font-name="Times New Roman" style:font-name-complex="Times New Roman" fo:font-size="14pt" style:font-size-asian="14pt" style:font-size-complex="14pt"/>
    </style:style>
    <style:style style:name="T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9" style:parent-style-name="DefaultParagraphFont" style:family="text">
      <style:text-properties style:font-name="Times New Roman" style:font-name-complex="Times New Roman" fo:font-size="14pt" style:font-size-asian="14pt" style:font-size-complex="14pt"/>
    </style:style>
    <style:style style:name="T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2" style:parent-style-name="Normal" style:family="paragraph">
      <style:text-properties style:font-name="Times New Roman" style:font-name-complex="Times New Roman" fo:font-size="14pt" style:font-size-asian="14pt" style:font-size-complex="14pt"/>
    </style:style>
    <style:style style:name="P33" style:parent-style-name="Normal" style:family="paragraph">
      <style:text-properties style:font-name="Times New Roman" style:font-name-complex="Times New Roman" fo:font-size="14pt" style:font-size-asian="14pt" style:font-size-complex="14pt"/>
    </style:style>
    <style:style style:name="P34" style:parent-style-name="Normal" style:family="paragraph">
      <style:text-properties style:font-name="Times New Roman" style:font-name-complex="Times New Roman" fo:font-size="14pt" style:font-size-asian="14pt" style:font-size-complex="14pt"/>
    </style:style>
    <style:style style:name="T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6" style:parent-style-name="DefaultParagraphFont" style:family="text">
      <style:text-properties style:font-name="Times New Roman" style:font-name-complex="Times New Roman" fo:font-size="14pt" style:font-size-asian="14pt" style:font-size-complex="14pt"/>
    </style:style>
    <style:style style:name="T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 style:parent-style-name="DefaultParagraphFont" style:family="text">
      <style:text-properties style:font-name="Times New Roman" style:font-name-complex="Times New Roman" fo:font-size="14pt" style:font-size-asian="14pt" style:font-size-complex="14pt"/>
    </style:style>
    <style:style style:name="T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0" style:parent-style-name="DefaultParagraphFont" style:family="text">
      <style:text-properties style:font-name="Times New Roman" style:font-name-complex="Times New Roman" fo:font-size="14pt" style:font-size-asian="14pt" style:font-size-complex="14pt"/>
    </style:style>
    <style:style style:name="T41"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4" style:parent-style-name="Normal" style:family="paragraph">
      <style:text-properties style:font-name="Times New Roman" style:font-name-complex="Times New Roman" fo:font-size="14pt" style:font-size-asian="14pt" style:font-size-complex="14pt"/>
    </style:style>
    <style:style style:name="P45" style:parent-style-name="Normal" style:family="paragraph">
      <style:text-properties style:font-name="Times New Roman" style:font-name-complex="Times New Roman" fo:font-size="14pt" style:font-size-asian="14pt" style:font-size-complex="14pt"/>
    </style:style>
    <style:style style:name="P46" style:parent-style-name="Normal" style:family="paragraph">
      <style:text-properties style:font-name="Times New Roman" style:font-name-complex="Times New Roman" fo:font-size="14pt" style:font-size-asian="14pt" style:font-size-complex="14pt"/>
    </style:style>
    <style:style style:name="P47" style:parent-style-name="Normal" style:family="paragraph">
      <style:text-properties style:font-name="Times New Roman" style:font-name-complex="Times New Roman" fo:font-size="14pt" style:font-size-asian="14pt" style:font-size-complex="14pt"/>
    </style:style>
    <style:style style:name="T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9" style:parent-style-name="DefaultParagraphFont" style:family="text">
      <style:text-properties style:font-name="Times New Roman" style:font-name-complex="Times New Roman" fo:font-size="14pt" style:font-size-asian="14pt" style:font-size-complex="14pt"/>
    </style:style>
    <style:style style:name="T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1" style:parent-style-name="Normal" style:family="paragraph">
      <style:text-properties style:font-name="Times New Roman" style:font-name-complex="Times New Roman" fo:font-size="14pt" style:font-size-asian="14pt" style:font-size-complex="14pt"/>
    </style:style>
    <style:style style:name="T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4" style:parent-style-name="Normal" style:family="paragraph">
      <style:text-properties style:font-name="Times New Roman" style:font-name-complex="Times New Roman" fo:font-size="14pt" style:font-size-asian="14pt" style:font-size-complex="14pt"/>
    </style:style>
    <style:style style:name="T55" style:parent-style-name="DefaultParagraphFont" style:family="text">
      <style:text-properties style:font-name="Times New Roman" style:font-name-complex="Times New Roman" fo:font-size="14pt" style:font-size-asian="14pt" style:font-size-complex="14pt"/>
    </style:style>
    <style:style style:name="P56" style:parent-style-name="Normal" style:family="paragraph">
      <style:text-properties style:font-name="Times New Roman" style:font-name-complex="Times New Roman" fo:font-size="14pt" style:font-size-asian="14pt" style:font-size-complex="14pt"/>
    </style:style>
    <style:style style:name="TableColumn58" style:family="table-column">
      <style:table-column-properties style:column-width="1.3805in"/>
    </style:style>
    <style:style style:name="TableColumn59" style:family="table-column">
      <style:table-column-properties style:column-width="1.3805in"/>
    </style:style>
    <style:style style:name="Table57" style:family="table">
      <style:table-properties style:width="2.7611in" fo:margin-left="0in" table:align="left"/>
    </style:style>
    <style:style style:name="TableRow60" style:family="table-row">
      <style:table-row-properties/>
    </style:style>
    <style:style style:name="TableCell6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62" style:parent-style-name="Normal" style:family="paragraph">
      <style:text-properties style:font-name="Times New Roman" style:font-name-complex="Times New Roman" fo:font-size="14pt" style:font-size-asian="14pt" style:font-size-complex="14pt"/>
    </style:style>
    <style:style style:name="P63" style:parent-style-name="Normal" style:family="paragraph">
      <style:text-properties style:font-name="Times New Roman" style:font-name-complex="Times New Roman" fo:font-size="14pt" style:font-size-asian="14pt" style:font-size-complex="14pt"/>
    </style:style>
    <style:style style:name="TableCell6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65" style:parent-style-name="Normal" style:family="paragraph">
      <style:text-properties style:font-name="Times New Roman" style:font-name-complex="Times New Roman" fo:font-size="14pt" style:font-size-asian="14pt" style:font-size-complex="14pt"/>
    </style:style>
    <style:style style:name="P66" style:parent-style-name="Normal" style:family="paragraph">
      <style:text-properties style:font-name="Times New Roman" style:font-name-complex="Times New Roman" fo:font-size="14pt" style:font-size-asian="14pt" style:font-size-complex="14pt"/>
    </style:style>
    <style:style style:name="TableRow67" style:family="table-row">
      <style:table-row-properties/>
    </style:style>
    <style:style style:name="TableCell6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69" style:parent-style-name="Normal" style:family="paragraph">
      <style:text-properties style:font-name="Times New Roman" style:font-name-complex="Times New Roman" fo:font-size="14pt" style:font-size-asian="14pt" style:font-size-complex="14pt"/>
    </style:style>
    <style:style style:name="P70" style:parent-style-name="Normal" style:family="paragraph">
      <style:text-properties style:font-name="Times New Roman" style:font-name-complex="Times New Roman" fo:font-size="14pt" style:font-size-asian="14pt" style:font-size-complex="14pt"/>
    </style:style>
    <style:style style:name="TableCell7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72" style:parent-style-name="Normal" style:family="paragraph">
      <style:text-properties style:font-name="Times New Roman" style:font-name-complex="Times New Roman" fo:font-size="14pt" style:font-size-asian="14pt" style:font-size-complex="14pt"/>
    </style:style>
    <style:style style:name="P73" style:parent-style-name="Normal" style:family="paragraph">
      <style:text-properties style:font-name="Times New Roman" style:font-name-complex="Times New Roman" fo:font-size="14pt" style:font-size-asian="14pt" style:font-size-complex="14pt"/>
    </style:style>
    <style:style style:name="P74" style:parent-style-name="Normal" style:family="paragraph">
      <style:text-properties style:font-name="Times New Roman" style:font-name-complex="Times New Roman" fo:font-size="14pt" style:font-size-asian="14pt" style:font-size-complex="14pt"/>
    </style:style>
    <style:style style:name="P75" style:parent-style-name="Normal" style:family="paragraph">
      <style:text-properties style:font-name="Times New Roman" style:font-name-complex="Times New Roman" fo:font-size="14pt" style:font-size-asian="14pt" style:font-size-complex="14pt"/>
    </style:style>
    <style:style style:name="T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7" style:parent-style-name="DefaultParagraphFont" style:family="text">
      <style:text-properties style:font-name="Times New Roman" style:font-name-complex="Times New Roman" fo:font-size="14pt" style:font-size-asian="14pt" style:font-size-complex="14pt"/>
    </style:style>
    <style:style style:name="T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9" style:parent-style-name="Normal" style:family="paragraph">
      <style:text-properties style:font-name="Times New Roman" style:font-name-complex="Times New Roman" fo:font-size="14pt" style:font-size-asian="14pt" style:font-size-complex="14pt"/>
    </style:style>
    <style:style style:name="T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2" style:parent-style-name="Normal" style:family="paragraph">
      <style:text-properties style:font-name="Times New Roman" style:font-name-complex="Times New Roman" fo:font-size="14pt" style:font-size-asian="14pt" style:font-size-complex="14pt"/>
    </style:style>
    <style:style style:name="T83" style:parent-style-name="DefaultParagraphFont" style:family="text">
      <style:text-properties style:font-name="Times New Roman" style:font-name-complex="Times New Roman" fo:font-size="14pt" style:font-size-asian="14pt" style:font-size-complex="14pt"/>
    </style:style>
    <style:style style:name="P84" style:parent-style-name="Normal" style:family="paragraph">
      <style:text-properties style:font-name="Times New Roman" style:font-name-complex="Times New Roman" fo:font-size="14pt" style:font-size-asian="14pt" style:font-size-complex="14pt"/>
    </style:style>
    <style:style style:name="P85" style:parent-style-name="Normal" style:family="paragraph">
      <style:text-properties style:font-name="Times New Roman" style:font-name-complex="Times New Roman" fo:font-size="14pt" style:font-size-asian="14pt" style:font-size-complex="14pt"/>
    </style:style>
    <style:style style:name="P86" style:parent-style-name="Normal" style:family="paragraph">
      <style:text-properties style:font-name="Times New Roman" style:font-name-complex="Times New Roman" fo:font-size="14pt" style:font-size-asian="14pt" style:font-size-complex="14pt"/>
    </style:style>
    <style:style style:name="T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 style:parent-style-name="DefaultParagraphFont" style:family="text">
      <style:text-properties style:font-name="Times New Roman" style:font-name-complex="Times New Roman" fo:font-size="14pt" style:font-size-asian="14pt" style:font-size-complex="14pt"/>
    </style:style>
    <style:style style:name="T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0" style:parent-style-name="Normal" style:family="paragraph">
      <style:text-properties style:font-name="Times New Roman" style:font-name-complex="Times New Roman" fo:font-size="14pt" style:font-size-asian="14pt" style:font-size-complex="14pt"/>
    </style:style>
    <style:style style:name="P91" style:parent-style-name="Normal" style:family="paragraph">
      <style:text-properties style:font-name="Times New Roman" style:font-name-complex="Times New Roman" fo:font-size="14pt" style:font-size-asian="14pt" style:font-size-complex="14pt"/>
    </style:style>
    <style:style style:name="T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4" style:parent-style-name="Normal" style:family="paragraph">
      <style:text-properties style:font-name="Times New Roman" style:font-name-complex="Times New Roman" fo:font-size="14pt" style:font-size-asian="14pt" style:font-size-complex="14pt"/>
    </style:style>
    <style:style style:name="P95" style:parent-style-name="consolas" style:family="paragraph">
      <style:text-properties fo:language="it" fo:country="IT"/>
    </style:style>
    <style:style style:name="P96" style:parent-style-name="consolas" style:family="paragraph">
      <style:text-properties fo:language="it" fo:country="IT"/>
    </style:style>
    <style:style style:name="P97" style:parent-style-name="consolas" style:family="paragraph">
      <style:text-properties fo:language="it" fo:country="IT"/>
    </style:style>
    <style:style style:name="P98" style:parent-style-name="Normal" style:family="paragraph">
      <style:text-properties style:font-name="Times New Roman" style:font-name-complex="Times New Roman" fo:font-size="14pt" style:font-size-asian="14pt" style:font-size-complex="14pt"/>
    </style:style>
    <style:style style:name="P99" style:parent-style-name="Normal" style:family="paragraph">
      <style:text-properties style:font-name="Times New Roman" style:font-name-complex="Times New Roman" fo:font-size="14pt" style:font-size-asian="14pt" style:font-size-complex="14pt"/>
    </style:style>
    <style:style style:name="P100" style:parent-style-name="Normal" style:family="paragraph">
      <style:text-properties style:font-name="Times New Roman" style:font-name-complex="Times New Roman" fo:font-size="14pt" style:font-size-asian="14pt" style:font-size-complex="14pt"/>
    </style:style>
    <style:style style:name="P101" style:parent-style-name="Normal" style:family="paragraph">
      <style:text-properties style:font-name="Times New Roman" style:font-name-complex="Times New Roman" fo:font-size="14pt" style:font-size-asian="14pt" style:font-size-complex="14pt"/>
    </style:style>
    <style:style style:name="P102" style:parent-style-name="Normal" style:family="paragraph">
      <style:text-properties style:font-name="Times New Roman" style:font-name-complex="Times New Roman" fo:font-size="14pt" style:font-size-asian="14pt" style:font-size-complex="14pt"/>
    </style:style>
    <style:style style:name="P103" style:parent-style-name="Normal" style:family="paragraph">
      <style:text-properties style:font-name="Times New Roman" style:font-name-complex="Times New Roman" fo:font-size="14pt" style:font-size-asian="14pt" style:font-size-complex="14pt"/>
    </style:style>
    <style:style style:name="T1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5" style:parent-style-name="DefaultParagraphFont" style:family="text">
      <style:text-properties style:font-name="Times New Roman" style:font-name-complex="Times New Roman" fo:font-size="14pt" style:font-size-asian="14pt" style:font-size-complex="14pt"/>
    </style:style>
    <style:style style:name="T1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8" style:parent-style-name="Normal" style:family="paragraph">
      <style:text-properties style:font-name="Times New Roman" style:font-name-complex="Times New Roman" fo:font-size="14pt" style:font-size-asian="14pt" style:font-size-complex="14pt"/>
    </style:style>
    <style:style style:name="T109" style:parent-style-name="DefaultParagraphFont" style:family="text">
      <style:text-properties style:font-name="Times New Roman" style:font-name-complex="Times New Roman" fo:font-size="14pt" style:font-size-asian="14pt" style:font-size-complex="14pt"/>
    </style:style>
    <style:style style:name="P110" style:parent-style-name="Normal" style:family="paragraph">
      <style:text-properties style:font-name="Times New Roman" style:font-name-complex="Times New Roman" fo:font-size="14pt" style:font-size-asian="14pt" style:font-size-complex="14pt"/>
    </style:style>
    <style:style style:name="TableColumn112" style:family="table-column">
      <style:table-column-properties style:column-width="3.4in"/>
    </style:style>
    <style:style style:name="TableColumn113" style:family="table-column">
      <style:table-column-properties style:column-width="2.3958in"/>
    </style:style>
    <style:style style:name="Table111" style:family="table">
      <style:table-properties style:width="5.7958in" fo:margin-left="0in" table:align="left"/>
    </style:style>
    <style:style style:name="TableRow114" style:family="table-row">
      <style:table-row-properties/>
    </style:style>
    <style:style style:name="TableCell115"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16" style:parent-style-name="Normal" style:family="paragraph">
      <style:text-properties style:font-name="Times New Roman" style:font-name-complex="Times New Roman" fo:font-size="14pt" style:font-size-asian="14pt" style:font-size-complex="14pt"/>
    </style:style>
    <style:style style:name="P117" style:parent-style-name="Normal" style:family="paragraph">
      <style:text-properties style:font-name="Times New Roman" style:font-name-complex="Times New Roman" fo:font-size="14pt" style:font-size-asian="14pt" style:font-size-complex="14pt"/>
    </style:style>
    <style:style style:name="TableCell118"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19" style:parent-style-name="Normal" style:family="paragraph">
      <style:text-properties style:font-name="Times New Roman" style:font-name-complex="Times New Roman" fo:font-size="14pt" style:font-size-asian="14pt" style:font-size-complex="14pt"/>
    </style:style>
    <style:style style:name="P120" style:parent-style-name="Normal" style:family="paragraph">
      <style:text-properties style:font-name="Times New Roman" style:font-name-complex="Times New Roman" fo:font-size="14pt" style:font-size-asian="14pt" style:font-size-complex="14pt"/>
    </style:style>
    <style:style style:name="TableRow121" style:family="table-row">
      <style:table-row-properties/>
    </style:style>
    <style:style style:name="TableCell122"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23" style:parent-style-name="Normal" style:family="paragraph">
      <style:text-properties style:font-name="Times New Roman" style:font-name-complex="Times New Roman" fo:font-size="14pt" style:font-size-asian="14pt" style:font-size-complex="14pt"/>
    </style:style>
    <style:style style:name="P124" style:parent-style-name="Normal" style:family="paragraph">
      <style:text-properties style:font-name="Times New Roman" style:font-name-complex="Times New Roman" fo:font-size="14pt" style:font-size-asian="14pt" style:font-size-complex="14pt"/>
    </style:style>
    <style:style style:name="TableCell125"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26" style:parent-style-name="Normal" style:family="paragraph">
      <style:text-properties style:font-name="Times New Roman" style:font-name-complex="Times New Roman" fo:font-size="14pt" style:font-size-asian="14pt" style:font-size-complex="14pt"/>
    </style:style>
    <style:style style:name="P127" style:parent-style-name="Normal" style:family="paragraph">
      <style:text-properties style:font-name="Times New Roman" style:font-name-complex="Times New Roman" fo:font-size="14pt" style:font-size-asian="14pt" style:font-size-complex="14pt"/>
    </style:style>
    <style:style style:name="P128" style:parent-style-name="Normal" style:family="paragraph">
      <style:text-properties style:font-name="Times New Roman" style:font-name-complex="Times New Roman" fo:font-size="14pt" style:font-size-asian="14pt" style:font-size-complex="14pt"/>
    </style:style>
    <style:style style:name="P129" style:parent-style-name="Normal" style:family="paragraph">
      <style:text-properties style:font-name="Times New Roman" style:font-name-complex="Times New Roman" fo:font-size="14pt" style:font-size-asian="14pt" style:font-size-complex="14pt"/>
    </style:style>
    <style:style style:name="T1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1" style:parent-style-name="DefaultParagraphFont" style:family="text">
      <style:text-properties style:font-name="Times New Roman" style:font-name-complex="Times New Roman" fo:font-size="14pt" style:font-size-asian="14pt" style:font-size-complex="14pt"/>
    </style:style>
    <style:style style:name="T1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3" style:parent-style-name="Normal" style:family="paragraph">
      <style:text-properties style:font-name="Times New Roman" style:font-name-complex="Times New Roman" fo:font-size="14pt" style:font-size-asian="14pt" style:font-size-complex="14pt"/>
    </style:style>
    <style:style style:name="T1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6" style:parent-style-name="Normal" style:family="paragraph">
      <style:text-properties style:font-name="Times New Roman" style:font-name-complex="Times New Roman" fo:font-size="14pt" style:font-size-asian="14pt" style:font-size-complex="14pt"/>
    </style:style>
    <style:style style:name="T137" style:parent-style-name="DefaultParagraphFont" style:family="text">
      <style:text-properties style:font-name="Times New Roman" style:font-name-complex="Times New Roman" fo:font-size="14pt" style:font-size-asian="14pt" style:font-size-complex="14pt"/>
    </style:style>
    <style:style style:name="P138" style:parent-style-name="Normal" style:family="paragraph">
      <style:text-properties style:font-name="Times New Roman" style:font-name-complex="Times New Roman" fo:font-size="14pt" style:font-size-asian="14pt" style:font-size-complex="14pt"/>
    </style:style>
    <style:style style:name="P139" style:parent-style-name="Normal" style:family="paragraph">
      <style:text-properties style:font-name="Times New Roman" style:font-name-complex="Times New Roman" fo:font-size="14pt" style:font-size-asian="14pt" style:font-size-complex="14pt"/>
    </style:style>
    <style:style style:name="P140" style:parent-style-name="Normal" style:family="paragraph">
      <style:text-properties style:font-name="Times New Roman" style:font-name-complex="Times New Roman" fo:font-size="14pt" style:font-size-asian="14pt" style:font-size-complex="14pt"/>
    </style:style>
    <style:style style:name="T1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2" style:parent-style-name="DefaultParagraphFont" style:family="text">
      <style:text-properties style:font-name="Times New Roman" style:font-name-complex="Times New Roman" fo:font-size="14pt" style:font-size-asian="14pt" style:font-size-complex="14pt"/>
    </style:style>
    <style:style style:name="T1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4" style:parent-style-name="Normal" style:family="paragraph">
      <style:text-properties style:font-name="Times New Roman" style:font-name-complex="Times New Roman" fo:font-size="14pt" style:font-size-asian="14pt" style:font-size-complex="14pt"/>
    </style:style>
    <style:style style:name="T1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7" style:parent-style-name="Normal" style:family="paragraph">
      <style:text-properties style:font-name="Times New Roman" style:font-name-complex="Times New Roman" fo:font-size="14pt" style:font-size-asian="14pt" style:font-size-complex="14pt"/>
    </style:style>
    <style:style style:name="T148" style:parent-style-name="DefaultParagraphFont" style:family="text">
      <style:text-properties style:font-name="Times New Roman" style:font-name-complex="Times New Roman" fo:font-size="14pt" style:font-size-asian="14pt" style:font-size-complex="14pt"/>
    </style:style>
    <style:style style:name="P149" style:parent-style-name="Normal" style:family="paragraph">
      <style:text-properties style:font-name="Times New Roman" style:font-name-complex="Times New Roman" fo:font-size="14pt" style:font-size-asian="14pt" style:font-size-complex="14pt"/>
    </style:style>
    <style:style style:name="P150" style:parent-style-name="Normal" style:family="paragraph">
      <style:text-properties style:font-name="Times New Roman" style:font-name-complex="Times New Roman" fo:font-size="14pt" style:font-size-asian="14pt" style:font-size-complex="14pt"/>
    </style:style>
    <style:style style:name="P151" style:parent-style-name="Normal" style:family="paragraph">
      <style:text-properties style:font-name="Times New Roman" style:font-name-complex="Times New Roman" fo:font-size="14pt" style:font-size-asian="14pt" style:font-size-complex="14pt"/>
    </style:style>
    <style:style style:name="P152" style:parent-style-name="Normal" style:family="paragraph">
      <style:text-properties style:font-name="Times New Roman" style:font-name-complex="Times New Roman" fo:font-size="14pt" style:font-size-asian="14pt" style:font-size-complex="14pt"/>
    </style:style>
    <style:style style:name="T1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4" style:parent-style-name="DefaultParagraphFont" style:family="text">
      <style:text-properties style:font-name="Times New Roman" style:font-name-complex="Times New Roman" fo:font-size="14pt" style:font-size-asian="14pt" style:font-size-complex="14pt"/>
    </style:style>
    <style:style style:name="T1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6" style:parent-style-name="Normal" style:family="paragraph">
      <style:text-properties style:font-name="Times New Roman" style:font-name-complex="Times New Roman" fo:font-size="14pt" style:font-size-asian="14pt" style:font-size-complex="14pt"/>
    </style:style>
    <style:style style:name="T1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9" style:parent-style-name="Normal" style:family="paragraph">
      <style:text-properties style:font-name="Times New Roman" style:font-name-complex="Times New Roman" fo:font-size="14pt" style:font-size-asian="14pt" style:font-size-complex="14pt"/>
    </style:style>
    <style:style style:name="T160" style:parent-style-name="DefaultParagraphFont" style:family="text">
      <style:text-properties style:font-name="Times New Roman" style:font-name-complex="Times New Roman" fo:font-size="14pt" style:font-size-asian="14pt" style:font-size-complex="14pt"/>
    </style:style>
    <style:style style:name="P161" style:parent-style-name="Normal" style:family="paragraph">
      <style:text-properties style:font-name="Times New Roman" style:font-name-complex="Times New Roman" fo:font-size="14pt" style:font-size-asian="14pt" style:font-size-complex="14pt"/>
    </style:style>
    <style:style style:name="P162" style:parent-style-name="Normal" style:family="paragraph">
      <style:text-properties style:font-name="Times New Roman" style:font-name-complex="Times New Roman" fo:font-size="14pt" style:font-size-asian="14pt" style:font-size-complex="14pt"/>
    </style:style>
    <style:style style:name="P163" style:parent-style-name="Normal" style:family="paragraph">
      <style:text-properties style:font-name="Times New Roman" style:font-name-complex="Times New Roman" fo:font-size="14pt" style:font-size-asian="14pt" style:font-size-complex="14pt"/>
    </style:style>
    <style:style style:name="T1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5" style:parent-style-name="DefaultParagraphFont" style:family="text">
      <style:text-properties style:font-name="Times New Roman" style:font-name-complex="Times New Roman" fo:font-size="14pt" style:font-size-asian="14pt" style:font-size-complex="14pt"/>
    </style:style>
    <style:style style:name="T1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8" style:parent-style-name="Normal" style:family="paragraph">
      <style:text-properties style:font-name="Times New Roman" style:font-name-complex="Times New Roman" fo:font-size="14pt" style:font-size-asian="14pt" style:font-size-complex="14pt"/>
    </style:style>
    <style:style style:name="P169" style:parent-style-name="Normal" style:family="paragraph">
      <style:text-properties style:font-name="Times New Roman" style:font-name-complex="Times New Roman" fo:font-size="14pt" style:font-size-asian="14pt" style:font-size-complex="14pt"/>
    </style:style>
    <style:style style:name="P170" style:parent-style-name="Normal" style:family="paragraph">
      <style:text-properties style:font-name="Times New Roman" style:font-name-complex="Times New Roman" fo:font-size="14pt" style:font-size-asian="14pt" style:font-size-complex="14pt"/>
    </style:style>
    <style:style style:name="T1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2" style:parent-style-name="DefaultParagraphFont" style:family="text">
      <style:text-properties style:font-name="Times New Roman" style:font-name-complex="Times New Roman" fo:font-size="14pt" style:font-size-asian="14pt" style:font-size-complex="14pt"/>
    </style:style>
    <style:style style:name="T1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4" style:parent-style-name="Normal" style:family="paragraph">
      <style:text-properties style:font-name="Times New Roman" style:font-name-complex="Times New Roman" fo:font-size="14pt" style:font-size-asian="14pt" style:font-size-complex="14pt"/>
    </style:style>
    <style:style style:name="T1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6" style:parent-style-name="DefaultParagraphFont" style:family="text">
      <style:text-properties style:font-name="Times New Roman" style:font-name-complex="Times New Roman" fo:font-size="14pt" style:font-size-asian="14pt" style:font-size-complex="14pt"/>
    </style:style>
    <style:style style:name="T1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8" style:parent-style-name="DefaultParagraphFont" style:family="text">
      <style:text-properties style:font-name="Times New Roman" style:font-name-complex="Times New Roman" fo:font-size="14pt" style:font-size-asian="14pt" style:font-size-complex="14pt"/>
    </style:style>
    <style:style style:name="T179" style:parent-style-name="DefaultParagraphFont" style:family="text">
      <style:text-properties style:font-name="Times New Roman" style:font-name-complex="Times New Roman" fo:font-size="14pt" style:font-size-asian="14pt" style:font-size-complex="14pt"/>
    </style:style>
    <style:style style:name="T1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1" style:parent-style-name="DefaultParagraphFont" style:family="text">
      <style:text-properties style:font-name="Times New Roman" style:font-name-complex="Times New Roman" fo:font-size="14pt" style:font-size-asian="14pt" style:font-size-complex="14pt"/>
    </style:style>
    <style:style style:name="T182" style:parent-style-name="DefaultParagraphFont" style:family="text">
      <style:text-properties style:font-name="Times New Roman" style:font-name-complex="Times New Roman" fo:font-size="14pt" style:font-size-asian="14pt" style:font-size-complex="14pt"/>
    </style:style>
    <style:style style:name="T1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4" style:parent-style-name="DefaultParagraphFont" style:family="text">
      <style:text-properties style:font-name="Times New Roman" style:font-name-complex="Times New Roman" fo:font-size="14pt" style:font-size-asian="14pt" style:font-size-complex="14pt"/>
    </style:style>
    <style:style style:name="P185" style:parent-style-name="Normal" style:family="paragraph">
      <style:text-properties style:font-name="Times New Roman" style:font-name-complex="Times New Roman" fo:font-size="14pt" style:font-size-asian="14pt" style:font-size-complex="14pt"/>
    </style:style>
    <style:style style:name="T1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7" style:parent-style-name="DefaultParagraphFont" style:family="text">
      <style:text-properties style:font-name="Times New Roman" style:font-name-complex="Times New Roman" fo:font-size="14pt" style:font-size-asian="14pt" style:font-size-complex="14pt"/>
    </style:style>
    <style:style style:name="T188" style:parent-style-name="DefaultParagraphFont" style:family="text">
      <style:text-properties style:font-name="Times New Roman" style:font-name-complex="Times New Roman" fo:font-size="14pt" style:font-size-asian="14pt" style:font-size-complex="14pt"/>
    </style:style>
    <style:style style:name="T189" style:parent-style-name="DefaultParagraphFont" style:family="text">
      <style:text-properties style:font-name="Times New Roman" style:font-name-complex="Times New Roman" fo:font-size="14pt" style:font-size-asian="14pt" style:font-size-complex="14pt"/>
    </style:style>
    <style:style style:name="T190" style:parent-style-name="DefaultParagraphFont" style:family="text">
      <style:text-properties style:font-name="Times New Roman" style:font-name-complex="Times New Roman" fo:font-size="14pt" style:font-size-asian="14pt" style:font-size-complex="14pt"/>
    </style:style>
    <style:style style:name="T191" style:parent-style-name="DefaultParagraphFont" style:family="text">
      <style:text-properties style:font-name="Times New Roman" style:font-name-complex="Times New Roman" fo:font-size="14pt" style:font-size-asian="14pt" style:font-size-complex="14pt"/>
    </style:style>
    <style:style style:name="T192" style:parent-style-name="DefaultParagraphFont" style:family="text">
      <style:text-properties style:font-name="Times New Roman" style:font-name-complex="Times New Roman" fo:font-size="14pt" style:font-size-asian="14pt" style:font-size-complex="14pt"/>
    </style:style>
    <style:style style:name="T193" style:parent-style-name="DefaultParagraphFont" style:family="text">
      <style:text-properties style:font-name="Times New Roman" style:font-name-complex="Times New Roman" fo:font-size="14pt" style:font-size-asian="14pt" style:font-size-complex="14pt"/>
    </style:style>
    <style:style style:name="T194"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95" style:parent-style-name="DefaultParagraphFont" style:family="text">
      <style:text-properties style:font-name="Times New Roman" style:font-name-complex="Times New Roman" fo:font-size="14pt" style:font-size-asian="14pt" style:font-size-complex="14pt"/>
    </style:style>
    <style:style style:name="T196" style:parent-style-name="DefaultParagraphFont" style:family="text">
      <style:text-properties style:font-name="Times New Roman" style:font-name-complex="Times New Roman" fo:font-size="14pt" style:font-size-asian="14pt" style:font-size-complex="14pt"/>
    </style:style>
    <style:style style:name="T197" style:parent-style-name="Hyperlink" style:family="text">
      <style:text-properties style:font-name="Times New Roman" style:font-name-complex="Times New Roman" fo:font-size="14pt" style:font-size-asian="14pt" style:font-size-complex="14pt"/>
    </style:style>
    <style:style style:name="T1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00" style:parent-style-name="Normal" style:family="paragraph">
      <style:text-properties style:font-name="Times New Roman" style:font-name-complex="Times New Roman" fo:font-size="14pt" style:font-size-asian="14pt" style:font-size-complex="14pt"/>
    </style:style>
    <style:style style:name="P201" style:parent-style-name="Normal" style:family="paragraph">
      <style:text-properties style:font-name="Times New Roman" style:font-name-complex="Times New Roman" fo:font-size="14pt" style:font-size-asian="14pt" style:font-size-complex="14pt"/>
    </style:style>
    <style:style style:name="P202" style:parent-style-name="Normal" style:family="paragraph">
      <style:text-properties style:font-name="Times New Roman" style:font-name-complex="Times New Roman" fo:font-size="14pt" style:font-size-asian="14pt" style:font-size-complex="14pt"/>
    </style:style>
    <style:style style:name="T2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04" style:parent-style-name="DefaultParagraphFont" style:family="text">
      <style:text-properties style:font-name="Times New Roman" style:font-name-complex="Times New Roman" fo:font-size="14pt" style:font-size-asian="14pt" style:font-size-complex="14pt"/>
    </style:style>
    <style:style style:name="T2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07" style:parent-style-name="Normal" style:family="paragraph">
      <style:text-properties style:font-name="Times New Roman" style:font-name-complex="Times New Roman" fo:font-size="14pt" style:font-size-asian="14pt" style:font-size-complex="14pt"/>
    </style:style>
    <style:style style:name="P208" style:parent-style-name="Normal" style:family="paragraph">
      <style:text-properties style:font-name="Times New Roman" style:font-name-complex="Times New Roman" fo:font-size="14pt" style:font-size-asian="14pt" style:font-size-complex="14pt"/>
    </style:style>
    <style:style style:name="P209" style:parent-style-name="Normal" style:family="paragraph">
      <style:text-properties style:font-name="Times New Roman" style:font-name-complex="Times New Roman" fo:font-size="14pt" style:font-size-asian="14pt" style:font-size-complex="14pt"/>
    </style:style>
    <style:style style:name="T2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1" style:parent-style-name="DefaultParagraphFont" style:family="text">
      <style:text-properties style:font-name="Times New Roman" style:font-name-complex="Times New Roman" fo:font-size="14pt" style:font-size-asian="14pt" style:font-size-complex="14pt"/>
    </style:style>
    <style:style style:name="T2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14" style:parent-style-name="Normal" style:family="paragraph">
      <style:text-properties style:font-name="Times New Roman" style:font-name-complex="Times New Roman" fo:font-size="14pt" style:font-size-asian="14pt" style:font-size-complex="14pt"/>
    </style:style>
    <style:style style:name="P215" style:parent-style-name="Normal" style:family="paragraph">
      <style:text-properties style:font-name="Times New Roman" style:font-name-complex="Times New Roman" fo:font-size="14pt" style:font-size-asian="14pt" style:font-size-complex="14pt"/>
    </style:style>
    <style:style style:name="P216" style:parent-style-name="Normal" style:family="paragraph">
      <style:text-properties style:font-name="Times New Roman" style:font-name-complex="Times New Roman" fo:font-size="14pt" style:font-size-asian="14pt" style:font-size-complex="14pt"/>
    </style:style>
    <style:style style:name="T2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8" style:parent-style-name="DefaultParagraphFont" style:family="text">
      <style:text-properties style:font-name="Times New Roman" style:font-name-complex="Times New Roman" fo:font-size="14pt" style:font-size-asian="14pt" style:font-size-complex="14pt"/>
    </style:style>
    <style:style style:name="T2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21" style:parent-style-name="Normal" style:family="paragraph">
      <style:text-properties style:font-name="Times New Roman" style:font-name-complex="Times New Roman" fo:font-size="14pt" style:font-size-asian="14pt" style:font-size-complex="14pt"/>
    </style:style>
    <style:style style:name="P222" style:parent-style-name="Normal" style:family="paragraph">
      <style:text-properties style:font-name="Times New Roman" style:font-name-complex="Times New Roman" fo:font-size="14pt" style:font-size-asian="14pt" style:font-size-complex="14pt"/>
    </style:style>
    <style:style style:name="TableColumn224" style:family="table-column">
      <style:table-column-properties style:column-width="2.7312in"/>
    </style:style>
    <style:style style:name="Table223" style:family="table">
      <style:table-properties style:width="2.7312in" fo:margin-left="0in" table:align="left"/>
    </style:style>
    <style:style style:name="TableRow225" style:family="table-row">
      <style:table-row-properties/>
    </style:style>
    <style:style style:name="TableCell22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227" style:parent-style-name="DefaultParagraphFont" style:family="text">
      <style:text-properties style:font-name="Times New Roman" style:font-name-complex="Times New Roman" fo:font-size="14pt" style:font-size-asian="14pt" style:font-size-complex="14pt"/>
    </style:style>
    <style:style style:name="T2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9" style:parent-style-name="DefaultParagraphFont" style:family="text">
      <style:text-properties style:font-name="Times New Roman" style:font-name-complex="Times New Roman" fo:font-size="14pt" style:font-size-asian="14pt" style:font-size-complex="14pt"/>
    </style:style>
    <style:style style:name="T2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31" style:parent-style-name="Normal" style:family="paragraph">
      <style:text-properties style:font-name="Times New Roman" style:font-name-complex="Times New Roman" fo:font-size="14pt" style:font-size-asian="14pt" style:font-size-complex="14pt"/>
    </style:style>
    <style:style style:name="TableColumn233" style:family="table-column">
      <style:table-column-properties style:column-width="2.9298in"/>
    </style:style>
    <style:style style:name="TableColumn234" style:family="table-column">
      <style:table-column-properties style:column-width="3.5506in"/>
    </style:style>
    <style:style style:name="Table232" style:family="table">
      <style:table-properties style:width="6.4805in" fo:margin-left="0in" table:align="left"/>
    </style:style>
    <style:style style:name="TableRow235" style:family="table-row">
      <style:table-row-properties/>
    </style:style>
    <style:style style:name="TableCell23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37" style:parent-style-name="Normal" style:family="paragraph">
      <style:text-properties style:font-name="Times New Roman" style:font-name-complex="Times New Roman" fo:font-size="14pt" style:font-size-asian="14pt" style:font-size-complex="14pt"/>
    </style:style>
    <style:style style:name="P238" style:parent-style-name="Normal" style:family="paragraph">
      <style:text-properties style:font-name="Times New Roman" style:font-name-complex="Times New Roman" fo:font-size="14pt" style:font-size-asian="14pt" style:font-size-complex="14pt"/>
    </style:style>
    <style:style style:name="TableCell239"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40" style:parent-style-name="Normal" style:family="paragraph">
      <style:text-properties style:font-name="Times New Roman" style:font-name-complex="Times New Roman" fo:font-size="14pt" style:font-size-asian="14pt" style:font-size-complex="14pt"/>
    </style:style>
    <style:style style:name="P241" style:parent-style-name="Normal" style:family="paragraph">
      <style:text-properties style:font-name="Times New Roman" style:font-name-complex="Times New Roman" fo:font-size="14pt" style:font-size-asian="14pt" style:font-size-complex="14pt"/>
    </style:style>
    <style:style style:name="TableRow242" style:family="table-row">
      <style:table-row-properties/>
    </style:style>
    <style:style style:name="TableCell24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44" style:parent-style-name="Normal" style:family="paragraph">
      <style:text-properties style:font-name="Times New Roman" style:font-name-complex="Times New Roman" fo:font-size="14pt" style:font-size-asian="14pt" style:font-size-complex="14pt"/>
    </style:style>
    <style:style style:name="P245" style:parent-style-name="Normal" style:family="paragraph">
      <style:text-properties style:font-name="Times New Roman" style:font-name-complex="Times New Roman" fo:font-size="14pt" style:font-size-asian="14pt" style:font-size-complex="14pt"/>
    </style:style>
    <style:style style:name="TableCell24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247" style:parent-style-name="Normal" style:family="paragraph">
      <style:text-properties style:font-name="Times New Roman" style:font-name-complex="Times New Roman" fo:font-size="14pt" style:font-size-asian="14pt" style:font-size-complex="14pt"/>
    </style:style>
    <style:style style:name="P248" style:parent-style-name="Normal" style:family="paragraph">
      <style:text-properties style:font-name="Times New Roman" style:font-name-complex="Times New Roman" fo:font-size="14pt" style:font-size-asian="14pt" style:font-size-complex="14pt"/>
    </style:style>
    <style:style style:name="P249" style:parent-style-name="Normal" style:family="paragraph">
      <style:text-properties style:font-name="Times New Roman" style:font-name-complex="Times New Roman" fo:font-size="14pt" style:font-size-asian="14pt" style:font-size-complex="14pt"/>
    </style:style>
    <style:style style:name="P250" style:parent-style-name="Normal" style:family="paragraph">
      <style:text-properties style:font-name="Times New Roman" style:font-name-complex="Times New Roman" fo:font-size="14pt" style:font-size-asian="14pt" style:font-size-complex="14pt"/>
    </style:style>
    <style:style style:name="T2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2" style:parent-style-name="DefaultParagraphFont" style:family="text">
      <style:text-properties style:font-name="Times New Roman" style:font-name-complex="Times New Roman" fo:font-size="14pt" style:font-size-asian="14pt" style:font-size-complex="14pt"/>
    </style:style>
    <style:style style:name="T2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55" style:parent-style-name="Normal" style:family="paragraph">
      <style:text-properties style:font-name="Times New Roman" style:font-name-complex="Times New Roman" fo:font-size="14pt" style:font-size-asian="14pt" style:font-size-complex="14pt"/>
    </style:style>
    <style:style style:name="P256" style:parent-style-name="Normal" style:family="paragraph">
      <style:text-properties style:font-name="Times New Roman" style:font-name-complex="Times New Roman" fo:font-size="14pt" style:font-size-asian="14pt" style:font-size-complex="14pt"/>
    </style:style>
    <style:style style:name="P257" style:parent-style-name="Normal" style:family="paragraph">
      <style:text-properties style:font-name="Times New Roman" style:font-name-complex="Times New Roman" fo:font-size="14pt" style:font-size-asian="14pt" style:font-size-complex="14pt"/>
    </style:style>
    <style:style style:name="T2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9" style:parent-style-name="DefaultParagraphFont" style:family="text">
      <style:text-properties style:font-name="Times New Roman" style:font-name-complex="Times New Roman" fo:font-size="14pt" style:font-size-asian="14pt" style:font-size-complex="14pt"/>
    </style:style>
    <style:style style:name="T2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62" style:parent-style-name="Normal" style:family="paragraph">
      <style:text-properties style:font-name="Times New Roman" style:font-name-complex="Times New Roman" fo:font-size="14pt" style:font-size-asian="14pt" style:font-size-complex="14pt"/>
    </style:style>
    <style:style style:name="T263" style:parent-style-name="DefaultParagraphFont" style:family="text">
      <style:text-properties style:font-name="Times New Roman" style:font-name-complex="Times New Roman" fo:font-size="14pt" style:font-size-asian="14pt" style:font-size-complex="14pt"/>
    </style:style>
    <style:style style:name="P264" style:parent-style-name="Normal" style:family="paragraph">
      <style:text-properties style:font-name="Times New Roman" style:font-name-complex="Times New Roman" fo:font-size="14pt" style:font-size-asian="14pt" style:font-size-complex="14pt"/>
    </style:style>
    <style:style style:name="P265" style:parent-style-name="Normal" style:family="paragraph">
      <style:text-properties style:font-name="Times New Roman" style:font-name-complex="Times New Roman" fo:font-size="14pt" style:font-size-asian="14pt" style:font-size-complex="14pt"/>
    </style:style>
    <style:style style:name="P266" style:parent-style-name="Normal" style:family="paragraph">
      <style:text-properties style:font-name="Times New Roman" style:font-name-complex="Times New Roman" fo:font-size="14pt" style:font-size-asian="14pt" style:font-size-complex="14pt"/>
    </style:style>
    <style:style style:name="T2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8" style:parent-style-name="DefaultParagraphFont" style:family="text">
      <style:text-properties style:font-name="Times New Roman" style:font-name-complex="Times New Roman" fo:font-size="14pt" style:font-size-asian="14pt" style:font-size-complex="14pt"/>
    </style:style>
    <style:style style:name="T2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70" style:parent-style-name="Normal" style:family="paragraph">
      <style:text-properties style:font-name="Times New Roman" style:font-name-complex="Times New Roman" fo:font-size="14pt" style:font-size-asian="14pt" style:font-size-complex="14pt"/>
    </style:style>
    <style:style style:name="T2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73" style:parent-style-name="Normal" style:family="paragraph">
      <style:text-properties style:font-name="Times New Roman" style:font-name-complex="Times New Roman" fo:font-size="14pt" style:font-size-asian="14pt" style:font-size-complex="14pt"/>
    </style:style>
    <style:style style:name="P274" style:parent-style-name="Normal" style:family="paragraph">
      <style:text-properties style:font-name="Times New Roman" style:font-name-complex="Times New Roman" fo:font-size="14pt" style:font-size-asian="14pt" style:font-size-complex="14pt"/>
    </style:style>
    <style:style style:name="P275" style:parent-style-name="Normal" style:family="paragraph">
      <style:text-properties style:font-name="Times New Roman" style:font-name-complex="Times New Roman" fo:font-size="14pt" style:font-size-asian="14pt" style:font-size-complex="14pt"/>
    </style:style>
    <style:style style:name="T2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77" style:parent-style-name="DefaultParagraphFont" style:family="text">
      <style:text-properties style:font-name="Times New Roman" style:font-name-complex="Times New Roman" fo:font-size="14pt" style:font-size-asian="14pt" style:font-size-complex="14pt"/>
    </style:style>
    <style:style style:name="T2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79" style:parent-style-name="Normal" style:family="paragraph">
      <style:text-properties style:font-name="Times New Roman" style:font-name-complex="Times New Roman" fo:font-size="14pt" style:font-size-asian="14pt" style:font-size-complex="14pt"/>
    </style:style>
    <style:style style:name="P280" style:parent-style-name="Normal" style:family="paragraph">
      <style:text-properties style:font-name="Times New Roman" style:font-name-complex="Times New Roman" fo:font-size="14pt" style:font-size-asian="14pt" style:font-size-complex="14pt"/>
    </style:style>
    <style:style style:name="T2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83" style:parent-style-name="Normal" style:family="paragraph">
      <style:text-properties style:font-name="Times New Roman" style:font-name-complex="Times New Roman" fo:font-size="14pt" style:font-size-asian="14pt" style:font-size-complex="14pt"/>
    </style:style>
    <style:style style:name="P284" style:parent-style-name="Normal" style:family="paragraph">
      <style:text-properties style:font-name="Times New Roman" style:font-name-complex="Times New Roman" fo:font-size="14pt" style:font-size-asian="14pt" style:font-size-complex="14pt"/>
    </style:style>
    <style:style style:name="P285" style:parent-style-name="Normal" style:family="paragraph">
      <style:text-properties style:font-name="Times New Roman" style:font-name-complex="Times New Roman" fo:font-size="14pt" style:font-size-asian="14pt" style:font-size-complex="14pt"/>
    </style:style>
    <style:style style:name="T2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7" style:parent-style-name="DefaultParagraphFont" style:family="text">
      <style:text-properties style:font-name="Times New Roman" style:font-name-complex="Times New Roman" fo:font-size="14pt" style:font-size-asian="14pt" style:font-size-complex="14pt"/>
    </style:style>
    <style:style style:name="T2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89" style:parent-style-name="Normal" style:family="paragraph">
      <style:text-properties style:font-name="Times New Roman" style:font-name-complex="Times New Roman" fo:font-size="14pt" style:font-size-asian="14pt" style:font-size-complex="14pt"/>
    </style:style>
    <style:style style:name="T290" style:parent-style-name="DefaultParagraphFont" style:family="text">
      <style:text-properties style:font-name="Times New Roman" style:font-name-complex="Times New Roman" fo:font-size="14pt" style:font-size-asian="14pt" style:font-size-complex="14pt"/>
    </style:style>
    <style:style style:name="T2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92" style:parent-style-name="DefaultParagraphFont" style:family="text">
      <style:text-properties style:font-name="Times New Roman" style:font-name-complex="Times New Roman" fo:font-size="14pt" style:font-size-asian="14pt" style:font-size-complex="14pt"/>
    </style:style>
    <style:style style:name="T293" style:parent-style-name="DefaultParagraphFont" style:family="text">
      <style:text-properties style:font-name="Times New Roman" style:font-name-complex="Times New Roman" fo:font-size="14pt" style:font-size-asian="14pt" style:font-size-complex="14pt"/>
    </style:style>
    <style:style style:name="T2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96" style:parent-style-name="Normal" style:family="paragraph">
      <style:text-properties style:font-name="Times New Roman" style:font-name-complex="Times New Roman" fo:font-size="14pt" style:font-size-asian="14pt" style:font-size-complex="14pt"/>
    </style:style>
    <style:style style:name="P297" style:parent-style-name="Normal" style:family="paragraph">
      <style:text-properties style:font-name="Times New Roman" style:font-name-complex="Times New Roman" fo:font-size="14pt" style:font-size-asian="14pt" style:font-size-complex="14pt"/>
    </style:style>
    <style:style style:name="P298" style:parent-style-name="Normal" style:family="paragraph">
      <style:text-properties style:font-name="Times New Roman" style:font-name-complex="Times New Roman" fo:font-size="14pt" style:font-size-asian="14pt" style:font-size-complex="14pt"/>
    </style:style>
    <style:style style:name="T2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0" style:parent-style-name="DefaultParagraphFont" style:family="text">
      <style:text-properties style:font-name="Times New Roman" style:font-name-complex="Times New Roman" fo:font-size="14pt" style:font-size-asian="14pt" style:font-size-complex="14pt"/>
    </style:style>
    <style:style style:name="T3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02" style:parent-style-name="Normal" style:family="paragraph">
      <style:text-properties style:font-name="Times New Roman" style:font-name-complex="Times New Roman" fo:font-size="14pt" style:font-size-asian="14pt" style:font-size-complex="14pt"/>
    </style:style>
    <style:style style:name="T303" style:parent-style-name="DefaultParagraphFont" style:family="text">
      <style:text-properties style:font-name="Times New Roman" style:font-name-complex="Times New Roman" fo:font-size="14pt" style:font-size-asian="14pt" style:font-size-complex="14pt"/>
    </style:style>
    <style:style style:name="T3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06" style:parent-style-name="Normal" style:family="paragraph">
      <style:text-properties style:font-name="Times New Roman" style:font-name-complex="Times New Roman" fo:font-size="14pt" style:font-size-asian="14pt" style:font-size-complex="14pt"/>
    </style:style>
    <style:style style:name="P307" style:parent-style-name="Normal" style:family="paragraph">
      <style:text-properties style:font-name="Times New Roman" style:font-name-complex="Times New Roman" fo:font-size="14pt" style:font-size-asian="14pt" style:font-size-complex="14pt"/>
    </style:style>
    <style:style style:name="P308" style:parent-style-name="Normal" style:family="paragraph">
      <style:text-properties style:font-name="Times New Roman" style:font-name-complex="Times New Roman" fo:font-size="14pt" style:font-size-asian="14pt" style:font-size-complex="14pt"/>
    </style:style>
    <style:style style:name="T3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0" style:parent-style-name="DefaultParagraphFont" style:family="text">
      <style:text-properties style:font-name="Times New Roman" style:font-name-complex="Times New Roman" fo:font-size="14pt" style:font-size-asian="14pt" style:font-size-complex="14pt"/>
    </style:style>
    <style:style style:name="T3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12" style:parent-style-name="Normal" style:family="paragraph">
      <style:text-properties style:font-name="Times New Roman" style:font-name-complex="Times New Roman" fo:font-size="14pt" style:font-size-asian="14pt" style:font-size-complex="14pt"/>
    </style:style>
    <style:style style:name="P313"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3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16" style:parent-style-name="Normal" style:family="paragraph">
      <style:text-properties style:font-name="Times New Roman" style:font-name-complex="Times New Roman" fo:font-size="14pt" style:font-size-asian="14pt" style:font-size-complex="14pt"/>
    </style:style>
    <style:style style:name="P317" style:parent-style-name="Normal" style:family="paragraph">
      <style:text-properties style:font-name="Times New Roman" style:font-name-complex="Times New Roman" fo:font-size="14pt" style:font-size-asian="14pt" style:font-size-complex="14pt"/>
    </style:style>
    <style:style style:name="P318" style:parent-style-name="Normal" style:family="paragraph">
      <style:text-properties style:font-name="Times New Roman" style:font-name-complex="Times New Roman" fo:font-size="14pt" style:font-size-asian="14pt" style:font-size-complex="14pt"/>
    </style:style>
    <style:style style:name="T3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0" style:parent-style-name="DefaultParagraphFont" style:family="text">
      <style:text-properties style:font-name="Times New Roman" style:font-name-complex="Times New Roman" fo:font-size="14pt" style:font-size-asian="14pt" style:font-size-complex="14pt"/>
    </style:style>
    <style:style style:name="T3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2" style:parent-style-name="DefaultParagraphFont" style:family="text">
      <style:text-properties style:font-name="Times New Roman" style:font-name-complex="Times New Roman" fo:font-size="14pt" style:font-size-asian="14pt" style:font-size-complex="14pt"/>
    </style:style>
    <style:style style:name="T3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4" style:parent-style-name="DefaultParagraphFont" style:family="text">
      <style:text-properties style:font-name="Times New Roman" style:font-name-complex="Times New Roman" fo:font-size="14pt" style:font-size-asian="14pt" style:font-size-complex="14pt"/>
    </style:style>
    <style:style style:name="T325" style:parent-style-name="DefaultParagraphFont" style:family="text">
      <style:text-properties style:font-name="Times New Roman" style:font-name-complex="Times New Roman" fo:font-size="14pt" style:font-size-asian="14pt" style:font-size-complex="14pt"/>
    </style:style>
    <style:style style:name="T3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28" style:parent-style-name="Normal" style:family="paragraph">
      <style:text-properties style:font-name="Times New Roman" style:font-name-complex="Times New Roman" fo:font-size="14pt" style:font-size-asian="14pt" style:font-size-complex="14pt"/>
    </style:style>
    <style:style style:name="T329" style:parent-style-name="DefaultParagraphFont" style:family="text">
      <style:text-properties style:font-name="Times New Roman" style:font-name-complex="Times New Roman" fo:font-size="14pt" style:font-size-asian="14pt" style:font-size-complex="14pt"/>
    </style:style>
    <style:style style:name="P330" style:parent-style-name="Normal" style:family="paragraph">
      <style:text-properties style:font-name="Times New Roman" style:font-name-complex="Times New Roman" fo:font-size="14pt" style:font-size-asian="14pt" style:font-size-complex="14pt"/>
    </style:style>
    <style:style style:name="P331" style:parent-style-name="Normal" style:family="paragraph">
      <style:text-properties style:font-name="Times New Roman" style:font-name-complex="Times New Roman" fo:font-size="14pt" style:font-size-asian="14pt" style:font-size-complex="14pt"/>
    </style:style>
    <style:style style:name="P332" style:parent-style-name="Normal" style:family="paragraph">
      <style:text-properties style:font-name="Times New Roman" style:font-name-complex="Times New Roman" fo:font-size="14pt" style:font-size-asian="14pt" style:font-size-complex="14pt"/>
    </style:style>
    <style:style style:name="P333" style:parent-style-name="Normal" style:family="paragraph">
      <style:text-properties style:font-name="Times New Roman" style:font-name-complex="Times New Roman" fo:font-size="14pt" style:font-size-asian="14pt" style:font-size-complex="14pt"/>
    </style:style>
    <style:style style:name="T3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35" style:parent-style-name="DefaultParagraphFont" style:family="text">
      <style:text-properties style:font-name="Times New Roman" style:font-name-complex="Times New Roman" fo:font-size="14pt" style:font-size-asian="14pt" style:font-size-complex="14pt"/>
    </style:style>
    <style:style style:name="T3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37" style:parent-style-name="Normal" style:family="paragraph">
      <style:text-properties style:font-name="Times New Roman" style:font-name-complex="Times New Roman" fo:font-size="14pt" style:font-size-asian="14pt" style:font-size-complex="14pt"/>
    </style:style>
    <style:style style:name="P338" style:parent-style-name="Normal" style:family="paragraph">
      <style:text-properties style:font-name="Times New Roman" style:font-name-complex="Times New Roman" fo:font-size="14pt" style:font-size-asian="14pt" style:font-size-complex="14pt"/>
    </style:style>
    <style:style style:name="T3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41" style:parent-style-name="Normal" style:family="paragraph">
      <style:text-properties style:font-name="Times New Roman" style:font-name-complex="Times New Roman" fo:font-size="14pt" style:font-size-asian="14pt" style:font-size-complex="14pt"/>
    </style:style>
    <style:style style:name="T342" style:parent-style-name="DefaultParagraphFont" style:family="text">
      <style:text-properties style:font-name="Times New Roman" style:font-name-complex="Times New Roman" fo:font-size="14pt" style:font-size-asian="14pt" style:font-size-complex="14pt"/>
    </style:style>
    <style:style style:name="P343" style:parent-style-name="Normal" style:family="paragraph">
      <style:text-properties style:font-name="Times New Roman" style:font-name-complex="Times New Roman" fo:font-size="14pt" style:font-size-asian="14pt" style:font-size-complex="14pt"/>
    </style:style>
    <style:style style:name="T344" style:parent-style-name="DefaultParagraphFont" style:family="text">
      <style:text-properties style:font-name="Times New Roman" style:font-name-complex="Times New Roman" fo:font-size="14pt" style:font-size-asian="14pt" style:font-size-complex="14pt" fo:language="it" fo:country="IT"/>
    </style:style>
    <style:style style:name="T345" style:parent-style-name="DefaultParagraphFont" style:family="text">
      <style:text-properties style:font-name="Times New Roman" style:font-name-complex="Times New Roman" fo:font-size="14pt" style:font-size-asian="14pt" style:font-size-complex="14pt"/>
    </style:style>
    <style:style style:name="T346" style:parent-style-name="DefaultParagraphFont" style:family="text">
      <style:text-properties style:font-name="Times New Roman" style:font-name-complex="Times New Roman" fo:font-size="14pt" style:font-size-asian="14pt" style:font-size-complex="14pt" fo:language="it" fo:country="IT"/>
    </style:style>
    <style:style style:name="T347" style:parent-style-name="DefaultParagraphFont" style:family="text">
      <style:text-properties style:font-name="Times New Roman" style:font-name-complex="Times New Roman" fo:font-size="14pt" style:font-size-asian="14pt" style:font-size-complex="14pt" fo:language="it" fo:country="IT"/>
    </style:style>
    <style:style style:name="T348" style:parent-style-name="DefaultParagraphFont" style:family="text">
      <style:text-properties style:font-name="Times New Roman" style:font-name-complex="Times New Roman" fo:font-size="14pt" style:font-size-asian="14pt" style:font-size-complex="14pt"/>
    </style:style>
    <style:style style:name="T349" style:parent-style-name="DefaultParagraphFont" style:family="text">
      <style:text-properties style:font-name="Times New Roman" style:font-name-complex="Times New Roman" fo:font-size="14pt" style:font-size-asian="14pt" style:font-size-complex="14pt" fo:language="it" fo:country="IT"/>
    </style:style>
    <style:style style:name="T350" style:parent-style-name="DefaultParagraphFont" style:family="text">
      <style:text-properties style:font-name="Times New Roman" style:font-name-complex="Times New Roman" fo:font-size="14pt" style:font-size-asian="14pt" style:font-size-complex="14pt" fo:language="it" fo:country="IT"/>
    </style:style>
    <style:style style:name="T351" style:parent-style-name="DefaultParagraphFont" style:family="text">
      <style:text-properties style:font-name="Times New Roman" style:font-name-complex="Times New Roman" fo:font-size="14pt" style:font-size-asian="14pt" style:font-size-complex="14pt" fo:language="it" fo:country="IT"/>
    </style:style>
    <style:style style:name="T352" style:parent-style-name="DefaultParagraphFont" style:family="text">
      <style:text-properties style:font-name="Times New Roman" style:font-name-complex="Times New Roman" fo:font-size="14pt" style:font-size-asian="14pt" style:font-size-complex="14pt"/>
    </style:style>
    <style:style style:name="T353" style:parent-style-name="DefaultParagraphFont" style:family="text">
      <style:text-properties style:font-name="Times New Roman" style:font-name-complex="Times New Roman" fo:font-size="14pt" style:font-size-asian="14pt" style:font-size-complex="14pt" fo:language="it" fo:country="IT"/>
    </style:style>
    <style:style style:name="P354" style:parent-style-name="Normal" style:family="paragraph">
      <style:text-properties style:font-name="Times New Roman" style:font-name-complex="Times New Roman" fo:font-size="14pt" style:font-size-asian="14pt" style:font-size-complex="14pt" fo:language="it" fo:country="IT"/>
    </style:style>
    <style:style style:name="P355" style:parent-style-name="Normal" style:family="paragraph">
      <style:text-properties style:font-name="Times New Roman" style:font-name-complex="Times New Roman" fo:font-size="14pt" style:font-size-asian="14pt" style:font-size-complex="14pt"/>
    </style:style>
    <style:style style:name="P356" style:parent-style-name="Normal" style:family="paragraph">
      <style:text-properties style:font-name="Times New Roman" style:font-name-complex="Times New Roman" fo:font-size="14pt" style:font-size-asian="14pt" style:font-size-complex="14pt"/>
    </style:style>
    <style:style style:name="T3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58" style:parent-style-name="DefaultParagraphFont" style:family="text">
      <style:text-properties style:font-name="Times New Roman" style:font-name-complex="Times New Roman" fo:font-size="14pt" style:font-size-asian="14pt" style:font-size-complex="14pt"/>
    </style:style>
    <style:style style:name="T3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60" style:parent-style-name="Normal" style:family="paragraph">
      <style:text-properties style:font-name="Times New Roman" style:font-name-complex="Times New Roman" fo:font-size="14pt" style:font-size-asian="14pt" style:font-size-complex="14pt"/>
    </style:style>
    <style:style style:name="T3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63" style:parent-style-name="Normal" style:family="paragraph">
      <style:text-properties style:font-name="Times New Roman" style:font-name-complex="Times New Roman" fo:font-size="14pt" style:font-size-asian="14pt" style:font-size-complex="14pt"/>
    </style:style>
    <style:style style:name="P364" style:parent-style-name="Normal" style:family="paragraph">
      <style:text-properties style:font-name="Times New Roman" style:font-name-complex="Times New Roman" fo:font-size="14pt" style:font-size-asian="14pt" style:font-size-complex="14pt"/>
    </style:style>
    <style:style style:name="P365" style:parent-style-name="Normal" style:family="paragraph">
      <style:text-properties style:font-name="Times New Roman" style:font-name-complex="Times New Roman" fo:font-size="14pt" style:font-size-asian="14pt" style:font-size-complex="14pt"/>
    </style:style>
    <style:style style:name="T3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67" style:parent-style-name="DefaultParagraphFont" style:family="text">
      <style:text-properties style:font-name="Times New Roman" style:font-name-complex="Times New Roman" fo:font-size="14pt" style:font-size-asian="14pt" style:font-size-complex="14pt"/>
    </style:style>
    <style:style style:name="T3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69" style:parent-style-name="Normal" style:family="paragraph">
      <style:text-properties style:font-name="Times New Roman" style:font-name-complex="Times New Roman" fo:font-size="14pt" style:font-size-asian="14pt" style:font-size-complex="14pt"/>
    </style:style>
    <style:style style:name="T3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72" style:parent-style-name="Normal" style:family="paragraph">
      <style:text-properties style:font-name="Times New Roman" style:font-name-complex="Times New Roman" fo:font-size="14pt" style:font-size-asian="14pt" style:font-size-complex="14pt"/>
    </style:style>
    <style:style style:name="T373" style:parent-style-name="DefaultParagraphFont" style:family="text">
      <style:text-properties style:font-name="Times New Roman" style:font-name-complex="Times New Roman" fo:font-size="14pt" style:font-size-asian="14pt" style:font-size-complex="14pt"/>
    </style:style>
    <style:style style:name="P374" style:parent-style-name="Normal" style:family="paragraph">
      <style:text-properties style:font-name="Times New Roman" style:font-name-complex="Times New Roman" fo:font-size="14pt" style:font-size-asian="14pt" style:font-size-complex="14pt"/>
    </style:style>
    <style:style style:name="T375" style:parent-style-name="DefaultParagraphFont" style:family="text">
      <style:text-properties style:font-name="Times New Roman" style:font-name-complex="Times New Roman" fo:font-size="14pt" style:font-size-asian="14pt" style:font-size-complex="14pt"/>
    </style:style>
    <style:style style:name="T3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77" style:parent-style-name="DefaultParagraphFont" style:family="text">
      <style:text-properties style:font-name="Times New Roman" style:font-name-complex="Times New Roman" fo:font-size="14pt" style:font-size-asian="14pt" style:font-size-complex="14pt"/>
    </style:style>
    <style:style style:name="T3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79" style:parent-style-name="DefaultParagraphFont" style:family="text">
      <style:text-properties style:font-name="Times New Roman" style:font-name-complex="Times New Roman" fo:font-size="14pt" style:font-size-asian="14pt" style:font-size-complex="14pt"/>
    </style:style>
    <style:style style:name="T380" style:parent-style-name="DefaultParagraphFont" style:family="text">
      <style:text-properties style:font-name="Times New Roman" style:font-name-complex="Times New Roman" fo:font-size="14pt" style:font-size-asian="14pt" style:font-size-complex="14pt"/>
    </style:style>
    <style:style style:name="T3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2" style:parent-style-name="DefaultParagraphFont" style:family="text">
      <style:text-properties style:font-name="Times New Roman" style:font-name-complex="Times New Roman" fo:font-size="14pt" style:font-size-asian="14pt" style:font-size-complex="14pt"/>
    </style:style>
    <style:style style:name="T3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4" style:parent-style-name="DefaultParagraphFont" style:family="text">
      <style:text-properties style:font-name="Times New Roman" style:font-name-complex="Times New Roman" fo:font-size="14pt" style:font-size-asian="14pt" style:font-size-complex="14pt"/>
    </style:style>
    <style:style style:name="T385" style:parent-style-name="DefaultParagraphFont" style:family="text">
      <style:text-properties style:font-name="Times New Roman" style:font-name-complex="Times New Roman" fo:font-size="14pt" style:font-size-asian="14pt" style:font-size-complex="14pt"/>
    </style:style>
    <style:style style:name="T3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7" style:parent-style-name="DefaultParagraphFont" style:family="text">
      <style:text-properties style:font-name="Times New Roman" style:font-name-complex="Times New Roman" fo:font-size="14pt" style:font-size-asian="14pt" style:font-size-complex="14pt"/>
    </style:style>
    <style:style style:name="T388" style:parent-style-name="DefaultParagraphFont" style:family="text">
      <style:text-properties style:font-name="Times New Roman" style:font-name-complex="Times New Roman" fo:font-size="14pt" style:font-size-asian="14pt" style:font-size-complex="14pt"/>
    </style:style>
    <style:style style:name="T3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90" style:parent-style-name="DefaultParagraphFont" style:family="text">
      <style:text-properties style:font-name="Times New Roman" style:font-name-complex="Times New Roman" fo:font-size="14pt" style:font-size-asian="14pt" style:font-size-complex="14pt"/>
    </style:style>
    <style:style style:name="T3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92" style:parent-style-name="DefaultParagraphFont" style:family="text">
      <style:text-properties style:font-name="Times New Roman" style:font-name-complex="Times New Roman" fo:font-size="14pt" style:font-size-asian="14pt" style:font-size-complex="14pt"/>
    </style:style>
    <style:style style:name="T3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94" style:parent-style-name="DefaultParagraphFont" style:family="text">
      <style:text-properties style:font-name="Times New Roman" style:font-name-complex="Times New Roman" fo:font-size="14pt" style:font-size-asian="14pt" style:font-size-complex="14pt"/>
    </style:style>
    <style:style style:name="T395" style:parent-style-name="DefaultParagraphFont" style:family="text">
      <style:text-properties style:font-name="Times New Roman" style:font-name-complex="Times New Roman" fo:font-size="14pt" style:font-size-asian="14pt" style:font-size-complex="14pt"/>
    </style:style>
    <style:style style:name="T3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97" style:parent-style-name="DefaultParagraphFont" style:family="text">
      <style:text-properties style:font-name="Times New Roman" style:font-name-complex="Times New Roman" fo:font-size="14pt" style:font-size-asian="14pt" style:font-size-complex="14pt"/>
    </style:style>
    <style:style style:name="T3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99" style:parent-style-name="DefaultParagraphFont" style:family="text">
      <style:text-properties style:font-name="Times New Roman" style:font-name-complex="Times New Roman" fo:font-size="14pt" style:font-size-asian="14pt" style:font-size-complex="14pt"/>
    </style:style>
    <style:style style:name="P400" style:parent-style-name="Normal" style:family="paragraph">
      <style:text-properties style:font-name="Times New Roman" style:font-name-complex="Times New Roman" fo:font-size="14pt" style:font-size-asian="14pt" style:font-size-complex="14pt"/>
    </style:style>
    <style:style style:name="T4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02" style:parent-style-name="DefaultParagraphFont" style:family="text">
      <style:text-properties style:font-name="Times New Roman" style:font-name-complex="Times New Roman" fo:font-size="14pt" style:font-size-asian="14pt" style:font-size-complex="14pt"/>
    </style:style>
    <style:style style:name="T4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04" style:parent-style-name="Normal" style:family="paragraph">
      <style:text-properties style:font-name="Times New Roman" style:font-name-complex="Times New Roman" fo:font-size="14pt" style:font-size-asian="14pt" style:font-size-complex="14pt"/>
    </style:style>
    <style:style style:name="T405" style:parent-style-name="DefaultParagraphFont" style:family="text">
      <style:text-properties style:font-name="Times New Roman" style:font-name-complex="Times New Roman" fo:font-size="14pt" style:font-size-asian="14pt" style:font-size-complex="14pt"/>
    </style:style>
    <style:style style:name="P406" style:parent-style-name="Normal" style:family="paragraph">
      <style:text-properties style:font-name="Times New Roman" style:font-name-complex="Times New Roman" fo:font-size="14pt" style:font-size-asian="14pt" style:font-size-complex="14pt"/>
    </style:style>
    <style:style style:name="T407" style:parent-style-name="DefaultParagraphFont" style:family="text">
      <style:text-properties style:font-name="Times New Roman" style:font-name-complex="Times New Roman" fo:font-size="14pt" style:font-size-asian="14pt" style:font-size-complex="14pt"/>
    </style:style>
    <style:style style:name="T4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10" style:parent-style-name="Normal" style:family="paragraph">
      <style:text-properties style:font-name="Times New Roman" style:font-name-complex="Times New Roman" fo:font-size="14pt" style:font-size-asian="14pt" style:font-size-complex="14pt"/>
    </style:style>
    <style:style style:name="P411" style:parent-style-name="Normal" style:family="paragraph">
      <style:text-properties style:font-name="Times New Roman" style:font-name-complex="Times New Roman" fo:font-size="14pt" style:font-size-asian="14pt" style:font-size-complex="14pt"/>
    </style:style>
    <style:style style:name="P412" style:parent-style-name="Normal" style:family="paragraph">
      <style:text-properties style:font-name="Times New Roman" style:font-name-complex="Times New Roman" fo:font-size="14pt" style:font-size-asian="14pt" style:font-size-complex="14pt"/>
    </style:style>
    <style:style style:name="T4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14" style:parent-style-name="DefaultParagraphFont" style:family="text">
      <style:text-properties style:font-name="Times New Roman" style:font-name-complex="Times New Roman" fo:font-size="14pt" style:font-size-asian="14pt" style:font-size-complex="14pt"/>
    </style:style>
    <style:style style:name="T4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16" style:parent-style-name="Normal" style:family="paragraph">
      <style:text-properties style:font-name="Times New Roman" style:font-name-complex="Times New Roman" fo:font-size="14pt" style:font-size-asian="14pt" style:font-size-complex="14pt"/>
    </style:style>
    <style:style style:name="T417" style:parent-style-name="DefaultParagraphFont" style:family="text">
      <style:text-properties style:font-name="Times New Roman" style:font-name-complex="Times New Roman" fo:font-size="14pt" style:font-size-asian="14pt" style:font-size-complex="14pt"/>
    </style:style>
    <style:style style:name="T4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20" style:parent-style-name="Normal" style:family="paragraph">
      <style:text-properties style:font-name="Times New Roman" style:font-name-complex="Times New Roman" fo:font-size="14pt" style:font-size-asian="14pt" style:font-size-complex="14pt"/>
    </style:style>
    <style:style style:name="P421" style:parent-style-name="Normal" style:family="paragraph">
      <style:text-properties style:font-name="Times New Roman" style:font-name-complex="Times New Roman" fo:font-size="14pt" style:font-size-asian="14pt" style:font-size-complex="14pt"/>
    </style:style>
    <style:style style:name="P422" style:parent-style-name="Normal" style:family="paragraph">
      <style:text-properties style:font-name="Times New Roman" style:font-name-complex="Times New Roman" fo:font-size="14pt" style:font-size-asian="14pt" style:font-size-complex="14pt"/>
    </style:style>
    <style:style style:name="T4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4" style:parent-style-name="DefaultParagraphFont" style:family="text">
      <style:text-properties style:font-name="Times New Roman" style:font-name-complex="Times New Roman" fo:font-size="14pt" style:font-size-asian="14pt" style:font-size-complex="14pt"/>
    </style:style>
    <style:style style:name="T4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26" style:parent-style-name="Normal" style:family="paragraph">
      <style:text-properties style:font-name="Times New Roman" style:font-name-complex="Times New Roman" fo:font-size="14pt" style:font-size-asian="14pt" style:font-size-complex="14pt"/>
    </style:style>
    <style:style style:name="T4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29" style:parent-style-name="Normal" style:family="paragraph">
      <style:text-properties style:font-name="Times New Roman" style:font-name-complex="Times New Roman" fo:font-size="14pt" style:font-size-asian="14pt" style:font-size-complex="14pt"/>
    </style:style>
    <style:style style:name="P430" style:parent-style-name="Normal" style:family="paragraph">
      <style:text-properties style:font-name="Times New Roman" style:font-name-complex="Times New Roman" fo:font-size="14pt" style:font-size-asian="14pt" style:font-size-complex="14pt"/>
    </style:style>
    <style:style style:name="P431" style:parent-style-name="Normal" style:family="paragraph">
      <style:text-properties style:font-name="Times New Roman" style:font-name-complex="Times New Roman" fo:font-size="14pt" style:font-size-asian="14pt" style:font-size-complex="14pt"/>
    </style:style>
    <style:style style:name="T4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33" style:parent-style-name="DefaultParagraphFont" style:family="text">
      <style:text-properties style:font-name="Times New Roman" style:font-name-complex="Times New Roman" fo:font-size="14pt" style:font-size-asian="14pt" style:font-size-complex="14pt"/>
    </style:style>
    <style:style style:name="T4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35" style:parent-style-name="Normal" style:family="paragraph">
      <style:text-properties style:font-name="Times New Roman" style:font-name-complex="Times New Roman" fo:font-size="14pt" style:font-size-asian="14pt" style:font-size-complex="14pt"/>
    </style:style>
    <style:style style:name="T436" style:parent-style-name="DefaultParagraphFont" style:family="text">
      <style:text-properties style:font-name="Times New Roman" style:font-name-complex="Times New Roman" fo:font-size="14pt" style:font-size-asian="14pt" style:font-size-complex="14pt"/>
    </style:style>
    <style:style style:name="T4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39" style:parent-style-name="Normal" style:family="paragraph">
      <style:text-properties style:font-name="Times New Roman" style:font-name-complex="Times New Roman" fo:font-size="14pt" style:font-size-asian="14pt" style:font-size-complex="14pt"/>
    </style:style>
    <style:style style:name="P440" style:parent-style-name="Normal" style:family="paragraph">
      <style:text-properties style:font-name="Times New Roman" style:font-name-complex="Times New Roman" fo:font-size="14pt" style:font-size-asian="14pt" style:font-size-complex="14pt"/>
    </style:style>
    <style:style style:name="P441" style:parent-style-name="Normal" style:family="paragraph">
      <style:text-properties style:font-name="Times New Roman" style:font-name-complex="Times New Roman" fo:font-size="14pt" style:font-size-asian="14pt" style:font-size-complex="14pt"/>
    </style:style>
    <style:style style:name="T4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43" style:parent-style-name="DefaultParagraphFont" style:family="text">
      <style:text-properties style:font-name="Times New Roman" style:font-name-complex="Times New Roman" fo:font-size="14pt" style:font-size-asian="14pt" style:font-size-complex="14pt"/>
    </style:style>
    <style:style style:name="T4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45" style:parent-style-name="Normal" style:family="paragraph">
      <style:text-properties style:font-name="Times New Roman" style:font-name-complex="Times New Roman" fo:font-size="14pt" style:font-size-asian="14pt" style:font-size-complex="14pt"/>
    </style:style>
    <style:style style:name="P446" style:parent-style-name="Normal" style:family="paragraph">
      <style:text-properties style:font-name="Times New Roman" style:font-name-complex="Times New Roman" fo:font-size="14pt" style:font-size-asian="14pt" style:font-size-complex="14pt"/>
    </style:style>
    <style:style style:name="T4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49" style:parent-style-name="Normal" style:family="paragraph">
      <style:text-properties style:font-name="Times New Roman" style:font-name-complex="Times New Roman" fo:font-size="14pt" style:font-size-asian="14pt" style:font-size-complex="14pt"/>
    </style:style>
    <style:style style:name="P450" style:parent-style-name="Normal" style:family="paragraph">
      <style:text-properties style:font-name="Times New Roman" style:font-name-complex="Times New Roman" fo:font-size="14pt" style:font-size-asian="14pt" style:font-size-complex="14pt"/>
    </style:style>
    <style:style style:name="P451" style:parent-style-name="Normal" style:family="paragraph">
      <style:text-properties style:font-name="Times New Roman" style:font-name-complex="Times New Roman" fo:font-size="14pt" style:font-size-asian="14pt" style:font-size-complex="14pt"/>
    </style:style>
    <style:style style:name="T4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53" style:parent-style-name="DefaultParagraphFont" style:family="text">
      <style:text-properties style:font-name="Times New Roman" style:font-name-complex="Times New Roman" fo:font-size="14pt" style:font-size-asian="14pt" style:font-size-complex="14pt"/>
    </style:style>
    <style:style style:name="T4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55" style:parent-style-name="Normal" style:family="paragraph">
      <style:text-properties style:font-name="Times New Roman" style:font-name-complex="Times New Roman" fo:font-size="14pt" style:font-size-asian="14pt" style:font-size-complex="14pt"/>
    </style:style>
    <style:style style:name="T456" style:parent-style-name="DefaultParagraphFont" style:family="text">
      <style:text-properties style:font-name="Times New Roman" style:font-name-complex="Times New Roman" fo:font-size="14pt" style:font-size-asian="14pt" style:font-size-complex="14pt"/>
    </style:style>
    <style:style style:name="T457" style:parent-style-name="Hyperlink" style:family="text">
      <style:text-properties style:font-name="Times New Roman" style:font-name-complex="Times New Roman" fo:font-size="14pt" style:font-size-asian="14pt" style:font-size-complex="14pt"/>
    </style:style>
    <style:style style:name="T4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60" style:parent-style-name="Normal" style:family="paragraph">
      <style:text-properties style:font-name="Times New Roman" style:font-name-complex="Times New Roman" fo:font-size="14pt" style:font-size-asian="14pt" style:font-size-complex="14pt"/>
    </style:style>
    <style:style style:name="P461" style:parent-style-name="Normal" style:family="paragraph">
      <style:text-properties style:font-name="Times New Roman" style:font-name-complex="Times New Roman" fo:font-size="14pt" style:font-size-asian="14pt" style:font-size-complex="14pt"/>
    </style:style>
    <style:style style:name="P462" style:parent-style-name="Normal" style:family="paragraph">
      <style:text-properties style:font-name="Times New Roman" style:font-name-complex="Times New Roman" fo:font-size="14pt" style:font-size-asian="14pt" style:font-size-complex="14pt"/>
    </style:style>
    <style:style style:name="T4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4" style:parent-style-name="DefaultParagraphFont" style:family="text">
      <style:text-properties style:font-name="Times New Roman" style:font-name-complex="Times New Roman" fo:font-size="14pt" style:font-size-asian="14pt" style:font-size-complex="14pt"/>
    </style:style>
    <style:style style:name="T4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66" style:parent-style-name="Normal" style:family="paragraph">
      <style:text-properties style:font-name="Times New Roman" style:font-name-complex="Times New Roman" fo:font-size="14pt" style:font-size-asian="14pt" style:font-size-complex="14pt"/>
    </style:style>
    <style:style style:name="T4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69" style:parent-style-name="Normal" style:family="paragraph">
      <style:text-properties style:font-name="Times New Roman" style:font-name-complex="Times New Roman" fo:font-size="14pt" style:font-size-asian="14pt" style:font-size-complex="14pt"/>
    </style:style>
    <style:style style:name="P470" style:parent-style-name="Normal" style:family="paragraph">
      <style:text-properties style:font-name="Times New Roman" style:font-name-complex="Times New Roman" fo:font-size="14pt" style:font-size-asian="14pt" style:font-size-complex="14pt"/>
    </style:style>
    <style:style style:name="P471" style:parent-style-name="Normal" style:family="paragraph">
      <style:text-properties style:font-name="Times New Roman" style:font-name-complex="Times New Roman" fo:font-size="14pt" style:font-size-asian="14pt" style:font-size-complex="14pt"/>
    </style:style>
    <style:style style:name="T4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3" style:parent-style-name="DefaultParagraphFont" style:family="text">
      <style:text-properties style:font-name="Times New Roman" style:font-name-complex="Times New Roman" fo:font-size="14pt" style:font-size-asian="14pt" style:font-size-complex="14pt"/>
    </style:style>
    <style:style style:name="T4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75" style:parent-style-name="Normal" style:family="paragraph">
      <style:text-properties style:font-name="Times New Roman" style:font-name-complex="Times New Roman" fo:font-size="14pt" style:font-size-asian="14pt" style:font-size-complex="14pt"/>
    </style:style>
    <style:style style:name="T4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78" style:parent-style-name="Normal" style:family="paragraph">
      <style:text-properties style:font-name="Times New Roman" style:font-name-complex="Times New Roman" fo:font-size="14pt" style:font-size-asian="14pt" style:font-size-complex="14pt"/>
    </style:style>
    <style:style style:name="P479" style:parent-style-name="Normal" style:family="paragraph">
      <style:text-properties style:font-name="Times New Roman" style:font-name-complex="Times New Roman" fo:font-size="14pt" style:font-size-asian="14pt" style:font-size-complex="14pt"/>
    </style:style>
    <style:style style:name="P480" style:parent-style-name="Normal" style:family="paragraph">
      <style:text-properties style:font-name="Times New Roman" style:font-name-complex="Times New Roman" fo:font-size="14pt" style:font-size-asian="14pt" style:font-size-complex="14pt"/>
    </style:style>
    <style:style style:name="T4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2" style:parent-style-name="DefaultParagraphFont" style:family="text">
      <style:text-properties style:font-name="Times New Roman" style:font-name-complex="Times New Roman" fo:font-size="14pt" style:font-size-asian="14pt" style:font-size-complex="14pt"/>
    </style:style>
    <style:style style:name="T4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84" style:parent-style-name="Normal" style:family="paragraph">
      <style:text-properties style:font-name="Times New Roman" style:font-name-complex="Times New Roman" fo:font-size="14pt" style:font-size-asian="14pt" style:font-size-complex="14pt"/>
    </style:style>
    <style:style style:name="T4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87" style:parent-style-name="Normal" style:family="paragraph">
      <style:text-properties style:font-name="Times New Roman" style:font-name-complex="Times New Roman" fo:font-size="14pt" style:font-size-asian="14pt" style:font-size-complex="14pt"/>
    </style:style>
    <style:style style:name="P488" style:parent-style-name="Normal" style:family="paragraph">
      <style:text-properties style:font-name="Times New Roman" style:font-name-complex="Times New Roman" fo:font-size="14pt" style:font-size-asian="14pt" style:font-size-complex="14pt"/>
    </style:style>
    <style:style style:name="P489" style:parent-style-name="Normal" style:family="paragraph">
      <style:text-properties style:font-name="Times New Roman" style:font-name-complex="Times New Roman" fo:font-size="14pt" style:font-size-asian="14pt" style:font-size-complex="14pt"/>
    </style:style>
    <style:style style:name="T4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91" style:parent-style-name="DefaultParagraphFont" style:family="text">
      <style:text-properties style:font-name="Times New Roman" style:font-name-complex="Times New Roman" fo:font-size="14pt" style:font-size-asian="14pt" style:font-size-complex="14pt"/>
    </style:style>
    <style:style style:name="T4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93" style:parent-style-name="Normal" style:family="paragraph">
      <style:text-properties style:font-name="Times New Roman" style:font-name-complex="Times New Roman" fo:font-size="14pt" style:font-size-asian="14pt" style:font-size-complex="14pt"/>
    </style:style>
    <style:style style:name="P494" style:parent-style-name="Normal" style:family="paragraph">
      <style:text-properties style:font-name="Times New Roman" style:font-name-complex="Times New Roman" fo:font-size="14pt" style:font-size-asian="14pt" style:font-size-complex="14pt"/>
    </style:style>
    <style:style style:name="T4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97" style:parent-style-name="Normal" style:family="paragraph">
      <style:text-properties style:font-name="Times New Roman" style:font-name-complex="Times New Roman" fo:font-size="14pt" style:font-size-asian="14pt" style:font-size-complex="14pt"/>
    </style:style>
    <style:style style:name="T498" style:parent-style-name="DefaultParagraphFont" style:family="text">
      <style:text-properties style:font-name="Times New Roman" style:font-name-complex="Times New Roman" fo:font-size="14pt" style:font-size-asian="14pt" style:font-size-complex="14pt"/>
    </style:style>
    <style:style style:name="P499" style:parent-style-name="Normal" style:family="paragraph">
      <style:text-properties style:font-name="Times New Roman" style:font-name-complex="Times New Roman" fo:font-size="14pt" style:font-size-asian="14pt" style:font-size-complex="14pt"/>
    </style:style>
    <style:style style:name="P500" style:parent-style-name="Normal" style:family="paragraph">
      <style:text-properties style:font-name="Times New Roman" style:font-name-complex="Times New Roman" fo:font-size="14pt" style:font-size-asian="14pt" style:font-size-complex="14pt"/>
    </style:style>
    <style:style style:name="P501" style:parent-style-name="Normal" style:family="paragraph">
      <style:text-properties style:font-name="Times New Roman" style:font-name-complex="Times New Roman" fo:font-size="14pt" style:font-size-asian="14pt" style:font-size-complex="14pt"/>
    </style:style>
    <style:style style:name="T5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03" style:parent-style-name="DefaultParagraphFont" style:family="text">
      <style:text-properties style:font-name="Times New Roman" style:font-name-complex="Times New Roman" fo:font-size="14pt" style:font-size-asian="14pt" style:font-size-complex="14pt"/>
    </style:style>
    <style:style style:name="T5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05" style:parent-style-name="Normal" style:family="paragraph">
      <style:text-properties style:font-name="Times New Roman" style:font-name-complex="Times New Roman" fo:font-size="14pt" style:font-size-asian="14pt" style:font-size-complex="14pt"/>
    </style:style>
    <style:style style:name="P506" style:parent-style-name="Normal" style:family="paragraph">
      <style:text-properties style:font-name="Times New Roman" style:font-name-complex="Times New Roman" fo:font-size="14pt" style:font-size-asian="14pt" style:font-size-complex="14pt"/>
    </style:style>
    <style:style style:name="P507" style:parent-style-name="Normal" style:family="paragraph">
      <style:text-properties style:font-name="Times New Roman" style:font-name-complex="Times New Roman" fo:font-size="14pt" style:font-size-asian="14pt" style:font-size-complex="14pt"/>
    </style:style>
    <style:style style:name="T5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10" style:parent-style-name="Normal" style:family="paragraph">
      <style:text-properties style:font-name="Times New Roman" style:font-name-complex="Times New Roman" fo:font-size="14pt" style:font-size-asian="14pt" style:font-size-complex="14pt"/>
    </style:style>
    <style:style style:name="P511" style:parent-style-name="Normal" style:family="paragraph">
      <style:text-properties style:font-name="Times New Roman" style:font-name-complex="Times New Roman" fo:font-size="14pt" style:font-size-asian="14pt" style:font-size-complex="14pt"/>
    </style:style>
    <style:style style:name="P512" style:parent-style-name="Normal" style:family="paragraph">
      <style:text-properties style:font-name="Times New Roman" style:font-name-complex="Times New Roman" fo:font-size="14pt" style:font-size-asian="14pt" style:font-size-complex="14pt"/>
    </style:style>
    <style:style style:name="T5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14" style:parent-style-name="DefaultParagraphFont" style:family="text">
      <style:text-properties style:font-name="Times New Roman" style:font-name-complex="Times New Roman" fo:font-size="14pt" style:font-size-asian="14pt" style:font-size-complex="14pt"/>
    </style:style>
    <style:style style:name="T5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16" style:parent-style-name="DefaultParagraphFont" style:family="text">
      <style:text-properties style:font-name="Times New Roman" style:font-name-complex="Times New Roman" fo:font-size="14pt" style:font-size-asian="14pt" style:font-size-complex="14pt"/>
    </style:style>
    <style:style style:name="T5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18" style:parent-style-name="DefaultParagraphFont" style:family="text">
      <style:text-properties style:font-name="Times New Roman" style:font-name-complex="Times New Roman" fo:font-size="14pt" style:font-size-asian="14pt" style:font-size-complex="14pt"/>
    </style:style>
    <style:style style:name="T5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21" style:parent-style-name="Normal" style:family="paragraph">
      <style:text-properties style:font-name="Times New Roman" style:font-name-complex="Times New Roman" fo:font-size="14pt" style:font-size-asian="14pt" style:font-size-complex="14pt"/>
    </style:style>
    <style:style style:name="P522" style:parent-style-name="Normal" style:family="paragraph">
      <style:text-properties style:font-name="Times New Roman" style:font-name-complex="Times New Roman" fo:font-size="14pt" style:font-size-asian="14pt" style:font-size-complex="14pt"/>
    </style:style>
    <style:style style:name="P523" style:parent-style-name="Normal" style:family="paragraph">
      <style:text-properties style:font-name="Times New Roman" style:font-name-complex="Times New Roman" fo:font-size="14pt" style:font-size-asian="14pt" style:font-size-complex="14pt"/>
    </style:style>
    <style:style style:name="T5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25" style:parent-style-name="DefaultParagraphFont" style:family="text">
      <style:text-properties style:font-name="Times New Roman" style:font-name-complex="Times New Roman" fo:font-size="14pt" style:font-size-asian="14pt" style:font-size-complex="14pt"/>
    </style:style>
    <style:style style:name="T5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27" style:parent-style-name="Normal" style:family="paragraph">
      <style:text-properties style:font-name="Times New Roman" style:font-name-complex="Times New Roman" fo:font-size="14pt" style:font-size-asian="14pt" style:font-size-complex="14pt"/>
    </style:style>
    <style:style style:name="T5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30" style:parent-style-name="Normal" style:family="paragraph">
      <style:text-properties style:font-name="Times New Roman" style:font-name-complex="Times New Roman" fo:font-size="14pt" style:font-size-asian="14pt" style:font-size-complex="14pt"/>
    </style:style>
    <style:style style:name="P531" style:parent-style-name="Normal" style:family="paragraph">
      <style:text-properties style:font-name="Times New Roman" style:font-name-complex="Times New Roman" fo:font-size="14pt" style:font-size-asian="14pt" style:font-size-complex="14pt"/>
    </style:style>
    <style:style style:name="P532" style:parent-style-name="Normal" style:family="paragraph">
      <style:text-properties style:font-name="Times New Roman" style:font-name-complex="Times New Roman" fo:font-size="14pt" style:font-size-asian="14pt" style:font-size-complex="14pt"/>
    </style:style>
    <style:style style:name="T5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34" style:parent-style-name="DefaultParagraphFont" style:family="text">
      <style:text-properties style:font-name="Times New Roman" style:font-name-complex="Times New Roman" fo:font-size="14pt" style:font-size-asian="14pt" style:font-size-complex="14pt"/>
    </style:style>
    <style:style style:name="T5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36" style:parent-style-name="Normal" style:family="paragraph">
      <style:text-properties style:font-name="Times New Roman" style:font-name-complex="Times New Roman" fo:font-size="14pt" style:font-size-asian="14pt" style:font-size-complex="14pt"/>
    </style:style>
    <style:style style:name="P537" style:parent-style-name="Normal" style:family="paragraph">
      <style:text-properties style:font-name="Times New Roman" style:font-name-complex="Times New Roman" fo:font-size="14pt" style:font-size-asian="14pt" style:font-size-complex="14pt"/>
    </style:style>
    <style:style style:name="P538" style:parent-style-name="Normal" style:list-style-name="LFO1" style:family="paragraph"/>
    <style:style style:name="T539" style:parent-style-name="DefaultParagraphFont" style:family="text">
      <style:text-properties style:font-name="Times New Roman" style:font-name-complex="Times New Roman" fo:font-size="14pt" style:font-size-asian="14pt" style:font-size-complex="14pt"/>
    </style:style>
    <style:style style:name="P540" style:parent-style-name="Normal" style:list-style-name="LFO1" style:family="paragraph"/>
    <style:style style:name="T541" style:parent-style-name="DefaultParagraphFont" style:family="text">
      <style:text-properties style:font-name="Times New Roman" style:font-name-complex="Times New Roman" fo:font-size="14pt" style:font-size-asian="14pt" style:font-size-complex="14pt"/>
    </style:style>
    <style:style style:name="P542" style:parent-style-name="Normal" style:list-style-name="LFO1" style:family="paragraph"/>
    <style:style style:name="T543" style:parent-style-name="DefaultParagraphFont" style:family="text">
      <style:text-properties style:font-name="Times New Roman" style:font-name-complex="Times New Roman" fo:font-size="14pt" style:font-size-asian="14pt" style:font-size-complex="14pt"/>
    </style:style>
    <style:style style:name="T5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46" style:parent-style-name="Normal" style:family="paragraph">
      <style:text-properties style:font-name="Times New Roman" style:font-name-complex="Times New Roman" fo:font-size="14pt" style:font-size-asian="14pt" style:font-size-complex="14pt"/>
    </style:style>
    <style:style style:name="T547" style:parent-style-name="DefaultParagraphFont" style:family="text">
      <style:text-properties style:font-name="Times New Roman" style:font-name-complex="Times New Roman" fo:font-size="14pt" style:font-size-asian="14pt" style:font-size-complex="14pt"/>
    </style:style>
    <style:style style:name="P548" style:parent-style-name="consolas" style:family="paragraph">
      <style:text-properties fo:language="it" fo:country="IT"/>
    </style:style>
    <style:style style:name="P549" style:parent-style-name="consolas" style:family="paragraph">
      <style:text-properties fo:language="it" fo:country="IT"/>
    </style:style>
    <style:style style:name="P550" style:parent-style-name="consolas" style:family="paragraph">
      <style:text-properties fo:language="it" fo:country="IT"/>
    </style:style>
    <style:style style:name="P551" style:parent-style-name="consolas" style:family="paragraph">
      <style:text-properties fo:language="it" fo:country="IT"/>
    </style:style>
    <style:style style:name="P552" style:parent-style-name="consolas" style:family="paragraph">
      <style:text-properties fo:language="it" fo:country="IT"/>
    </style:style>
    <style:style style:name="P553" style:parent-style-name="consolas" style:family="paragraph">
      <style:text-properties fo:language="it" fo:country="IT"/>
    </style:style>
    <style:style style:name="P554" style:parent-style-name="Normal" style:family="paragraph">
      <style:text-properties style:font-name="Times New Roman" style:font-name-complex="Times New Roman" fo:font-size="14pt" style:font-size-asian="14pt" style:font-size-complex="14pt"/>
    </style:style>
    <style:style style:name="P555" style:parent-style-name="Normal" style:family="paragraph">
      <style:text-properties style:font-name="Times New Roman" style:font-name-complex="Times New Roman" fo:font-size="14pt" style:font-size-asian="14pt" style:font-size-complex="14pt"/>
    </style:style>
    <style:style style:name="P556" style:parent-style-name="Normal" style:family="paragraph">
      <style:text-properties style:font-name="Times New Roman" style:font-name-complex="Times New Roman" fo:font-size="14pt" style:font-size-asian="14pt" style:font-size-complex="14pt"/>
    </style:style>
    <style:style style:name="T5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58" style:parent-style-name="DefaultParagraphFont" style:family="text">
      <style:text-properties style:font-name="Times New Roman" style:font-name-complex="Times New Roman" fo:font-size="14pt" style:font-size-asian="14pt" style:font-size-complex="14pt"/>
    </style:style>
    <style:style style:name="T5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61" style:parent-style-name="Normal" style:family="paragraph">
      <style:text-properties style:font-name="Times New Roman" style:font-name-complex="Times New Roman" fo:font-size="14pt" style:font-size-asian="14pt" style:font-size-complex="14pt"/>
    </style:style>
    <style:style style:name="P562" style:parent-style-name="Normal" style:family="paragraph">
      <style:text-properties style:font-name="Times New Roman" style:font-name-complex="Times New Roman" fo:font-size="14pt" style:font-size-asian="14pt" style:font-size-complex="14pt"/>
    </style:style>
    <style:style style:name="P563" style:parent-style-name="Normal" style:family="paragraph">
      <style:text-properties style:font-name="Times New Roman" style:font-name-complex="Times New Roman" fo:font-size="14pt" style:font-size-asian="14pt" style:font-size-complex="14pt"/>
    </style:style>
    <style:style style:name="T5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5" style:parent-style-name="DefaultParagraphFont" style:family="text">
      <style:text-properties style:font-name="Times New Roman" style:font-name-complex="Times New Roman" fo:font-size="14pt" style:font-size-asian="14pt" style:font-size-complex="14pt"/>
    </style:style>
    <style:style style:name="T5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67" style:parent-style-name="Normal" style:family="paragraph">
      <style:text-properties style:font-name="Times New Roman" style:font-name-complex="Times New Roman" fo:font-size="14pt" style:font-size-asian="14pt" style:font-size-complex="14pt"/>
    </style:style>
    <style:style style:name="T5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70" style:parent-style-name="Normal" style:family="paragraph">
      <style:text-properties style:font-name="Times New Roman" style:font-name-complex="Times New Roman" fo:font-size="14pt" style:font-size-asian="14pt" style:font-size-complex="14pt"/>
    </style:style>
    <style:style style:name="T571" style:parent-style-name="DefaultParagraphFont" style:family="text">
      <style:text-properties style:font-name="Times New Roman" style:font-name-complex="Times New Roman" fo:font-size="14pt" style:font-size-asian="14pt" style:font-size-complex="14pt"/>
    </style:style>
    <style:style style:name="P572" style:parent-style-name="Normal" style:family="paragraph">
      <style:text-properties style:font-name="Times New Roman" style:font-name-complex="Times New Roman" fo:font-size="14pt" style:font-size-asian="14pt" style:font-size-complex="14pt"/>
    </style:style>
    <style:style style:name="T573" style:parent-style-name="DefaultParagraphFont" style:family="text">
      <style:text-properties style:font-name="Times New Roman" style:font-name-complex="Times New Roman" fo:font-size="14pt" style:font-size-asian="14pt" style:font-size-complex="14pt"/>
    </style:style>
    <style:style style:name="T5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75" style:parent-style-name="DefaultParagraphFont" style:family="text">
      <style:text-properties style:font-name="Times New Roman" style:font-name-complex="Times New Roman" fo:font-size="14pt" style:font-size-asian="14pt" style:font-size-complex="14pt"/>
    </style:style>
    <style:style style:name="T576" style:parent-style-name="DefaultParagraphFont" style:family="text">
      <style:text-properties style:font-name="Times New Roman" style:font-name-complex="Times New Roman" fo:font-size="14pt" style:font-size-asian="14pt" style:font-size-complex="14pt"/>
    </style:style>
    <style:style style:name="T5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78" style:parent-style-name="DefaultParagraphFont" style:family="text">
      <style:text-properties style:font-name="Times New Roman" style:font-name-complex="Times New Roman" fo:font-size="14pt" style:font-size-asian="14pt" style:font-size-complex="14pt"/>
    </style:style>
    <style:style style:name="T579" style:parent-style-name="DefaultParagraphFont" style:family="text">
      <style:text-properties style:font-name="Times New Roman" style:font-name-complex="Times New Roman" fo:font-size="14pt" style:font-size-asian="14pt" style:font-size-complex="14pt"/>
    </style:style>
    <style:style style:name="T5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81" style:parent-style-name="DefaultParagraphFont" style:family="text">
      <style:text-properties style:font-name="Times New Roman" style:font-name-complex="Times New Roman" fo:font-size="14pt" style:font-size-asian="14pt" style:font-size-complex="14pt"/>
    </style:style>
    <style:style style:name="T582" style:parent-style-name="DefaultParagraphFont" style:family="text">
      <style:text-properties style:font-name="Times New Roman" style:font-name-complex="Times New Roman" fo:font-size="14pt" style:font-size-asian="14pt" style:font-size-complex="14pt"/>
    </style:style>
    <style:style style:name="T5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84" style:parent-style-name="DefaultParagraphFont" style:family="text">
      <style:text-properties style:font-name="Times New Roman" style:font-name-complex="Times New Roman" fo:font-size="14pt" style:font-size-asian="14pt" style:font-size-complex="14pt"/>
    </style:style>
    <style:style style:name="P585" style:parent-style-name="Normal" style:family="paragraph">
      <style:text-properties style:font-name="Times New Roman" style:font-name-complex="Times New Roman" fo:font-size="14pt" style:font-size-asian="14pt" style:font-size-complex="14pt"/>
    </style:style>
    <style:style style:name="T5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87" style:parent-style-name="DefaultParagraphFont" style:family="text">
      <style:text-properties style:font-name="Times New Roman" style:font-name-complex="Times New Roman" fo:font-size="14pt" style:font-size-asian="14pt" style:font-size-complex="14pt"/>
    </style:style>
    <style:style style:name="T5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89" style:parent-style-name="Normal" style:family="paragraph">
      <style:text-properties style:font-name="Times New Roman" style:font-name-complex="Times New Roman" fo:font-size="14pt" style:font-size-asian="14pt" style:font-size-complex="14pt"/>
    </style:style>
    <style:style style:name="T590" style:parent-style-name="DefaultParagraphFont" style:family="text">
      <style:text-properties style:font-name="Times New Roman" style:font-name-complex="Times New Roman" fo:font-size="14pt" style:font-size-asian="14pt" style:font-size-complex="14pt"/>
    </style:style>
    <style:style style:name="T5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93" style:parent-style-name="Normal" style:family="paragraph">
      <style:text-properties style:font-name="Times New Roman" style:font-name-complex="Times New Roman" fo:font-size="14pt" style:font-size-asian="14pt" style:font-size-complex="14pt"/>
    </style:style>
    <style:style style:name="P594" style:parent-style-name="Normal" style:family="paragraph">
      <style:text-properties style:font-name="Times New Roman" style:font-name-complex="Times New Roman" fo:font-size="14pt" style:font-size-asian="14pt" style:font-size-complex="14pt"/>
    </style:style>
    <style:style style:name="TableColumn596" style:family="table-column">
      <style:table-column-properties style:column-width="3.1875in"/>
    </style:style>
    <style:style style:name="TableColumn597" style:family="table-column">
      <style:table-column-properties style:column-width="3.3013in"/>
    </style:style>
    <style:style style:name="Table595" style:family="table">
      <style:table-properties style:width="6.4888in" fo:margin-left="0in" table:align="left"/>
    </style:style>
    <style:style style:name="TableRow598" style:family="table-row">
      <style:table-row-properties/>
    </style:style>
    <style:style style:name="TableCell599"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600" style:parent-style-name="Normal" style:family="paragraph">
      <style:text-properties style:font-name="Times New Roman" style:font-name-complex="Times New Roman" fo:font-size="14pt" style:font-size-asian="14pt" style:font-size-complex="14pt"/>
    </style:style>
    <style:style style:name="TableCell60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602" style:parent-style-name="Normal" style:family="paragraph">
      <style:text-properties style:font-name="Times New Roman" style:font-name-complex="Times New Roman" fo:font-size="14pt" style:font-size-asian="14pt" style:font-size-complex="14pt"/>
    </style:style>
    <style:style style:name="TableRow603" style:family="table-row">
      <style:table-row-properties/>
    </style:style>
    <style:style style:name="TableCell60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605" style:parent-style-name="Normal" style:family="paragraph">
      <style:text-properties style:font-name="Times New Roman" style:font-name-complex="Times New Roman" fo:font-size="14pt" style:font-size-asian="14pt" style:font-size-complex="14pt"/>
    </style:style>
    <style:style style:name="TableCell60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607" style:parent-style-name="Normal" style:family="paragraph">
      <style:text-properties style:font-name="Times New Roman" style:font-name-complex="Times New Roman" fo:font-size="14pt" style:font-size-asian="14pt" style:font-size-complex="14pt"/>
    </style:style>
    <style:style style:name="TableRow608" style:family="table-row">
      <style:table-row-properties/>
    </style:style>
    <style:style style:name="TableCell609"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610" style:parent-style-name="Normal" style:family="paragraph">
      <style:text-properties style:font-name="Times New Roman" style:font-name-complex="Times New Roman" fo:font-size="14pt" style:font-size-asian="14pt" style:font-size-complex="14pt"/>
    </style:style>
    <style:style style:name="TableCell61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612" style:parent-style-name="Normal" style:family="paragraph">
      <style:text-properties style:font-name="Times New Roman" style:font-name-complex="Times New Roman" fo:font-size="14pt" style:font-size-asian="14pt" style:font-size-complex="14pt"/>
    </style:style>
    <style:style style:name="P613" style:parent-style-name="Normal" style:family="paragraph">
      <style:text-properties style:font-name="Times New Roman" style:font-name-complex="Times New Roman" fo:font-size="14pt" style:font-size-asian="14pt" style:font-size-complex="14pt"/>
    </style:style>
    <style:style style:name="P614" style:parent-style-name="Normal" style:family="paragraph">
      <style:text-properties style:font-name="Times New Roman" style:font-name-complex="Times New Roman" fo:font-size="14pt" style:font-size-asian="14pt" style:font-size-complex="14pt"/>
    </style:style>
    <style:style style:name="T6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16" style:parent-style-name="DefaultParagraphFont" style:family="text">
      <style:text-properties style:font-name="Times New Roman" style:font-name-complex="Times New Roman" fo:font-size="14pt" style:font-size-asian="14pt" style:font-size-complex="14pt"/>
    </style:style>
    <style:style style:name="T6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18" style:parent-style-name="Normal" style:family="paragraph">
      <style:text-properties style:font-name="Times New Roman" style:font-name-complex="Times New Roman" fo:font-size="14pt" style:font-size-asian="14pt" style:font-size-complex="14pt"/>
    </style:style>
    <style:style style:name="T6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21" style:parent-style-name="Normal" style:family="paragraph">
      <style:text-properties style:font-name="Times New Roman" style:font-name-complex="Times New Roman" fo:font-size="14pt" style:font-size-asian="14pt" style:font-size-complex="14pt"/>
    </style:style>
    <style:style style:name="T622" style:parent-style-name="DefaultParagraphFont" style:family="text">
      <style:text-properties style:font-name="Times New Roman" style:font-name-complex="Times New Roman" fo:font-size="14pt" style:font-size-asian="14pt" style:font-size-complex="14pt"/>
    </style:style>
    <style:style style:name="P623" style:parent-style-name="Normal" style:family="paragraph">
      <style:text-properties style:font-name="Times New Roman" style:font-name-complex="Times New Roman" fo:font-size="14pt" style:font-size-asian="14pt" style:font-size-complex="14pt"/>
    </style:style>
    <style:style style:name="P624" style:parent-style-name="Normal" style:family="paragraph">
      <style:text-properties style:font-name="Times New Roman" style:font-name-complex="Times New Roman" fo:font-size="14pt" style:font-size-asian="14pt" style:font-size-complex="14pt"/>
    </style:style>
    <style:style style:name="P625" style:parent-style-name="Normal" style:family="paragraph">
      <style:text-properties style:font-name="Times New Roman" style:font-name-complex="Times New Roman" fo:font-size="14pt" style:font-size-asian="14pt" style:font-size-complex="14pt"/>
    </style:style>
    <style:style style:name="T6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7" style:parent-style-name="DefaultParagraphFont" style:family="text">
      <style:text-properties style:font-name="Times New Roman" style:font-name-complex="Times New Roman" fo:font-size="14pt" style:font-size-asian="14pt" style:font-size-complex="14pt"/>
    </style:style>
    <style:style style:name="T6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29" style:parent-style-name="Normal" style:family="paragraph">
      <style:text-properties style:font-name="Times New Roman" style:font-name-complex="Times New Roman" fo:font-size="14pt" style:font-size-asian="14pt" style:font-size-complex="14pt"/>
    </style:style>
    <style:style style:name="P630" style:parent-style-name="Normal" style:family="paragraph">
      <style:text-properties style:font-name="Times New Roman" style:font-name-complex="Times New Roman" fo:font-size="14pt" style:font-size-asian="14pt" style:font-size-complex="14pt"/>
    </style:style>
    <style:style style:name="P631" style:parent-style-name="Normal" style:family="paragraph">
      <style:text-properties style:font-name="Times New Roman" style:font-name-complex="Times New Roman" fo:font-size="14pt" style:font-size-asian="14pt" style:font-size-complex="14pt"/>
    </style:style>
    <style:style style:name="P632" style:parent-style-name="Normal" style:family="paragraph">
      <style:text-properties style:font-name="Times New Roman" style:font-name-complex="Times New Roman" fo:font-size="14pt" style:font-size-asian="14pt" style:font-size-complex="14pt"/>
    </style:style>
    <style:style style:name="T6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35" style:parent-style-name="Normal" style:family="paragraph">
      <style:text-properties style:font-name="Times New Roman" style:font-name-complex="Times New Roman" fo:font-size="14pt" style:font-size-asian="14pt" style:font-size-complex="14pt"/>
    </style:style>
    <style:style style:name="P636" style:parent-style-name="Normal" style:family="paragraph">
      <style:text-properties style:font-name="Times New Roman" style:font-name-complex="Times New Roman" fo:font-size="14pt" style:font-size-asian="14pt" style:font-size-complex="14pt"/>
    </style:style>
    <style:style style:name="P637" style:parent-style-name="Normal" style:family="paragraph">
      <style:text-properties style:font-name="Times New Roman" style:font-name-complex="Times New Roman" fo:font-size="14pt" style:font-size-asian="14pt" style:font-size-complex="14pt"/>
    </style:style>
    <style:style style:name="T6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39" style:parent-style-name="DefaultParagraphFont" style:family="text">
      <style:text-properties style:font-name="Times New Roman" style:font-name-complex="Times New Roman" fo:font-size="14pt" style:font-size-asian="14pt" style:font-size-complex="14pt"/>
    </style:style>
    <style:style style:name="T6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41" style:parent-style-name="Normal" style:family="paragraph">
      <style:text-properties style:font-name="Times New Roman" style:font-name-complex="Times New Roman" fo:font-size="14pt" style:font-size-asian="14pt" style:font-size-complex="14pt"/>
    </style:style>
    <style:style style:name="P642" style:parent-style-name="Normal" style:family="paragraph">
      <style:text-properties style:font-name="Times New Roman" style:font-name-complex="Times New Roman" fo:font-size="14pt" style:font-size-asian="14pt" style:font-size-complex="14pt"/>
    </style:style>
    <style:style style:name="P643" style:parent-style-name="Normal" style:family="paragraph">
      <style:text-properties style:font-name="Times New Roman" style:font-name-complex="Times New Roman" fo:font-size="14pt" style:font-size-asian="14pt" style:font-size-complex="14pt"/>
    </style:style>
    <style:style style:name="P644" style:parent-style-name="Normal" style:family="paragraph">
      <style:text-properties style:font-name="Times New Roman" style:font-name-complex="Times New Roman" fo:font-size="14pt" style:font-size-asian="14pt" style:font-size-complex="14pt"/>
    </style:style>
    <style:style style:name="P645" style:parent-style-name="Normal" style:family="paragraph">
      <style:text-properties style:font-name="Times New Roman" style:font-name-complex="Times New Roman" fo:font-size="14pt" style:font-size-asian="14pt" style:font-size-complex="14pt"/>
    </style:style>
    <style:style style:name="T6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48" style:parent-style-name="Normal" style:family="paragraph">
      <style:text-properties style:font-name="Times New Roman" style:font-name-complex="Times New Roman" fo:font-size="14pt" style:font-size-asian="14pt" style:font-size-complex="14pt"/>
    </style:style>
    <style:style style:name="P649" style:parent-style-name="Normal" style:family="paragraph">
      <style:text-properties style:font-name="Times New Roman" style:font-name-complex="Times New Roman" fo:font-size="14pt" style:font-size-asian="14pt" style:font-size-complex="14pt"/>
    </style:style>
    <style:style style:name="P650" style:parent-style-name="Normal" style:family="paragraph">
      <style:text-properties style:font-name="Times New Roman" style:font-name-complex="Times New Roman" fo:font-size="14pt" style:font-size-asian="14pt" style:font-size-complex="14pt"/>
    </style:style>
    <style:style style:name="P651" style:parent-style-name="Normal" style:family="paragraph">
      <style:text-properties style:font-name="Times New Roman" style:font-name-complex="Times New Roman" fo:font-size="14pt" style:font-size-asian="14pt" style:font-size-complex="14pt"/>
    </style:style>
    <style:style style:name="T6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3" style:parent-style-name="DefaultParagraphFont" style:family="text">
      <style:text-properties style:font-name="Times New Roman" style:font-name-complex="Times New Roman" fo:font-size="14pt" style:font-size-asian="14pt" style:font-size-complex="14pt"/>
    </style:style>
    <style:style style:name="T6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55" style:parent-style-name="Normal" style:family="paragraph">
      <style:text-properties style:font-name="Times New Roman" style:font-name-complex="Times New Roman" fo:font-size="14pt" style:font-size-asian="14pt" style:font-size-complex="14pt"/>
    </style:style>
    <style:style style:name="P656" style:parent-style-name="Normal" style:family="paragraph">
      <style:text-properties style:font-name="Times New Roman" style:font-name-complex="Times New Roman" fo:font-size="14pt" style:font-size-asian="14pt" style:font-size-complex="14pt"/>
    </style:style>
    <style:style style:name="T6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59" style:parent-style-name="Normal" style:family="paragraph">
      <style:text-properties style:font-name="Times New Roman" style:font-name-complex="Times New Roman" fo:font-size="14pt" style:font-size-asian="14pt" style:font-size-complex="14pt"/>
    </style:style>
    <style:style style:name="P660" style:parent-style-name="Normal" style:family="paragraph">
      <style:text-properties style:font-name="Times New Roman" style:font-name-complex="Times New Roman" fo:font-size="14pt" style:font-size-asian="14pt" style:font-size-complex="14pt"/>
    </style:style>
    <style:style style:name="P661" style:parent-style-name="Normal" style:family="paragraph">
      <style:text-properties style:font-name="Times New Roman" style:font-name-complex="Times New Roman" fo:font-size="14pt" style:font-size-asian="14pt" style:font-size-complex="14pt"/>
    </style:style>
    <style:style style:name="T6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3" style:parent-style-name="DefaultParagraphFont" style:family="text">
      <style:text-properties style:font-name="Times New Roman" style:font-name-complex="Times New Roman" fo:font-size="14pt" style:font-size-asian="14pt" style:font-size-complex="14pt"/>
    </style:style>
    <style:style style:name="T6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65" style:parent-style-name="Normal" style:family="paragraph">
      <style:text-properties style:font-name="Times New Roman" style:font-name-complex="Times New Roman" fo:font-size="14pt" style:font-size-asian="14pt" style:font-size-complex="14pt"/>
    </style:style>
    <style:style style:name="P666" style:parent-style-name="Normal" style:family="paragraph">
      <style:text-properties style:font-name="Times New Roman" style:font-name-complex="Times New Roman" fo:font-size="14pt" style:font-size-asian="14pt" style:font-size-complex="14pt"/>
    </style:style>
    <style:style style:name="P667" style:parent-style-name="Normal" style:family="paragraph">
      <style:text-properties style:font-name="Times New Roman" style:font-name-complex="Times New Roman" fo:font-size="14pt" style:font-size-asian="14pt" style:font-size-complex="14pt"/>
    </style:style>
    <style:style style:name="T6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70" style:parent-style-name="Normal" style:family="paragraph">
      <style:text-properties style:font-name="Times New Roman" style:font-name-complex="Times New Roman" fo:font-size="14pt" style:font-size-asian="14pt" style:font-size-complex="14pt"/>
    </style:style>
    <style:style style:name="P671" style:parent-style-name="Normal" style:family="paragraph">
      <style:text-properties style:font-name="Times New Roman" style:font-name-complex="Times New Roman" fo:font-size="14pt" style:font-size-asian="14pt" style:font-size-complex="14pt"/>
    </style:style>
    <style:style style:name="P672" style:parent-style-name="Normal" style:family="paragraph">
      <style:text-properties style:font-name="Times New Roman" style:font-name-complex="Times New Roman" fo:font-size="14pt" style:font-size-asian="14pt" style:font-size-complex="14pt"/>
    </style:style>
    <style:style style:name="T6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4" style:parent-style-name="DefaultParagraphFont" style:family="text">
      <style:text-properties style:font-name="Times New Roman" style:font-name-complex="Times New Roman" fo:font-size="14pt" style:font-size-asian="14pt" style:font-size-complex="14pt"/>
    </style:style>
    <style:style style:name="T6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6" style:parent-style-name="DefaultParagraphFont" style:family="text">
      <style:text-properties style:font-name="Times New Roman" style:font-name-complex="Times New Roman" fo:font-size="14pt" style:font-size-asian="14pt" style:font-size-complex="14pt"/>
    </style:style>
    <style:style style:name="T6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8" style:parent-style-name="DefaultParagraphFont" style:family="text">
      <style:text-properties style:font-name="Times New Roman" style:font-name-complex="Times New Roman" fo:font-size="14pt" style:font-size-asian="14pt" style:font-size-complex="14pt"/>
    </style:style>
    <style:style style:name="T679" style:parent-style-name="DefaultParagraphFont" style:family="text">
      <style:text-properties style:font-name="Times New Roman" style:font-name-complex="Times New Roman" fo:font-size="14pt" style:font-size-asian="14pt" style:font-size-complex="14pt"/>
    </style:style>
    <style:style style:name="P680" style:parent-style-name="Normal" style:family="paragraph">
      <style:text-properties style:font-name="Times New Roman" style:font-name-complex="Times New Roman" fo:font-size="14pt" style:font-size-asian="14pt" style:font-size-complex="14pt"/>
    </style:style>
    <style:style style:name="T681" style:parent-style-name="DefaultParagraphFont" style:family="text">
      <style:text-properties style:font-name="Times New Roman" style:font-name-complex="Times New Roman" fo:font-size="14pt" style:font-size-asian="14pt" style:font-size-complex="14pt"/>
    </style:style>
    <style:style style:name="P682" style:parent-style-name="Normal" style:family="paragraph">
      <style:text-properties style:font-name="Times New Roman" style:font-name-complex="Times New Roman" fo:font-size="14pt" style:font-size-asian="14pt" style:font-size-complex="14pt"/>
    </style:style>
    <style:style style:name="T683" style:parent-style-name="DefaultParagraphFont" style:family="text">
      <style:text-properties style:font-name="Times New Roman" style:font-name-complex="Times New Roman" fo:font-size="14pt" style:font-size-asian="14pt" style:font-size-complex="14pt"/>
    </style:style>
    <style:style style:name="T68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86" style:parent-style-name="Normal" style:family="paragraph">
      <style:text-properties style:font-name="Times New Roman" style:font-name-complex="Times New Roman" fo:font-size="14pt" style:font-size-asian="14pt" style:font-size-complex="14pt"/>
    </style:style>
    <style:style style:name="T687" style:parent-style-name="DefaultParagraphFont" style:family="text">
      <style:text-properties style:font-name="Times New Roman" style:font-name-complex="Times New Roman" fo:font-size="14pt" style:font-size-asian="14pt" style:font-size-complex="14pt"/>
    </style:style>
    <style:style style:name="P688" style:parent-style-name="Normal" style:family="paragraph">
      <style:text-properties style:font-name="Times New Roman" style:font-name-complex="Times New Roman" fo:font-size="14pt" style:font-size-asian="14pt" style:font-size-complex="14pt"/>
    </style:style>
    <style:style style:name="T6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1" style:parent-style-name="DefaultParagraphFont" style:family="text">
      <style:text-properties style:font-name="Times New Roman" style:font-name-complex="Times New Roman" fo:font-size="14pt" style:font-size-asian="14pt" style:font-size-complex="14pt"/>
    </style:style>
    <style:style style:name="T692" style:parent-style-name="DefaultParagraphFont" style:family="text">
      <style:text-properties style:font-name="Times New Roman" style:font-name-complex="Times New Roman" fo:font-size="14pt" style:font-size-asian="14pt" style:font-size-complex="14pt"/>
    </style:style>
    <style:style style:name="T693" style:parent-style-name="DefaultParagraphFont" style:family="text">
      <style:text-properties style:font-name="Times New Roman" style:font-name-complex="Times New Roman" fo:font-size="14pt" style:font-size-asian="14pt" style:font-size-complex="14pt"/>
    </style:style>
    <style:style style:name="T6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5" style:parent-style-name="DefaultParagraphFont" style:family="text">
      <style:text-properties style:font-name="Times New Roman" style:font-name-complex="Times New Roman" fo:font-size="14pt" style:font-size-asian="14pt" style:font-size-complex="14pt"/>
    </style:style>
    <style:style style:name="T696" style:parent-style-name="DefaultParagraphFont" style:family="text">
      <style:text-properties style:font-name="Times New Roman" style:font-name-complex="Times New Roman" fo:font-size="14pt" style:font-size-asian="14pt" style:font-size-complex="14pt"/>
    </style:style>
    <style:style style:name="T697" style:parent-style-name="DefaultParagraphFont" style:family="text">
      <style:text-properties style:font-name="Times New Roman" style:font-name-complex="Times New Roman" fo:font-size="14pt" style:font-size-asian="14pt" style:font-size-complex="14pt"/>
    </style:style>
    <style:style style:name="T6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99" style:parent-style-name="Normal" style:family="paragraph">
      <style:text-properties style:font-name="Times New Roman" style:font-name-complex="Times New Roman" fo:font-size="14pt" style:font-size-asian="14pt" style:font-size-complex="14pt"/>
    </style:style>
    <style:style style:name="T700" style:parent-style-name="DefaultParagraphFont" style:family="text">
      <style:text-properties style:font-name="Times New Roman" style:font-name-complex="Times New Roman" fo:font-size="14pt" style:font-size-asian="14pt" style:font-size-complex="14pt"/>
    </style:style>
    <style:style style:name="T7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2" style:parent-style-name="DefaultParagraphFont" style:family="text">
      <style:text-properties style:font-name="Times New Roman" style:font-name-complex="Times New Roman" fo:font-size="14pt" style:font-size-asian="14pt" style:font-size-complex="14pt"/>
    </style:style>
    <style:style style:name="T7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05" style:parent-style-name="Normal" style:family="paragraph">
      <style:text-properties style:font-name="Times New Roman" style:font-name-complex="Times New Roman" fo:font-size="14pt" style:font-size-asian="14pt" style:font-size-complex="14pt"/>
    </style:style>
    <style:style style:name="P706" style:parent-style-name="Normal" style:family="paragraph">
      <style:text-properties style:font-name="Times New Roman" style:font-name-complex="Times New Roman" fo:font-size="14pt" style:font-size-asian="14pt" style:font-size-complex="14pt"/>
    </style:style>
    <style:style style:name="P707" style:parent-style-name="Normal" style:family="paragraph">
      <style:text-properties style:font-name="Times New Roman" style:font-name-complex="Times New Roman" fo:font-size="14pt" style:font-size-asian="14pt" style:font-size-complex="14pt"/>
    </style:style>
    <style:style style:name="T7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9" style:parent-style-name="DefaultParagraphFont" style:family="text">
      <style:text-properties style:font-name="Times New Roman" style:font-name-complex="Times New Roman" fo:font-size="14pt" style:font-size-asian="14pt" style:font-size-complex="14pt"/>
    </style:style>
    <style:style style:name="T7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11" style:parent-style-name="DefaultParagraphFont" style:family="text">
      <style:text-properties style:font-name="Times New Roman" style:font-name-complex="Times New Roman" fo:font-size="14pt" style:font-size-asian="14pt" style:font-size-complex="14pt"/>
    </style:style>
    <style:style style:name="T7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13" style:parent-style-name="DefaultParagraphFont" style:family="text">
      <style:text-properties style:font-name="Times New Roman" style:font-name-complex="Times New Roman" fo:font-size="14pt" style:font-size-asian="14pt" style:font-size-complex="14pt"/>
    </style:style>
    <style:style style:name="T714" style:parent-style-name="DefaultParagraphFont" style:family="text">
      <style:text-properties style:font-name="Times New Roman" style:font-name-complex="Times New Roman" fo:font-size="14pt" style:font-size-asian="14pt" style:font-size-complex="14pt"/>
    </style:style>
    <style:style style:name="T715" style:parent-style-name="Hyperlink" style:family="text">
      <style:text-properties style:font-name="Times New Roman" style:font-name-complex="Times New Roman" fo:font-size="14pt" style:font-size-asian="14pt" style:font-size-complex="14pt"/>
    </style:style>
    <style:style style:name="T7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18" style:parent-style-name="Normal" style:family="paragraph">
      <style:text-properties style:font-name="Times New Roman" style:font-name-complex="Times New Roman" fo:font-size="14pt" style:font-size-asian="14pt" style:font-size-complex="14pt"/>
    </style:style>
    <style:style style:name="P719" style:parent-style-name="Normal" style:family="paragraph">
      <style:text-properties style:font-name="Times New Roman" style:font-name-complex="Times New Roman" fo:font-size="14pt" style:font-size-asian="14pt" style:font-size-complex="14pt"/>
    </style:style>
    <style:style style:name="P720" style:parent-style-name="Normal" style:family="paragraph">
      <style:text-properties style:font-name="Times New Roman" style:font-name-complex="Times New Roman" fo:font-size="14pt" style:font-size-asian="14pt" style:font-size-complex="14pt"/>
    </style:style>
    <style:style style:name="T7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22" style:parent-style-name="DefaultParagraphFont" style:family="text">
      <style:text-properties style:font-name="Times New Roman" style:font-name-complex="Times New Roman" fo:font-size="14pt" style:font-size-asian="14pt" style:font-size-complex="14pt"/>
    </style:style>
    <style:style style:name="T7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24" style:parent-style-name="Normal" style:family="paragraph">
      <style:text-properties style:font-name="Times New Roman" style:font-name-complex="Times New Roman" fo:font-size="14pt" style:font-size-asian="14pt" style:font-size-complex="14pt"/>
    </style:style>
    <style:style style:name="T725" style:parent-style-name="DefaultParagraphFont" style:family="text">
      <style:text-properties style:font-name="Times New Roman" style:font-name-complex="Times New Roman" fo:font-size="14pt" style:font-size-asian="14pt" style:font-size-complex="14pt"/>
    </style:style>
    <style:style style:name="T726" style:parent-style-name="Hyperlink" style:family="text">
      <style:text-properties style:font-name="Times New Roman" style:font-name-complex="Times New Roman" fo:font-size="14pt" style:font-size-asian="14pt" style:font-size-complex="14pt"/>
    </style:style>
    <style:style style:name="P727" style:parent-style-name="Normal" style:family="paragraph">
      <style:text-properties style:font-name="Times New Roman" style:font-name-complex="Times New Roman" fo:font-size="14pt" style:font-size-asian="14pt" style:font-size-complex="14pt"/>
    </style:style>
    <style:style style:name="T7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30" style:parent-style-name="Normal" style:family="paragraph">
      <style:text-properties style:font-name="Times New Roman" style:font-name-complex="Times New Roman" fo:font-size="14pt" style:font-size-asian="14pt" style:font-size-complex="14pt"/>
    </style:style>
    <style:style style:name="P731" style:parent-style-name="Normal" style:family="paragraph">
      <style:text-properties style:font-name="Times New Roman" style:font-name-complex="Times New Roman" fo:font-size="14pt" style:font-size-asian="14pt" style:font-size-complex="14pt"/>
    </style:style>
    <style:style style:name="P732" style:parent-style-name="Normal" style:family="paragraph">
      <style:text-properties style:font-name="Times New Roman" style:font-name-complex="Times New Roman" fo:font-size="14pt" style:font-size-asian="14pt" style:font-size-complex="14pt"/>
    </style:style>
    <style:style style:name="T7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34" style:parent-style-name="DefaultParagraphFont" style:family="text">
      <style:text-properties style:font-name="Times New Roman" style:font-name-complex="Times New Roman" fo:font-size="14pt" style:font-size-asian="14pt" style:font-size-complex="14pt"/>
    </style:style>
    <style:style style:name="T7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36" style:parent-style-name="Normal" style:family="paragraph">
      <style:text-properties style:font-name="Times New Roman" style:font-name-complex="Times New Roman" fo:font-size="14pt" style:font-size-asian="14pt" style:font-size-complex="14pt"/>
    </style:style>
    <style:style style:name="T7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39" style:parent-style-name="Normal" style:family="paragraph">
      <style:text-properties style:font-name="Times New Roman" style:font-name-complex="Times New Roman" fo:font-size="14pt" style:font-size-asian="14pt" style:font-size-complex="14pt"/>
    </style:style>
    <style:style style:name="P740" style:parent-style-name="Normal" style:family="paragraph">
      <style:text-properties style:font-name="Times New Roman" style:font-name-complex="Times New Roman" fo:font-size="14pt" style:font-size-asian="14pt" style:font-size-complex="14pt"/>
    </style:style>
    <style:style style:name="P741" style:parent-style-name="Normal" style:family="paragraph">
      <style:text-properties style:font-name="Times New Roman" style:font-name-complex="Times New Roman" fo:font-size="14pt" style:font-size-asian="14pt" style:font-size-complex="14pt"/>
    </style:style>
    <style:style style:name="T7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43" style:parent-style-name="DefaultParagraphFont" style:family="text">
      <style:text-properties style:font-name="Times New Roman" style:font-name-complex="Times New Roman" fo:font-size="14pt" style:font-size-asian="14pt" style:font-size-complex="14pt"/>
    </style:style>
    <style:style style:name="T7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45" style:parent-style-name="Normal" style:family="paragraph">
      <style:text-properties style:font-name="Times New Roman" style:font-name-complex="Times New Roman" fo:font-size="14pt" style:font-size-asian="14pt" style:font-size-complex="14pt"/>
    </style:style>
    <style:style style:name="T746" style:parent-style-name="DefaultParagraphFont" style:family="text">
      <style:text-properties style:font-name="Times New Roman" style:font-name-complex="Times New Roman" fo:font-size="14pt" style:font-size-asian="14pt" style:font-size-complex="14pt"/>
    </style:style>
    <style:style style:name="T7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49" style:parent-style-name="Normal" style:family="paragraph">
      <style:text-properties style:font-name="Times New Roman" style:font-name-complex="Times New Roman" fo:font-size="14pt" style:font-size-asian="14pt" style:font-size-complex="14pt"/>
    </style:style>
    <style:style style:name="P750" style:parent-style-name="Normal" style:family="paragraph">
      <style:text-properties style:font-name="Times New Roman" style:font-name-complex="Times New Roman" fo:font-size="14pt" style:font-size-asian="14pt" style:font-size-complex="14pt"/>
    </style:style>
    <style:style style:name="P751" style:parent-style-name="Normal" style:family="paragraph">
      <style:text-properties style:font-name="Times New Roman" style:font-name-complex="Times New Roman" fo:font-size="14pt" style:font-size-asian="14pt" style:font-size-complex="14pt"/>
    </style:style>
    <style:style style:name="T7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3" style:parent-style-name="DefaultParagraphFont" style:family="text">
      <style:text-properties style:font-name="Times New Roman" style:font-name-complex="Times New Roman" fo:font-size="14pt" style:font-size-asian="14pt" style:font-size-complex="14pt"/>
    </style:style>
    <style:style style:name="T7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55" style:parent-style-name="Normal" style:family="paragraph">
      <style:text-properties style:font-name="Times New Roman" style:font-name-complex="Times New Roman" fo:font-size="14pt" style:font-size-asian="14pt" style:font-size-complex="14pt"/>
    </style:style>
    <style:style style:name="T756" style:parent-style-name="DefaultParagraphFont" style:family="text">
      <style:text-properties style:font-name="Times New Roman" style:font-name-complex="Times New Roman" fo:font-size="14pt" style:font-size-asian="14pt" style:font-size-complex="14pt"/>
    </style:style>
    <style:style style:name="T757" style:parent-style-name="Hyperlink" style:family="text">
      <style:text-properties style:font-name="Times New Roman" style:font-name-complex="Times New Roman" fo:font-size="14pt" style:font-size-asian="14pt" style:font-size-complex="14pt"/>
    </style:style>
    <style:style style:name="T7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60" style:parent-style-name="Normal" style:family="paragraph">
      <style:text-properties style:font-name="Times New Roman" style:font-name-complex="Times New Roman" fo:font-size="14pt" style:font-size-asian="14pt" style:font-size-complex="14pt"/>
    </style:style>
    <style:style style:name="T761" style:parent-style-name="DefaultParagraphFont" style:family="text">
      <style:text-properties style:font-name="Times New Roman" style:font-name-complex="Times New Roman" fo:font-size="14pt" style:font-size-asian="14pt" style:font-size-complex="14pt"/>
    </style:style>
    <style:style style:name="P762" style:parent-style-name="Normal" style:family="paragraph">
      <style:text-properties style:font-name="Times New Roman" style:font-name-complex="Times New Roman" fo:font-size="14pt" style:font-size-asian="14pt" style:font-size-complex="14pt"/>
    </style:style>
    <style:style style:name="T763" style:parent-style-name="DefaultParagraphFont" style:family="text">
      <style:text-properties style:font-name="Times New Roman" style:font-name-complex="Times New Roman" fo:font-size="14pt" style:font-size-asian="14pt" style:font-size-complex="14pt"/>
    </style:style>
    <style:style style:name="T7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65" style:parent-style-name="DefaultParagraphFont" style:family="text">
      <style:text-properties style:font-name="Times New Roman" style:font-name-complex="Times New Roman" fo:font-size="14pt" style:font-size-asian="14pt" style:font-size-complex="14pt"/>
    </style:style>
    <style:style style:name="T7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67" style:parent-style-name="DefaultParagraphFont" style:family="text">
      <style:text-properties style:font-name="Times New Roman" style:font-name-complex="Times New Roman" fo:font-size="14pt" style:font-size-asian="14pt" style:font-size-complex="14pt"/>
    </style:style>
    <style:style style:name="T7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69" style:parent-style-name="DefaultParagraphFont" style:family="text">
      <style:text-properties style:font-name="Times New Roman" style:font-name-complex="Times New Roman" fo:font-size="14pt" style:font-size-asian="14pt" style:font-size-complex="14pt"/>
    </style:style>
    <style:style style:name="T770" style:parent-style-name="DefaultParagraphFont" style:family="text">
      <style:text-properties style:font-name="Times New Roman" style:font-name-complex="Times New Roman" fo:font-size="14pt" style:font-size-asian="14pt" style:font-size-complex="14pt"/>
    </style:style>
    <style:style style:name="T7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72" style:parent-style-name="DefaultParagraphFont" style:family="text">
      <style:text-properties style:font-name="Times New Roman" style:font-name-complex="Times New Roman" fo:font-size="14pt" style:font-size-asian="14pt" style:font-size-complex="14pt"/>
    </style:style>
    <style:style style:name="T7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74" style:parent-style-name="DefaultParagraphFont" style:family="text">
      <style:text-properties style:font-name="Times New Roman" style:font-name-complex="Times New Roman" fo:font-size="14pt" style:font-size-asian="14pt" style:font-size-complex="14pt"/>
    </style:style>
    <style:style style:name="T7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76" style:parent-style-name="DefaultParagraphFont" style:family="text">
      <style:text-properties style:font-name="Times New Roman" style:font-name-complex="Times New Roman" fo:font-size="14pt" style:font-size-asian="14pt" style:font-size-complex="14pt"/>
    </style:style>
    <style:style style:name="T777" style:parent-style-name="DefaultParagraphFont" style:family="text">
      <style:text-properties style:font-name="Times New Roman" style:font-name-complex="Times New Roman" fo:font-size="14pt" style:font-size-asian="14pt" style:font-size-complex="14pt"/>
    </style:style>
    <style:style style:name="T7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79" style:parent-style-name="DefaultParagraphFont" style:family="text">
      <style:text-properties style:font-name="Times New Roman" style:font-name-complex="Times New Roman" fo:font-size="14pt" style:font-size-asian="14pt" style:font-size-complex="14pt"/>
    </style:style>
    <style:style style:name="T7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81" style:parent-style-name="DefaultParagraphFont" style:family="text">
      <style:text-properties style:font-name="Times New Roman" style:font-name-complex="Times New Roman" fo:font-size="14pt" style:font-size-asian="14pt" style:font-size-complex="14pt"/>
    </style:style>
    <style:style style:name="T7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83" style:parent-style-name="DefaultParagraphFont" style:family="text">
      <style:text-properties style:font-name="Times New Roman" style:font-name-complex="Times New Roman" fo:font-size="14pt" style:font-size-asian="14pt" style:font-size-complex="14pt"/>
    </style:style>
    <style:style style:name="T784" style:parent-style-name="DefaultParagraphFont" style:family="text">
      <style:text-properties style:font-name="Times New Roman" style:font-name-complex="Times New Roman" fo:font-size="14pt" style:font-size-asian="14pt" style:font-size-complex="14pt"/>
    </style:style>
    <style:style style:name="T7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86" style:parent-style-name="DefaultParagraphFont" style:family="text">
      <style:text-properties style:font-name="Times New Roman" style:font-name-complex="Times New Roman" fo:font-size="14pt" style:font-size-asian="14pt" style:font-size-complex="14pt"/>
    </style:style>
    <style:style style:name="T7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88" style:parent-style-name="DefaultParagraphFont" style:family="text">
      <style:text-properties style:font-name="Times New Roman" style:font-name-complex="Times New Roman" fo:font-size="14pt" style:font-size-asian="14pt" style:font-size-complex="14pt"/>
    </style:style>
    <style:style style:name="P789" style:parent-style-name="Normal" style:family="paragraph">
      <style:text-properties style:font-name="Times New Roman" style:font-name-complex="Times New Roman" fo:font-size="14pt" style:font-size-asian="14pt" style:font-size-complex="14pt"/>
    </style:style>
    <style:style style:name="T7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91" style:parent-style-name="DefaultParagraphFont" style:family="text">
      <style:text-properties style:font-name="Times New Roman" style:font-name-complex="Times New Roman" fo:font-size="14pt" style:font-size-asian="14pt" style:font-size-complex="14pt"/>
    </style:style>
    <style:style style:name="T7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93" style:parent-style-name="Normal" style:family="paragraph">
      <style:text-properties style:font-name="Times New Roman" style:font-name-complex="Times New Roman" fo:font-size="14pt" style:font-size-asian="14pt" style:font-size-complex="14pt"/>
    </style:style>
    <style:style style:name="P794" style:parent-style-name="Normal" style:family="paragraph">
      <style:text-properties style:font-name="Times New Roman" style:font-name-complex="Times New Roman" fo:font-size="14pt" style:font-size-asian="14pt" style:font-size-complex="14pt"/>
    </style:style>
    <style:style style:name="T795" style:parent-style-name="DefaultParagraphFont" style:family="text">
      <style:text-properties style:font-name="Times New Roman" style:font-name-complex="Times New Roman" fo:font-size="14pt" style:font-size-asian="14pt" style:font-size-complex="14pt"/>
    </style:style>
    <style:style style:name="T7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97" style:parent-style-name="DefaultParagraphFont" style:family="text">
      <style:text-properties style:font-name="Times New Roman" style:font-name-complex="Times New Roman" fo:font-size="14pt" style:font-size-asian="14pt" style:font-size-complex="14pt"/>
    </style:style>
    <style:style style:name="T7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99" style:parent-style-name="DefaultParagraphFont" style:family="text">
      <style:text-properties style:font-name="Times New Roman" style:font-name-complex="Times New Roman" fo:font-size="14pt" style:font-size-asian="14pt" style:font-size-complex="14pt"/>
    </style:style>
    <style:style style:name="P800" style:parent-style-name="Normal" style:family="paragraph">
      <style:text-properties style:font-name="Times New Roman" style:font-name-complex="Times New Roman" fo:font-size="14pt" style:font-size-asian="14pt" style:font-size-complex="14pt"/>
    </style:style>
    <style:style style:name="T8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03" style:parent-style-name="Normal" style:family="paragraph">
      <style:text-properties style:font-name="Times New Roman" style:font-name-complex="Times New Roman" fo:font-size="14pt" style:font-size-asian="14pt" style:font-size-complex="14pt"/>
    </style:style>
    <style:style style:name="T804" style:parent-style-name="DefaultParagraphFont" style:family="text">
      <style:text-properties style:font-name="Times New Roman" style:font-name-complex="Times New Roman" fo:font-size="14pt" style:font-size-asian="14pt" style:font-size-complex="14pt"/>
    </style:style>
    <style:style style:name="P805" style:parent-style-name="Normal" style:family="paragraph">
      <style:text-properties style:font-name="Times New Roman" style:font-name-complex="Times New Roman" fo:font-size="14pt" style:font-size-asian="14pt" style:font-size-complex="14pt"/>
    </style:style>
    <style:style style:name="P806" style:parent-style-name="Normal" style:family="paragraph">
      <style:text-properties style:font-name="Times New Roman" style:font-name-complex="Times New Roman" fo:font-size="14pt" style:font-size-asian="14pt" style:font-size-complex="14pt"/>
    </style:style>
    <style:style style:name="P807" style:parent-style-name="Normal" style:family="paragraph">
      <style:text-properties style:font-name="Times New Roman" style:font-name-complex="Times New Roman" fo:font-size="14pt" style:font-size-asian="14pt" style:font-size-complex="14pt"/>
    </style:style>
    <style:style style:name="T8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09" style:parent-style-name="DefaultParagraphFont" style:family="text">
      <style:text-properties style:font-name="Times New Roman" style:font-name-complex="Times New Roman" fo:font-size="14pt" style:font-size-asian="14pt" style:font-size-complex="14pt"/>
    </style:style>
    <style:style style:name="T8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11" style:parent-style-name="Normal" style:family="paragraph">
      <style:text-properties style:font-name="Times New Roman" style:font-name-complex="Times New Roman" fo:font-size="14pt" style:font-size-asian="14pt" style:font-size-complex="14pt"/>
    </style:style>
    <style:style style:name="P812" style:parent-style-name="Normal" style:family="paragraph">
      <style:text-properties style:font-name="Times New Roman" style:font-name-complex="Times New Roman" fo:font-size="14pt" style:font-size-asian="14pt" style:font-size-complex="14pt"/>
    </style:style>
    <style:style style:name="T8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15" style:parent-style-name="Normal" style:family="paragraph">
      <style:text-properties style:font-name="Times New Roman" style:font-name-complex="Times New Roman" fo:font-size="14pt" style:font-size-asian="14pt" style:font-size-complex="14pt"/>
    </style:style>
    <style:style style:name="P816" style:parent-style-name="Normal" style:family="paragraph">
      <style:text-properties style:font-name="Times New Roman" style:font-name-complex="Times New Roman" fo:font-size="14pt" style:font-size-asian="14pt" style:font-size-complex="14pt"/>
    </style:style>
    <style:style style:name="P817" style:parent-style-name="Normal" style:family="paragraph">
      <style:text-properties style:font-name="Times New Roman" style:font-name-complex="Times New Roman" fo:font-size="14pt" style:font-size-asian="14pt" style:font-size-complex="14pt"/>
    </style:style>
    <style:style style:name="T8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19" style:parent-style-name="DefaultParagraphFont" style:family="text">
      <style:text-properties style:font-name="Times New Roman" style:font-name-complex="Times New Roman" fo:font-size="14pt" style:font-size-asian="14pt" style:font-size-complex="14pt"/>
    </style:style>
    <style:style style:name="T8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21" style:parent-style-name="Normal" style:family="paragraph">
      <style:text-properties style:font-name="Times New Roman" style:font-name-complex="Times New Roman" fo:font-size="14pt" style:font-size-asian="14pt" style:font-size-complex="14pt"/>
    </style:style>
    <style:style style:name="T822" style:parent-style-name="DefaultParagraphFont" style:family="text">
      <style:text-properties style:font-name="Times New Roman" style:font-name-complex="Times New Roman" fo:font-size="14pt" style:font-size-asian="14pt" style:font-size-complex="14pt"/>
    </style:style>
    <style:style style:name="T8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24" style:parent-style-name="DefaultParagraphFont" style:family="text">
      <style:text-properties style:font-name="Times New Roman" style:font-name-complex="Times New Roman" fo:font-size="14pt" style:font-size-asian="14pt" style:font-size-complex="14pt"/>
    </style:style>
    <style:style style:name="T825" style:parent-style-name="DefaultParagraphFont" style:family="text">
      <style:text-properties style:font-name="Times New Roman" style:font-name-complex="Times New Roman" fo:font-size="14pt" style:font-size-asian="14pt" style:font-size-complex="14pt"/>
    </style:style>
    <style:style style:name="T8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27" style:parent-style-name="DefaultParagraphFont" style:family="text">
      <style:text-properties style:font-name="Times New Roman" style:font-name-complex="Times New Roman" fo:font-size="14pt" style:font-size-asian="14pt" style:font-size-complex="14pt"/>
    </style:style>
    <style:style style:name="T828" style:parent-style-name="DefaultParagraphFont" style:family="text">
      <style:text-properties style:font-name="Times New Roman" style:font-name-complex="Times New Roman" fo:font-size="14pt" style:font-size-asian="14pt" style:font-size-complex="14pt"/>
    </style:style>
    <style:style style:name="T8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30" style:parent-style-name="DefaultParagraphFont" style:family="text">
      <style:text-properties style:font-name="Times New Roman" style:font-name-complex="Times New Roman" fo:font-size="14pt" style:font-size-asian="14pt" style:font-size-complex="14pt"/>
    </style:style>
    <style:style style:name="P831" style:parent-style-name="Normal" style:family="paragraph">
      <style:text-properties style:font-name="Times New Roman" style:font-name-complex="Times New Roman" fo:font-size="14pt" style:font-size-asian="14pt" style:font-size-complex="14pt"/>
    </style:style>
    <style:style style:name="P832" style:parent-style-name="Normal" style:family="paragraph">
      <style:text-properties style:font-name="Times New Roman" style:font-name-complex="Times New Roman" fo:font-size="14pt" style:font-size-asian="14pt" style:font-size-complex="14pt"/>
    </style:style>
    <style:style style:name="P833" style:parent-style-name="Normal" style:family="paragraph">
      <style:text-properties style:font-name="Times New Roman" style:font-name-complex="Times New Roman" fo:font-size="14pt" style:font-size-asian="14pt" style:font-size-complex="14pt"/>
    </style:style>
    <style:style style:name="P834" style:parent-style-name="Normal" style:family="paragraph">
      <style:text-properties style:font-name="Times New Roman" style:font-name-complex="Times New Roman" fo:font-size="14pt" style:font-size-asian="14pt" style:font-size-complex="14pt"/>
    </style:style>
    <style:style style:name="P835" style:parent-style-name="Normal" style:family="paragraph">
      <style:text-properties style:font-name="Times New Roman" style:font-name-complex="Times New Roman" fo:font-size="14pt" style:font-size-asian="14pt" style:font-size-complex="14pt"/>
    </style:style>
    <style:style style:name="T8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38" style:parent-style-name="Normal" style:family="paragraph">
      <style:text-properties style:font-name="Times New Roman" style:font-name-complex="Times New Roman" fo:font-size="14pt" style:font-size-asian="14pt" style:font-size-complex="14pt"/>
    </style:style>
    <style:style style:name="P839" style:parent-style-name="Normal" style:family="paragraph">
      <style:text-properties style:font-name="Times New Roman" style:font-name-complex="Times New Roman" fo:font-size="14pt" style:font-size-asian="14pt" style:font-size-complex="14pt"/>
    </style:style>
    <style:style style:name="P840" style:parent-style-name="Normal" style:family="paragraph">
      <style:text-properties style:font-name="Times New Roman" style:font-name-complex="Times New Roman" fo:font-size="14pt" style:font-size-asian="14pt" style:font-size-complex="14pt"/>
    </style:style>
    <style:style style:name="T8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42" style:parent-style-name="DefaultParagraphFont" style:family="text">
      <style:text-properties style:font-name="Times New Roman" style:font-name-complex="Times New Roman" fo:font-size="14pt" style:font-size-asian="14pt" style:font-size-complex="14pt"/>
    </style:style>
    <style:style style:name="T8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44" style:parent-style-name="Normal" style:family="paragraph">
      <style:text-properties style:font-name="Times New Roman" style:font-name-complex="Times New Roman" fo:font-size="14pt" style:font-size-asian="14pt" style:font-size-complex="14pt"/>
    </style:style>
    <style:style style:name="T845" style:parent-style-name="DefaultParagraphFont" style:family="text">
      <style:text-properties style:font-name="Times New Roman" style:font-name-complex="Times New Roman" fo:font-size="14pt" style:font-size-asian="14pt" style:font-size-complex="14pt"/>
    </style:style>
    <style:style style:name="T846" style:parent-style-name="Hyperlink" style:family="text">
      <style:text-properties style:font-name="Times New Roman" style:font-name-complex="Times New Roman" fo:font-size="14pt" style:font-size-asian="14pt" style:font-size-complex="14pt"/>
    </style:style>
    <style:style style:name="T8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49" style:parent-style-name="Normal" style:family="paragraph">
      <style:text-properties style:font-name="Times New Roman" style:font-name-complex="Times New Roman" fo:font-size="14pt" style:font-size-asian="14pt" style:font-size-complex="14pt"/>
    </style:style>
    <style:style style:name="P850" style:parent-style-name="Normal" style:family="paragraph">
      <style:text-properties style:font-name="Times New Roman" style:font-name-complex="Times New Roman" fo:font-size="14pt" style:font-size-asian="14pt" style:font-size-complex="14pt"/>
    </style:style>
    <style:style style:name="P851" style:parent-style-name="Normal" style:family="paragraph">
      <style:text-properties style:font-name="Times New Roman" style:font-name-complex="Times New Roman" fo:font-size="14pt" style:font-size-asian="14pt" style:font-size-complex="14pt"/>
    </style:style>
    <style:style style:name="T8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53" style:parent-style-name="DefaultParagraphFont" style:family="text">
      <style:text-properties style:font-name="Times New Roman" style:font-name-complex="Times New Roman" fo:font-size="14pt" style:font-size-asian="14pt" style:font-size-complex="14pt"/>
    </style:style>
    <style:style style:name="T8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55" style:parent-style-name="Normal" style:family="paragraph">
      <style:text-properties style:font-name="Times New Roman" style:font-name-complex="Times New Roman" fo:font-size="14pt" style:font-size-asian="14pt" style:font-size-complex="14pt"/>
    </style:style>
    <style:style style:name="P856" style:parent-style-name="Normal" style:family="paragraph">
      <style:text-properties style:font-name="Times New Roman" style:font-name-complex="Times New Roman" fo:font-size="14pt" style:font-size-asian="14pt" style:font-size-complex="14pt"/>
    </style:style>
    <style:style style:name="T857" style:parent-style-name="DefaultParagraphFont" style:family="text">
      <style:text-properties style:font-name="Times New Roman" style:font-name-complex="Times New Roman" fo:font-size="14pt" style:font-size-asian="14pt" style:font-size-complex="14pt"/>
    </style:style>
    <style:style style:name="P858" style:parent-style-name="Normal" style:family="paragraph">
      <style:text-properties style:font-name="Times New Roman" style:font-name-complex="Times New Roman" fo:font-size="14pt" style:font-size-asian="14pt" style:font-size-complex="14pt"/>
    </style:style>
    <style:style style:name="T8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61" style:parent-style-name="Normal" style:family="paragraph">
      <style:text-properties style:font-name="Times New Roman" style:font-name-complex="Times New Roman" fo:font-size="14pt" style:font-size-asian="14pt" style:font-size-complex="14pt"/>
    </style:style>
    <style:style style:name="T862" style:parent-style-name="DefaultParagraphFont" style:family="text">
      <style:text-properties style:font-name="Times New Roman" style:font-name-complex="Times New Roman" fo:font-size="14pt" style:font-size-asian="14pt" style:font-size-complex="14pt"/>
    </style:style>
    <style:style style:name="P863" style:parent-style-name="Normal" style:family="paragraph">
      <style:text-properties style:font-name="Times New Roman" style:font-name-complex="Times New Roman" fo:font-size="14pt" style:font-size-asian="14pt" style:font-size-complex="14pt"/>
    </style:style>
    <style:style style:name="T8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65" style:parent-style-name="Normal" style:family="paragraph">
      <style:text-properties style:font-name="Times New Roman" style:font-name-complex="Times New Roman" fo:font-size="14pt" style:font-size-asian="14pt" style:font-size-complex="14pt"/>
    </style:style>
    <style:style style:name="T8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67" style:parent-style-name="Normal" style:family="paragraph">
      <style:text-properties style:font-name="Times New Roman" style:font-name-complex="Times New Roman" fo:font-size="14pt" style:font-size-asian="14pt" style:font-size-complex="14pt"/>
    </style:style>
    <style:style style:name="T8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70" style:parent-style-name="Normal" style:family="paragraph">
      <style:text-properties style:font-name="Times New Roman" style:font-name-complex="Times New Roman" fo:font-size="14pt" style:font-size-asian="14pt" style:font-size-complex="14pt"/>
    </style:style>
    <style:style style:name="P871" style:parent-style-name="Normal" style:family="paragraph">
      <style:text-properties style:font-name="Times New Roman" style:font-name-complex="Times New Roman" fo:font-size="14pt" style:font-size-asian="14pt" style:font-size-complex="14pt"/>
    </style:style>
    <style:style style:name="P872" style:parent-style-name="Normal" style:family="paragraph">
      <style:text-properties style:font-name="Times New Roman" style:font-name-complex="Times New Roman" fo:font-size="14pt" style:font-size-asian="14pt" style:font-size-complex="14pt"/>
    </style:style>
    <style:style style:name="T8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74" style:parent-style-name="DefaultParagraphFont" style:family="text">
      <style:text-properties style:font-name="Times New Roman" style:font-name-complex="Times New Roman" fo:font-size="14pt" style:font-size-asian="14pt" style:font-size-complex="14pt"/>
    </style:style>
    <style:style style:name="T8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76" style:parent-style-name="Normal" style:family="paragraph">
      <style:text-properties style:font-name="Times New Roman" style:font-name-complex="Times New Roman" fo:font-size="14pt" style:font-size-asian="14pt" style:font-size-complex="14pt"/>
    </style:style>
    <style:style style:name="T877" style:parent-style-name="DefaultParagraphFont" style:family="text">
      <style:text-properties style:font-name="Times New Roman" style:font-name-complex="Times New Roman" fo:font-size="14pt" style:font-size-asian="14pt" style:font-size-complex="14pt"/>
    </style:style>
    <style:style style:name="P878" style:parent-style-name="Normal" style:family="paragraph">
      <style:text-properties style:font-name="Times New Roman" style:font-name-complex="Times New Roman" fo:font-size="14pt" style:font-size-asian="14pt" style:font-size-complex="14pt"/>
    </style:style>
    <style:style style:name="T879" style:parent-style-name="DefaultParagraphFont" style:family="text">
      <style:text-properties style:font-name="Times New Roman" style:font-name-complex="Times New Roman" fo:font-size="14pt" style:font-size-asian="14pt" style:font-size-complex="14pt"/>
    </style:style>
    <style:style style:name="T8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82" style:parent-style-name="Normal" style:family="paragraph">
      <style:text-properties style:font-name="Times New Roman" style:font-name-complex="Times New Roman" fo:font-size="14pt" style:font-size-asian="14pt" style:font-size-complex="14pt"/>
    </style:style>
    <style:style style:name="T883" style:parent-style-name="DefaultParagraphFont" style:family="text">
      <style:text-properties style:font-name="Times New Roman" style:font-name-complex="Times New Roman" fo:font-size="14pt" style:font-size-asian="14pt" style:font-size-complex="14pt"/>
    </style:style>
    <style:style style:name="P884" style:parent-style-name="Normal" style:family="paragraph">
      <style:text-properties style:font-name="Times New Roman" style:font-name-complex="Times New Roman" fo:font-size="14pt" style:font-size-asian="14pt" style:font-size-complex="14pt"/>
    </style:style>
    <style:style style:name="P885" style:parent-style-name="Normal" style:family="paragraph">
      <style:text-properties style:font-name="Times New Roman" style:font-name-complex="Times New Roman" fo:font-size="14pt" style:font-size-asian="14pt" style:font-size-complex="14pt"/>
    </style:style>
    <style:style style:name="P886" style:parent-style-name="Normal" style:family="paragraph">
      <style:text-properties style:font-name="Times New Roman" style:font-name-complex="Times New Roman" fo:font-size="14pt" style:font-size-asian="14pt" style:font-size-complex="14pt"/>
    </style:style>
    <style:style style:name="T8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8" style:parent-style-name="DefaultParagraphFont" style:family="text">
      <style:text-properties style:font-name="Times New Roman" style:font-name-complex="Times New Roman" fo:font-size="14pt" style:font-size-asian="14pt" style:font-size-complex="14pt"/>
    </style:style>
    <style:style style:name="T8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90" style:parent-style-name="Normal" style:family="paragraph">
      <style:text-properties style:font-name="Times New Roman" style:font-name-complex="Times New Roman" fo:font-size="14pt" style:font-size-asian="14pt" style:font-size-complex="14pt"/>
    </style:style>
    <style:style style:name="T891" style:parent-style-name="DefaultParagraphFont" style:family="text">
      <style:text-properties style:font-name="Times New Roman" style:font-name-complex="Times New Roman" fo:font-size="14pt" style:font-size-asian="14pt" style:font-size-complex="14pt"/>
    </style:style>
    <style:style style:name="T8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93" style:parent-style-name="DefaultParagraphFont" style:family="text">
      <style:text-properties style:font-name="Times New Roman" style:font-name-complex="Times New Roman" fo:font-size="14pt" style:font-size-asian="14pt" style:font-size-complex="14pt"/>
    </style:style>
    <style:style style:name="T8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95" style:parent-style-name="DefaultParagraphFont" style:family="text">
      <style:text-properties style:font-name="Times New Roman" style:font-name-complex="Times New Roman" fo:font-size="14pt" style:font-size-asian="14pt" style:font-size-complex="14pt"/>
    </style:style>
    <style:style style:name="T8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98" style:parent-style-name="Normal" style:family="paragraph">
      <style:text-properties style:font-name="Times New Roman" style:font-name-complex="Times New Roman" fo:font-size="14pt" style:font-size-asian="14pt" style:font-size-complex="14pt"/>
    </style:style>
    <style:style style:name="P899" style:parent-style-name="Normal" style:family="paragraph">
      <style:text-properties style:font-name="Times New Roman" style:font-name-complex="Times New Roman" fo:font-size="14pt" style:font-size-asian="14pt" style:font-size-complex="14pt"/>
    </style:style>
    <style:style style:name="P900" style:parent-style-name="Normal" style:family="paragraph">
      <style:text-properties style:font-name="Times New Roman" style:font-name-complex="Times New Roman" fo:font-size="14pt" style:font-size-asian="14pt" style:font-size-complex="14pt"/>
    </style:style>
    <style:style style:name="T9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02" style:parent-style-name="DefaultParagraphFont" style:family="text">
      <style:text-properties style:font-name="Times New Roman" style:font-name-complex="Times New Roman" fo:font-size="14pt" style:font-size-asian="14pt" style:font-size-complex="14pt"/>
    </style:style>
    <style:style style:name="T9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04" style:parent-style-name="Normal" style:family="paragraph">
      <style:text-properties style:font-name="Times New Roman" style:font-name-complex="Times New Roman" fo:font-size="14pt" style:font-size-asian="14pt" style:font-size-complex="14pt"/>
    </style:style>
    <style:style style:name="T9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07" style:parent-style-name="Normal" style:family="paragraph">
      <style:text-properties style:font-name="Times New Roman" style:font-name-complex="Times New Roman" fo:font-size="14pt" style:font-size-asian="14pt" style:font-size-complex="14pt"/>
    </style:style>
    <style:style style:name="P908" style:parent-style-name="Normal" style:family="paragraph">
      <style:text-properties style:font-name="Times New Roman" style:font-name-complex="Times New Roman" fo:font-size="14pt" style:font-size-asian="14pt" style:font-size-complex="14pt"/>
    </style:style>
    <style:style style:name="P909" style:parent-style-name="Normal" style:family="paragraph">
      <style:text-properties style:font-name="Times New Roman" style:font-name-complex="Times New Roman" fo:font-size="14pt" style:font-size-asian="14pt" style:font-size-complex="14pt"/>
    </style:style>
    <style:style style:name="T9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11" style:parent-style-name="DefaultParagraphFont" style:family="text">
      <style:text-properties style:font-name="Times New Roman" style:font-name-complex="Times New Roman" fo:font-size="14pt" style:font-size-asian="14pt" style:font-size-complex="14pt"/>
    </style:style>
    <style:style style:name="T9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14" style:parent-style-name="DefaultParagraphFont" style:family="text">
      <style:text-properties style:font-name="Times New Roman" style:font-name-complex="Times New Roman" fo:font-size="14pt" style:font-size-asian="14pt" style:font-size-complex="14pt"/>
    </style:style>
    <style:style style:name="P915" style:parent-style-name="Normal" style:family="paragraph">
      <style:text-properties style:font-name="Times New Roman" style:font-name-complex="Times New Roman" fo:font-size="14pt" style:font-size-asian="14pt" style:font-size-complex="14pt"/>
    </style:style>
    <style:style style:name="T9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18" style:parent-style-name="Normal" style:family="paragraph">
      <style:text-properties style:font-name="Times New Roman" style:font-name-complex="Times New Roman" fo:font-size="14pt" style:font-size-asian="14pt" style:font-size-complex="14pt"/>
    </style:style>
    <style:style style:name="T919" style:parent-style-name="DefaultParagraphFont" style:family="text">
      <style:text-properties style:font-name="Times New Roman" style:font-name-complex="Times New Roman" fo:font-size="14pt" style:font-size-asian="14pt" style:font-size-complex="14pt"/>
    </style:style>
    <style:style style:name="T920" style:parent-style-name="DefaultParagraphFont" style:family="text">
      <style:text-properties style:font-name="Times New Roman" style:font-name-complex="Times New Roman" fo:font-size="14pt" style:font-size-asian="14pt" style:font-size-complex="14pt"/>
    </style:style>
    <style:style style:name="T9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23" style:parent-style-name="Normal" style:family="paragraph">
      <style:text-properties style:font-name="Times New Roman" style:font-name-complex="Times New Roman" fo:font-size="14pt" style:font-size-asian="14pt" style:font-size-complex="14pt"/>
    </style:style>
    <style:style style:name="T9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25" style:parent-style-name="Normal" style:family="paragraph">
      <style:text-properties style:font-name="Times New Roman" style:font-name-complex="Times New Roman" fo:font-size="14pt" style:font-size-asian="14pt" style:font-size-complex="14pt"/>
    </style:style>
    <style:style style:name="T9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28" style:parent-style-name="Normal" style:family="paragraph">
      <style:text-properties style:font-name="Times New Roman" style:font-name-complex="Times New Roman" fo:font-size="14pt" style:font-size-asian="14pt" style:font-size-complex="14pt"/>
    </style:style>
    <style:style style:name="P929" style:parent-style-name="Normal" style:family="paragraph">
      <style:text-properties style:font-name="Times New Roman" style:font-name-complex="Times New Roman" fo:font-size="14pt" style:font-size-asian="14pt" style:font-size-complex="14pt" fo:language="it" fo:country="IT"/>
    </style:style>
    <style:style style:name="P930" style:parent-style-name="Normal" style:family="paragraph">
      <style:text-properties style:font-name="Times New Roman" style:font-name-complex="Times New Roman" fo:font-size="14pt" style:font-size-asian="14pt" style:font-size-complex="14pt" fo:language="it" fo:country="IT"/>
    </style:style>
    <style:style style:name="T9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2" style:parent-style-name="DefaultParagraphFont" style:family="text">
      <style:text-properties style:font-name="Times New Roman" style:font-name-complex="Times New Roman" fo:font-size="14pt" style:font-size-asian="14pt" style:font-size-complex="14pt"/>
    </style:style>
    <style:style style:name="T9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34" style:parent-style-name="Normal" style:family="paragraph">
      <style:text-properties style:font-name="Times New Roman" style:font-name-complex="Times New Roman" fo:font-size="14pt" style:font-size-asian="14pt" style:font-size-complex="14pt"/>
    </style:style>
    <style:style style:name="T9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37" style:parent-style-name="Normal" style:family="paragraph">
      <style:text-properties style:font-name="Times New Roman" style:font-name-complex="Times New Roman" fo:font-size="14pt" style:font-size-asian="14pt" style:font-size-complex="14pt"/>
    </style:style>
    <style:style style:name="T938" style:parent-style-name="DefaultParagraphFont" style:family="text">
      <style:text-properties style:font-name="Times New Roman" style:font-name-complex="Times New Roman" fo:font-size="14pt" style:font-size-asian="14pt" style:font-size-complex="14pt"/>
    </style:style>
    <style:style style:name="P939" style:parent-style-name="Normal" style:family="paragraph">
      <style:text-properties style:font-name="Times New Roman" style:font-name-complex="Times New Roman" fo:font-size="14pt" style:font-size-asian="14pt" style:font-size-complex="14pt"/>
    </style:style>
    <style:style style:name="P940" style:parent-style-name="Normal" style:family="paragraph">
      <style:text-properties style:font-name="Times New Roman" style:font-name-complex="Times New Roman" fo:font-size="14pt" style:font-size-asian="14pt" style:font-size-complex="14pt"/>
    </style:style>
    <style:style style:name="P941" style:parent-style-name="Normal" style:family="paragraph">
      <style:text-properties style:font-name="Times New Roman" style:font-name-complex="Times New Roman" fo:font-size="14pt" style:font-size-asian="14pt" style:font-size-complex="14pt"/>
    </style:style>
    <style:style style:name="T9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43" style:parent-style-name="DefaultParagraphFont" style:family="text">
      <style:text-properties style:font-name="Times New Roman" style:font-name-complex="Times New Roman" fo:font-size="14pt" style:font-size-asian="14pt" style:font-size-complex="14pt"/>
    </style:style>
    <style:style style:name="T9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45" style:parent-style-name="Normal" style:family="paragraph">
      <style:text-properties style:font-name="Times New Roman" style:font-name-complex="Times New Roman" fo:font-size="14pt" style:font-size-asian="14pt" style:font-size-complex="14pt"/>
    </style:style>
    <style:style style:name="T9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48" style:parent-style-name="Normal" style:family="paragraph">
      <style:text-properties style:font-name="Times New Roman" style:font-name-complex="Times New Roman" fo:font-size="14pt" style:font-size-asian="14pt" style:font-size-complex="14pt"/>
    </style:style>
    <style:style style:name="P949" style:parent-style-name="Normal" style:family="paragraph">
      <style:text-properties style:font-name="Times New Roman" style:font-name-complex="Times New Roman" fo:font-size="14pt" style:font-size-asian="14pt" style:font-size-complex="14pt"/>
    </style:style>
    <style:style style:name="P950" style:parent-style-name="Normal" style:family="paragraph">
      <style:text-properties style:font-name="Times New Roman" style:font-name-complex="Times New Roman" fo:font-size="14pt" style:font-size-asian="14pt" style:font-size-complex="14pt"/>
    </style:style>
    <style:style style:name="T9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2" style:parent-style-name="DefaultParagraphFont" style:family="text">
      <style:text-properties style:font-name="Times New Roman" style:font-name-complex="Times New Roman" fo:font-size="14pt" style:font-size-asian="14pt" style:font-size-complex="14pt"/>
    </style:style>
    <style:style style:name="T9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4" style:parent-style-name="DefaultParagraphFont" style:family="text">
      <style:text-properties style:font-name="Times New Roman" style:font-name-complex="Times New Roman" fo:font-size="14pt" style:font-size-asian="14pt" style:font-size-complex="14pt"/>
    </style:style>
    <style:style style:name="T9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6" style:parent-style-name="DefaultParagraphFont" style:family="text">
      <style:text-properties style:font-name="Times New Roman" style:font-name-complex="Times New Roman" fo:font-size="14pt" style:font-size-asian="14pt" style:font-size-complex="14pt"/>
    </style:style>
    <style:style style:name="T9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8" style:parent-style-name="DefaultParagraphFont" style:family="text">
      <style:text-properties style:font-name="Times New Roman" style:font-name-complex="Times New Roman" fo:font-size="14pt" style:font-size-asian="14pt" style:font-size-complex="14pt"/>
    </style:style>
    <style:style style:name="T9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61" style:parent-style-name="Normal" style:family="paragraph">
      <style:text-properties style:font-name="Times New Roman" style:font-name-complex="Times New Roman" fo:font-size="14pt" style:font-size-asian="14pt" style:font-size-complex="14pt"/>
    </style:style>
    <style:style style:name="P962" style:parent-style-name="Normal" style:family="paragraph">
      <style:text-properties style:font-name="Times New Roman" style:font-name-complex="Times New Roman" fo:font-size="14pt" style:font-size-asian="14pt" style:font-size-complex="14pt"/>
    </style:style>
    <style:style style:name="P963" style:parent-style-name="Normal" style:family="paragraph">
      <style:text-properties style:font-name="Times New Roman" style:font-name-complex="Times New Roman" fo:font-size="14pt" style:font-size-asian="14pt" style:font-size-complex="14pt"/>
    </style:style>
    <style:style style:name="T9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65" style:parent-style-name="DefaultParagraphFont" style:family="text">
      <style:text-properties style:font-name="Times New Roman" style:font-name-complex="Times New Roman" fo:font-size="14pt" style:font-size-asian="14pt" style:font-size-complex="14pt"/>
    </style:style>
    <style:style style:name="T9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67" style:parent-style-name="Normal" style:family="paragraph">
      <style:text-properties style:font-name="Times New Roman" style:font-name-complex="Times New Roman" fo:font-size="14pt" style:font-size-asian="14pt" style:font-size-complex="14pt"/>
    </style:style>
    <style:style style:name="P968" style:parent-style-name="Normal" style:family="paragraph">
      <style:text-properties style:font-name="Times New Roman" style:font-name-complex="Times New Roman" fo:font-size="14pt" style:font-size-asian="14pt" style:font-size-complex="14pt"/>
    </style:style>
    <style:style style:name="P969" style:parent-style-name="Normal" style:family="paragraph">
      <style:text-properties style:font-name="Times New Roman" style:font-name-complex="Times New Roman" fo:font-size="14pt" style:font-size-asian="14pt" style:font-size-complex="14pt"/>
    </style:style>
    <style:style style:name="T9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72" style:parent-style-name="Normal" style:family="paragraph">
      <style:text-properties style:font-name="Times New Roman" style:font-name-complex="Times New Roman" fo:font-size="14pt" style:font-size-asian="14pt" style:font-size-complex="14pt"/>
    </style:style>
    <style:style style:name="P973" style:parent-style-name="Normal" style:family="paragraph">
      <style:text-properties style:font-name="Times New Roman" style:font-name-complex="Times New Roman" fo:font-size="14pt" style:font-size-asian="14pt" style:font-size-complex="14pt"/>
    </style:style>
    <style:style style:name="P974" style:parent-style-name="Normal" style:family="paragraph">
      <style:text-properties style:font-name="Times New Roman" style:font-name-complex="Times New Roman" fo:font-size="14pt" style:font-size-asian="14pt" style:font-size-complex="14pt"/>
    </style:style>
    <style:style style:name="T9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76" style:parent-style-name="DefaultParagraphFont" style:family="text">
      <style:text-properties style:font-name="Times New Roman" style:font-name-complex="Times New Roman" fo:font-size="14pt" style:font-size-asian="14pt" style:font-size-complex="14pt"/>
    </style:style>
    <style:style style:name="T9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79" style:parent-style-name="DefaultParagraphFont" style:family="text">
      <style:text-properties style:font-name="Times New Roman" style:font-name-complex="Times New Roman" fo:font-size="14pt" style:font-size-asian="14pt" style:font-size-complex="14pt"/>
    </style:style>
    <style:style style:name="T980" style:parent-style-name="DefaultParagraphFont" style:family="text">
      <style:text-properties style:font-name="Times New Roman" style:font-name-complex="Times New Roman" fo:font-size="14pt" style:font-size-asian="14pt" style:font-size-complex="14pt"/>
    </style:style>
    <style:style style:name="T981"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982" style:parent-style-name="DefaultParagraphFont" style:family="text">
      <style:text-properties style:font-name="Times New Roman" style:font-name-complex="Times New Roman" fo:font-size="14pt" style:font-size-asian="14pt" style:font-size-complex="14pt"/>
    </style:style>
    <style:style style:name="T983" style:parent-style-name="DefaultParagraphFont" style:family="text">
      <style:text-properties style:font-name="Times New Roman" style:font-name-complex="Times New Roman" fo:font-size="14pt" style:font-size-asian="14pt" style:font-size-complex="14pt"/>
    </style:style>
    <style:style style:name="T984" style:parent-style-name="Hyperlink" style:family="text">
      <style:text-properties style:font-name="Times New Roman" style:font-name-complex="Times New Roman" fo:font-size="14pt" style:font-size-asian="14pt" style:font-size-complex="14pt"/>
    </style:style>
    <style:style style:name="P985" style:parent-style-name="Normal" style:family="paragraph">
      <style:text-properties style:font-name="Times New Roman" style:font-name-complex="Times New Roman" fo:font-size="14pt" style:font-size-asian="14pt" style:font-size-complex="14pt"/>
    </style:style>
    <style:style style:name="T9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88" style:parent-style-name="Normal" style:family="paragraph">
      <style:text-properties style:font-name="Times New Roman" style:font-name-complex="Times New Roman" fo:font-size="14pt" style:font-size-asian="14pt" style:font-size-complex="14pt"/>
    </style:style>
    <style:style style:name="P989" style:parent-style-name="Normal" style:family="paragraph">
      <style:text-properties style:font-name="Times New Roman" style:font-name-complex="Times New Roman" fo:font-size="14pt" style:font-size-asian="14pt" style:font-size-complex="14pt"/>
    </style:style>
    <style:style style:name="P990" style:parent-style-name="Normal" style:family="paragraph">
      <style:text-properties style:font-name="Times New Roman" style:font-name-complex="Times New Roman" fo:font-size="14pt" style:font-size-asian="14pt" style:font-size-complex="14pt"/>
    </style:style>
    <style:style style:name="T9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92" style:parent-style-name="DefaultParagraphFont" style:family="text">
      <style:text-properties style:font-name="Times New Roman" style:font-name-complex="Times New Roman" fo:font-size="14pt" style:font-size-asian="14pt" style:font-size-complex="14pt"/>
    </style:style>
    <style:style style:name="T9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94" style:parent-style-name="Normal" style:family="paragraph">
      <style:text-properties style:font-name="Times New Roman" style:font-name-complex="Times New Roman" fo:font-size="14pt" style:font-size-asian="14pt" style:font-size-complex="14pt"/>
    </style:style>
    <style:style style:name="P995" style:parent-style-name="Normal" style:family="paragraph">
      <style:text-properties style:font-name="Times New Roman" style:font-name-complex="Times New Roman" fo:font-size="14pt" style:font-size-asian="14pt" style:font-size-complex="14pt"/>
    </style:style>
    <style:style style:name="P996" style:parent-style-name="Normal" style:family="paragraph">
      <style:text-properties style:font-name="Times New Roman" style:font-name-complex="Times New Roman" fo:font-size="14pt" style:font-size-asian="14pt" style:font-size-complex="14pt"/>
    </style:style>
    <style:style style:name="P997" style:parent-style-name="Normal" style:family="paragraph">
      <style:text-properties style:font-name="Times New Roman" style:font-name-complex="Times New Roman" fo:font-size="14pt" style:font-size-asian="14pt" style:font-size-complex="14pt"/>
    </style:style>
    <style:style style:name="T9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00" style:parent-style-name="Normal" style:family="paragraph">
      <style:text-properties style:font-name="Times New Roman" style:font-name-complex="Times New Roman" fo:font-size="14pt" style:font-size-asian="14pt" style:font-size-complex="14pt"/>
    </style:style>
    <style:style style:name="P1001" style:parent-style-name="Normal" style:family="paragraph">
      <style:text-properties style:font-name="Times New Roman" style:font-name-complex="Times New Roman" fo:font-size="14pt" style:font-size-asian="14pt" style:font-size-complex="14pt"/>
    </style:style>
    <style:style style:name="P1002" style:parent-style-name="Normal" style:family="paragraph">
      <style:text-properties style:font-name="Times New Roman" style:font-name-complex="Times New Roman" fo:font-size="14pt" style:font-size-asian="14pt" style:font-size-complex="14pt"/>
    </style:style>
    <style:style style:name="T10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04" style:parent-style-name="DefaultParagraphFont" style:family="text">
      <style:text-properties style:font-name="Times New Roman" style:font-name-complex="Times New Roman" fo:font-size="14pt" style:font-size-asian="14pt" style:font-size-complex="14pt"/>
    </style:style>
    <style:style style:name="T10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06" style:parent-style-name="DefaultParagraphFont" style:family="text">
      <style:text-properties style:font-name="Times New Roman" style:font-name-complex="Times New Roman" fo:font-size="14pt" style:font-size-asian="14pt" style:font-size-complex="14pt"/>
    </style:style>
    <style:style style:name="T10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08" style:parent-style-name="DefaultParagraphFont" style:family="text">
      <style:text-properties style:font-name="Times New Roman" style:font-name-complex="Times New Roman" fo:font-size="14pt" style:font-size-asian="14pt" style:font-size-complex="14pt"/>
    </style:style>
    <style:style style:name="T1009" style:parent-style-name="DefaultParagraphFont" style:family="text">
      <style:text-properties style:font-name="Times New Roman" style:font-name-complex="Times New Roman" fo:font-size="14pt" style:font-size-asian="14pt" style:font-size-complex="14pt"/>
    </style:style>
    <style:style style:name="T1010" style:parent-style-name="DefaultParagraphFont" style:family="text">
      <style:text-properties style:font-name="Times New Roman" style:font-name-complex="Times New Roman" fo:font-size="14pt" style:font-size-asian="14pt" style:font-size-complex="14pt"/>
    </style:style>
    <style:style style:name="T1011" style:parent-style-name="Hyperlink" style:family="text">
      <style:text-properties style:font-name="Times New Roman" style:font-name-complex="Times New Roman" fo:font-size="14pt" style:font-size-asian="14pt" style:font-size-complex="14pt"/>
    </style:style>
    <style:style style:name="T10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14" style:parent-style-name="Normal" style:family="paragraph">
      <style:text-properties style:font-name="Times New Roman" style:font-name-complex="Times New Roman" fo:font-size="14pt" style:font-size-asian="14pt" style:font-size-complex="14pt"/>
    </style:style>
    <style:style style:name="P1015" style:parent-style-name="Normal" style:family="paragraph">
      <style:text-properties style:font-name="Times New Roman" style:font-name-complex="Times New Roman" fo:font-size="14pt" style:font-size-asian="14pt" style:font-size-complex="14pt"/>
    </style:style>
    <style:style style:name="P1016" style:parent-style-name="Normal" style:family="paragraph">
      <style:text-properties style:font-name="Times New Roman" style:font-name-complex="Times New Roman" fo:font-size="14pt" style:font-size-asian="14pt" style:font-size-complex="14pt"/>
    </style:style>
    <style:style style:name="T10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18" style:parent-style-name="DefaultParagraphFont" style:family="text">
      <style:text-properties style:font-name="Times New Roman" style:font-name-complex="Times New Roman" fo:font-size="14pt" style:font-size-asian="14pt" style:font-size-complex="14pt"/>
    </style:style>
    <style:style style:name="T10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0" style:parent-style-name="DefaultParagraphFont" style:family="text">
      <style:text-properties style:font-name="Times New Roman" style:font-name-complex="Times New Roman" fo:font-size="14pt" style:font-size-asian="14pt" style:font-size-complex="14pt"/>
    </style:style>
    <style:style style:name="T10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2" style:parent-style-name="DefaultParagraphFont" style:family="text">
      <style:text-properties style:font-name="Times New Roman" style:font-name-complex="Times New Roman" fo:font-size="14pt" style:font-size-asian="14pt" style:font-size-complex="14pt"/>
    </style:style>
    <style:style style:name="T1023" style:parent-style-name="DefaultParagraphFont" style:family="text">
      <style:text-properties style:font-name="Times New Roman" style:font-name-complex="Times New Roman" fo:font-size="14pt" style:font-size-asian="14pt" style:font-size-complex="14pt"/>
    </style:style>
    <style:style style:name="T1024" style:parent-style-name="Hyperlink" style:family="text">
      <style:text-properties style:font-name="Times New Roman" style:font-name-complex="Times New Roman" fo:font-size="14pt" style:font-size-asian="14pt" style:font-size-complex="14pt"/>
    </style:style>
    <style:style style:name="T10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27" style:parent-style-name="Normal" style:family="paragraph">
      <style:text-properties style:font-name="Times New Roman" style:font-name-complex="Times New Roman" fo:font-size="14pt" style:font-size-asian="14pt" style:font-size-complex="14pt"/>
    </style:style>
    <style:style style:name="P1028" style:parent-style-name="Normal" style:family="paragraph">
      <style:text-properties style:font-name="Times New Roman" style:font-name-complex="Times New Roman" fo:font-size="14pt" style:font-size-asian="14pt" style:font-size-complex="14pt"/>
    </style:style>
    <style:style style:name="P1029" style:parent-style-name="Normal" style:family="paragraph">
      <style:text-properties style:font-name="Times New Roman" style:font-name-complex="Times New Roman" fo:font-size="14pt" style:font-size-asian="14pt" style:font-size-complex="14pt"/>
    </style:style>
    <style:style style:name="T10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31" style:parent-style-name="DefaultParagraphFont" style:family="text">
      <style:text-properties style:font-name="Times New Roman" style:font-name-complex="Times New Roman" fo:font-size="14pt" style:font-size-asian="14pt" style:font-size-complex="14pt"/>
    </style:style>
    <style:style style:name="T10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33" style:parent-style-name="Normal" style:family="paragraph">
      <style:text-properties style:font-name="Times New Roman" style:font-name-complex="Times New Roman" fo:font-size="14pt" style:font-size-asian="14pt" style:font-size-complex="14pt"/>
    </style:style>
    <style:style style:name="P1034" style:parent-style-name="Normal" style:family="paragraph">
      <style:text-properties style:font-name="Times New Roman" style:font-name-complex="Times New Roman" fo:font-size="14pt" style:font-size-asian="14pt" style:font-size-complex="14pt"/>
    </style:style>
    <style:style style:name="P1035" style:parent-style-name="Normal" style:family="paragraph">
      <style:text-properties style:font-name="Times New Roman" style:font-name-complex="Times New Roman" fo:font-size="14pt" style:font-size-asian="14pt" style:font-size-complex="14pt"/>
    </style:style>
    <style:style style:name="P1036" style:parent-style-name="Normal" style:family="paragraph">
      <style:text-properties style:font-name="Times New Roman" style:font-name-complex="Times New Roman" fo:font-size="14pt" style:font-size-asian="14pt" style:font-size-complex="14pt"/>
    </style:style>
    <style:style style:name="P1037" style:parent-style-name="Normal" style:family="paragraph">
      <style:text-properties style:font-name="Times New Roman" style:font-name-complex="Times New Roman" fo:font-size="14pt" style:font-size-asian="14pt" style:font-size-complex="14pt"/>
    </style:style>
    <style:style style:name="T10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40" style:parent-style-name="Normal" style:family="paragraph">
      <style:text-properties style:font-name="Times New Roman" style:font-name-complex="Times New Roman" fo:font-size="14pt" style:font-size-asian="14pt" style:font-size-complex="14pt"/>
    </style:style>
    <style:style style:name="P1041" style:parent-style-name="Normal" style:family="paragraph">
      <style:text-properties style:font-name="Times New Roman" style:font-name-complex="Times New Roman" fo:font-size="14pt" style:font-size-asian="14pt" style:font-size-complex="14pt"/>
    </style:style>
    <style:style style:name="P1042" style:parent-style-name="Normal" style:family="paragraph">
      <style:text-properties style:font-name="Times New Roman" style:font-name-complex="Times New Roman" fo:font-size="14pt" style:font-size-asian="14pt" style:font-size-complex="14pt"/>
    </style:style>
    <style:style style:name="T10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44" style:parent-style-name="DefaultParagraphFont" style:family="text">
      <style:text-properties style:font-name="Times New Roman" style:font-name-complex="Times New Roman" fo:font-size="14pt" style:font-size-asian="14pt" style:font-size-complex="14pt"/>
    </style:style>
    <style:style style:name="T10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46" style:parent-style-name="Normal" style:family="paragraph">
      <style:text-properties style:font-name="Times New Roman" style:font-name-complex="Times New Roman" fo:font-size="14pt" style:font-size-asian="14pt" style:font-size-complex="14pt"/>
    </style:style>
    <style:style style:name="T10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49" style:parent-style-name="Normal" style:family="paragraph">
      <style:text-properties style:font-name="Times New Roman" style:font-name-complex="Times New Roman" fo:font-size="14pt" style:font-size-asian="14pt" style:font-size-complex="14pt"/>
    </style:style>
    <style:style style:name="P1050" style:parent-style-name="Normal" style:family="paragraph">
      <style:text-properties style:font-name="Times New Roman" style:font-name-complex="Times New Roman" fo:font-size="14pt" style:font-size-asian="14pt" style:font-size-complex="14pt"/>
    </style:style>
    <style:style style:name="P1051" style:parent-style-name="Normal" style:family="paragraph">
      <style:text-properties style:font-name="Times New Roman" style:font-name-complex="Times New Roman" fo:font-size="14pt" style:font-size-asian="14pt" style:font-size-complex="14pt"/>
    </style:style>
    <style:style style:name="T10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53" style:parent-style-name="DefaultParagraphFont" style:family="text">
      <style:text-properties style:font-name="Times New Roman" style:font-name-complex="Times New Roman" fo:font-size="14pt" style:font-size-asian="14pt" style:font-size-complex="14pt"/>
    </style:style>
    <style:style style:name="T10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56" style:parent-style-name="Normal" style:family="paragraph">
      <style:text-properties style:font-name="Times New Roman" style:font-name-complex="Times New Roman" fo:font-size="14pt" style:font-size-asian="14pt" style:font-size-complex="14pt"/>
    </style:style>
    <style:style style:name="P1057" style:parent-style-name="Normal" style:family="paragraph">
      <style:text-properties style:font-name="Times New Roman" style:font-name-complex="Times New Roman" fo:font-size="14pt" style:font-size-asian="14pt" style:font-size-complex="14pt"/>
    </style:style>
    <style:style style:name="T10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60" style:parent-style-name="Normal" style:family="paragraph">
      <style:text-properties style:font-name="Times New Roman" style:font-name-complex="Times New Roman" fo:font-size="14pt" style:font-size-asian="14pt" style:font-size-complex="14pt"/>
    </style:style>
    <style:style style:name="P1061" style:parent-style-name="Normal" style:family="paragraph">
      <style:text-properties style:font-name="Times New Roman" style:font-name-complex="Times New Roman" fo:font-size="14pt" style:font-size-asian="14pt" style:font-size-complex="14pt"/>
    </style:style>
    <style:style style:name="P1062" style:parent-style-name="Normal" style:family="paragraph">
      <style:text-properties style:font-name="Times New Roman" style:font-name-complex="Times New Roman" fo:font-size="14pt" style:font-size-asian="14pt" style:font-size-complex="14pt"/>
    </style:style>
    <style:style style:name="T10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64" style:parent-style-name="DefaultParagraphFont" style:family="text">
      <style:text-properties style:font-name="Times New Roman" style:font-name-complex="Times New Roman" fo:font-size="14pt" style:font-size-asian="14pt" style:font-size-complex="14pt"/>
    </style:style>
    <style:style style:name="T10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66" style:parent-style-name="Normal" style:family="paragraph">
      <style:text-properties style:font-name="Times New Roman" style:font-name-complex="Times New Roman" fo:font-size="14pt" style:font-size-asian="14pt" style:font-size-complex="14pt"/>
    </style:style>
    <style:style style:name="T1067" style:parent-style-name="DefaultParagraphFont" style:family="text">
      <style:text-properties style:font-name="Times New Roman" style:font-name-complex="Times New Roman" fo:font-size="14pt" style:font-size-asian="14pt" style:font-size-complex="14pt"/>
    </style:style>
    <style:style style:name="T1068" style:parent-style-name="Hyperlink" style:family="text">
      <style:text-properties style:font-name="Times New Roman" style:font-name-complex="Times New Roman" fo:font-size="14pt" style:font-size-asian="14pt" style:font-size-complex="14pt"/>
    </style:style>
    <style:style style:name="T10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71" style:parent-style-name="Normal" style:family="paragraph">
      <style:text-properties style:font-name="Times New Roman" style:font-name-complex="Times New Roman" fo:font-size="14pt" style:font-size-asian="14pt" style:font-size-complex="14pt"/>
    </style:style>
    <style:style style:name="P1072" style:parent-style-name="Normal" style:family="paragraph">
      <style:text-properties style:font-name="Times New Roman" style:font-name-complex="Times New Roman" fo:font-size="14pt" style:font-size-asian="14pt" style:font-size-complex="14pt"/>
    </style:style>
    <style:style style:name="P1073" style:parent-style-name="Normal" style:family="paragraph">
      <style:text-properties style:font-name="Times New Roman" style:font-name-complex="Times New Roman" fo:font-size="14pt" style:font-size-asian="14pt" style:font-size-complex="14pt"/>
    </style:style>
    <style:style style:name="T10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5" style:parent-style-name="DefaultParagraphFont" style:family="text">
      <style:text-properties style:font-name="Times New Roman" style:font-name-complex="Times New Roman" fo:font-size="14pt" style:font-size-asian="14pt" style:font-size-complex="14pt"/>
    </style:style>
    <style:style style:name="T10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77" style:parent-style-name="Normal" style:family="paragraph">
      <style:text-properties style:font-name="Times New Roman" style:font-name-complex="Times New Roman" fo:font-size="14pt" style:font-size-asian="14pt" style:font-size-complex="14pt"/>
    </style:style>
    <style:style style:name="T1078" style:parent-style-name="DefaultParagraphFont" style:family="text">
      <style:text-properties style:font-name="Times New Roman" style:font-name-complex="Times New Roman" fo:font-size="14pt" style:font-size-asian="14pt" style:font-size-complex="14pt"/>
    </style:style>
    <style:style style:name="P1079" style:parent-style-name="Normal" style:family="paragraph">
      <style:text-properties style:font-name="Times New Roman" style:font-name-complex="Times New Roman" fo:font-size="14pt" style:font-size-asian="14pt" style:font-size-complex="14pt"/>
    </style:style>
    <style:style style:name="T10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82" style:parent-style-name="Normal" style:family="paragraph">
      <style:text-properties style:font-name="Times New Roman" style:font-name-complex="Times New Roman" fo:font-size="14pt" style:font-size-asian="14pt" style:font-size-complex="14pt"/>
    </style:style>
    <style:style style:name="P1083" style:parent-style-name="Normal" style:family="paragraph">
      <style:text-properties style:font-name="Times New Roman" style:font-name-complex="Times New Roman" fo:font-size="14pt" style:font-size-asian="14pt" style:font-size-complex="14pt"/>
    </style:style>
    <style:style style:name="P1084" style:parent-style-name="Normal" style:family="paragraph">
      <style:text-properties style:font-name="Times New Roman" style:font-name-complex="Times New Roman" fo:font-size="14pt" style:font-size-asian="14pt" style:font-size-complex="14pt"/>
    </style:style>
    <style:style style:name="T10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6" style:parent-style-name="DefaultParagraphFont" style:family="text">
      <style:text-properties style:font-name="Times New Roman" style:font-name-complex="Times New Roman" fo:font-size="14pt" style:font-size-asian="14pt" style:font-size-complex="14pt"/>
    </style:style>
    <style:style style:name="T10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89" style:parent-style-name="Normal" style:family="paragraph">
      <style:text-properties style:font-name="Times New Roman" style:font-name-complex="Times New Roman" fo:font-size="14pt" style:font-size-asian="14pt" style:font-size-complex="14pt"/>
    </style:style>
    <style:style style:name="P1090" style:parent-style-name="consolas" style:family="paragraph">
      <style:text-properties fo:font-size="10pt" style:font-size-asian="10pt" style:font-size-complex="10pt"/>
    </style:style>
    <style:style style:name="P1091" style:parent-style-name="consolas" style:family="paragraph">
      <style:text-properties fo:font-size="10pt" style:font-size-asian="10pt" style:font-size-complex="10pt"/>
    </style:style>
    <style:style style:name="P1092" style:parent-style-name="consolas" style:family="paragraph">
      <style:text-properties fo:font-size="10pt" style:font-size-asian="10pt" style:font-size-complex="10pt"/>
    </style:style>
    <style:style style:name="P1093" style:parent-style-name="consolas" style:family="paragraph">
      <style:text-properties fo:font-size="10pt" style:font-size-asian="10pt" style:font-size-complex="10pt"/>
    </style:style>
    <style:style style:name="P1094" style:parent-style-name="consolas" style:family="paragraph">
      <style:text-properties fo:font-size="10pt" style:font-size-asian="10pt" style:font-size-complex="10pt"/>
    </style:style>
    <style:style style:name="P1095" style:parent-style-name="consolas" style:family="paragraph">
      <style:text-properties fo:font-size="10pt" style:font-size-asian="10pt" style:font-size-complex="10pt"/>
    </style:style>
    <style:style style:name="P1096" style:parent-style-name="consolas" style:family="paragraph">
      <style:text-properties fo:font-size="10pt" style:font-size-asian="10pt" style:font-size-complex="10pt"/>
    </style:style>
    <style:style style:name="P1097" style:parent-style-name="consolas" style:family="paragraph">
      <style:text-properties fo:font-size="10pt" style:font-size-asian="10pt" style:font-size-complex="10pt"/>
    </style:style>
    <style:style style:name="P1098" style:parent-style-name="consolas" style:family="paragraph">
      <style:text-properties fo:font-size="10pt" style:font-size-asian="10pt" style:font-size-complex="10pt"/>
    </style:style>
    <style:style style:name="P1099" style:parent-style-name="consolas" style:family="paragraph">
      <style:text-properties fo:font-size="10pt" style:font-size-asian="10pt" style:font-size-complex="10pt"/>
    </style:style>
    <style:style style:name="P1100" style:parent-style-name="consolas" style:family="paragraph">
      <style:text-properties fo:font-size="10pt" style:font-size-asian="10pt" style:font-size-complex="10pt"/>
    </style:style>
    <style:style style:name="P1101" style:parent-style-name="consolas" style:family="paragraph">
      <style:text-properties fo:font-size="10pt" style:font-size-asian="10pt" style:font-size-complex="10pt"/>
    </style:style>
    <style:style style:name="P1102" style:parent-style-name="consolas" style:family="paragraph">
      <style:text-properties fo:font-size="10pt" style:font-size-asian="10pt" style:font-size-complex="10pt"/>
    </style:style>
    <style:style style:name="P1103" style:parent-style-name="consolas" style:family="paragraph">
      <style:text-properties fo:font-size="10pt" style:font-size-asian="10pt" style:font-size-complex="10pt"/>
    </style:style>
    <style:style style:name="P1104" style:parent-style-name="consolas" style:family="paragraph">
      <style:text-properties fo:font-size="10pt" style:font-size-asian="10pt" style:font-size-complex="10pt" fo:language="it" fo:country="IT"/>
    </style:style>
    <style:style style:name="P1105" style:parent-style-name="consolas" style:family="paragraph">
      <style:text-properties fo:font-size="10pt" style:font-size-asian="10pt" style:font-size-complex="10pt" fo:language="it" fo:country="IT"/>
    </style:style>
    <style:style style:name="P1106" style:parent-style-name="Normal" style:family="paragraph">
      <style:text-properties style:font-name="Times New Roman" style:font-name-complex="Times New Roman" fo:font-size="14pt" style:font-size-asian="14pt" style:font-size-complex="14pt"/>
    </style:style>
    <style:style style:name="P1107" style:parent-style-name="Normal" style:family="paragraph">
      <style:text-properties style:font-name="Times New Roman" style:font-name-complex="Times New Roman" fo:font-size="14pt" style:font-size-asian="14pt" style:font-size-complex="14pt"/>
    </style:style>
    <style:style style:name="P1108" style:parent-style-name="Normal" style:family="paragraph">
      <style:text-properties style:font-name="Times New Roman" style:font-name-complex="Times New Roman" fo:font-size="14pt" style:font-size-asian="14pt" style:font-size-complex="14pt"/>
    </style:style>
    <style:style style:name="P1109" style:parent-style-name="Normal" style:family="paragraph">
      <style:text-properties style:font-name="Times New Roman" style:font-name-complex="Times New Roman" fo:font-size="14pt" style:font-size-asian="14pt" style:font-size-complex="14pt"/>
    </style:style>
    <style:style style:name="P1110" style:parent-style-name="Normal" style:family="paragraph">
      <style:text-properties style:font-name="Times New Roman" style:font-name-complex="Times New Roman" fo:font-size="14pt" style:font-size-asian="14pt" style:font-size-complex="14pt"/>
    </style:style>
    <style:style style:name="P1111" style:parent-style-name="Normal" style:family="paragraph">
      <style:text-properties style:font-name="Times New Roman" style:font-name-complex="Times New Roman" fo:font-size="14pt" style:font-size-asian="14pt" style:font-size-complex="14pt"/>
    </style:style>
    <style:style style:name="T11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13" style:parent-style-name="DefaultParagraphFont" style:family="text">
      <style:text-properties style:font-name="Times New Roman" style:font-name-complex="Times New Roman" fo:font-size="14pt" style:font-size-asian="14pt" style:font-size-complex="14pt"/>
    </style:style>
    <style:style style:name="T11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15" style:parent-style-name="Normal" style:family="paragraph">
      <style:text-properties style:font-name="Times New Roman" style:font-name-complex="Times New Roman" fo:font-size="14pt" style:font-size-asian="14pt" style:font-size-complex="14pt"/>
    </style:style>
    <style:style style:name="P1116" style:parent-style-name="Normal" style:family="paragraph">
      <style:text-properties style:font-name="Times New Roman" style:font-name-complex="Times New Roman" fo:font-size="14pt" style:font-size-asian="14pt" style:font-size-complex="14pt"/>
    </style:style>
    <style:style style:name="T11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19" style:parent-style-name="Normal" style:family="paragraph">
      <style:text-properties style:font-name="Times New Roman" style:font-name-complex="Times New Roman" fo:font-size="14pt" style:font-size-asian="14pt" style:font-size-complex="14pt"/>
    </style:style>
    <style:style style:name="T1120" style:parent-style-name="DefaultParagraphFont" style:family="text">
      <style:text-properties style:font-name="Times New Roman" style:font-name-complex="Times New Roman" fo:font-size="14pt" style:font-size-asian="14pt" style:font-size-complex="14pt"/>
    </style:style>
    <style:style style:name="P1121" style:parent-style-name="Normal" style:family="paragraph">
      <style:text-properties style:font-name="Times New Roman" style:font-name-complex="Times New Roman" fo:font-size="14pt" style:font-size-asian="14pt" style:font-size-complex="14pt"/>
    </style:style>
    <style:style style:name="P1122" style:parent-style-name="Normal" style:family="paragraph">
      <style:text-properties style:font-name="Times New Roman" style:font-name-complex="Times New Roman" fo:font-size="14pt" style:font-size-asian="14pt" style:font-size-complex="14pt"/>
    </style:style>
    <style:style style:name="P1123" style:parent-style-name="Normal" style:family="paragraph">
      <style:text-properties style:font-name="Times New Roman" style:font-name-complex="Times New Roman" fo:font-size="14pt" style:font-size-asian="14pt" style:font-size-complex="14pt"/>
    </style:style>
    <style:style style:name="P1124" style:parent-style-name="Normal" style:family="paragraph">
      <style:text-properties style:font-name="Times New Roman" style:font-name-complex="Times New Roman" fo:font-size="14pt" style:font-size-asian="14pt" style:font-size-complex="14pt"/>
    </style:style>
    <style:style style:name="P1125" style:parent-style-name="Normal" style:family="paragraph">
      <style:text-properties style:font-name="Times New Roman" style:font-name-complex="Times New Roman" fo:font-size="14pt" style:font-size-asian="14pt" style:font-size-complex="14pt"/>
    </style:style>
    <style:style style:name="P1126" style:parent-style-name="Normal" style:family="paragraph">
      <style:text-properties style:font-name="Times New Roman" style:font-name-complex="Times New Roman" fo:font-size="14pt" style:font-size-asian="14pt" style:font-size-complex="14pt"/>
    </style:style>
    <style:style style:name="T11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28" style:parent-style-name="DefaultParagraphFont" style:family="text">
      <style:text-properties style:font-name="Times New Roman" style:font-name-complex="Times New Roman" fo:font-size="14pt" style:font-size-asian="14pt" style:font-size-complex="14pt"/>
    </style:style>
    <style:style style:name="T11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30" style:parent-style-name="DefaultParagraphFont" style:family="text">
      <style:text-properties style:font-name="Times New Roman" style:font-name-complex="Times New Roman" fo:font-size="14pt" style:font-size-asian="14pt" style:font-size-complex="14pt"/>
    </style:style>
    <style:style style:name="T1131" style:parent-style-name="Hyperlink" style:family="text">
      <style:text-properties style:font-name="Times New Roman" style:font-name-complex="Times New Roman" fo:font-size="14pt" style:font-size-asian="14pt" style:font-size-complex="14pt"/>
    </style:style>
    <style:style style:name="T1132" style:parent-style-name="DefaultParagraphFont" style:family="text">
      <style:text-properties style:font-name="Times New Roman" style:font-name-complex="Times New Roman" fo:font-size="14pt" style:font-size-asian="14pt" style:font-size-complex="14pt"/>
    </style:style>
    <style:style style:name="T11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35" style:parent-style-name="Normal" style:family="paragraph">
      <style:text-properties style:font-name="Times New Roman" style:font-name-complex="Times New Roman" fo:font-size="14pt" style:font-size-asian="14pt" style:font-size-complex="14pt"/>
    </style:style>
    <style:style style:name="T1136" style:parent-style-name="DefaultParagraphFont" style:family="text">
      <style:text-properties style:font-name="Times New Roman" style:font-name-complex="Times New Roman" fo:font-size="14pt" style:font-size-asian="14pt" style:font-size-complex="14pt"/>
    </style:style>
    <style:style style:name="P1137" style:parent-style-name="Normal" style:family="paragraph">
      <style:text-properties style:font-name="Times New Roman" style:font-name-complex="Times New Roman" fo:font-size="14pt" style:font-size-asian="14pt" style:font-size-complex="14pt"/>
    </style:style>
    <style:style style:name="P1138" style:parent-style-name="Normal" style:family="paragraph">
      <style:text-properties style:font-name="Times New Roman" style:font-name-complex="Times New Roman" fo:font-size="14pt" style:font-size-asian="14pt" style:font-size-complex="14pt"/>
    </style:style>
    <style:style style:name="P1139" style:parent-style-name="Normal" style:family="paragraph">
      <style:text-properties style:font-name="Times New Roman" style:font-name-complex="Times New Roman" fo:font-size="14pt" style:font-size-asian="14pt" style:font-size-complex="14pt"/>
    </style:style>
    <style:style style:name="T11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41" style:parent-style-name="DefaultParagraphFont" style:family="text">
      <style:text-properties style:font-name="Times New Roman" style:font-name-complex="Times New Roman" fo:font-size="14pt" style:font-size-asian="14pt" style:font-size-complex="14pt"/>
    </style:style>
    <style:style style:name="T11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43" style:parent-style-name="Normal" style:family="paragraph">
      <style:text-properties style:font-name="Times New Roman" style:font-name-complex="Times New Roman" fo:font-size="14pt" style:font-size-asian="14pt" style:font-size-complex="14pt"/>
    </style:style>
    <style:style style:name="T11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46" style:parent-style-name="Normal" style:family="paragraph">
      <style:text-properties style:font-name="Times New Roman" style:font-name-complex="Times New Roman" fo:font-size="14pt" style:font-size-asian="14pt" style:font-size-complex="14pt"/>
    </style:style>
    <style:style style:name="T1147" style:parent-style-name="DefaultParagraphFont" style:family="text">
      <style:text-properties style:font-name="Times New Roman" style:font-name-complex="Times New Roman" fo:font-size="14pt" style:font-size-asian="14pt" style:font-size-complex="14pt"/>
    </style:style>
    <style:style style:name="P1148" style:parent-style-name="Normal" style:family="paragraph">
      <style:text-properties style:font-name="Times New Roman" style:font-name-complex="Times New Roman" fo:font-size="14pt" style:font-size-asian="14pt" style:font-size-complex="14pt"/>
    </style:style>
    <style:style style:name="P1149" style:parent-style-name="Normal" style:family="paragraph">
      <style:text-properties style:font-name="Times New Roman" style:font-name-complex="Times New Roman" fo:font-size="14pt" style:font-size-asian="14pt" style:font-size-complex="14pt"/>
    </style:style>
    <style:style style:name="P1150" style:parent-style-name="Normal" style:family="paragraph">
      <style:text-properties style:font-name="Times New Roman" style:font-name-complex="Times New Roman" fo:font-size="14pt" style:font-size-asian="14pt" style:font-size-complex="14pt"/>
    </style:style>
    <style:style style:name="T11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52" style:parent-style-name="DefaultParagraphFont" style:family="text">
      <style:text-properties style:font-name="Times New Roman" style:font-name-complex="Times New Roman" fo:font-size="14pt" style:font-size-asian="14pt" style:font-size-complex="14pt"/>
    </style:style>
    <style:style style:name="T11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54" style:parent-style-name="Normal" style:family="paragraph">
      <style:text-properties style:font-name="Times New Roman" style:font-name-complex="Times New Roman" fo:font-size="14pt" style:font-size-asian="14pt" style:font-size-complex="14pt"/>
    </style:style>
    <style:style style:name="T1155" style:parent-style-name="DefaultParagraphFont" style:family="text">
      <style:text-properties style:font-name="Times New Roman" style:font-name-complex="Times New Roman" fo:font-size="14pt" style:font-size-asian="14pt" style:font-size-complex="14pt"/>
    </style:style>
    <style:style style:name="T1156" style:parent-style-name="Hyperlink" style:family="text">
      <style:text-properties style:font-name="Times New Roman" style:font-name-complex="Times New Roman" fo:font-size="14pt" style:font-size-asian="14pt" style:font-size-complex="14pt"/>
    </style:style>
    <style:style style:name="P1157" style:parent-style-name="Normal" style:family="paragraph">
      <style:text-properties style:font-name="Times New Roman" style:font-name-complex="Times New Roman" fo:font-size="14pt" style:font-size-asian="14pt" style:font-size-complex="14pt"/>
    </style:style>
    <style:style style:name="T11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60" style:parent-style-name="Normal" style:family="paragraph">
      <style:text-properties style:font-name="Times New Roman" style:font-name-complex="Times New Roman" fo:font-size="14pt" style:font-size-asian="14pt" style:font-size-complex="14pt"/>
    </style:style>
    <style:style style:name="P1161" style:parent-style-name="consolas" style:family="paragraph">
      <style:text-properties fo:language="it" fo:country="IT"/>
    </style:style>
    <style:style style:name="P1162" style:parent-style-name="consolas" style:family="paragraph">
      <style:text-properties fo:language="it" fo:country="IT"/>
    </style:style>
    <style:style style:name="T1163" style:parent-style-name="DefaultParagraphFont" style:family="text">
      <style:text-properties fo:language="it" fo:country="IT"/>
    </style:style>
    <style:style style:name="P1164" style:parent-style-name="Normal" style:family="paragraph">
      <style:text-properties style:font-name="Times New Roman" style:font-name-complex="Times New Roman" fo:font-size="14pt" style:font-size-asian="14pt" style:font-size-complex="14pt"/>
    </style:style>
    <style:style style:name="P1165" style:parent-style-name="Normal" style:family="paragraph">
      <style:text-properties style:font-name="Times New Roman" style:font-name-complex="Times New Roman" fo:font-size="14pt" style:font-size-asian="14pt" style:font-size-complex="14pt"/>
    </style:style>
    <style:style style:name="P1166" style:parent-style-name="Normal" style:family="paragraph">
      <style:text-properties style:font-name="Times New Roman" style:font-name-complex="Times New Roman" fo:font-size="14pt" style:font-size-asian="14pt" style:font-size-complex="14pt"/>
    </style:style>
    <style:style style:name="T11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68" style:parent-style-name="DefaultParagraphFont" style:family="text">
      <style:text-properties style:font-name="Times New Roman" style:font-name-complex="Times New Roman" fo:font-size="14pt" style:font-size-asian="14pt" style:font-size-complex="14pt"/>
    </style:style>
    <style:style style:name="T11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70" style:parent-style-name="Normal" style:family="paragraph">
      <style:text-properties style:font-name="Times New Roman" style:font-name-complex="Times New Roman" fo:font-size="14pt" style:font-size-asian="14pt" style:font-size-complex="14pt"/>
    </style:style>
    <style:style style:name="T11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73" style:parent-style-name="Normal" style:family="paragraph">
      <style:text-properties style:font-name="Times New Roman" style:font-name-complex="Times New Roman" fo:font-size="14pt" style:font-size-asian="14pt" style:font-size-complex="14pt"/>
    </style:style>
    <style:style style:name="P1174" style:parent-style-name="Normal" style:family="paragraph">
      <style:text-properties style:font-name="Times New Roman" style:font-name-complex="Times New Roman" fo:font-size="14pt" style:font-size-asian="14pt" style:font-size-complex="14pt"/>
    </style:style>
    <style:style style:name="P1175" style:parent-style-name="Normal" style:family="paragraph">
      <style:text-properties style:font-name="Times New Roman" style:font-name-complex="Times New Roman" fo:font-size="14pt" style:font-size-asian="14pt" style:font-size-complex="14pt"/>
    </style:style>
    <style:style style:name="T11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77" style:parent-style-name="DefaultParagraphFont" style:family="text">
      <style:text-properties style:font-name="Times New Roman" style:font-name-complex="Times New Roman" fo:font-size="14pt" style:font-size-asian="14pt" style:font-size-complex="14pt"/>
    </style:style>
    <style:style style:name="T11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79" style:parent-style-name="Normal" style:family="paragraph">
      <style:text-properties style:font-name="Times New Roman" style:font-name-complex="Times New Roman" fo:font-size="14pt" style:font-size-asian="14pt" style:font-size-complex="14pt"/>
    </style:style>
    <style:style style:name="T11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82" style:parent-style-name="Normal" style:family="paragraph">
      <style:text-properties style:font-name="Times New Roman" style:font-name-complex="Times New Roman" fo:font-size="14pt" style:font-size-asian="14pt" style:font-size-complex="14pt"/>
    </style:style>
    <style:style style:name="P1183" style:parent-style-name="Normal" style:family="paragraph">
      <style:text-properties style:font-name="Times New Roman" style:font-name-complex="Times New Roman" fo:font-size="14pt" style:font-size-asian="14pt" style:font-size-complex="14pt"/>
    </style:style>
    <style:style style:name="P1184" style:parent-style-name="Normal" style:family="paragraph">
      <style:text-properties style:font-name="Times New Roman" style:font-name-complex="Times New Roman" fo:font-size="14pt" style:font-size-asian="14pt" style:font-size-complex="14pt"/>
    </style:style>
    <style:style style:name="T11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86" style:parent-style-name="DefaultParagraphFont" style:family="text">
      <style:text-properties style:font-name="Times New Roman" style:font-name-complex="Times New Roman" fo:font-size="14pt" style:font-size-asian="14pt" style:font-size-complex="14pt"/>
    </style:style>
    <style:style style:name="T11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88" style:parent-style-name="Normal" style:family="paragraph">
      <style:text-properties style:font-name="Times New Roman" style:font-name-complex="Times New Roman" fo:font-size="14pt" style:font-size-asian="14pt" style:font-size-complex="14pt"/>
    </style:style>
    <style:style style:name="T11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91" style:parent-style-name="Normal" style:family="paragraph">
      <style:text-properties style:font-name="Times New Roman" style:font-name-complex="Times New Roman" fo:font-size="14pt" style:font-size-asian="14pt" style:font-size-complex="14pt"/>
    </style:style>
    <style:style style:name="P1192" style:parent-style-name="Normal" style:family="paragraph">
      <style:text-properties style:font-name="Times New Roman" style:font-name-complex="Times New Roman" fo:font-size="14pt" style:font-size-asian="14pt" style:font-size-complex="14pt"/>
    </style:style>
    <style:style style:name="P1193" style:parent-style-name="Normal" style:family="paragraph">
      <style:text-properties style:font-name="Times New Roman" style:font-name-complex="Times New Roman" fo:font-size="14pt" style:font-size-asian="14pt" style:font-size-complex="14pt"/>
    </style:style>
    <style:style style:name="T11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95" style:parent-style-name="DefaultParagraphFont" style:family="text">
      <style:text-properties style:font-name="Times New Roman" style:font-name-complex="Times New Roman" fo:font-size="14pt" style:font-size-asian="14pt" style:font-size-complex="14pt"/>
    </style:style>
    <style:style style:name="T11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98" style:parent-style-name="Normal" style:family="paragraph">
      <style:text-properties style:font-name="Times New Roman" style:font-name-complex="Times New Roman" fo:font-size="14pt" style:font-size-asian="14pt" style:font-size-complex="14pt"/>
    </style:style>
    <style:style style:name="T1199" style:parent-style-name="DefaultParagraphFont" style:family="text">
      <style:text-properties style:font-name="Times New Roman" style:font-name-complex="Times New Roman" fo:font-size="14pt" style:font-size-asian="14pt" style:font-size-complex="14pt"/>
    </style:style>
    <style:style style:name="T1200" style:parent-style-name="DefaultParagraphFont" style:family="text">
      <style:text-properties style:font-name="Times New Roman" style:font-name-complex="Times New Roman" fo:font-size="14pt" style:font-size-asian="14pt" style:font-size-complex="14pt"/>
    </style:style>
    <style:style style:name="P1201" style:parent-style-name="Normal" style:family="paragraph">
      <style:text-properties style:font-name="Times New Roman" style:font-name-complex="Times New Roman" fo:font-size="14pt" style:font-size-asian="14pt" style:font-size-complex="14pt"/>
    </style:style>
    <style:style style:name="T12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03" style:parent-style-name="Normal" style:family="paragraph">
      <style:text-properties style:font-name="Times New Roman" style:font-name-complex="Times New Roman" fo:font-size="14pt" style:font-size-asian="14pt" style:font-size-complex="14pt"/>
    </style:style>
    <style:style style:name="T12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05" style:parent-style-name="Normal" style:family="paragraph">
      <style:text-properties style:font-name="Times New Roman" style:font-name-complex="Times New Roman" fo:font-size="14pt" style:font-size-asian="14pt" style:font-size-complex="14pt"/>
    </style:style>
    <style:style style:name="T12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08" style:parent-style-name="Normal" style:family="paragraph">
      <style:text-properties style:font-name="Times New Roman" style:font-name-complex="Times New Roman" fo:font-size="14pt" style:font-size-asian="14pt" style:font-size-complex="14pt"/>
    </style:style>
    <style:style style:name="P1209" style:parent-style-name="consolas" style:family="paragraph">
      <style:text-properties fo:language="it" fo:country="IT"/>
    </style:style>
    <style:style style:name="P1210" style:parent-style-name="consolas" style:family="paragraph">
      <style:text-properties fo:language="it" fo:country="IT"/>
    </style:style>
    <style:style style:name="P1211" style:parent-style-name="Normal" style:family="paragraph">
      <style:text-properties style:font-name="Times New Roman" style:font-name-complex="Times New Roman" fo:font-size="14pt" style:font-size-asian="14pt" style:font-size-complex="14pt"/>
    </style:style>
    <style:style style:name="P1212" style:parent-style-name="Normal" style:family="paragraph">
      <style:text-properties style:font-name="Times New Roman" style:font-name-complex="Times New Roman" fo:font-size="14pt" style:font-size-asian="14pt" style:font-size-complex="14pt" fo:language="it" fo:country="IT"/>
    </style:style>
    <style:style style:name="P1213" style:parent-style-name="Normal" style:family="paragraph">
      <style:text-properties style:font-name="Times New Roman" style:font-name-complex="Times New Roman" fo:font-size="14pt" style:font-size-asian="14pt" style:font-size-complex="14pt" fo:language="it" fo:country="IT"/>
    </style:style>
    <style:style style:name="T12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15" style:parent-style-name="DefaultParagraphFont" style:family="text">
      <style:text-properties style:font-name="Times New Roman" style:font-name-complex="Times New Roman" fo:font-size="14pt" style:font-size-asian="14pt" style:font-size-complex="14pt"/>
    </style:style>
    <style:style style:name="T12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17" style:parent-style-name="DefaultParagraphFont" style:family="text">
      <style:text-properties style:font-name="Times New Roman" style:font-name-complex="Times New Roman" fo:font-size="14pt" style:font-size-asian="14pt" style:font-size-complex="14pt"/>
    </style:style>
    <style:style style:name="T12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19" style:parent-style-name="DefaultParagraphFont" style:family="text">
      <style:text-properties style:font-name="Times New Roman" style:font-name-complex="Times New Roman" fo:font-size="14pt" style:font-size-asian="14pt" style:font-size-complex="14pt"/>
    </style:style>
    <style:style style:name="P1220" style:parent-style-name="Normal" style:family="paragraph">
      <style:text-properties style:font-name="Times New Roman" style:font-name-complex="Times New Roman" fo:font-size="14pt" style:font-size-asian="14pt" style:font-size-complex="14pt"/>
    </style:style>
    <style:style style:name="T12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23" style:parent-style-name="Normal" style:family="paragraph">
      <style:text-properties style:font-name="Times New Roman" style:font-name-complex="Times New Roman" fo:font-size="14pt" style:font-size-asian="14pt" style:font-size-complex="14pt"/>
    </style:style>
    <style:style style:name="P1224" style:parent-style-name="Normal" style:family="paragraph">
      <style:text-properties style:font-name="Times New Roman" style:font-name-complex="Times New Roman" fo:font-size="14pt" style:font-size-asian="14pt" style:font-size-complex="14pt"/>
    </style:style>
    <style:style style:name="P1225" style:parent-style-name="Normal" style:family="paragraph">
      <style:text-properties style:font-name="Times New Roman" style:font-name-complex="Times New Roman" fo:font-size="14pt" style:font-size-asian="14pt" style:font-size-complex="14pt"/>
    </style:style>
    <style:style style:name="T12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27" style:parent-style-name="DefaultParagraphFont" style:family="text">
      <style:text-properties style:font-name="Times New Roman" style:font-name-complex="Times New Roman" fo:font-size="14pt" style:font-size-asian="14pt" style:font-size-complex="14pt"/>
    </style:style>
    <style:style style:name="T12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29" style:parent-style-name="Normal" style:family="paragraph">
      <style:text-properties style:font-name="Times New Roman" style:font-name-complex="Times New Roman" fo:font-size="14pt" style:font-size-asian="14pt" style:font-size-complex="14pt"/>
    </style:style>
    <style:style style:name="T1230" style:parent-style-name="DefaultParagraphFont" style:family="text">
      <style:text-properties style:font-name="Times New Roman" style:font-name-complex="Times New Roman" fo:font-size="14pt" style:font-size-asian="14pt" style:font-size-complex="14pt"/>
    </style:style>
    <style:style style:name="T12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33" style:parent-style-name="Normal" style:family="paragraph">
      <style:text-properties style:font-name="Times New Roman" style:font-name-complex="Times New Roman" fo:font-size="14pt" style:font-size-asian="14pt" style:font-size-complex="14pt"/>
    </style:style>
    <style:style style:name="P1234" style:parent-style-name="Normal" style:family="paragraph">
      <style:text-properties style:font-name="Times New Roman" style:font-name-complex="Times New Roman" fo:font-size="14pt" style:font-size-asian="14pt" style:font-size-complex="14pt"/>
    </style:style>
    <style:style style:name="P1235" style:parent-style-name="Normal" style:family="paragraph">
      <style:text-properties style:font-name="Times New Roman" style:font-name-complex="Times New Roman" fo:font-size="14pt" style:font-size-asian="14pt" style:font-size-complex="14pt"/>
    </style:style>
    <style:style style:name="T12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37" style:parent-style-name="DefaultParagraphFont" style:family="text">
      <style:text-properties style:font-name="Times New Roman" style:font-name-complex="Times New Roman" fo:font-size="14pt" style:font-size-asian="14pt" style:font-size-complex="14pt"/>
    </style:style>
    <style:style style:name="T12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40" style:parent-style-name="Normal" style:family="paragraph">
      <style:text-properties style:font-name="Times New Roman" style:font-name-complex="Times New Roman" fo:font-size="14pt" style:font-size-asian="14pt" style:font-size-complex="14pt"/>
    </style:style>
    <style:style style:name="T1241" style:parent-style-name="DefaultParagraphFont" style:family="text">
      <style:text-properties style:font-name="Times New Roman" style:font-name-complex="Times New Roman" fo:font-size="14pt" style:font-size-asian="14pt" style:font-size-complex="14pt"/>
    </style:style>
    <style:style style:name="P1242" style:parent-style-name="Normal" style:family="paragraph">
      <style:text-properties style:font-name="Times New Roman" style:font-name-complex="Times New Roman" fo:font-size="14pt" style:font-size-asian="14pt" style:font-size-complex="14pt"/>
    </style:style>
    <style:style style:name="P1243" style:parent-style-name="Normal" style:family="paragraph">
      <style:text-properties style:font-name="Times New Roman" style:font-name-complex="Times New Roman" fo:font-size="14pt" style:font-size-asian="14pt" style:font-size-complex="14pt"/>
    </style:style>
    <style:style style:name="P1244" style:parent-style-name="Normal" style:family="paragraph">
      <style:text-properties style:font-name="Times New Roman" style:font-name-complex="Times New Roman" fo:font-size="14pt" style:font-size-asian="14pt" style:font-size-complex="14pt"/>
    </style:style>
    <style:style style:name="T12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46" style:parent-style-name="DefaultParagraphFont" style:family="text">
      <style:text-properties style:font-name="Times New Roman" style:font-name-complex="Times New Roman" fo:font-size="14pt" style:font-size-asian="14pt" style:font-size-complex="14pt"/>
    </style:style>
    <style:style style:name="T12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48" style:parent-style-name="Normal" style:family="paragraph">
      <style:text-properties style:font-name="Times New Roman" style:font-name-complex="Times New Roman" fo:font-size="14pt" style:font-size-asian="14pt" style:font-size-complex="14pt"/>
    </style:style>
    <style:style style:name="T12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51" style:parent-style-name="Normal" style:family="paragraph">
      <style:text-properties style:font-name="Times New Roman" style:font-name-complex="Times New Roman" fo:font-size="14pt" style:font-size-asian="14pt" style:font-size-complex="14pt"/>
    </style:style>
    <style:style style:name="T1252" style:parent-style-name="DefaultParagraphFont" style:family="text">
      <style:text-properties style:font-name="Times New Roman" style:font-name-complex="Times New Roman" fo:font-size="14pt" style:font-size-asian="14pt" style:font-size-complex="14pt"/>
    </style:style>
    <style:style style:name="TableColumn1254" style:family="table-column">
      <style:table-column-properties style:column-width="6.4888in"/>
    </style:style>
    <style:style style:name="Table1253" style:family="table">
      <style:table-properties style:width="6.4888in" fo:margin-left="0in" table:align="left"/>
    </style:style>
    <style:style style:name="TableRow1255" style:family="table-row">
      <style:table-row-properties/>
    </style:style>
    <style:style style:name="TableCell125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257" style:parent-style-name="Normal" style:family="paragraph">
      <style:text-properties style:font-name="Times New Roman" style:font-name-complex="Times New Roman" fo:font-size="14pt" style:font-size-asian="14pt" style:font-size-complex="14pt"/>
    </style:style>
    <style:style style:name="P1258" style:parent-style-name="Normal" style:family="paragraph">
      <style:text-properties style:font-name="Times New Roman" style:font-name-complex="Times New Roman" fo:font-size="14pt" style:font-size-asian="14pt" style:font-size-complex="14pt"/>
    </style:style>
    <style:style style:name="T12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60" style:parent-style-name="DefaultParagraphFont" style:family="text">
      <style:text-properties style:font-name="Times New Roman" style:font-name-complex="Times New Roman" fo:font-size="14pt" style:font-size-asian="14pt" style:font-size-complex="14pt"/>
    </style:style>
    <style:style style:name="T12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63" style:parent-style-name="Normal" style:family="paragraph">
      <style:text-properties style:font-name="Times New Roman" style:font-name-complex="Times New Roman" fo:font-size="14pt" style:font-size-asian="14pt" style:font-size-complex="14pt"/>
    </style:style>
    <style:style style:name="P1264" style:parent-style-name="Normal" style:family="paragraph">
      <style:text-properties style:font-name="Times New Roman" style:font-name-complex="Times New Roman" fo:font-size="14pt" style:font-size-asian="14pt" style:font-size-complex="14pt"/>
    </style:style>
    <style:style style:name="P1265" style:parent-style-name="Normal" style:family="paragraph">
      <style:text-properties style:font-name="Times New Roman" style:font-name-complex="Times New Roman" fo:font-size="14pt" style:font-size-asian="14pt" style:font-size-complex="14pt"/>
    </style:style>
    <style:style style:name="T12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67" style:parent-style-name="DefaultParagraphFont" style:family="text">
      <style:text-properties style:font-name="Times New Roman" style:font-name-complex="Times New Roman" fo:font-size="14pt" style:font-size-asian="14pt" style:font-size-complex="14pt"/>
    </style:style>
    <style:style style:name="T12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70" style:parent-style-name="Normal" style:family="paragraph">
      <style:text-properties style:font-name="Times New Roman" style:font-name-complex="Times New Roman" fo:font-size="14pt" style:font-size-asian="14pt" style:font-size-complex="14pt"/>
    </style:style>
    <style:style style:name="P1271" style:parent-style-name="Normal" style:family="paragraph">
      <style:text-properties style:font-name="Times New Roman" style:font-name-complex="Times New Roman" fo:font-size="14pt" style:font-size-asian="14pt" style:font-size-complex="14pt"/>
    </style:style>
    <style:style style:name="P1272" style:parent-style-name="Normal" style:family="paragraph">
      <style:text-properties style:font-name="Times New Roman" style:font-name-complex="Times New Roman" fo:font-size="14pt" style:font-size-asian="14pt" style:font-size-complex="14pt"/>
    </style:style>
    <style:style style:name="T12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74" style:parent-style-name="DefaultParagraphFont" style:family="text">
      <style:text-properties style:font-name="Times New Roman" style:font-name-complex="Times New Roman" fo:font-size="14pt" style:font-size-asian="14pt" style:font-size-complex="14pt"/>
    </style:style>
    <style:style style:name="T12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76" style:parent-style-name="DefaultParagraphFont" style:family="text">
      <style:text-properties style:font-name="Times New Roman" style:font-name-complex="Times New Roman" fo:font-size="14pt" style:font-size-asian="14pt" style:font-size-complex="14pt"/>
    </style:style>
    <style:style style:name="T1277"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1278" style:parent-style-name="DefaultParagraphFont" style:family="text">
      <style:text-properties style:font-name="Times New Roman" style:font-name-complex="Times New Roman" fo:font-size="14pt" style:font-size-asian="14pt" style:font-size-complex="14pt"/>
    </style:style>
    <style:style style:name="T1279" style:parent-style-name="DefaultParagraphFont" style:family="text">
      <style:text-properties style:font-name="Times New Roman" style:font-name-complex="Times New Roman" fo:font-size="14pt" style:font-size-asian="14pt" style:font-size-complex="14pt"/>
    </style:style>
    <style:style style:name="P1280" style:parent-style-name="Normal" style:family="paragraph">
      <style:text-properties style:font-name="Times New Roman" style:font-name-complex="Times New Roman" fo:font-size="14pt" style:font-size-asian="14pt" style:font-size-complex="14pt"/>
    </style:style>
    <style:style style:name="T12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83" style:parent-style-name="Normal" style:family="paragraph">
      <style:text-properties style:font-name="Times New Roman" style:font-name-complex="Times New Roman" fo:font-size="14pt" style:font-size-asian="14pt" style:font-size-complex="14pt"/>
    </style:style>
    <style:style style:name="T1284" style:parent-style-name="DefaultParagraphFont" style:family="text">
      <style:text-properties style:font-name="Times New Roman" style:font-name-complex="Times New Roman" fo:font-size="14pt" style:font-size-asian="14pt" style:font-size-complex="14pt"/>
    </style:style>
    <style:style style:name="P1285" style:parent-style-name="Normal" style:family="paragraph">
      <style:text-properties style:font-name="Times New Roman" style:font-name-complex="Times New Roman" fo:font-size="14pt" style:font-size-asian="14pt" style:font-size-complex="14pt"/>
    </style:style>
    <style:style style:name="TableColumn1287" style:family="table-column">
      <style:table-column-properties style:column-width="2.6229in"/>
    </style:style>
    <style:style style:name="TableColumn1288" style:family="table-column">
      <style:table-column-properties style:column-width="2.6229in"/>
    </style:style>
    <style:style style:name="Table1286" style:family="table">
      <style:table-properties style:width="5.2458in" fo:margin-left="0in" table:align="left"/>
    </style:style>
    <style:style style:name="TableRow1289" style:family="table-row">
      <style:table-row-properties/>
    </style:style>
    <style:style style:name="TableCell129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291" style:parent-style-name="Normal" style:family="paragraph">
      <style:text-properties style:font-name="Times New Roman" style:font-name-complex="Times New Roman" fo:font-size="14pt" style:font-size-asian="14pt" style:font-size-complex="14pt"/>
    </style:style>
    <style:style style:name="P1292" style:parent-style-name="Normal" style:family="paragraph">
      <style:text-properties style:font-name="Times New Roman" style:font-name-complex="Times New Roman" fo:font-size="14pt" style:font-size-asian="14pt" style:font-size-complex="14pt"/>
    </style:style>
    <style:style style:name="TableCell129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294" style:parent-style-name="Normal" style:family="paragraph">
      <style:text-properties style:font-name="Times New Roman" style:font-name-complex="Times New Roman" fo:font-size="14pt" style:font-size-asian="14pt" style:font-size-complex="14pt"/>
    </style:style>
    <style:style style:name="P1295" style:parent-style-name="Normal" style:family="paragraph">
      <style:text-properties style:font-name="Times New Roman" style:font-name-complex="Times New Roman" fo:font-size="14pt" style:font-size-asian="14pt" style:font-size-complex="14pt"/>
    </style:style>
    <style:style style:name="TableRow1296" style:family="table-row">
      <style:table-row-properties/>
    </style:style>
    <style:style style:name="TableCell129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298" style:parent-style-name="Normal" style:family="paragraph">
      <style:text-properties style:font-name="Times New Roman" style:font-name-complex="Times New Roman" fo:font-size="14pt" style:font-size-asian="14pt" style:font-size-complex="14pt"/>
    </style:style>
    <style:style style:name="P1299" style:parent-style-name="Normal" style:family="paragraph">
      <style:text-properties style:font-name="Times New Roman" style:font-name-complex="Times New Roman" fo:font-size="14pt" style:font-size-asian="14pt" style:font-size-complex="14pt"/>
    </style:style>
    <style:style style:name="TableCell1300"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01" style:parent-style-name="Normal" style:family="paragraph">
      <style:text-properties style:font-name="Times New Roman" style:font-name-complex="Times New Roman" fo:font-size="14pt" style:font-size-asian="14pt" style:font-size-complex="14pt"/>
    </style:style>
    <style:style style:name="P1302" style:parent-style-name="Normal" style:family="paragraph">
      <style:text-properties style:font-name="Times New Roman" style:font-name-complex="Times New Roman" fo:font-size="14pt" style:font-size-asian="14pt" style:font-size-complex="14pt"/>
    </style:style>
    <style:style style:name="P1303" style:parent-style-name="Normal" style:family="paragraph">
      <style:text-properties style:font-name="Times New Roman" style:font-name-complex="Times New Roman" fo:font-size="14pt" style:font-size-asian="14pt" style:font-size-complex="14pt"/>
    </style:style>
    <style:style style:name="P1304" style:parent-style-name="Normal" style:family="paragraph">
      <style:text-properties style:font-name="Times New Roman" style:font-name-complex="Times New Roman" fo:font-size="14pt" style:font-size-asian="14pt" style:font-size-complex="14pt"/>
    </style:style>
    <style:style style:name="T13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06" style:parent-style-name="DefaultParagraphFont" style:family="text">
      <style:text-properties style:font-name="Times New Roman" style:font-name-complex="Times New Roman" fo:font-size="14pt" style:font-size-asian="14pt" style:font-size-complex="14pt"/>
    </style:style>
    <style:style style:name="T13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08" style:parent-style-name="Normal" style:family="paragraph">
      <style:text-properties style:font-name="Times New Roman" style:font-name-complex="Times New Roman" fo:font-size="14pt" style:font-size-asian="14pt" style:font-size-complex="14pt"/>
    </style:style>
    <style:style style:name="T13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11" style:parent-style-name="Normal" style:family="paragraph">
      <style:text-properties style:font-name="Times New Roman" style:font-name-complex="Times New Roman" fo:font-size="14pt" style:font-size-asian="14pt" style:font-size-complex="14pt"/>
    </style:style>
    <style:style style:name="T1312" style:parent-style-name="DefaultParagraphFont" style:family="text">
      <style:text-properties style:font-name="Times New Roman" style:font-name-complex="Times New Roman" fo:font-size="14pt" style:font-size-asian="14pt" style:font-size-complex="14pt"/>
    </style:style>
    <style:style style:name="P1313" style:parent-style-name="Normal" style:family="paragraph">
      <style:text-properties style:font-name="Times New Roman" style:font-name-complex="Times New Roman" fo:font-size="14pt" style:font-size-asian="14pt" style:font-size-complex="14pt"/>
    </style:style>
    <style:style style:name="P1314" style:parent-style-name="Normal" style:family="paragraph">
      <style:text-properties style:font-name="Times New Roman" style:font-name-complex="Times New Roman" fo:font-size="14pt" style:font-size-asian="14pt" style:font-size-complex="14pt"/>
    </style:style>
    <style:style style:name="T13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16" style:parent-style-name="DefaultParagraphFont" style:family="text">
      <style:text-properties style:font-name="Times New Roman" style:font-name-complex="Times New Roman" fo:font-size="14pt" style:font-size-asian="14pt" style:font-size-complex="14pt"/>
    </style:style>
    <style:style style:name="T13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19" style:parent-style-name="Normal" style:family="paragraph">
      <style:text-properties style:font-name="Times New Roman" style:font-name-complex="Times New Roman" fo:font-size="14pt" style:font-size-asian="14pt" style:font-size-complex="14pt"/>
    </style:style>
    <style:style style:name="TableColumn1321" style:family="table-column">
      <style:table-column-properties style:column-width="2.4763in"/>
    </style:style>
    <style:style style:name="Table1320" style:family="table">
      <style:table-properties style:width="2.4763in" fo:margin-left="0in" table:align="left"/>
    </style:style>
    <style:style style:name="TableRow1322" style:family="table-row">
      <style:table-row-properties/>
    </style:style>
    <style:style style:name="TableCell1323"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24" style:parent-style-name="Normal" style:family="paragraph">
      <style:text-properties style:font-name="Times New Roman" style:font-name-complex="Times New Roman" fo:font-size="14pt" style:font-size-asian="14pt" style:font-size-complex="14pt"/>
    </style:style>
    <style:style style:name="P1325" style:parent-style-name="Normal" style:family="paragraph">
      <style:text-properties style:font-name="Times New Roman" style:font-name-complex="Times New Roman" fo:font-size="14pt" style:font-size-asian="14pt" style:font-size-complex="14pt"/>
    </style:style>
    <style:style style:name="T13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27" style:parent-style-name="DefaultParagraphFont" style:family="text">
      <style:text-properties style:font-name="Times New Roman" style:font-name-complex="Times New Roman" fo:font-size="14pt" style:font-size-asian="14pt" style:font-size-complex="14pt"/>
    </style:style>
    <style:style style:name="T13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29" style:parent-style-name="Normal" style:family="paragraph">
      <style:text-properties style:font-name="Times New Roman" style:font-name-complex="Times New Roman" fo:font-size="14pt" style:font-size-asian="14pt" style:font-size-complex="14pt"/>
    </style:style>
    <style:style style:name="TableColumn1331" style:family="table-column">
      <style:table-column-properties style:column-width="2.9284in"/>
    </style:style>
    <style:style style:name="TableColumn1332" style:family="table-column">
      <style:table-column-properties style:column-width="3.5604in"/>
    </style:style>
    <style:style style:name="Table1330" style:family="table">
      <style:table-properties style:width="6.4888in" fo:margin-left="0in" table:align="left"/>
    </style:style>
    <style:style style:name="TableRow1333" style:family="table-row">
      <style:table-row-properties/>
    </style:style>
    <style:style style:name="TableCell133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13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133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13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Row1338" style:family="table-row">
      <style:table-row-properties/>
    </style:style>
    <style:style style:name="TableCell1339"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40" style:parent-style-name="Normal" style:family="paragraph">
      <style:text-properties style:font-name="Times New Roman" style:font-name-complex="Times New Roman" fo:font-size="14pt" style:font-size-asian="14pt" style:font-size-complex="14pt"/>
    </style:style>
    <style:style style:name="TableCell134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42" style:parent-style-name="Normal" style:family="paragraph">
      <style:text-properties style:font-name="Times New Roman" style:font-name-complex="Times New Roman" fo:font-size="14pt" style:font-size-asian="14pt" style:font-size-complex="14pt"/>
    </style:style>
    <style:style style:name="TableRow1343" style:family="table-row">
      <style:table-row-properties/>
    </style:style>
    <style:style style:name="TableCell134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45" style:parent-style-name="Normal" style:family="paragraph">
      <style:text-properties style:font-name="Times New Roman" style:font-name-complex="Times New Roman" fo:font-size="14pt" style:font-size-asian="14pt" style:font-size-complex="14pt"/>
    </style:style>
    <style:style style:name="TableCell1346"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47" style:parent-style-name="Normal" style:family="paragraph">
      <style:text-properties style:font-name="Times New Roman" style:font-name-complex="Times New Roman" fo:font-size="14pt" style:font-size-asian="14pt" style:font-size-complex="14pt"/>
    </style:style>
    <style:style style:name="TableRow1348" style:family="table-row">
      <style:table-row-properties/>
    </style:style>
    <style:style style:name="TableCell1349"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P1350" style:parent-style-name="Normal" style:family="paragraph">
      <style:text-properties style:font-name="Times New Roman" style:font-name-complex="Times New Roman" fo:font-size="14pt" style:font-size-asian="14pt" style:font-size-complex="14pt"/>
    </style:style>
    <style:style style:name="TableCell135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1352" style:parent-style-name="DefaultParagraphFont" style:family="text">
      <style:text-properties style:font-name="Times New Roman" style:font-name-complex="Times New Roman" fo:font-size="14pt" style:font-size-asian="14pt" style:font-size-complex="14pt"/>
    </style:style>
    <style:style style:name="T1353"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1354" style:parent-style-name="DefaultParagraphFont" style:family="text">
      <style:text-properties style:font-name="Times New Roman" style:font-name-complex="Times New Roman" fo:font-size="14pt" style:font-size-asian="14pt" style:font-size-complex="14pt"/>
    </style:style>
    <style:style style:name="T1355"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1356" style:parent-style-name="DefaultParagraphFont" style:family="text">
      <style:text-properties style:font-name="Times New Roman" style:font-name-complex="Times New Roman" fo:font-size="14pt" style:font-size-asian="14pt" style:font-size-complex="14pt"/>
    </style:style>
    <style:style style:name="P1357" style:parent-style-name="Normal" style:family="paragraph">
      <style:text-properties style:font-name="Times New Roman" style:font-name-complex="Times New Roman" fo:font-size="14pt" style:font-size-asian="14pt" style:font-size-complex="14pt"/>
    </style:style>
    <style:style style:name="T13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60" style:parent-style-name="Normal" style:family="paragraph">
      <style:text-properties style:font-name="Times New Roman" style:font-name-complex="Times New Roman" fo:font-size="14pt" style:font-size-asian="14pt" style:font-size-complex="14pt"/>
    </style:style>
    <style:style style:name="T1361" style:parent-style-name="DefaultParagraphFont" style:family="text">
      <style:text-properties style:font-name="Times New Roman" style:font-name-complex="Times New Roman" fo:font-size="14pt" style:font-size-asian="14pt" style:font-size-complex="14pt"/>
    </style:style>
    <style:style style:name="P1362" style:parent-style-name="consolas" style:family="paragraph">
      <style:text-properties fo:language="it" fo:country="IT"/>
    </style:style>
    <style:style style:name="P1363" style:parent-style-name="consolas" style:family="paragraph">
      <style:text-properties fo:language="it" fo:country="IT"/>
    </style:style>
    <style:style style:name="P1364" style:parent-style-name="consolas" style:family="paragraph">
      <style:text-properties fo:language="it" fo:country="IT"/>
    </style:style>
    <style:style style:name="P1365" style:parent-style-name="consolas" style:family="paragraph">
      <style:text-properties fo:language="it" fo:country="IT"/>
    </style:style>
    <style:style style:name="P1366" style:parent-style-name="Normal" style:family="paragraph">
      <style:text-properties style:font-name="Times New Roman" style:font-name-complex="Times New Roman" fo:font-size="14pt" style:font-size-asian="14pt" style:font-size-complex="14pt"/>
    </style:style>
    <style:style style:name="P1367" style:parent-style-name="Normal" style:family="paragraph">
      <style:text-properties style:font-name="Times New Roman" style:font-name-complex="Times New Roman" fo:font-size="14pt" style:font-size-asian="14pt" style:font-size-complex="14pt"/>
    </style:style>
    <style:style style:name="T13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69" style:parent-style-name="DefaultParagraphFont" style:family="text">
      <style:text-properties style:font-name="Times New Roman" style:font-name-complex="Times New Roman" fo:font-size="14pt" style:font-size-asian="14pt" style:font-size-complex="14pt"/>
    </style:style>
    <style:style style:name="T13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71" style:parent-style-name="Normal" style:family="paragraph">
      <style:text-properties style:font-name="Times New Roman" style:font-name-complex="Times New Roman" fo:font-size="14pt" style:font-size-asian="14pt" style:font-size-complex="14pt"/>
    </style:style>
    <style:style style:name="T13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74" style:parent-style-name="Normal" style:family="paragraph">
      <style:text-properties style:font-name="Times New Roman" style:font-name-complex="Times New Roman" fo:font-size="14pt" style:font-size-asian="14pt" style:font-size-complex="14pt"/>
    </style:style>
    <style:style style:name="T1375" style:parent-style-name="DefaultParagraphFont" style:family="text">
      <style:text-properties style:font-name="Times New Roman" style:font-name-complex="Times New Roman" fo:font-size="14pt" style:font-size-asian="14pt" style:font-size-complex="14pt"/>
    </style:style>
    <style:style style:name="P1376" style:parent-style-name="Normal" style:family="paragraph">
      <style:text-properties style:font-name="Times New Roman" style:font-name-complex="Times New Roman" fo:font-size="14pt" style:font-size-asian="14pt" style:font-size-complex="14pt"/>
    </style:style>
    <style:style style:name="P1377" style:parent-style-name="Normal" style:family="paragraph">
      <style:text-properties style:font-name="Times New Roman" style:font-name-complex="Times New Roman" fo:font-size="14pt" style:font-size-asian="14pt" style:font-size-complex="14pt"/>
    </style:style>
    <style:style style:name="T13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79" style:parent-style-name="DefaultParagraphFont" style:family="text">
      <style:text-properties style:font-name="Times New Roman" style:font-name-complex="Times New Roman" fo:font-size="14pt" style:font-size-asian="14pt" style:font-size-complex="14pt"/>
    </style:style>
    <style:style style:name="T13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81" style:parent-style-name="Normal" style:family="paragraph">
      <style:text-properties style:font-name="Times New Roman" style:font-name-complex="Times New Roman" fo:font-size="14pt" style:font-size-asian="14pt" style:font-size-complex="14pt"/>
    </style:style>
    <style:style style:name="T13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84" style:parent-style-name="Normal" style:family="paragraph">
      <style:text-properties style:font-name="Times New Roman" style:font-name-complex="Times New Roman" fo:font-size="14pt" style:font-size-asian="14pt" style:font-size-complex="14pt"/>
    </style:style>
    <style:style style:name="T1385" style:parent-style-name="DefaultParagraphFont" style:family="text">
      <style:text-properties style:font-name="Times New Roman" style:font-name-complex="Times New Roman" fo:font-size="14pt" style:font-size-asian="14pt" style:font-size-complex="14pt"/>
    </style:style>
    <style:style style:name="P1386" style:parent-style-name="Normal" style:family="paragraph">
      <style:text-properties style:font-name="Times New Roman" style:font-name-complex="Times New Roman" fo:font-size="14pt" style:font-size-asian="14pt" style:font-size-complex="14pt"/>
    </style:style>
    <style:style style:name="T13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88" style:parent-style-name="Normal" style:family="paragraph">
      <style:text-properties style:font-name="Times New Roman" style:font-name-complex="Times New Roman" fo:font-size="14pt" style:font-size-asian="14pt" style:font-size-complex="14pt"/>
    </style:style>
    <style:style style:name="T13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91" style:parent-style-name="DefaultParagraphFont" style:family="text">
      <style:text-properties style:font-name="Times New Roman" style:font-name-complex="Times New Roman" fo:font-size="14pt" style:font-size-asian="14pt" style:font-size-complex="14pt"/>
    </style:style>
    <style:style style:name="T13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93" style:parent-style-name="DefaultParagraphFont" style:family="text">
      <style:text-properties style:font-name="Times New Roman" style:font-name-complex="Times New Roman" fo:font-size="14pt" style:font-size-asian="14pt" style:font-size-complex="14pt"/>
    </style:style>
    <style:style style:name="P1394" style:parent-style-name="Normal" style:family="paragraph">
      <style:text-properties style:font-name="Times New Roman" style:font-name-complex="Times New Roman" fo:font-size="14pt" style:font-size-asian="14pt" style:font-size-complex="14pt"/>
    </style:style>
    <style:style style:name="P1395" style:parent-style-name="Normal" style:family="paragraph">
      <style:text-properties style:font-name="Times New Roman" style:font-name-complex="Times New Roman" fo:font-size="14pt" style:font-size-asian="14pt" style:font-size-complex="14pt"/>
    </style:style>
    <style:style style:name="P1396" style:parent-style-name="Normal" style:family="paragraph">
      <style:text-properties style:font-name="Times New Roman" style:font-name-complex="Times New Roman" fo:font-size="14pt" style:font-size-asian="14pt" style:font-size-complex="14pt"/>
    </style:style>
    <style:style style:name="T13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98" style:parent-style-name="DefaultParagraphFont" style:family="text">
      <style:text-properties style:font-name="Times New Roman" style:font-name-complex="Times New Roman" fo:font-size="14pt" style:font-size-asian="14pt" style:font-size-complex="14pt"/>
    </style:style>
    <style:style style:name="P1399" style:parent-style-name="Normal" style:family="paragraph">
      <style:text-properties style:font-name="Times New Roman" style:font-name-complex="Times New Roman" fo:font-size="14pt" style:font-size-asian="14pt" style:font-size-complex="14pt"/>
    </style:style>
    <style:style style:name="P1400" style:parent-style-name="Normal" style:family="paragraph">
      <style:text-properties style:font-name="Times New Roman" style:font-name-complex="Times New Roman" fo:font-size="14pt" style:font-size-asian="14pt" style:font-size-complex="14pt"/>
    </style:style>
    <style:style style:name="P1401" style:parent-style-name="Normal" style:family="paragraph">
      <style:text-properties style:font-name="Times New Roman" style:font-name-complex="Times New Roman" fo:font-size="14pt" style:font-size-asian="14pt" style:font-size-complex="14pt"/>
    </style:style>
    <style:style style:name="P1402" style:parent-style-name="Normal" style:family="paragraph">
      <style:text-properties style:font-name="Times New Roman" style:font-name-complex="Times New Roman" fo:font-size="14pt" style:font-size-asian="14pt" style:font-size-complex="14pt"/>
    </style:style>
    <style:style style:name="T14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05" style:parent-style-name="Normal" style:family="paragraph">
      <style:text-properties style:font-name="Times New Roman" style:font-name-complex="Times New Roman" fo:font-size="14pt" style:font-size-asian="14pt" style:font-size-complex="14pt"/>
    </style:style>
    <style:style style:name="P1406" style:parent-style-name="Normal" style:family="paragraph">
      <style:text-properties style:font-name="Times New Roman" style:font-name-complex="Times New Roman" fo:font-size="14pt" style:font-size-asian="14pt" style:font-size-complex="14pt"/>
    </style:style>
    <style:style style:name="P1407" style:parent-style-name="Normal" style:family="paragraph">
      <style:text-properties style:font-name="Times New Roman" style:font-name-complex="Times New Roman" fo:font-size="14pt" style:font-size-asian="14pt" style:font-size-complex="14pt"/>
    </style:style>
    <style:style style:name="T14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09" style:parent-style-name="DefaultParagraphFont" style:family="text">
      <style:text-properties style:font-name="Times New Roman" style:font-name-complex="Times New Roman" fo:font-size="14pt" style:font-size-asian="14pt" style:font-size-complex="14pt"/>
    </style:style>
    <style:style style:name="T14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11" style:parent-style-name="Normal" style:family="paragraph">
      <style:text-properties style:font-name="Times New Roman" style:font-name-complex="Times New Roman" fo:font-size="14pt" style:font-size-asian="14pt" style:font-size-complex="14pt"/>
    </style:style>
    <style:style style:name="T1412" style:parent-style-name="DefaultParagraphFont" style:family="text">
      <style:text-properties style:font-name="Times New Roman" style:font-name-complex="Times New Roman" fo:font-size="14pt" style:font-size-asian="14pt" style:font-size-complex="14pt"/>
    </style:style>
    <style:style style:name="T1413" style:parent-style-name="Hyperlink" style:family="text">
      <style:text-properties style:font-name="Times New Roman" style:font-name-complex="Times New Roman" fo:font-size="14pt" style:font-size-asian="14pt" style:font-size-complex="14pt"/>
    </style:style>
    <style:style style:name="T14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16" style:parent-style-name="Normal" style:family="paragraph">
      <style:text-properties style:font-name="Times New Roman" style:font-name-complex="Times New Roman" fo:font-size="14pt" style:font-size-asian="14pt" style:font-size-complex="14pt"/>
    </style:style>
    <style:style style:name="P1417" style:parent-style-name="Normal" style:family="paragraph">
      <style:text-properties style:font-name="Times New Roman" style:font-name-complex="Times New Roman" fo:font-size="14pt" style:font-size-asian="14pt" style:font-size-complex="14pt"/>
    </style:style>
    <style:style style:name="P1418" style:parent-style-name="Normal" style:family="paragraph">
      <style:text-properties style:font-name="Times New Roman" style:font-name-complex="Times New Roman" fo:font-size="14pt" style:font-size-asian="14pt" style:font-size-complex="14pt"/>
    </style:style>
    <style:style style:name="T14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20" style:parent-style-name="DefaultParagraphFont" style:family="text">
      <style:text-properties style:font-name="Times New Roman" style:font-name-complex="Times New Roman" fo:font-size="14pt" style:font-size-asian="14pt" style:font-size-complex="14pt"/>
    </style:style>
    <style:style style:name="T14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23" style:parent-style-name="Normal" style:family="paragraph">
      <style:text-properties style:font-name="Times New Roman" style:font-name-complex="Times New Roman" fo:font-size="14pt" style:font-size-asian="14pt" style:font-size-complex="14pt"/>
    </style:style>
    <style:style style:name="T1424" style:parent-style-name="DefaultParagraphFont" style:family="text">
      <style:text-properties style:font-name="Times New Roman" style:font-name-complex="Times New Roman" fo:font-size="14pt" style:font-size-asian="14pt" style:font-size-complex="14pt"/>
    </style:style>
    <style:style style:name="P1425" style:parent-style-name="Normal" style:family="paragraph">
      <style:text-properties style:font-name="Times New Roman" style:font-name-complex="Times New Roman" fo:font-size="14pt" style:font-size-asian="14pt" style:font-size-complex="14pt"/>
    </style:style>
    <style:style style:name="T14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28" style:parent-style-name="DefaultParagraphFont" style:family="text">
      <style:text-properties style:font-name="Times New Roman" style:font-name-complex="Times New Roman" fo:font-size="14pt" style:font-size-asian="14pt" style:font-size-complex="14pt"/>
    </style:style>
    <style:style style:name="T1429" style:parent-style-name="DefaultParagraphFont" style:family="text">
      <style:text-properties style:font-name="Times New Roman" style:font-name-complex="Times New Roman" fo:font-size="14pt" style:font-size-asian="14pt" style:font-size-complex="14pt"/>
    </style:style>
    <style:style style:name="T14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31" style:parent-style-name="DefaultParagraphFont" style:family="text">
      <style:text-properties style:font-name="Times New Roman" style:font-name-complex="Times New Roman" fo:font-size="14pt" style:font-size-asian="14pt" style:font-size-complex="14pt"/>
    </style:style>
    <style:style style:name="T1432" style:parent-style-name="DefaultParagraphFont" style:family="text">
      <style:text-properties style:font-name="Times New Roman" style:font-name-complex="Times New Roman" fo:font-size="14pt" style:font-size-asian="14pt" style:font-size-complex="14pt"/>
    </style:style>
    <style:style style:name="T14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34" style:parent-style-name="Normal" style:family="paragraph">
      <style:text-properties style:font-name="Times New Roman" style:font-name-complex="Times New Roman" fo:font-size="14pt" style:font-size-asian="14pt" style:font-size-complex="14pt"/>
    </style:style>
    <style:style style:name="T14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36" style:parent-style-name="DefaultParagraphFont" style:family="text">
      <style:text-properties style:font-name="Times New Roman" style:font-name-complex="Times New Roman" fo:font-size="14pt" style:font-size-asian="14pt" style:font-size-complex="14pt"/>
    </style:style>
    <style:style style:name="T14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39" style:parent-style-name="Normal" style:family="paragraph">
      <style:text-properties style:font-name="Times New Roman" style:font-name-complex="Times New Roman" fo:font-size="14pt" style:font-size-asian="14pt" style:font-size-complex="14pt"/>
    </style:style>
    <style:style style:name="T1440" style:parent-style-name="DefaultParagraphFont" style:family="text">
      <style:text-properties style:font-name="Times New Roman" style:font-name-complex="Times New Roman" fo:font-size="14pt" style:font-size-asian="14pt" style:font-size-complex="14pt"/>
    </style:style>
    <style:style style:name="P1441" style:parent-style-name="Normal" style:family="paragraph">
      <style:text-properties style:font-name="Times New Roman" style:font-name-complex="Times New Roman" fo:font-size="14pt" style:font-size-asian="14pt" style:font-size-complex="14pt" fo:language="it" fo:country="IT"/>
    </style:style>
    <style:style style:name="P1442" style:parent-style-name="Normal" style:family="paragraph">
      <style:text-properties style:font-name="Times New Roman" style:font-name-complex="Times New Roman" fo:font-size="14pt" style:font-size-asian="14pt" style:font-size-complex="14pt" fo:language="it" fo:country="IT"/>
    </style:style>
    <style:style style:name="T14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44" style:parent-style-name="DefaultParagraphFont" style:family="text">
      <style:text-properties style:font-name="Times New Roman" style:font-name-complex="Times New Roman" fo:font-size="14pt" style:font-size-asian="14pt" style:font-size-complex="14pt"/>
    </style:style>
    <style:style style:name="T14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47" style:parent-style-name="Normal" style:family="paragraph">
      <style:text-properties style:font-name="Times New Roman" style:font-name-complex="Times New Roman" fo:font-size="14pt" style:font-size-asian="14pt" style:font-size-complex="14pt"/>
    </style:style>
    <style:style style:name="T1448" style:parent-style-name="DefaultParagraphFont" style:family="text">
      <style:text-properties style:font-name="Times New Roman" style:font-name-complex="Times New Roman" fo:font-size="14pt" style:font-size-asian="14pt" style:font-size-complex="14pt"/>
    </style:style>
    <style:style style:name="P1449" style:parent-style-name="Normal" style:family="paragraph">
      <style:text-properties style:font-name="Times New Roman" style:font-name-complex="Times New Roman" fo:font-size="14pt" style:font-size-asian="14pt" style:font-size-complex="14pt"/>
    </style:style>
    <style:style style:name="P1450" style:parent-style-name="Normal" style:family="paragraph">
      <style:text-properties style:font-name="Times New Roman" style:font-name-complex="Times New Roman" fo:font-size="14pt" style:font-size-asian="14pt" style:font-size-complex="14pt"/>
    </style:style>
    <style:style style:name="T14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52" style:parent-style-name="DefaultParagraphFont" style:family="text">
      <style:text-properties style:font-name="Times New Roman" style:font-name-complex="Times New Roman" fo:font-size="14pt" style:font-size-asian="14pt" style:font-size-complex="14pt"/>
    </style:style>
    <style:style style:name="T14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54" style:parent-style-name="DefaultParagraphFont" style:family="text">
      <style:text-properties style:font-name="Times New Roman" style:font-name-complex="Times New Roman" fo:font-size="14pt" style:font-size-asian="14pt" style:font-size-complex="14pt"/>
    </style:style>
    <style:style style:name="T1455" style:parent-style-name="DefaultParagraphFont" style:family="text">
      <style:text-properties style:font-name="Times New Roman" style:font-name-complex="Times New Roman" style:text-position="super 64.2%" fo:font-size="14pt" style:font-size-asian="14pt" style:font-size-complex="14pt"/>
    </style:style>
    <style:style style:name="T1456" style:parent-style-name="DefaultParagraphFont" style:family="text">
      <style:text-properties style:font-name="Times New Roman" style:font-name-complex="Times New Roman" fo:font-size="14pt" style:font-size-asian="14pt" style:font-size-complex="14pt"/>
    </style:style>
    <style:style style:name="T14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59" style:parent-style-name="Normal" style:family="paragraph">
      <style:text-properties style:font-name="Times New Roman" style:font-name-complex="Times New Roman" fo:font-size="14pt" style:font-size-asian="14pt" style:font-size-complex="14pt"/>
    </style:style>
    <style:style style:name="P1460" style:parent-style-name="Normal" style:family="paragraph">
      <style:text-properties style:font-name="Times New Roman" style:font-name-complex="Times New Roman" fo:font-size="14pt" style:font-size-asian="14pt" style:font-size-complex="14pt"/>
    </style:style>
    <style:style style:name="P1461" style:parent-style-name="Normal" style:family="paragraph">
      <style:text-properties style:font-name="Times New Roman" style:font-name-complex="Times New Roman" fo:font-size="14pt" style:font-size-asian="14pt" style:font-size-complex="14pt"/>
    </style:style>
    <style:style style:name="T14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63" style:parent-style-name="DefaultParagraphFont" style:family="text">
      <style:text-properties style:font-name="Times New Roman" style:font-name-complex="Times New Roman" fo:font-size="14pt" style:font-size-asian="14pt" style:font-size-complex="14pt"/>
    </style:style>
    <style:style style:name="T14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66" style:parent-style-name="Normal" style:family="paragraph">
      <style:text-properties style:font-name="Times New Roman" style:font-name-complex="Times New Roman" fo:font-size="14pt" style:font-size-asian="14pt" style:font-size-complex="14pt"/>
    </style:style>
    <style:style style:name="P1467" style:parent-style-name="Normal" style:family="paragraph">
      <style:text-properties style:font-name="Times New Roman" style:font-name-complex="Times New Roman" fo:font-size="14pt" style:font-size-asian="14pt" style:font-size-complex="14pt"/>
    </style:style>
    <style:style style:name="P1468" style:parent-style-name="Normal" style:family="paragraph">
      <style:text-properties style:font-name="Times New Roman" style:font-name-complex="Times New Roman" fo:font-size="14pt" style:font-size-asian="14pt" style:font-size-complex="14pt"/>
    </style:style>
    <style:style style:name="T14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70" style:parent-style-name="DefaultParagraphFont" style:family="text">
      <style:text-properties style:font-name="Times New Roman" style:font-name-complex="Times New Roman" fo:font-size="14pt" style:font-size-asian="14pt" style:font-size-complex="14pt"/>
    </style:style>
    <style:style style:name="T14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72" style:parent-style-name="Normal" style:family="paragraph">
      <style:text-properties style:font-name="Times New Roman" style:font-name-complex="Times New Roman" fo:font-size="14pt" style:font-size-asian="14pt" style:font-size-complex="14pt"/>
    </style:style>
    <style:style style:name="T1473" style:parent-style-name="DefaultParagraphFont" style:family="text">
      <style:text-properties style:font-name="Times New Roman" style:font-name-complex="Times New Roman" fo:font-size="14pt" style:font-size-asian="14pt" style:font-size-complex="14pt"/>
    </style:style>
    <style:style style:name="T1474" style:parent-style-name="Hyperlink" style:family="text">
      <style:text-properties style:font-name="Times New Roman" style:font-name-complex="Times New Roman" fo:font-size="14pt" style:font-size-asian="14pt" style:font-size-complex="14pt"/>
    </style:style>
    <style:style style:name="T14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77" style:parent-style-name="Normal" style:family="paragraph">
      <style:text-properties style:font-name="Times New Roman" style:font-name-complex="Times New Roman" fo:font-size="14pt" style:font-size-asian="14pt" style:font-size-complex="14pt"/>
    </style:style>
    <style:style style:name="P1478" style:parent-style-name="Normal" style:family="paragraph">
      <style:text-properties style:font-name="Times New Roman" style:font-name-complex="Times New Roman" fo:font-size="14pt" style:font-size-asian="14pt" style:font-size-complex="14pt"/>
    </style:style>
    <style:style style:name="P1479" style:parent-style-name="Normal" style:family="paragraph">
      <style:text-properties style:font-name="Times New Roman" style:font-name-complex="Times New Roman" fo:font-size="14pt" style:font-size-asian="14pt" style:font-size-complex="14pt"/>
    </style:style>
    <style:style style:name="T14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81" style:parent-style-name="DefaultParagraphFont" style:family="text">
      <style:text-properties style:font-name="Times New Roman" style:font-name-complex="Times New Roman" fo:font-size="14pt" style:font-size-asian="14pt" style:font-size-complex="14pt"/>
    </style:style>
    <style:style style:name="T14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83" style:parent-style-name="Normal" style:family="paragraph">
      <style:text-properties style:font-name="Times New Roman" style:font-name-complex="Times New Roman" fo:font-size="14pt" style:font-size-asian="14pt" style:font-size-complex="14pt"/>
    </style:style>
    <style:style style:name="T1484" style:parent-style-name="DefaultParagraphFont" style:family="text">
      <style:text-properties style:font-name="Times New Roman" style:font-name-complex="Times New Roman" fo:font-size="14pt" style:font-size-asian="14pt" style:font-size-complex="14pt"/>
    </style:style>
    <style:style style:name="T14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87" style:parent-style-name="Normal" style:family="paragraph">
      <style:text-properties style:font-name="Times New Roman" style:font-name-complex="Times New Roman" fo:font-size="14pt" style:font-size-asian="14pt" style:font-size-complex="14pt"/>
    </style:style>
    <style:style style:name="P1488" style:parent-style-name="Normal" style:family="paragraph">
      <style:text-properties style:font-name="Times New Roman" style:font-name-complex="Times New Roman" fo:font-size="14pt" style:font-size-asian="14pt" style:font-size-complex="14pt"/>
    </style:style>
    <style:style style:name="P1489" style:parent-style-name="Normal" style:family="paragraph">
      <style:text-properties style:font-name="Times New Roman" style:font-name-complex="Times New Roman" fo:font-size="14pt" style:font-size-asian="14pt" style:font-size-complex="14pt"/>
    </style:style>
    <style:style style:name="T14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91" style:parent-style-name="DefaultParagraphFont" style:family="text">
      <style:text-properties style:font-name="Times New Roman" style:font-name-complex="Times New Roman" fo:font-size="14pt" style:font-size-asian="14pt" style:font-size-complex="14pt"/>
    </style:style>
    <style:style style:name="T14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93" style:parent-style-name="Normal" style:family="paragraph">
      <style:text-properties style:font-name="Times New Roman" style:font-name-complex="Times New Roman" fo:font-size="14pt" style:font-size-asian="14pt" style:font-size-complex="14pt"/>
    </style:style>
    <style:style style:name="P1494" style:parent-style-name="Normal" style:family="paragraph">
      <style:text-properties style:font-name="Times New Roman" style:font-name-complex="Times New Roman" fo:font-size="14pt" style:font-size-asian="14pt" style:font-size-complex="14pt"/>
    </style:style>
    <style:style style:name="T14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97" style:parent-style-name="Normal" style:family="paragraph">
      <style:text-properties style:font-name="Times New Roman" style:font-name-complex="Times New Roman" fo:font-size="14pt" style:font-size-asian="14pt" style:font-size-complex="14pt"/>
    </style:style>
    <style:style style:name="P1498" style:parent-style-name="Normal" style:family="paragraph">
      <style:text-properties style:font-name="Times New Roman" style:font-name-complex="Times New Roman" fo:font-size="14pt" style:font-size-asian="14pt" style:font-size-complex="14pt"/>
    </style:style>
    <style:style style:name="P1499" style:parent-style-name="Normal" style:family="paragraph">
      <style:text-properties style:font-name="Times New Roman" style:font-name-complex="Times New Roman" fo:font-size="14pt" style:font-size-asian="14pt" style:font-size-complex="14pt"/>
    </style:style>
    <style:style style:name="T15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01" style:parent-style-name="DefaultParagraphFont" style:family="text">
      <style:text-properties style:font-name="Times New Roman" style:font-name-complex="Times New Roman" fo:font-size="14pt" style:font-size-asian="14pt" style:font-size-complex="14pt"/>
    </style:style>
    <style:style style:name="T15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03" style:parent-style-name="Normal" style:family="paragraph">
      <style:text-properties style:font-name="Times New Roman" style:font-name-complex="Times New Roman" fo:font-size="14pt" style:font-size-asian="14pt" style:font-size-complex="14pt"/>
    </style:style>
    <style:style style:name="T1504" style:parent-style-name="DefaultParagraphFont" style:family="text">
      <style:text-properties style:font-name="Times New Roman" style:font-name-complex="Times New Roman" fo:font-size="14pt" style:font-size-asian="14pt" style:font-size-complex="14pt"/>
    </style:style>
    <style:style style:name="P1505" style:parent-style-name="Normal" style:family="paragraph">
      <style:text-properties style:font-name="Times New Roman" style:font-name-complex="Times New Roman" fo:font-size="14pt" style:font-size-asian="14pt" style:font-size-complex="14pt"/>
    </style:style>
    <style:style style:name="T15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08" style:parent-style-name="Normal" style:family="paragraph">
      <style:text-properties style:font-name="Times New Roman" style:font-name-complex="Times New Roman" fo:font-size="14pt" style:font-size-asian="14pt" style:font-size-complex="14pt"/>
    </style:style>
    <style:style style:name="P1509" style:parent-style-name="Normal" style:family="paragraph">
      <style:text-properties style:font-name="Times New Roman" style:font-name-complex="Times New Roman" fo:font-size="14pt" style:font-size-asian="14pt" style:font-size-complex="14pt"/>
    </style:style>
    <style:style style:name="P1510" style:parent-style-name="Normal" style:family="paragraph">
      <style:text-properties style:font-name="Times New Roman" style:font-name-complex="Times New Roman" fo:font-size="14pt" style:font-size-asian="14pt" style:font-size-complex="14pt"/>
    </style:style>
    <style:style style:name="T15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12" style:parent-style-name="DefaultParagraphFont" style:family="text">
      <style:text-properties style:font-name="Times New Roman" style:font-name-complex="Times New Roman" fo:font-size="14pt" style:font-size-asian="14pt" style:font-size-complex="14pt"/>
    </style:style>
    <style:style style:name="T15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14" style:parent-style-name="Normal" style:family="paragraph">
      <style:text-properties style:font-name="Times New Roman" style:font-name-complex="Times New Roman" fo:font-size="14pt" style:font-size-asian="14pt" style:font-size-complex="14pt"/>
    </style:style>
    <style:style style:name="P1515" style:parent-style-name="Normal" style:family="paragraph">
      <style:text-properties style:font-name="Times New Roman" style:font-name-complex="Times New Roman" fo:font-size="14pt" style:font-size-asian="14pt" style:font-size-complex="14pt"/>
    </style:style>
    <style:style style:name="T15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18" style:parent-style-name="Normal" style:family="paragraph">
      <style:text-properties style:font-name="Times New Roman" style:font-name-complex="Times New Roman" fo:font-size="14pt" style:font-size-asian="14pt" style:font-size-complex="14pt"/>
    </style:style>
    <style:style style:name="P1519" style:parent-style-name="consolas" style:family="paragraph">
      <style:text-properties fo:language="it" fo:country="IT"/>
    </style:style>
    <style:style style:name="P1520" style:parent-style-name="consolas" style:family="paragraph">
      <style:text-properties fo:language="it" fo:country="IT"/>
    </style:style>
    <style:style style:name="P1521" style:parent-style-name="consolas" style:family="paragraph">
      <style:text-properties fo:language="it" fo:country="IT"/>
    </style:style>
    <style:style style:name="P1522" style:parent-style-name="consolas" style:family="paragraph">
      <style:text-properties fo:language="it" fo:country="IT"/>
    </style:style>
    <style:style style:name="P1523" style:parent-style-name="consolas" style:family="paragraph">
      <style:text-properties fo:language="it" fo:country="IT"/>
    </style:style>
    <style:style style:name="T1524" style:parent-style-name="DefaultParagraphFont" style:family="text">
      <style:text-properties fo:language="it" fo:country="IT"/>
    </style:style>
    <style:style style:name="P1525" style:parent-style-name="Normal" style:family="paragraph">
      <style:text-properties style:font-name="Times New Roman" style:font-name-complex="Times New Roman" fo:font-size="14pt" style:font-size-asian="14pt" style:font-size-complex="14pt"/>
    </style:style>
    <style:style style:name="P1526" style:parent-style-name="Normal" style:family="paragraph">
      <style:text-properties style:font-name="Times New Roman" style:font-name-complex="Times New Roman" fo:font-size="14pt" style:font-size-asian="14pt" style:font-size-complex="14pt"/>
    </style:style>
    <style:style style:name="P1527" style:parent-style-name="Normal" style:family="paragraph">
      <style:text-properties style:font-name="Times New Roman" style:font-name-complex="Times New Roman" fo:font-size="14pt" style:font-size-asian="14pt" style:font-size-complex="14pt"/>
    </style:style>
    <style:style style:name="T15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29" style:parent-style-name="DefaultParagraphFont" style:family="text">
      <style:text-properties style:font-name="Times New Roman" style:font-name-complex="Times New Roman" fo:font-size="14pt" style:font-size-asian="14pt" style:font-size-complex="14pt"/>
    </style:style>
    <style:style style:name="T15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31" style:parent-style-name="DefaultParagraphFont" style:family="text">
      <style:text-properties style:font-name="Times New Roman" style:font-name-complex="Times New Roman" fo:font-size="14pt" style:font-size-asian="14pt" style:font-size-complex="14pt"/>
    </style:style>
    <style:style style:name="T15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33" style:parent-style-name="DefaultParagraphFont" style:family="text">
      <style:text-properties style:font-name="Times New Roman" style:font-name-complex="Times New Roman" fo:font-size="14pt" style:font-size-asian="14pt" style:font-size-complex="14pt"/>
    </style:style>
    <style:style style:name="T15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36" style:parent-style-name="Normal" style:family="paragraph">
      <style:text-properties style:font-name="Times New Roman" style:font-name-complex="Times New Roman" fo:font-size="14pt" style:font-size-asian="14pt" style:font-size-complex="14pt"/>
    </style:style>
    <style:style style:name="TableColumn1538" style:family="table-column">
      <style:table-column-properties style:column-width="3.2888in"/>
    </style:style>
    <style:style style:name="TableColumn1539" style:family="table-column">
      <style:table-column-properties style:column-width="3.2in"/>
    </style:style>
    <style:style style:name="Table1537" style:family="table">
      <style:table-properties style:width="6.4888in" fo:margin-left="0in" table:align="left"/>
    </style:style>
    <style:style style:name="TableRow1540" style:family="table-row">
      <style:table-row-properties/>
    </style:style>
    <style:style style:name="TableCell1541"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15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43" style:parent-style-name="DefaultParagraphFont" style:family="text">
      <style:text-properties style:font-name="Times New Roman" style:font-name-complex="Times New Roman" fo:font-size="14pt" style:font-size-asian="14pt" style:font-size-complex="14pt"/>
    </style:style>
    <style:style style:name="T1544" style:parent-style-name="DefaultParagraphFont" style:family="text">
      <style:text-properties style:font-name="Times New Roman" style:font-name-complex="Times New Roman" fo:font-size="14pt" style:font-size-asian="14pt" style:font-size-complex="14pt"/>
    </style:style>
    <style:style style:name="T1545" style:parent-style-name="DefaultParagraphFont" style:family="text">
      <style:text-properties style:font-name="Times New Roman" style:font-name-complex="Times New Roman" fo:font-size="14pt" style:font-size-asian="14pt" style:font-size-complex="14pt"/>
    </style:style>
    <style:style style:name="T1546" style:parent-style-name="DefaultParagraphFont" style:family="text">
      <style:text-properties style:font-name="Times New Roman" style:font-name-complex="Times New Roman" fo:font-size="14pt" style:font-size-asian="14pt" style:font-size-complex="14pt"/>
    </style:style>
    <style:style style:name="T1547" style:parent-style-name="DefaultParagraphFont" style:family="text">
      <style:text-properties style:font-name="Times New Roman" style:font-name-complex="Times New Roman" fo:font-size="14pt" style:font-size-asian="14pt" style:font-size-complex="14pt"/>
    </style:style>
    <style:style style:name="T1548" style:parent-style-name="DefaultParagraphFont" style:family="text">
      <style:text-properties style:font-name="Times New Roman" style:font-name-complex="Times New Roman" fo:font-size="14pt" style:font-size-asian="14pt" style:font-size-complex="14pt"/>
    </style:style>
    <style:style style:name="T1549" style:parent-style-name="DefaultParagraphFont" style:family="text">
      <style:text-properties style:font-name="Times New Roman" style:font-name-complex="Times New Roman" fo:font-size="14pt" style:font-size-asian="14pt" style:font-size-complex="14pt"/>
    </style:style>
    <style:style style:name="T1550" style:parent-style-name="DefaultParagraphFont" style:family="text">
      <style:text-properties style:font-name="Times New Roman" style:font-name-complex="Times New Roman" fo:font-size="14pt" style:font-size-asian="14pt" style:font-size-complex="14pt"/>
    </style:style>
    <style:style style:name="T1551" style:parent-style-name="DefaultParagraphFont" style:family="text">
      <style:text-properties style:font-name="Times New Roman" style:font-name-complex="Times New Roman" fo:font-size="14pt" style:font-size-asian="14pt" style:font-size-complex="14pt"/>
    </style:style>
    <style:style style:name="TableCell1552"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15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54" style:parent-style-name="DefaultParagraphFont" style:family="text">
      <style:text-properties style:font-name="Times New Roman" style:font-name-complex="Times New Roman" fo:font-size="14pt" style:font-size-asian="14pt" style:font-size-complex="14pt"/>
    </style:style>
    <style:style style:name="T1555" style:parent-style-name="DefaultParagraphFont" style:family="text">
      <style:text-properties style:font-name="Times New Roman" style:font-name-complex="Times New Roman" fo:font-size="14pt" style:font-size-asian="14pt" style:font-size-complex="14pt"/>
    </style:style>
    <style:style style:name="T1556" style:parent-style-name="DefaultParagraphFont" style:family="text">
      <style:text-properties style:font-name="Times New Roman" style:font-name-complex="Times New Roman" fo:font-size="14pt" style:font-size-asian="14pt" style:font-size-complex="14pt"/>
    </style:style>
    <style:style style:name="T1557" style:parent-style-name="DefaultParagraphFont" style:family="text">
      <style:text-properties style:font-name="Times New Roman" style:font-name-complex="Times New Roman" fo:font-size="14pt" style:font-size-asian="14pt" style:font-size-complex="14pt"/>
    </style:style>
    <style:style style:name="T1558" style:parent-style-name="DefaultParagraphFont" style:family="text">
      <style:text-properties style:font-name="Times New Roman" style:font-name-complex="Times New Roman" fo:font-size="14pt" style:font-size-asian="14pt" style:font-size-complex="14pt"/>
    </style:style>
    <style:style style:name="T1559" style:parent-style-name="DefaultParagraphFont" style:family="text">
      <style:text-properties style:font-name="Times New Roman" style:font-name-complex="Times New Roman" fo:font-size="14pt" style:font-size-asian="14pt" style:font-size-complex="14pt"/>
    </style:style>
    <style:style style:name="T1560" style:parent-style-name="DefaultParagraphFont" style:family="text">
      <style:text-properties style:font-name="Times New Roman" style:font-name-complex="Times New Roman" fo:font-size="14pt" style:font-size-asian="14pt" style:font-size-complex="14pt"/>
    </style:style>
    <style:style style:name="T1561" style:parent-style-name="DefaultParagraphFont" style:family="text">
      <style:text-properties style:font-name="Times New Roman" style:font-name-complex="Times New Roman" fo:font-size="14pt" style:font-size-asian="14pt" style:font-size-complex="14pt"/>
    </style:style>
    <style:style style:name="T1562" style:parent-style-name="DefaultParagraphFont" style:family="text">
      <style:text-properties style:font-name="Times New Roman" style:font-name-complex="Times New Roman" fo:font-size="14pt" style:font-size-asian="14pt" style:font-size-complex="14pt"/>
    </style:style>
    <style:style style:name="TableRow1563" style:family="table-row">
      <style:table-row-properties/>
    </style:style>
    <style:style style:name="TableCell1564"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15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67" style:parent-style-name="DefaultParagraphFont" style:family="text">
      <style:text-properties style:font-name="Times New Roman" style:font-name-complex="Times New Roman" fo:font-size="14pt" style:font-size-asian="14pt" style:font-size-complex="14pt"/>
    </style:style>
    <style:style style:name="T1568" style:parent-style-name="DefaultParagraphFont" style:family="text">
      <style:text-properties style:font-name="Times New Roman" style:font-name-complex="Times New Roman" fo:font-size="14pt" style:font-size-asian="14pt" style:font-size-complex="14pt"/>
    </style:style>
    <style:style style:name="T1569" style:parent-style-name="DefaultParagraphFont" style:family="text">
      <style:text-properties style:font-name="Times New Roman" style:font-name-complex="Times New Roman" fo:font-size="14pt" style:font-size-asian="14pt" style:font-size-complex="14pt"/>
    </style:style>
    <style:style style:name="T1570" style:parent-style-name="DefaultParagraphFont" style:family="text">
      <style:text-properties style:font-name="Times New Roman" style:font-name-complex="Times New Roman" fo:font-size="14pt" style:font-size-asian="14pt" style:font-size-complex="14pt"/>
    </style:style>
    <style:style style:name="T1571" style:parent-style-name="DefaultParagraphFont" style:family="text">
      <style:text-properties style:font-name="Times New Roman" style:font-name-complex="Times New Roman" fo:font-size="14pt" style:font-size-asian="14pt" style:font-size-complex="14pt"/>
    </style:style>
    <style:style style:name="T1572" style:parent-style-name="DefaultParagraphFont" style:family="text">
      <style:text-properties style:font-name="Times New Roman" style:font-name-complex="Times New Roman" fo:font-size="14pt" style:font-size-asian="14pt" style:font-size-complex="14pt"/>
    </style:style>
    <style:style style:name="T1573" style:parent-style-name="DefaultParagraphFont" style:family="text">
      <style:text-properties style:font-name="Times New Roman" style:font-name-complex="Times New Roman" fo:font-size="14pt" style:font-size-asian="14pt" style:font-size-complex="14pt"/>
    </style:style>
    <style:style style:name="T1574" style:parent-style-name="DefaultParagraphFont" style:family="text">
      <style:text-properties style:font-name="Times New Roman" style:font-name-complex="Times New Roman" fo:font-size="14pt" style:font-size-asian="14pt" style:font-size-complex="14pt"/>
    </style:style>
    <style:style style:name="T1575" style:parent-style-name="DefaultParagraphFont" style:family="text">
      <style:text-properties style:font-name="Times New Roman" style:font-name-complex="Times New Roman" fo:font-size="14pt" style:font-size-asian="14pt" style:font-size-complex="14pt"/>
    </style:style>
    <style:style style:name="T1576" style:parent-style-name="DefaultParagraphFont" style:family="text">
      <style:text-properties style:font-name="Times New Roman" style:font-name-complex="Times New Roman" fo:font-size="14pt" style:font-size-asian="14pt" style:font-size-complex="14pt"/>
    </style:style>
    <style:style style:name="TableCell1577" style:family="table-cell">
      <style:table-cell-properties fo:border="0.0104in solid #CCCCCC" fo:background-color="#FFFFFF" style:writing-mode="lr-tb" fo:padding-top="0.0312in" fo:padding-left="0.1041in" fo:padding-bottom="0.0312in" fo:padding-right="0.1041in">
        <style:background-fill draw:fill="solid" draw:fill-color="#FFFFFF"/>
      </style:table-cell-properties>
    </style:style>
    <style:style style:name="T15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80" style:parent-style-name="DefaultParagraphFont" style:family="text">
      <style:text-properties style:font-name="Times New Roman" style:font-name-complex="Times New Roman" fo:font-size="14pt" style:font-size-asian="14pt" style:font-size-complex="14pt"/>
    </style:style>
    <style:style style:name="T1581" style:parent-style-name="DefaultParagraphFont" style:family="text">
      <style:text-properties style:font-name="Times New Roman" style:font-name-complex="Times New Roman" fo:font-size="14pt" style:font-size-asian="14pt" style:font-size-complex="14pt"/>
    </style:style>
    <style:style style:name="T1582" style:parent-style-name="DefaultParagraphFont" style:family="text">
      <style:text-properties style:font-name="Times New Roman" style:font-name-complex="Times New Roman" fo:font-size="14pt" style:font-size-asian="14pt" style:font-size-complex="14pt"/>
    </style:style>
    <style:style style:name="T1583" style:parent-style-name="DefaultParagraphFont" style:family="text">
      <style:text-properties style:font-name="Times New Roman" style:font-name-complex="Times New Roman" fo:font-size="14pt" style:font-size-asian="14pt" style:font-size-complex="14pt"/>
    </style:style>
    <style:style style:name="T1584" style:parent-style-name="DefaultParagraphFont" style:family="text">
      <style:text-properties style:font-name="Times New Roman" style:font-name-complex="Times New Roman" fo:font-size="14pt" style:font-size-asian="14pt" style:font-size-complex="14pt"/>
    </style:style>
    <style:style style:name="T1585" style:parent-style-name="DefaultParagraphFont" style:family="text">
      <style:text-properties style:font-name="Times New Roman" style:font-name-complex="Times New Roman" fo:font-size="14pt" style:font-size-asian="14pt" style:font-size-complex="14pt"/>
    </style:style>
    <style:style style:name="T1586" style:parent-style-name="DefaultParagraphFont" style:family="text">
      <style:text-properties style:font-name="Times New Roman" style:font-name-complex="Times New Roman" fo:font-size="14pt" style:font-size-asian="14pt" style:font-size-complex="14pt"/>
    </style:style>
    <style:style style:name="T1587" style:parent-style-name="DefaultParagraphFont" style:family="text">
      <style:text-properties style:font-name="Times New Roman" style:font-name-complex="Times New Roman" fo:font-size="14pt" style:font-size-asian="14pt" style:font-size-complex="14pt"/>
    </style:style>
    <style:style style:name="T1588" style:parent-style-name="DefaultParagraphFont" style:family="text">
      <style:text-properties style:font-name="Times New Roman" style:font-name-complex="Times New Roman" fo:font-size="14pt" style:font-size-asian="14pt" style:font-size-complex="14pt"/>
    </style:style>
    <style:style style:name="T1589" style:parent-style-name="DefaultParagraphFont" style:family="text">
      <style:text-properties style:font-name="Times New Roman" style:font-name-complex="Times New Roman" fo:font-size="14pt" style:font-size-asian="14pt" style:font-size-complex="14pt"/>
    </style:style>
    <style:style style:name="P1590" style:parent-style-name="Normal" style:family="paragraph">
      <style:text-properties style:font-name="Times New Roman" style:font-name-complex="Times New Roman" fo:font-size="14pt" style:font-size-asian="14pt" style:font-size-complex="14pt"/>
    </style:style>
    <style:style style:name="P1591" style:parent-style-name="Normal" style:family="paragraph">
      <style:text-properties style:font-name="Times New Roman" style:font-name-complex="Times New Roman" fo:font-size="14pt" style:font-size-asian="14pt" style:font-size-complex="14pt"/>
    </style:style>
    <style:style style:name="T15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93" style:parent-style-name="DefaultParagraphFont" style:family="text">
      <style:text-properties style:font-name="Times New Roman" style:font-name-complex="Times New Roman" fo:font-size="14pt" style:font-size-asian="14pt" style:font-size-complex="14pt"/>
    </style:style>
    <style:style style:name="T15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95" style:parent-style-name="Normal" style:family="paragraph">
      <style:text-properties style:font-name="Times New Roman" style:font-name-complex="Times New Roman" fo:font-size="14pt" style:font-size-asian="14pt" style:font-size-complex="14pt"/>
    </style:style>
    <style:style style:name="P1596" style:parent-style-name="Normal" style:family="paragraph">
      <style:text-properties style:font-name="Times New Roman" style:font-name-complex="Times New Roman" fo:font-size="14pt" style:font-size-asian="14pt" style:font-size-complex="14pt"/>
    </style:style>
    <style:style style:name="T15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99" style:parent-style-name="Normal" style:family="paragraph">
      <style:text-properties style:font-name="Times New Roman" style:font-name-complex="Times New Roman" fo:font-size="14pt" style:font-size-asian="14pt" style:font-size-complex="14pt"/>
    </style:style>
    <style:style style:name="T1600" style:parent-style-name="DefaultParagraphFont" style:family="text">
      <style:text-properties style:font-name="Times New Roman" style:font-name-complex="Times New Roman" fo:font-size="14pt" style:font-size-asian="14pt" style:font-size-complex="14pt"/>
    </style:style>
    <style:style style:name="P1601" style:parent-style-name="Normal" style:family="paragraph">
      <style:text-properties style:font-name="Times New Roman" style:font-name-complex="Times New Roman" fo:font-size="14pt" style:font-size-asian="14pt" style:font-size-complex="14pt"/>
    </style:style>
    <style:style style:name="T16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04" style:parent-style-name="DefaultParagraphFont" style:family="text">
      <style:text-properties style:font-name="Times New Roman" style:font-name-complex="Times New Roman" fo:font-size="14pt" style:font-size-asian="14pt" style:font-size-complex="14pt"/>
    </style:style>
    <style:style style:name="T1605" style:parent-style-name="DefaultParagraphFont" style:family="text">
      <style:text-properties style:font-name="Times New Roman" style:font-name-complex="Times New Roman" fo:font-size="14pt" style:font-size-asian="14pt" style:font-size-complex="14pt"/>
    </style:style>
    <style:style style:name="T1606" style:parent-style-name="DefaultParagraphFont" style:family="text">
      <style:text-properties style:font-name="Times New Roman" style:font-name-complex="Times New Roman" fo:font-size="14pt" style:font-size-asian="14pt" style:font-size-complex="14pt"/>
    </style:style>
    <style:style style:name="T16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08" style:parent-style-name="DefaultParagraphFont" style:family="text">
      <style:text-properties style:font-name="Times New Roman" style:font-name-complex="Times New Roman" fo:font-size="14pt" style:font-size-asian="14pt" style:font-size-complex="14pt"/>
    </style:style>
    <style:style style:name="T1609" style:parent-style-name="DefaultParagraphFont" style:family="text">
      <style:text-properties style:font-name="Times New Roman" style:font-name-complex="Times New Roman" fo:font-size="14pt" style:font-size-asian="14pt" style:font-size-complex="14pt"/>
    </style:style>
    <style:style style:name="T16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11" style:parent-style-name="DefaultParagraphFont" style:family="text">
      <style:text-properties style:font-name="Times New Roman" style:font-name-complex="Times New Roman" fo:font-size="14pt" style:font-size-asian="14pt" style:font-size-complex="14pt"/>
    </style:style>
    <style:style style:name="T1612" style:parent-style-name="DefaultParagraphFont" style:family="text">
      <style:text-properties style:font-name="Times New Roman" style:font-name-complex="Times New Roman" fo:font-size="14pt" style:font-size-asian="14pt" style:font-size-complex="14pt"/>
    </style:style>
    <style:style style:name="T16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14" style:parent-style-name="DefaultParagraphFont" style:family="text">
      <style:text-properties style:font-name="Times New Roman" style:font-name-complex="Times New Roman" fo:font-size="14pt" style:font-size-asian="14pt" style:font-size-complex="14pt"/>
    </style:style>
    <style:style style:name="T1615" style:parent-style-name="DefaultParagraphFont" style:family="text">
      <style:text-properties style:font-name="Times New Roman" style:font-name-complex="Times New Roman" fo:font-size="14pt" style:font-size-asian="14pt" style:font-size-complex="14pt"/>
    </style:style>
    <style:style style:name="T1616" style:parent-style-name="Hyperlink" style:family="text">
      <style:text-properties style:font-name="Times New Roman" style:font-name-complex="Times New Roman" fo:font-size="14pt" style:font-size-asian="14pt" style:font-size-complex="14pt"/>
    </style:style>
    <style:style style:name="P1617" style:parent-style-name="Normal" style:family="paragraph">
      <style:text-properties style:font-name="Times New Roman" style:font-name-complex="Times New Roman" fo:font-size="14pt" style:font-size-asian="14pt" style:font-size-complex="14pt"/>
    </style:style>
    <style:style style:name="T1618" style:parent-style-name="DefaultParagraphFont" style:family="text">
      <style:text-properties style:font-name="Times New Roman" style:font-name-complex="Times New Roman" fo:font-size="14pt" style:font-size-asian="14pt" style:font-size-complex="14pt"/>
    </style:style>
    <style:style style:name="T16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21" style:parent-style-name="Normal" style:family="paragraph">
      <style:text-properties style:font-name="Times New Roman" style:font-name-complex="Times New Roman" fo:font-size="14pt" style:font-size-asian="14pt" style:font-size-complex="14pt"/>
    </style:style>
    <style:style style:name="P1622" style:parent-style-name="Normal" style:family="paragraph">
      <style:text-properties style:font-name="Times New Roman" style:font-name-complex="Times New Roman" fo:font-size="14pt" style:font-size-asian="14pt" style:font-size-complex="14pt"/>
    </style:style>
    <style:style style:name="P1623" style:parent-style-name="Normal" style:family="paragraph">
      <style:text-properties style:font-name="Times New Roman" style:font-name-complex="Times New Roman" fo:font-size="14pt" style:font-size-asian="14pt" style:font-size-complex="14pt"/>
    </style:style>
    <style:style style:name="T16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25" style:parent-style-name="DefaultParagraphFont" style:family="text">
      <style:text-properties style:font-name="Times New Roman" style:font-name-complex="Times New Roman" fo:font-size="14pt" style:font-size-asian="14pt" style:font-size-complex="14pt"/>
    </style:style>
    <style:style style:name="T16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28" style:parent-style-name="Normal" style:family="paragraph">
      <style:text-properties style:font-name="Times New Roman" style:font-name-complex="Times New Roman" fo:font-size="14pt" style:font-size-asian="14pt" style:font-size-complex="14pt"/>
    </style:style>
    <style:style style:name="P1629" style:parent-style-name="Normal" style:family="paragraph">
      <style:text-properties style:font-name="Times New Roman" style:font-name-complex="Times New Roman" fo:font-size="14pt" style:font-size-asian="14pt" style:font-size-complex="14pt"/>
    </style:style>
    <style:style style:name="P1630" style:parent-style-name="Normal" style:family="paragraph">
      <style:text-properties style:font-name="Times New Roman" style:font-name-complex="Times New Roman" fo:font-size="14pt" style:font-size-asian="14pt" style:font-size-complex="14pt"/>
    </style:style>
    <style:style style:name="T16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32" style:parent-style-name="DefaultParagraphFont" style:family="text">
      <style:text-properties style:font-name="Times New Roman" style:font-name-complex="Times New Roman" fo:font-size="14pt" style:font-size-asian="14pt" style:font-size-complex="14pt"/>
    </style:style>
    <style:style style:name="T16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35" style:parent-style-name="Normal" style:family="paragraph">
      <style:text-properties style:font-name="Times New Roman" style:font-name-complex="Times New Roman" fo:font-size="14pt" style:font-size-asian="14pt" style:font-size-complex="14pt"/>
    </style:style>
    <style:style style:name="T1636" style:parent-style-name="DefaultParagraphFont" style:family="text">
      <style:text-properties style:font-name="Times New Roman" style:font-name-complex="Times New Roman" fo:font-size="14pt" style:font-size-asian="14pt" style:font-size-complex="14pt"/>
    </style:style>
    <style:style style:name="T16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39" style:parent-style-name="DefaultParagraphFont" style:family="text">
      <style:text-properties style:font-name="Times New Roman" style:font-name-complex="Times New Roman" fo:font-size="14pt" style:font-size-asian="14pt" style:font-size-complex="14pt"/>
    </style:style>
    <style:style style:name="T1640" style:parent-style-name="DefaultParagraphFont" style:family="text">
      <style:text-properties style:font-name="Times New Roman" style:font-name-complex="Times New Roman" fo:font-size="14pt" style:font-size-asian="14pt" style:font-size-complex="14pt"/>
    </style:style>
    <style:style style:name="T16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42" style:parent-style-name="DefaultParagraphFont" style:family="text">
      <style:text-properties style:font-name="Times New Roman" style:font-name-complex="Times New Roman" fo:font-size="14pt" style:font-size-asian="14pt" style:font-size-complex="14pt"/>
    </style:style>
    <style:style style:name="T1643" style:parent-style-name="DefaultParagraphFont" style:family="text">
      <style:text-properties style:font-name="Times New Roman" style:font-name-complex="Times New Roman" fo:font-size="14pt" style:font-size-asian="14pt" style:font-size-complex="14pt"/>
    </style:style>
    <style:style style:name="T16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45" style:parent-style-name="Normal" style:family="paragraph">
      <style:text-properties style:font-name="Times New Roman" style:font-name-complex="Times New Roman" fo:font-size="14pt" style:font-size-asian="14pt" style:font-size-complex="14pt"/>
    </style:style>
    <style:style style:name="T16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48" style:parent-style-name="Normal" style:family="paragraph">
      <style:text-properties style:font-name="Times New Roman" style:font-name-complex="Times New Roman" fo:font-size="14pt" style:font-size-asian="14pt" style:font-size-complex="14pt"/>
    </style:style>
    <style:style style:name="P1649" style:parent-style-name="consolas" style:family="paragraph">
      <style:text-properties fo:language="it" fo:country="IT"/>
    </style:style>
    <style:style style:name="P1650" style:parent-style-name="consolas" style:family="paragraph">
      <style:text-properties fo:language="it" fo:country="IT"/>
    </style:style>
    <style:style style:name="P1651" style:parent-style-name="consolas" style:family="paragraph">
      <style:text-properties fo:language="it" fo:country="IT"/>
    </style:style>
    <style:style style:name="P1652" style:parent-style-name="consolas" style:family="paragraph">
      <style:text-properties fo:language="it" fo:country="IT"/>
    </style:style>
    <style:style style:name="P1653" style:parent-style-name="Normal" style:family="paragraph">
      <style:text-properties style:font-name="Times New Roman" style:font-name-complex="Times New Roman" fo:font-size="14pt" style:font-size-asian="14pt" style:font-size-complex="14pt"/>
    </style:style>
    <style:style style:name="P1654" style:parent-style-name="Normal" style:family="paragraph">
      <style:text-properties style:font-name="Times New Roman" style:font-name-complex="Times New Roman" fo:font-size="14pt" style:font-size-asian="14pt" style:font-size-complex="14pt"/>
    </style:style>
    <style:style style:name="P1655" style:parent-style-name="Normal" style:family="paragraph">
      <style:text-properties style:font-name="Times New Roman" style:font-name-complex="Times New Roman" fo:font-size="14pt" style:font-size-asian="14pt" style:font-size-complex="14pt"/>
    </style:style>
    <style:style style:name="T16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57" style:parent-style-name="DefaultParagraphFont" style:family="text">
      <style:text-properties style:font-name="Times New Roman" style:font-name-complex="Times New Roman" fo:font-size="14pt" style:font-size-asian="14pt" style:font-size-complex="14pt"/>
    </style:style>
    <style:style style:name="T16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59" style:parent-style-name="Normal" style:family="paragraph">
      <style:text-properties style:font-name="Times New Roman" style:font-name-complex="Times New Roman" fo:font-size="14pt" style:font-size-asian="14pt" style:font-size-complex="14pt"/>
    </style:style>
    <style:style style:name="P1660" style:parent-style-name="Normal" style:family="paragraph">
      <style:text-properties style:font-name="Times New Roman" style:font-name-complex="Times New Roman" fo:font-size="14pt" style:font-size-asian="14pt" style:font-size-complex="14pt"/>
    </style:style>
    <style:style style:family="graphic" style:name="a50"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57"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58"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5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60"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Question 15.</text:span><text:span text:style-name="T3">1</text:span></text:p>
      <text:p text:style-name="P4">Refer to the exhibit.</text:p>
      <text:p text:style-name="Normal"><text:span text:style-name="T5"><draw:frame draw:style-name="a0" draw:name="Picture 122" text:anchor-type="as-char" svg:x="0in" svg:y="0in" svg:width="6.5in" svg:height="4.64306in" style:rel-width="scale" style:rel-height="scale"><draw:image xlink:href="media/image1.jpeg" xlink:type="simple" xlink:show="embed" xlink:actuate="onLoad"/><svg:title/><svg:desc/></draw:frame></text:span></text:p>
      <text:p text:style-name="P6">A network engineer is configuring a WLAN to use a WPA2 PSK and allow only specific clients to join. Which two actions must be taken to complete the process? (Choose two)</text:p>
      <text:p text:style-name="P7">A. Enable the CCKM option for Authentication Key Management<text:line-break/>B. Enable the 802.1X option for Authentication Key Management<text:line-break/>C. Enable the WPA2 Policy option<text:line-break/>D. Enable the OSEN Policy option<text:line-break/>E. Enable the MAC Filtering option</text:p>
      <text:p text:style-name="P8"> </text:p>
      <text:p text:style-name="Normal"><text:span text:style-name="T9">Answer:</text:span><text:span text:style-name="T10"> C E</text:span></text:p>
      <text:p text:style-name="Normal"><text:span text:style-name="T11">Explanation</text:span></text:p>
      <text:soft-page-break/>
      <text:p text:style-name="P12">We need to choose “Layer 2 Mac Filtering” so that only clients with specific MAC addresses are allowed to join. And the “WPA2 Policy” option to instruct WLC to use WPA2 only with one of WPA2 Encryption (AES or TKIP).</text:p>
      <text:p text:style-name="Normal"><text:span text:style-name="T13">Question 15.</text:span><text:span text:style-name="T14">2</text:span></text:p>
      <text:p text:style-name="P15">What is the RFC 4627 default encoding for JSON text?</text:p>
      <text:p text:style-name="P16">A. UTF-8<text:line-break/>B. GB18030<text:line-break/>C. UCS-2<text:line-break/>D. Hex</text:p>
      <text:p text:style-name="P17"> </text:p>
      <text:p text:style-name="Normal"><text:span text:style-name="T18">Answer:</text:span><text:span text:style-name="T19"> A</text:span></text:p>
      <text:p text:style-name="Normal"><text:span text:style-name="T20">Explanation</text:span></text:p>
      <text:p text:style-name="P21">Data is encoded as defined by JSON in RFC4627. The default encoding for APIs is UTF-8.</text:p>
      <text:p text:style-name="Normal"><text:span text:style-name="T22">Question 15.</text:span><text:span text:style-name="T23">3</text:span></text:p>
      <text:p text:style-name="P24">Refer to the exhibit.</text:p>
      <text:p text:style-name="consolas">["red", "one"]</text:p>
      <text:p text:style-name="P25">Which type of JSON data is represented?</text:p>
      <text:p text:style-name="P26">A. number<text:line-break/>B. array<text:line-break/>C. object<text:line-break/>D. string</text:p>
      <text:p text:style-name="P27"> </text:p>
      <text:p text:style-name="Normal"><text:span text:style-name="T28">Answer:</text:span><text:span text:style-name="T29"> B</text:span></text:p>
      <text:p text:style-name="Normal"><text:span text:style-name="T30">Question 15.</text:span><text:span text:style-name="T31">4</text:span></text:p>
      <text:p text:style-name="P32">A network engineer is configuring a new router at a branch office. The router is connected to an upstream WAN network that allows the branch to communicate with the head office. The central time server with IP address 172.24.54.8 is located<text:s/><text:soft-page-break/>behind a firewall at the head office. Which command must the engineer configure so that the software clock of the new router synchronizes with the time server?</text:p>
      <text:p text:style-name="P33">A. ntp client 172.24.54.8<text:line-break/>B. ntp master 172.24.54.8<text:line-break/>C. ntp peer 172.24.54.8<text:line-break/>D. ntp server 172.24.54.8</text:p>
      <text:p text:style-name="P34"> </text:p>
      <text:p text:style-name="Normal"><text:span text:style-name="T35">Answer:</text:span><text:span text:style-name="T36"> D</text:span></text:p>
      <text:p text:style-name="Normal"><text:span text:style-name="T37">Explanation</text:span></text:p>
      <text:p text:style-name="Normal"><text:span text:style-name="T38">To configure the local device as a NTP client and use a remote NTP clock source, use the command </text:span><text:span text:style-name="T39">ntp server</text:span><text:span text:style-name="T40"> {</text:span><text:span text:style-name="T41">IP address}</text:span></text:p>
      <text:p text:style-name="Normal"><text:span text:style-name="T42">Question 15.</text:span><text:span text:style-name="T43">5</text:span></text:p>
      <text:p text:style-name="P44">Refer to the exhibit.</text:p>
      <text:p text:style-name="consolas">Router-WAN1#show interface g0/0<text:s/></text:p>
      <text:p text:style-name="consolas">GigabitEthernet0/0 is up, line protocol is up</text:p>
      <text:p text:style-name="consolas"><text:s text:c="2"/>Hardware is CSR NIC, address is 5000.0001.0000 (bia 5000.0001.0000)<text:s/></text:p>
      <text:p text:style-name="consolas"><text:s text:c="2"/>Internet address is 192.168.0.0/31<text:s/></text:p>
      <text:p text:style-name="consolas"><text:s text:c="2"/>MTU 1500 bytes, BW 1000000 Kbit/sec, DLY 10 usec,<text:s/></text:p>
      <text:p text:style-name="consolas"><text:s text:c="4"/>reliability 255/255, txload 1/255, rxload 1/255<text:s/></text:p>
      <text:p text:style-name="consolas"><text:s text:c="2"/>Encapsulation ARPA, loopback not set<text:s/></text:p>
      <text:p text:style-name="consolas"><text:s text:c="2"/>Keepalive set (10 sec)</text:p>
      <text:p text:style-name="consolas"><text:s text:c="2"/>Full Duplex, 1000Mbps, link type is auto, media type is NIC</text:p>
      <text:p text:style-name="consolas"><text:s text:c="2"/>output flow-control is unsupported, input flow-control is unsupported</text:p>
      <text:p text:style-name="consolas"><text:s text:c="2"/>ARP type: ARPA, ARP Timeout 04:00:00</text:p>
      <text:p text:style-name="consolas"><text:s text:c="2"/>Last input never, output 00:00:03, output hang never</text:p>
      <text:p text:style-name="consolas"><text:s text:c="2"/>Last clearing of "show interface" counters never</text:p>
      <text:p text:style-name="consolas"><text:s text:c="2"/>Input queue: 0/375/0/0 (size/max/drops/flushes); Total output drops: 0<text:s/></text:p>
      <text:p text:style-name="consolas"><text:s text:c="2"/>Queueing strategy: fifo<text:s/></text:p>
      <text:soft-page-break/>
      <text:p text:style-name="consolas"><text:s text:c="2"/>Output queue: 0/40 (size /max)</text:p>
      <text:p text:style-name="consolas"><text:s text:c="2"/>5 minute input rate 1000 bits/sec, 0 packets/sec<text:s/></text:p>
      <text:p text:style-name="consolas"><text:s text:c="2"/>5 minute output rate 2000 bits/sec, 1 packets/sec<text:s/></text:p>
      <text:p text:style-name="consolas"><text:s text:c="4"/>0 packets input, 0 bytes, 0 no buffer<text:s/></text:p>
      <text:p text:style-name="consolas"><text:s text:c="4"/>Received 110 broadcasts (0 IP multicasts)</text:p>
      <text:p text:style-name="consolas"><text:s text:c="4"/>0 runts, 0 giants, 0 throttles</text:p>
      <text:p text:style-name="consolas"><text:s text:c="4"/>100 input errors, 100 CRC, 100 frame, 0 overrun, 0 ignored</text:p>
      <text:p text:style-name="consolas"><text:s text:c="4"/>0 watchdog, 0 multicast, 0 pause input</text:p>
      <text:p text:style-name="consolas"><text:s text:c="4"/>260 packets output, 89070 bytes, 0 underruns</text:p>
      <text:p text:style-name="consolas"><text:s text:c="4"/>Output 0 broadcasts (0 IP multicasts)</text:p>
      <text:p text:style-name="consolas"><text:s text:c="4"/>0 output errors, 100 collisions, 0 interface resets<text:s/></text:p>
      <text:p text:style-name="consolas"><text:s text:c="4"/>0 unknown protocol drops</text:p>
      <text:p text:style-name="consolas"><text:s text:c="4"/>0 babbles, 0 late collision, 0 deferred</text:p>
      <text:p text:style-name="consolas"><text:s text:c="4"/>1 lost carrier, 0 no carrier, 0 pause output</text:p>
      <text:p text:style-name="P45">Router-WAN1 has a new connection via Gi0/0 to the ISP. Users running the web applications indicate that connectivity is unstable to the internet. What is causing the interface issue?</text:p>
      <text:p text:style-name="P46">A. Broadcast packets are rejected because ARP timeout is enabled<text:line-break/>B. The receive buffer is full due to a broadcast storm<text:line-break/>C. Frames are discarded due to a half-duplex negotiation<text:line-break/>D. Small frames less than 64 bytes are rejected due to size</text:p>
      <text:p text:style-name="P47"> </text:p>
      <text:p text:style-name="Normal"><text:span text:style-name="T48">Answer:</text:span><text:span text:style-name="T49"> C</text:span></text:p>
      <text:p text:style-name="Normal"><text:span text:style-name="T50">Explanation</text:span></text:p>
      <text:p text:style-name="P51">This interface has “input errors” (100) and high “collision” (100) so the most likely cause of this problem is the other end was configured in half-duplex, which creates a duplex mismatched problem.</text:p>
      <text:p text:style-name="Normal"><text:span text:style-name="T52">Question 15.</text:span><text:span text:style-name="T53">6</text:span></text:p>
      <text:soft-page-break/>
      <text:p text:style-name="P54">Refer to the exhibit.</text:p>
      <text:p text:style-name="Normal"><text:span text:style-name="T55"><draw:frame draw:style-name="a1" draw:name="Picture 121" text:anchor-type="as-char" svg:x="0in" svg:y="0in" svg:width="5.36111in" svg:height="3.22917in" style:rel-width="scale" style:rel-height="scale"><draw:image xlink:href="media/image2.jpeg" xlink:type="simple" xlink:show="embed" xlink:actuate="onLoad"/><svg:title/><svg:desc/></draw:frame></text:span></text:p>
      <text:p text:style-name="P56">All routers in the network are configured correctly, and the expected routes are being exchanged among the routers. Which set of routes are learned from neighbors and installed on router 2?</text:p>
      <table:table table:style-name="Table57">
        <table:table-columns>
          <table:table-column table:style-name="TableColumn58"/>
          <table:table-column table:style-name="TableColumn59"/>
        </table:table-columns>
        <table:table-row table:style-name="TableRow60">
          <table:table-cell table:style-name="TableCell61">
            <text:p text:style-name="P62">Option A</text:p>
            <text:p text:style-name="P63">10.40.1.0/30<text:line-break/>10.139.2.0/30<text:line-break/>10.12.191.0/30<text:line-break/>10.129.9.0/25</text:p>
          </table:table-cell>
          <table:table-cell table:style-name="TableCell64">
            <text:p text:style-name="P65">Option B</text:p>
            <text:p text:style-name="P66">10.129.9.0/23<text:line-break/>10.139.2.0/30<text:line-break/>10.129.9.0/25<text:line-break/>10.22.1.0/24</text:p>
          </table:table-cell>
        </table:table-row>
        <table:table-row table:style-name="TableRow67">
          <table:table-cell table:style-name="TableCell68">
            <text:p text:style-name="P69">Option C</text:p>
            <text:p text:style-name="P70">10.129.9.0/23<text:line-break/>10.40.1.0/30<text:line-break/>10.12.191.0/30<text:line-break/>10.129.9.0/25</text:p>
          </table:table-cell>
          <table:table-cell table:style-name="TableCell71">
            <text:p text:style-name="P72">Option D</text:p>
            <text:p text:style-name="P73">10.129.9.0/23<text:line-break/>10.139.2.0/30<text:line-break/>10.12.191.0/30<text:line-break/>10.129.9.0/25</text:p>
          </table:table-cell>
        </table:table-row>
      </table:table>
      <text:p text:style-name="P74">A. Option A<text:line-break/>B. Option B<text:line-break/>C. Option C<text:line-break/>D. Option D</text:p>
      <text:soft-page-break/>
      <text:p text:style-name="P75"> </text:p>
      <text:p text:style-name="Normal"><text:span text:style-name="T76">Answer:</text:span><text:span text:style-name="T77"> D</text:span></text:p>
      <text:p text:style-name="Normal"><text:span text:style-name="T78">Explanation</text:span></text:p>
      <text:p text:style-name="P79">This question asks “Which set of routes are learned from neighbors” so only EIGRP routes are advertised and learned from the neighbors. Routes 10.40.1.0/30 and 10.22.1.0/24 are learned from local so they are not correct.</text:p>
      <text:p text:style-name="Normal"><text:span text:style-name="T80">Question 15.</text:span><text:span text:style-name="T81">7</text:span></text:p>
      <text:p text:style-name="P82">Refer to the exhibit.</text:p>
      <text:p text:style-name="Normal"><text:span text:style-name="T83"><draw:frame draw:style-name="a2" draw:name="Picture 120" text:anchor-type="as-char" svg:x="0in" svg:y="0in" svg:width="3.0625in" svg:height="2.59722in" style:rel-width="scale" style:rel-height="scale"><draw:image xlink:href="media/image3.jpeg" xlink:type="simple" xlink:show="embed" xlink:actuate="onLoad"/><svg:title/><svg:desc/></draw:frame></text:span></text:p>
      <text:p text:style-name="P84">Which switch in this configuration will be elected as the root bridge?</text:p>
      <text:p text:style-name="P85">A. SW1: 0C:4A:82.:65:62:72<text:line-break/>B. SW2: 0C:0A:A8:1A:3C:9D<text:line-break/>C. SW3: 0C:0A:18:81:B3:19<text:line-break/>D. SW4: 0C:0A:05:22:05:97</text:p>
      <text:p text:style-name="P86"> </text:p>
      <text:p text:style-name="Normal"><text:span text:style-name="T87">Answer:</text:span><text:span text:style-name="T88"> D</text:span></text:p>
      <text:p text:style-name="Normal"><text:span text:style-name="T89">Explanation</text:span></text:p>
      <text:p text:style-name="P90">The switch with lowest bridge priority will be chosen the root bridge. If many switches have the same bridge priority then the lowest MAC address would be chosen.</text:p>
      <text:soft-page-break/>
      <text:p text:style-name="P91">In this question, SW3 and SW4 have lowest (and same) bridge priority. But SW4 has lower MAC address so it would be elected root bridge.</text:p>
      <text:p text:style-name="Normal"><text:span text:style-name="T92">Question 15.</text:span><text:span text:style-name="T93">8</text:span></text:p>
      <text:p text:style-name="P94">Refer to the exhibit.</text:p>
      <text:p text:style-name="consolas">100.0.0.0/8 is variably subnetted, 4 subnets, 4 masks</text:p>
      <text:p text:style-name="consolas">R <text:s text:c="3"/>100.0.0.0/8 [120/2] via 192.168.3.1, 00:00:13, Ethernet0/3</text:p>
      <text:p text:style-name="P95">S <text:s text:c="3"/>100.100.0.0/16 [1/0] via 192.168.4.1</text:p>
      <text:p text:style-name="P96">D <text:s text:c="3"/>100.100.100.0/24 [90/435200] via 192.168.2.1, 00:00:13, Ethernet0/2<text:s/></text:p>
      <text:p text:style-name="P97">O <text:s text:c="3"/>100.100.100.100/32 [110/21] via 192.168.1.1, 00:05:57, Ethernet0/1</text:p>
      <text:p text:style-name="P98">How will the device handle a packet destined to IP address 100.100.100.100?</text:p>
      <text:p text:style-name="P99">A. It will always prefer the static route over dynamic routes and choose the route<text:line-break/>S 100.100.0.0/16 [1/0] via 192.168.4.1</text:p>
      <text:p text:style-name="P100">B. It will choose the route with the lowest metric<text:line-break/>R 100.0.0.0/8 [120/2] via 192.168.3.1, 00:00:13, Ethernet0/3</text:p>
      <text:p text:style-name="P101">C. It will choose the route with the highest metric<text:line-break/>D 100.100.100.0/24 [90/435200] via 192.168.2.1, 00:00:13, Ethernet0/2</text:p>
      <text:p text:style-name="P102">D. It will choose the route with the longest match<text:line-break/>O 100.100.100.100/32 [110/21] via 192.168.1.1, 00:05:57, Ethernet0/1</text:p>
      <text:p text:style-name="P103"> </text:p>
      <text:p text:style-name="Normal"><text:span text:style-name="T104">Answer:</text:span><text:span text:style-name="T105"> D</text:span></text:p>
      <text:p text:style-name="Normal"><text:span text:style-name="T106">Question 15.</text:span><text:span text:style-name="T107">9</text:span></text:p>
      <text:p text:style-name="P108">Refer to the exhibit.</text:p>
      <text:soft-page-break/>
      <text:p text:style-name="Normal"><text:span text:style-name="T109"><draw:frame draw:style-name="a3" draw:name="Picture 119" text:anchor-type="as-char" svg:x="0in" svg:y="0in" svg:width="2.89583in" svg:height="2.14583in" style:rel-width="scale" style:rel-height="scale"><draw:image xlink:href="media/image4.jpeg" xlink:type="simple" xlink:show="embed" xlink:actuate="onLoad"/><svg:title/><svg:desc/></draw:frame></text:span></text:p>
      <text:p text:style-name="P110">Network services must be enabled on interface Gi1/0/34. Which configuration meets the needs for this implementation?</text:p>
      <table:table table:style-name="Table111">
        <table:table-columns>
          <table:table-column table:style-name="TableColumn112"/>
          <table:table-column table:style-name="TableColumn113"/>
        </table:table-columns>
        <table:table-row table:style-name="TableRow114">
          <table:table-cell table:style-name="TableCell115">
            <text:p text:style-name="P116">Option A</text:p>
            <text:p text:style-name="P117">interface Gi1/0/34<text:line-break/>switchport mode trunk<text:line-break/>switchport trunk allowed vlan 400, 4041<text:line-break/>switchport voice vlan 4041</text:p>
          </table:table-cell>
          <table:table-cell table:style-name="TableCell118">
            <text:p text:style-name="P119">Option B</text:p>
            <text:p text:style-name="P120">interface Gi1/0/34<text:line-break/>switchport mode access<text:line-break/>switchport access vlan 4041<text:line-break/>switchport voice vlan 400</text:p>
          </table:table-cell>
        </table:table-row>
        <table:table-row table:style-name="TableRow121">
          <table:table-cell table:style-name="TableCell122">
            <text:p text:style-name="P123">Option C</text:p>
            <text:p text:style-name="P124">interface Gi1/0/34<text:line-break/>switchport mode trunk<text:line-break/>switchport trunk allowed native vlan 400<text:line-break/>switchport voice vlan 4041</text:p>
          </table:table-cell>
          <table:table-cell table:style-name="TableCell125">
            <text:p text:style-name="P126">Option D</text:p>
            <text:p text:style-name="P127">interface Gi1/0/34<text:line-break/>switchport mode access<text:line-break/>switchport access vlan 400<text:line-break/>switchport voice vlan 4041</text:p>
          </table:table-cell>
        </table:table-row>
      </table:table>
      <text:p text:style-name="P128">A. Option A<text:line-break/>B. Option B<text:line-break/>C. Option C<text:line-break/>D. Option D</text:p>
      <text:p text:style-name="P129"> </text:p>
      <text:p text:style-name="Normal"><text:span text:style-name="T130">Answer:</text:span><text:span text:style-name="T131"> D</text:span></text:p>
      <text:p text:style-name="Normal"><text:span text:style-name="T132">Explanation</text:span></text:p>
      <text:soft-page-break/>
      <text:p text:style-name="P133">The voice VLAN feature enables access ports to carry IP voice traffic from an IP phone. You can configure a voice VLAN with the “switchport voice vlan …” command under interface mode.</text:p>
      <text:p text:style-name="Normal"><text:span text:style-name="T134">Question 15.</text:span><text:span text:style-name="T135">10</text:span></text:p>
      <text:p text:style-name="P136">Refer to the exhibit.</text:p>
      <text:p text:style-name="Normal"><text:span text:style-name="T137"><draw:frame draw:style-name="a4" draw:name="Picture 118" text:anchor-type="as-char" svg:x="0in" svg:y="0in" svg:width="5.51389in" svg:height="4.88194in" style:rel-width="scale" style:rel-height="scale"><draw:image xlink:href="media/image5.jpeg" xlink:type="simple" xlink:show="embed" xlink:actuate="onLoad"/><svg:title/><svg:desc/></draw:frame></text:span></text:p>
      <text:p text:style-name="P138">Which configuration parameter is preventing host С from reaching the internet?</text:p>
      <text:p text:style-name="P139">A. IP address assignment<text:line-break/>B. default gateway<text:line-break/>C. IP network mask<text:line-break/>D. automatic DNS</text:p>
      <text:p text:style-name="P140"> </text:p>
      <text:p text:style-name="Normal"><text:span text:style-name="T141">Answer:</text:span><text:span text:style-name="T142"> B</text:span></text:p>
      <text:soft-page-break/>
      <text:p text:style-name="Normal"><text:span text:style-name="T143">Explanation</text:span></text:p>
      <text:p text:style-name="P144">From the topology we see the IP address of interface Gi0/0/0 of Router A is 192.168.1.254 and this is also the default gateway of our hosts. But in the IPv4 Properties box, the default gateway of host C is set to 192.168.1.1 which is not correct.</text:p>
      <text:p text:style-name="Normal"><text:span text:style-name="T145">Question 15.</text:span><text:span text:style-name="T146">11</text:span></text:p>
      <text:p text:style-name="P147">Refer to the exhibit.</text:p>
      <text:p text:style-name="Normal"><text:span text:style-name="T148"><draw:frame draw:style-name="a5" draw:name="Picture 117" text:anchor-type="as-char" svg:x="0in" svg:y="0in" svg:width="3.0625in" svg:height="2.59722in" style:rel-width="scale" style:rel-height="scale"><draw:image xlink:href="media/image6.jpeg" xlink:type="simple" xlink:show="embed" xlink:actuate="onLoad"/><svg:title/><svg:desc/></draw:frame></text:span></text:p>
      <text:p text:style-name="P149">Which switch in this configuration will be elected as the root bridge?</text:p>
      <text:p text:style-name="P150">SW1 0С:0A:05:22:05:97<text:line-break/>SW2 0С:4A:82:07:57:58<text:line-break/>SW3 0C:0A:A8:1A:3C:9D<text:line-break/>SW4 0С:0A:18:A1:B3:19</text:p>
      <text:p text:style-name="P151">A. SW1<text:line-break/>B. SW2<text:line-break/>C. SW3<text:line-break/>D. SW4</text:p>
      <text:p text:style-name="P152"> </text:p>
      <text:p text:style-name="Normal"><text:span text:style-name="T153">Answer:</text:span><text:span text:style-name="T154"> D</text:span></text:p>
      <text:p text:style-name="Normal"><text:span text:style-name="T155">Explanation</text:span></text:p>
      <text:soft-page-break/>
      <text:p text:style-name="P156">SW3 &amp; SW4 have the bridge priority of 8192 which is better than SW1 &amp; SW2. Between SW3 &amp; SW4, SW4 has lower MAC address so it will be chosen the root bridge.</text:p>
      <text:p text:style-name="Normal"><text:span text:style-name="T157">Question 15.</text:span><text:span text:style-name="T158">12</text:span></text:p>
      <text:p text:style-name="P159">Refer to the exhibit.</text:p>
      <text:p text:style-name="Normal"><text:span text:style-name="T160"><draw:frame draw:style-name="a6" draw:name="Picture 116" text:anchor-type="as-char" svg:x="0in" svg:y="0in" svg:width="4.89583in" svg:height="4.54167in" style:rel-width="scale" style:rel-height="scale"><draw:image xlink:href="media/image7.jpeg" xlink:type="simple" xlink:show="embed" xlink:actuate="onLoad"/><svg:title/><svg:desc/></draw:frame></text:span></text:p>
      <text:p text:style-name="P161">An engineer is creating a secure preshared key based SSID using WPA2 for a wireless network running on 2.4 GHz and 5 GHz. Which two tasks must the engineer perform to complete the process? (Choose two)</text:p>
      <text:p text:style-name="P162">A. Select the 802.1x option for Auth Key Management<text:line-break/>B. Select the AES (CCMP128) option for WPA2 WPA3 Encryption<text:line-break/>C. Select the AES option for Auth Key Management<text:line-break/>D. Select the PSK option for Auth Key Management<text:line-break/>E. Select the WPA Policy option.</text:p>
      <text:p text:style-name="P163"> </text:p>
      <text:soft-page-break/>
      <text:p text:style-name="Normal"><text:span text:style-name="T164">Answer:</text:span><text:span text:style-name="T165"> B D</text:span></text:p>
      <text:p text:style-name="Normal"><text:span text:style-name="T166">Question 15.</text:span><text:span text:style-name="T167">13</text:span></text:p>
      <text:p text:style-name="P168">Which Rapid PVST+ port state does a port operate in without receiving BPDUs from neighbors or updating the address database?</text:p>
      <text:p text:style-name="P169">A. listening<text:line-break/>B. forwarding<text:line-break/>C. disabled<text:line-break/>D. blocking</text:p>
      <text:p text:style-name="P170"> </text:p>
      <text:p text:style-name="Normal"><text:span text:style-name="T171">Answer:</text:span><text:span text:style-name="T172"> C</text:span></text:p>
      <text:p text:style-name="Normal"><text:span text:style-name="T173">Explanation</text:span></text:p>
      <text:p text:style-name="P174">There are only three port states left in RSTP that correspond to the three possible operational states. The 802.1D disabled, blocking, and listening states are merged into the 802.1w discarding state.</text:p>
      <text:p text:style-name="Normal"><text:span text:style-name="T175">* Discarding</text:span><text:span text:style-name="T176"> (</text:span><text:span text:style-name="T177">Blocking</text:span><text:span text:style-name="T178">)– the port does not forward frames, process received frames, or learn MAC addresses – but it does listen for BPDUs (like the STP blocking state)</text:span><text:span text:style-name="T179"><text:line-break/></text:span><text:span text:style-name="T180">* Learning</text:span><text:span text:style-name="T181"> – receives and transmits BPDUs and learns MAC addresses but does not yet forward frames (same as STP).</text:span><text:span text:style-name="T182"><text:line-break/></text:span><text:span text:style-name="T183">* Forwarding</text:span><text:span text:style-name="T184"> – receives and sends data, normal operation, learns MAC address, receives and transmits BPDUs (same as STP).</text:span></text:p>
      <text:p text:style-name="P185">In fact, there is another state which is Disabled state.</text:p>
      <text:p text:style-name="Normal"><text:span text:style-name="T186">Disabled State</text:span><text:span text:style-name="T187"><text:line-break/>A LAN port in the disabled state does not participate in frame forwarding or STP. A LAN port in the disabled state is virtually nonoperational.</text:span><text:span text:style-name="T188"><text:line-break/>A disabled LAN port performs as follows:</text:span><text:span text:style-name="T189"><text:line-break/>+ Discards frames received from the attached segment.</text:span><text:span text:style-name="T190"><text:line-break/>+ Discards frames switched from another port for forwarding.</text:span><text:span text:style-name="T191"><text:line-break/>+ Does not incorporate the end station location into its address database. (There is no learning, so there is no address database update.)</text:span><text:span text:style-name="T192"><text:line-break/></text:span><text:soft-page-break/><text:span text:style-name="T193">+ </text:span><text:span text:style-name="T194">Does not receive BPDUs from neighbors.</text:span><text:span text:style-name="T195"><text:line-break/>+ Does not receive BPDUs for transmission from the system module.</text:span></text:p>
      <text:p text:style-name="Normal"><text:span text:style-name="T196">Reference: </text:span><text:a xlink:href="https://www.cisco.com/c/en/us/td/docs/switches/datacenter/nexus5000/sw/layer2/521_n1_1/b_Nexus_5000_Layer2_Config_521N1.html" office:target-frame-name="_blank" xlink:show="new"><text:span text:style-name="T197">https://www.cisco.com/c/en/us/td/docs/switches/datacenter/nexus5000/sw/layer2/521_n1_1/b_Nexus_5000_Layer2_Config_521N1.html</text:span></text:a></text:p>
      <text:p text:style-name="Normal"><text:span text:style-name="T198">Question 15.</text:span><text:span text:style-name="T199">14</text:span></text:p>
      <text:p text:style-name="P200">Which protocol should be used to transfer large files on a company intranet that allows TCP 20 and 21 through the firewall?</text:p>
      <text:p text:style-name="P201">A. FTP<text:line-break/>B. REST API<text:line-break/>C. TFTP<text:line-break/>D. SMTP</text:p>
      <text:p text:style-name="P202"> </text:p>
      <text:p text:style-name="Normal"><text:span text:style-name="T203">Answer:</text:span><text:span text:style-name="T204"> A</text:span></text:p>
      <text:p text:style-name="Normal"><text:span text:style-name="T205">Question 15.</text:span><text:span text:style-name="T206">15</text:span></text:p>
      <text:p text:style-name="P207">Which alternative to password authentication is implemented to allow enterprise devices to log in to the corporate network?</text:p>
      <text:p text:style-name="P208">A. digital certificates<text:line-break/>B. magic links<text:line-break/>C. one-time passwords<text:line-break/>D. 90-day renewal policies</text:p>
      <text:p text:style-name="P209"> </text:p>
      <text:p text:style-name="Normal"><text:span text:style-name="T210">Answer:</text:span><text:span text:style-name="T211"> A</text:span></text:p>
      <text:p text:style-name="Normal"><text:span text:style-name="T212">Question 15.</text:span><text:span text:style-name="T213">16</text:span></text:p>
      <text:p text:style-name="P214">Which guideline helps to create a secure password policy?</text:p>
      <text:p text:style-name="P215">A. forbidding users from storing passwords in a password manager<text:line-break/>B. allowing passwords used by service accounts to never expire<text:line-break/>C. requiring complex, lengthy passwords instead of simple, short ones<text:line-break/>D. restricting password sharing to a very small group</text:p>
      <text:soft-page-break/>
      <text:p text:style-name="P216"> </text:p>
      <text:p text:style-name="Normal"><text:span text:style-name="T217">Answer:</text:span><text:span text:style-name="T218"> C</text:span></text:p>
      <text:p text:style-name="Normal"><text:span text:style-name="T219">Question 15.</text:span><text:span text:style-name="T220">17</text:span></text:p>
      <text:p text:style-name="P221">Refer to the exhibit.</text:p>
      <text:p text:style-name="consolas">SW1#conf t</text:p>
      <text:p text:style-name="consolas">Enter configuration commands, one per line. End with CNTL/Z.</text:p>
      <text:p text:style-name="consolas">SW1(config)#enable password test!2E</text:p>
      <text:p text:style-name="consolas">SW1(config)#line con 0</text:p>
      <text:p text:style-name="consolas">SW1(config-line)#password Labtest32!</text:p>
      <text:p text:style-name="consolas">SH1(config-line)#exit</text:p>
      <text:p text:style-name="consolas">SW1(config)#</text:p>
      <text:p text:style-name="P222">A network engineer started to change default settings on SW1 to allow remote access and has entered the following in the configuration mode:</text:p>
      <table:table table:style-name="Table223">
        <table:table-columns>
          <table:table-column table:style-name="TableColumn224"/>
        </table:table-columns>
        <table:table-row table:style-name="TableRow225">
          <table:table-cell table:style-name="TableCell226">
            <text:p text:style-name="Normal"><text:span text:style-name="T227">SW1#(config)#</text:span><text:span text:style-name="T228">line vty 0 15</text:span><text:span text:style-name="T229"><text:line-break/>SW1#(config-line)#</text:span><text:span text:style-name="T230">password Labtest32!</text:span></text:p>
          </table:table-cell>
        </table:table-row>
      </table:table>
      <text:p text:style-name="P231">Which set of commands are needed to allow only SSH access and hide passwords in the running configuration?</text:p>
      <table:table table:style-name="Table232">
        <table:table-columns>
          <table:table-column table:style-name="TableColumn233"/>
          <table:table-column table:style-name="TableColumn234"/>
        </table:table-columns>
        <table:table-row table:style-name="TableRow235">
          <table:table-cell table:style-name="TableCell236">
            <text:p text:style-name="P237">Option A</text:p>
            <text:p text:style-name="P238">SW1(config-line)#login local<text:line-break/>SW1(config-line)#exit<text:line-break/>SW1(config)#enable secret test!2E</text:p>
          </table:table-cell>
          <table:table-cell table:style-name="TableCell239">
            <text:p text:style-name="P240">Option B</text:p>
            <text:p text:style-name="P241">SW1(config-line)#transport input ssh<text:line-break/>SW1(config-line)#exit<text:line-break/>SW1(config)#service password-encryption</text:p>
          </table:table-cell>
        </table:table-row>
        <table:table-row table:style-name="TableRow242">
          <table:table-cell table:style-name="TableCell243">
            <text:p text:style-name="P244">Option C</text:p>
            <text:p text:style-name="P245">SW1(config-line)#login local<text:line-break/>SW1(config-line)#exit</text:p>
          </table:table-cell>
          <table:table-cell table:style-name="TableCell246">
            <text:p text:style-name="P247">Option D</text:p>
            <text:p text:style-name="P248">SW1(config-line)#exit<text:line-break/>SW1(config)#aaa new-model</text:p>
          </table:table-cell>
        </table:table-row>
      </table:table>
      <text:p text:style-name="P249">A. Option A<text:line-break/>B. Option B<text:line-break/><text:soft-page-break/>C. Option C<text:line-break/>D. Option D</text:p>
      <text:p text:style-name="P250"> </text:p>
      <text:p text:style-name="Normal"><text:span text:style-name="T251">Answer:</text:span><text:span text:style-name="T252"> B</text:span></text:p>
      <text:p text:style-name="Normal"><text:span text:style-name="T253">Question 15.</text:span><text:span text:style-name="T254">18</text:span></text:p>
      <text:p text:style-name="P255">How does machine learning contribute to the effectiveness of intrusion detection systems?</text:p>
      <text:p text:style-name="P256">A. It assigns security clearance levels.<text:line-break/>B. It dictates security policy updates.<text:line-break/>C. It monitors for outdated software.<text:line-break/>D. It identifies patterns indicating intrusions.</text:p>
      <text:p text:style-name="P257"> </text:p>
      <text:p text:style-name="Normal"><text:span text:style-name="T258">Answer:</text:span><text:span text:style-name="T259"> D</text:span></text:p>
      <text:p text:style-name="Normal"><text:span text:style-name="T260">Question 15.</text:span><text:span text:style-name="T261">19</text:span></text:p>
      <text:p text:style-name="P262">Refer to the exhibit.</text:p>
      <text:p text:style-name="Normal"><text:span text:style-name="T263"><draw:frame draw:style-name="a7" draw:name="Picture 115" text:anchor-type="as-char" svg:x="0in" svg:y="0in" svg:width="4.25in" svg:height="3.17361in" style:rel-width="scale" style:rel-height="scale"><draw:image xlink:href="media/image8.jpeg" xlink:type="simple" xlink:show="embed" xlink:actuate="onLoad"/><svg:title/><svg:desc/></draw:frame></text:span></text:p>
      <text:p text:style-name="consolas">Router-Y#show ip route</text:p>
      <text:p text:style-name="consolas">Gateway of last resort is not set</text:p>
      <text:p text:style-name="consolas"/>
      <text:p text:style-name="consolas">10.0.0.0/8 is variably subnetted</text:p>
      <text:p text:style-name="consolas">B 10.220.100.96/27 [20/0] via 10.224.1.3, 1w6d</text:p>
      <text:p text:style-name="P264">The route for 10.220.100.96/27 has been very unstable. The same route has four backups to routers A, B, C, and D via the respective methods. The routing protocol defaults for router Y have not been changed. When the current route for 10.220.100.96/27 becomes unavailable, which router will router Y use to route traffic to 10.220.100.96/27?</text:p>
      <text:p text:style-name="P265">A. router A<text:line-break/>B. router B<text:line-break/>C. router C<text:line-break/>D. router D</text:p>
      <text:p text:style-name="P266"> </text:p>
      <text:p text:style-name="Normal"><text:span text:style-name="T267">Answer:</text:span><text:span text:style-name="T268"> B</text:span></text:p>
      <text:p text:style-name="Normal"><text:span text:style-name="T269">Explanation</text:span></text:p>
      <text:p text:style-name="P270">The current route is learned via BGP (Router D). Among three routing protocols left, the “static route with AD of 105” has the best AD (OSPF AD is 110 and External EIGRP AD is 170).</text:p>
      <text:p text:style-name="Normal"><text:span text:style-name="T271">Question 15.</text:span><text:span text:style-name="T272">20</text:span></text:p>
      <text:p text:style-name="P273">What must be considered when planning an IPsec VPN deployment?</text:p>
      <text:p text:style-name="P274">A. IPsec transport mode allows intermediate devices to see the final destination of the packet<text:line-break/>B. In IPsec tunnel mode, only the IP payload is encrypted<text:line-break/>C. IPsec transport mode increases GRE tunnel security over tunnel mode.<text:line-break/>D. IPsec transport mode does not encrypt the Layer 4 header, which allow full examination of the packet</text:p>
      <text:p text:style-name="P275"> </text:p>
      <text:p text:style-name="Normal"><text:span text:style-name="T276">Answer:</text:span><text:span text:style-name="T277"> A</text:span></text:p>
      <text:p text:style-name="Normal"><text:span text:style-name="T278">Explanation</text:span></text:p>
      <text:soft-page-break/>
      <text:p text:style-name="P279">In tunnel mode, the entire original IP packet is encapsulated to become the payload of a new IP packet. Additionally, a new IP header is added on top of the original IP packet. -&gt; Answer B and answer C are not correct.</text:p>
      <text:p text:style-name="P280">In IPsec Transport mode, the original IP header is retained (-&gt; answer A is correct) and just the Layer 4 payload carried by the IP packet is encrypted -&gt; Answer D is not correct.</text:p>
      <text:p text:style-name="Normal"><text:span text:style-name="T281">Question 15.</text:span><text:span text:style-name="T282">21</text:span></text:p>
      <text:p text:style-name="P283">Where are the real-time control functions processed in a split MAC architecture?</text:p>
      <text:p text:style-name="P284">A. central WLC<text:line-break/>B. individual AP<text:line-break/>C. centralized cloud management platform<text:line-break/>D. client device</text:p>
      <text:p text:style-name="P285"> </text:p>
      <text:p text:style-name="Normal"><text:span text:style-name="T286">Answer:</text:span><text:span text:style-name="T287"> B</text:span></text:p>
      <text:p text:style-name="Normal"><text:span text:style-name="T288">Explanation</text:span></text:p>
      <text:p text:style-name="P289">In a split MAC architecture, the control and data plane functions are divided between the access points (APs) and a central controller, typically a Wireless LAN Controller (WLC).</text:p>
      <text:p text:style-name="Normal"><text:span text:style-name="T290">+ </text:span><text:span text:style-name="T291">Real-time control functions</text:span><text:span text:style-name="T292">, such as beacon generation, frame acknowledgment, and packet queuing, are processed locally at the individual AP.</text:span><text:span text:style-name="T293"><text:line-break/>+ The central WLC (Wireless LAN Controller) handles non-real-time functions like security policies, configuration management, and mobility management.</text:span></text:p>
      <text:p text:style-name="Normal"><text:span text:style-name="T294">Question 15.</text:span><text:span text:style-name="T295">22</text:span></text:p>
      <text:p text:style-name="P296">Which group of channels in the 802.11b/g/n/ac/ax 2.4 GHz frequency bands are nonoverlapping channels?</text:p>
      <text:p text:style-name="P297">A. channels 1,6, and 10<text:line-break/>B. channels 1,5, and 11<text:line-break/>C. channels 1,6, and 11<text:line-break/>D. channels 1,5, and 10</text:p>
      <text:soft-page-break/>
      <text:p text:style-name="P298"> </text:p>
      <text:p text:style-name="Normal"><text:span text:style-name="T299">Answer:</text:span><text:span text:style-name="T300"> C</text:span></text:p>
      <text:p text:style-name="Normal"><text:span text:style-name="T301">Explanation</text:span></text:p>
      <text:p text:style-name="P302">The 2.4 GHz band is subdivided into multiple channels each allotted 22 MHz bandwidth and separated from the next channel by 5 MHz.<text:line-break/>-&gt; A best practice for 802.11b/g/n WLANs requiring multiple APs is to use non-overlapping channels such as 1, 6, and 11.</text:p>
      <text:p text:style-name="Normal"><text:span text:style-name="T303"><draw:frame draw:style-name="a8" draw:name="Picture 114" text:anchor-type="as-char" svg:x="0in" svg:y="0in" svg:width="6.5in" svg:height="1.88611in" style:rel-width="scale" style:rel-height="scale"><draw:image xlink:href="media/image9.png" xlink:type="simple" xlink:show="embed" xlink:actuate="onLoad"/><svg:title/><svg:desc/></draw:frame></text:span></text:p>
      <text:p text:style-name="Normal"><text:span text:style-name="T304">Question 15.</text:span><text:span text:style-name="T305">23</text:span></text:p>
      <text:p text:style-name="P306">Which IPsec mode encapsulates the entire IP packet?</text:p>
      <text:p text:style-name="P307">A. tunnel<text:line-break/>B. transport<text:line-break/>C. SSL VPN<text:line-break/>D. Q-in-Q</text:p>
      <text:p text:style-name="P308"> </text:p>
      <text:p text:style-name="Normal"><text:span text:style-name="T309">Answer:</text:span><text:span text:style-name="T310"> A</text:span></text:p>
      <text:p text:style-name="Normal"><text:span text:style-name="T311">Explanation</text:span></text:p>
      <text:p text:style-name="P312">In tunnel mode, the entire original IP packet is encapsulated to become the payload of a new IP packet. Additionally, a new IP header is added on top of the original IP packet.</text:p>
      <text:p text:style-name="P313"/>
      <text:p text:style-name="Normal"><text:span text:style-name="T314">Question 15.</text:span><text:span text:style-name="T315">24</text:span></text:p>
      <text:soft-page-break/>
      <text:p text:style-name="P316">Which mechanism allows WPA3 to provide a higher degree of security than its predecessors?</text:p>
      <text:p text:style-name="P317">A. automatic device pairing<text:line-break/>B. special-character support in preshared keys<text:line-break/>C. certificate-based authentication<text:line-break/>D. SAE password-based key exchange</text:p>
      <text:p text:style-name="P318"> </text:p>
      <text:p text:style-name="Normal"><text:span text:style-name="T319">Answer:</text:span><text:span text:style-name="T320"> D</text:span></text:p>
      <text:p text:style-name="Normal"><text:span text:style-name="T321">Explanation</text:span></text:p>
      <text:p text:style-name="Normal"><text:span text:style-name="T322">WPA3 provides improvements to the general Wi-Fi encryption, thanks to Simultaneous Authentication of Equals (</text:span><text:span text:style-name="T323">SAE</text:span><text:span text:style-name="T324">) replacing the Pre-Shared Key (PSK) authentication method used in prior WPA versions. SAE enables individuals or home users to set Wi-Fi passwords that are easier to remember and provide the same security protection even if the passwords are not complex enough.</text:span></text:p>
      <text:p text:style-name="Normal"><text:span text:style-name="T325"><draw:frame draw:style-name="a9" draw:name="Picture 113" text:anchor-type="as-char" svg:x="0in" svg:y="0in" svg:width="2.57639in" svg:height="2.375in" style:rel-width="scale" style:rel-height="scale"><draw:image xlink:href="media/image10.jpeg" xlink:type="simple" xlink:show="embed" xlink:actuate="onLoad"/><svg:title/><svg:desc/></draw:frame></text:span></text:p>
      <text:p text:style-name="Normal"><text:span text:style-name="T326">Question 15.</text:span><text:span text:style-name="T327">25</text:span></text:p>
      <text:p text:style-name="P328">Refer to the exhibit.</text:p>
      <text:soft-page-break/>
      <text:p text:style-name="Normal"><text:span text:style-name="T329"><draw:frame draw:style-name="a10" draw:name="Picture 112" text:anchor-type="as-char" svg:x="0in" svg:y="0in" svg:width="3.0625in" svg:height="2.59722in" style:rel-width="scale" style:rel-height="scale"><draw:image xlink:href="media/image11.jpeg" xlink:type="simple" xlink:show="embed" xlink:actuate="onLoad"/><svg:title/><svg:desc/></draw:frame></text:span></text:p>
      <text:p text:style-name="P330">Which switch in this configuration will be elected as the root bridge?</text:p>
      <text:p text:style-name="P331">SW1 0С:B4:86:22:42:37<text:line-break/>SW2 0С:0B:15:22:05:97<text:line-break/>SW3 0C:0B:15:1A:3C:9D<text:line-break/>SW4 0С:B0:18:A1:B3:19</text:p>
      <text:p text:style-name="P332">A. SW1<text:line-break/>B. SW2<text:line-break/>C. SW3<text:line-break/>D. SW4</text:p>
      <text:p text:style-name="P333"> </text:p>
      <text:p text:style-name="Normal"><text:span text:style-name="T334">Answer:</text:span><text:span text:style-name="T335"> C</text:span></text:p>
      <text:p text:style-name="Normal"><text:span text:style-name="T336">Explanation</text:span></text:p>
      <text:p text:style-name="P337">The switch with lowest bridge priority will be chosen the root bridge. If many switches have the same bridge priority then the lowest MAC address would be chosen.</text:p>
      <text:p text:style-name="P338">In this question, SW3 and SW4 have lowest (and same) bridge priority of 4096. But SW3 has lower MAC address so it would be elected root bridge.</text:p>
      <text:p text:style-name="Normal"><text:span text:style-name="T339">Question 15.</text:span><text:span text:style-name="T340">26</text:span></text:p>
      <text:p text:style-name="P341">Refer to the exhibit.</text:p>
      <text:soft-page-break/>
      <text:p text:style-name="Normal"><text:span text:style-name="T342"><draw:frame draw:style-name="a11" draw:name="Picture 111" text:anchor-type="as-char" svg:x="0in" svg:y="0in" svg:width="3.0625in" svg:height="2.59722in" style:rel-width="scale" style:rel-height="scale"><draw:image xlink:href="media/image12.jpeg" xlink:type="simple" xlink:show="embed" xlink:actuate="onLoad"/><svg:title/><svg:desc/></draw:frame></text:span></text:p>
      <text:p text:style-name="P343">Which switch in this configuration will be elected as the root bridge?</text:p>
      <text:p text:style-name="Normal"><text:span text:style-name="T344">SW1 0</text:span><text:span text:style-name="T345">С</text:span><text:span text:style-name="T346">:E4:85:71:03:80</text:span><text:span text:style-name="T347"><text:line-break/>SW2 0</text:span><text:span text:style-name="T348">С</text:span><text:span text:style-name="T349">:0E:1A:22:05:97</text:span><text:span text:style-name="T350"><text:line-break/>SW3 0C:E0:A1:1A:3C:9D</text:span><text:span text:style-name="T351"><text:line-break/>SW4 0</text:span><text:span text:style-name="T352">С</text:span><text:span text:style-name="T353">:00:18:A1:B3:19</text:span></text:p>
      <text:p text:style-name="P354"> </text:p>
      <text:p text:style-name="P355">A. SW1<text:line-break/>B. SW2<text:line-break/>C. SW3<text:line-break/>D. SW4</text:p>
      <text:p text:style-name="P356"> </text:p>
      <text:p text:style-name="Normal"><text:span text:style-name="T357">Answer:</text:span><text:span text:style-name="T358"> B</text:span></text:p>
      <text:p text:style-name="Normal"><text:span text:style-name="T359">Explanation</text:span></text:p>
      <text:p text:style-name="P360">SW2 has lowest bridge priority (4096) so surely it will be elected as the root bridge regardless of its MAC address.</text:p>
      <text:p text:style-name="Normal"><text:span text:style-name="T361">Question 15.</text:span><text:span text:style-name="T362">27</text:span></text:p>
      <text:p text:style-name="P363">Which authentication method requires the user to provide a physical attribute to authenticate successfully?</text:p>
      <text:soft-page-break/>
      <text:p text:style-name="P364">A. certificate<text:line-break/>B. password<text:line-break/>C. multifactor<text:line-break/>D. biometric</text:p>
      <text:p text:style-name="P365"> </text:p>
      <text:p text:style-name="Normal"><text:span text:style-name="T366">Answer:</text:span><text:span text:style-name="T367"> D</text:span></text:p>
      <text:p text:style-name="Normal"><text:span text:style-name="T368">Explanation</text:span></text:p>
      <text:p text:style-name="P369">Biometric authentication requires the user to provide a physical attribute, such as a fingerprint, facial recognition, or iris scan, to authenticate successfully. This method relies on unique biological characteristics to verify identity.</text:p>
      <text:p text:style-name="Normal"><text:span text:style-name="T370">Question 15.</text:span><text:span text:style-name="T371">28</text:span></text:p>
      <text:p text:style-name="P372">Refer to the exhibit.</text:p>
      <text:p text:style-name="Normal"><text:span text:style-name="T373"><draw:frame draw:style-name="a12" draw:name="Picture 110" text:anchor-type="as-char" svg:x="0in" svg:y="0in" svg:width="4.80556in" svg:height="4.3125in" style:rel-width="scale" style:rel-height="scale"><draw:image xlink:href="media/image13.jpeg" xlink:type="simple" xlink:show="embed" xlink:actuate="onLoad"/><svg:title/><svg:desc/></draw:frame></text:span></text:p>
      <text:p text:style-name="P374">An engineer is using the Cisco WLC GUI to configure a WLAN for WPA2 encryption with AES and preshared key Cisc0123456. After the engineer selects<text:s/><text:soft-page-break/>the WPA + WPA2 option from the Layer 2 Security drop-down list, which two tasks must they perform to complete the process? (Choose two)</text:p>
      <text:p text:style-name="Normal"><text:span text:style-name="T375">A. Select </text:span><text:span text:style-name="T376">PSK</text:span><text:span text:style-name="T377"> from the Auth Key Mgmt drop-down list, set the PSK Format to </text:span><text:span text:style-name="T378">ASCII</text:span><text:span text:style-name="T379">, and enter the key</text:span><text:span text:style-name="T380"><text:line-break/>B. Select </text:span><text:span text:style-name="T381">CCKM</text:span><text:span text:style-name="T382"> from the Auth Key Mgmt drop-down list, set the PSK Format to </text:span><text:span text:style-name="T383">Hex</text:span><text:span text:style-name="T384">, and enter the key</text:span><text:span text:style-name="T385"><text:line-break/>C. Select </text:span><text:span text:style-name="T386">ASCII</text:span><text:span text:style-name="T387"> from the PSK Format drop-down list, enter the key, and leave the Auth Key Mgmt setting blank</text:span><text:span text:style-name="T388"><text:line-break/>D. Select the </text:span><text:span text:style-name="T389">WPA2 Policy</text:span><text:span text:style-name="T390">, </text:span><text:span text:style-name="T391">AES</text:span><text:span text:style-name="T392">, and </text:span><text:span text:style-name="T393">TKIP</text:span><text:span text:style-name="T394"> check boxes</text:span><text:span text:style-name="T395"><text:line-break/>E. Select the </text:span><text:span text:style-name="T396">WPA2 Policy</text:span><text:span text:style-name="T397"> and </text:span><text:span text:style-name="T398">AES</text:span><text:span text:style-name="T399"> check boxes.</text:span></text:p>
      <text:p text:style-name="P400"> </text:p>
      <text:p text:style-name="Normal"><text:span text:style-name="T401">Answer:</text:span><text:span text:style-name="T402"> A E</text:span></text:p>
      <text:p text:style-name="Normal"><text:span text:style-name="T403">Explanation</text:span></text:p>
      <text:p text:style-name="P404">We need to choose “PSK” from Auth Key Mgmt:</text:p>
      <text:p text:style-name="Normal"><text:span text:style-name="T405"><draw:frame draw:style-name="a13" draw:name="Picture 109" text:anchor-type="as-char" svg:x="0in" svg:y="0in" svg:width="2.5625in" svg:height="2.5in" style:rel-width="scale" style:rel-height="scale"><draw:image xlink:href="media/image14.jpeg" xlink:type="simple" xlink:show="embed" xlink:actuate="onLoad"/><svg:title/><svg:desc/></draw:frame></text:span></text:p>
      <text:p text:style-name="P406">Next choose “ASCII” from PSK Format and type the password:</text:p>
      <text:soft-page-break/>
      <text:p text:style-name="Normal"><text:span text:style-name="T407"><draw:frame draw:style-name="a14" draw:name="Picture 108" text:anchor-type="as-char" svg:x="0in" svg:y="0in" svg:width="2.57639in" svg:height="2.375in" style:rel-width="scale" style:rel-height="scale"><draw:image xlink:href="media/image10.jpeg" xlink:type="simple" xlink:show="embed" xlink:actuate="onLoad"/><svg:title/><svg:desc/></draw:frame></text:span></text:p>
      <text:p text:style-name="Normal"><text:span text:style-name="T408">Question 15.</text:span><text:span text:style-name="T409">29</text:span></text:p>
      <text:p text:style-name="P410">Which protocol does Ansible use to push modules to nodes in a network?</text:p>
      <text:p text:style-name="P411">A. SSH<text:line-break/>B. Kerberos<text:line-break/>C. SNMP<text:line-break/>D. Telnet</text:p>
      <text:p text:style-name="P412"> </text:p>
      <text:p text:style-name="Normal"><text:span text:style-name="T413">Answer:</text:span><text:span text:style-name="T414"> A</text:span></text:p>
      <text:p text:style-name="Normal"><text:span text:style-name="T415">Explanation</text:span></text:p>
      <text:p text:style-name="P416">Ansible uses an agentless architecture to manage network devices. Agentless means that the managed device does not need any code (agent) to be installed on it. Therefore Ansible uses SSH (NETCONF over SSH in particular) to “push” changes and extract information to managed devices.</text:p>
      <text:soft-page-break/>
      <text:p text:style-name="Normal"><text:span text:style-name="T417"><draw:frame draw:style-name="a15" draw:name="Picture 107" text:anchor-type="as-char" svg:x="0in" svg:y="0in" svg:width="6.10417in" svg:height="3.10417in" style:rel-width="scale" style:rel-height="scale"><draw:image xlink:href="media/image15.jpeg" xlink:type="simple" xlink:show="embed" xlink:actuate="onLoad"/><svg:title/><svg:desc/></draw:frame></text:span></text:p>
      <text:p text:style-name="Normal"><text:span text:style-name="T418">Question 15.</text:span><text:span text:style-name="T419">30</text:span></text:p>
      <text:p text:style-name="P420">Which function does an iterative DNS query serve in the domain name resolution process?</text:p>
      <text:p text:style-name="P421">A. Encrypt communication automatically between DNS clients and servers.<text:line-break/>B. Allow a DNS client to contact several DNS servers until the correct information is found.<text:line-break/>C. Obtain information directly from all root DNS servers configured within the scope.<text:line-break/>D. Update records dynamically across multiple DNS servers at the same time.</text:p>
      <text:p text:style-name="P422"> </text:p>
      <text:p text:style-name="Normal"><text:span text:style-name="T423">Answer:</text:span><text:span text:style-name="T424"> B</text:span></text:p>
      <text:p text:style-name="Normal"><text:span text:style-name="T425">Explanation</text:span></text:p>
      <text:p text:style-name="P426">An iterative DNS query is a request for a website name or URL. However, with this query type, the DNS server does not fetch the complete answer for the query. Rather, it provides a referral to other DNS servers that might have the answer. Thus, if the queries server does not have the IP address requested, it forwards it to another DNS server until the answer is found.</text:p>
      <text:p text:style-name="Normal"><text:span text:style-name="T427">Question 15.</text:span><text:span text:style-name="T428">31</text:span></text:p>
      <text:soft-page-break/>
      <text:p text:style-name="P429">What is the difference between controller-based networks and traditional networks as they relate to control-plane and/or data-plane functions?</text:p>
      <text:p text:style-name="P430">A. Controller-based networks centralize all important control-plane functions, and traditional networks distribute control-plane functions.<text:line-break/>B. Traditional networks centralize all important control-plane functions, and controller-based networks distribute control-plane functions.<text:line-break/>C. Traditional networks centralize all important data-plane functions, and controller-based networks distribute data-plane functions.<text:line-break/>D. Controller-based networks centralize all important data-plane functions, and traditional networks distribute data-plane functions.</text:p>
      <text:p text:style-name="P431"> </text:p>
      <text:p text:style-name="Normal"><text:span text:style-name="T432">Answer:</text:span><text:span text:style-name="T433"> A</text:span></text:p>
      <text:p text:style-name="Normal"><text:span text:style-name="T434">Explanation</text:span></text:p>
      <text:p text:style-name="P435">In controller-based networks, the control-plane functions (such as routing decisions) are centralized in a controller, which can manage and configure the entire network. In contrast, traditional networks distribute control-plane functions across individual network devices, where each device makes its own decisions about routing and forwarding.</text:p>
      <text:soft-page-break/>
      <text:p text:style-name="Normal"><text:span text:style-name="T436"><draw:frame draw:style-name="a16" draw:name="Picture 106" text:anchor-type="as-char" svg:x="0in" svg:y="0in" svg:width="6.0625in" svg:height="4.27083in" style:rel-width="scale" style:rel-height="scale"><draw:image xlink:href="media/image16.jpeg" xlink:type="simple" xlink:show="embed" xlink:actuate="onLoad"/><svg:title/><svg:desc/></draw:frame></text:span></text:p>
      <text:p text:style-name="Normal"><text:span text:style-name="T437">Question 15.</text:span><text:span text:style-name="T438">32</text:span></text:p>
      <text:p text:style-name="P439">Which factor must be considered during the implementation of an IPsec VPN?</text:p>
      <text:p text:style-name="P440">A. IPsec transport mode leaves the Layer 4 header unencrypted for inspection.<text:line-break/>B. IPsec transport mode increases GRE tunnel security over tunnel mode.<text:line-break/>C. In IPsec tunnel mode, only the IP payload is encrypted.<text:line-break/>D. In IPsec tunnel mode, the entire original IP datagram is encrypted.</text:p>
      <text:p text:style-name="P441"> </text:p>
      <text:p text:style-name="Normal"><text:span text:style-name="T442">Answer:</text:span><text:span text:style-name="T443"> D</text:span></text:p>
      <text:p text:style-name="Normal"><text:span text:style-name="T444">Explanation</text:span></text:p>
      <text:p text:style-name="P445">In tunnel mode, the entire original IP packet is encapsulated to become the payload of a new IP packet. Additionally, a new IP header is added on top of the original IP packet. -&gt; Answer D is correct.</text:p>
      <text:p text:style-name="P446">Note: In IPsec Transport mode, the original IP header is retained and just the Layer 4 payload carried by the IP packet is encrypted.</text:p>
      <text:soft-page-break/>
      <text:p text:style-name="Normal"><text:span text:style-name="T447">Question 15.</text:span><text:span text:style-name="T448">33</text:span></text:p>
      <text:p text:style-name="P449">What is the default interface for in-band wireless network management on a WLC?</text:p>
      <text:p text:style-name="P450">A. wireless management<text:line-break/>B. redundant port<text:line-break/>C. service port<text:line-break/>D. out-of-band</text:p>
      <text:p text:style-name="P451"> </text:p>
      <text:p text:style-name="Normal"><text:span text:style-name="T452">Answer:</text:span><text:span text:style-name="T453"> A</text:span></text:p>
      <text:p text:style-name="Normal"><text:span text:style-name="T454">Explanation</text:span></text:p>
      <text:p text:style-name="P455">Wireless Management Interface (WMI) is also the default interface for in-band management and connectivity to enterprise services, such as, AAA, syslog, SNMP, and so on. You can use the WMI IP address to remotely connect to the device using SSH or Telnet (or) access the Graphical User Interface (GUI) using HTTP or HTTPs by entering the wireless<text:line-break/>management interface IP address of the controller in the address field of your browser.</text:p>
      <text:p text:style-name="Normal"><text:span text:style-name="T456">Reference: </text:span><text:a xlink:href="https://www.cisco.com/c/en/us/td/docs/wireless/controller/9800/16-12/config-guide/b_wl_16_12_cg/m_config-wmi.pdf" office:target-frame-name="_blank" xlink:show="new"><text:span text:style-name="T457">https://www.cisco.com/c/en/us/td/docs/wireless/controller/9800/16-12/config-guide/b_wl_16_12_cg/m_config-wmi.pdf</text:span></text:a></text:p>
      <text:p text:style-name="Normal"><text:span text:style-name="T458">Question 15.</text:span><text:span text:style-name="T459">34</text:span></text:p>
      <text:p text:style-name="P460">Why choose Cisco DNA Center for automated lifecycle management?</text:p>
      <text:p text:style-name="P461">A. to perform upgrades without service interruption<text:line-break/>B. to provide software redundancy in the network<text:line-break/>C. to provide fast and accurate deployment of patches and updates<text:line-break/>D. to allow SSH access to all nodes in the network</text:p>
      <text:p text:style-name="P462"> </text:p>
      <text:p text:style-name="Normal"><text:span text:style-name="T463">Answer:</text:span><text:span text:style-name="T464"> C</text:span></text:p>
      <text:p text:style-name="Normal"><text:span text:style-name="T465">Explanation</text:span></text:p>
      <text:soft-page-break/>
      <text:p text:style-name="P466">Cisco DNA Center is used for automating lifecycle management, including the fast and accurate deployment of patches, updates, and configuration changes across the network. It helps streamline network management tasks, reducing errors and improving operational efficiency.</text:p>
      <text:p text:style-name="Normal"><text:span text:style-name="T467">Question 15.</text:span><text:span text:style-name="T468">35</text:span></text:p>
      <text:p text:style-name="P469">What are the two main capabilities of tunnel mode in IPsec site-to-site VPNs ? (Choose two.)</text:p>
      <text:p text:style-name="P470">A. It authenticates the data field in original packet.<text:line-break/>B. It encrypts the complete IP packet with the data field.<text:line-break/>C. It secures only the data field in the packet.<text:line-break/>D. It transmits with the original packet header visible.<text:line-break/>E. It inserts a new IPsec header with new IP address.</text:p>
      <text:p text:style-name="P471"> </text:p>
      <text:p text:style-name="Normal"><text:span text:style-name="T472">Answer:</text:span><text:span text:style-name="T473"> B E</text:span></text:p>
      <text:p text:style-name="Normal"><text:span text:style-name="T474">Explanation</text:span></text:p>
      <text:p text:style-name="P475">In tunnel mode, IPsec encrypts the entire original IP packet, including the header and data. It then adds a new IP header so the packet can be routed through the network to its destination, providing a higher level of security and privacy.</text:p>
      <text:p text:style-name="Normal"><text:span text:style-name="T476">Question 15.</text:span><text:span text:style-name="T477">36</text:span></text:p>
      <text:p text:style-name="P478">How does AI contribute to network traffic analysis?</text:p>
      <text:p text:style-name="P479">A. It simplifies traffic route mapping.<text:line-break/>B. It enhances data packet delivery speeds.<text:line-break/>C. It analyzes patterns for anomaly detection.<text:line-break/>D. It eliminates network threats.</text:p>
      <text:p text:style-name="P480"> </text:p>
      <text:p text:style-name="Normal"><text:span text:style-name="T481">Answer:</text:span><text:span text:style-name="T482"> C</text:span></text:p>
      <text:p text:style-name="Normal"><text:span text:style-name="T483">Explanation</text:span></text:p>
      <text:soft-page-break/>
      <text:p text:style-name="P484">AI contributes to network traffic analysis by examining patterns in network data to identify anomalies, which could indicate security threats, unusual activity, or performance issues. Machine learning algorithms can learn from historical network data to detect deviations from normal behavior, enabling proactive threat detection and response.</text:p>
      <text:p text:style-name="Normal"><text:span text:style-name="T485">Question 15.</text:span><text:span text:style-name="T486">37</text:span></text:p>
      <text:p text:style-name="P487">Which type of traffic is sent with pure IPsec?</text:p>
      <text:p text:style-name="P488">A. spanning-tree updates between switches that are at two different sites<text:line-break/>B. unicast messages from a host at a remote site to a server at headquarters<text:line-break/>C. broadcast packets from a switch that is attempting to locate a MAC address at one of several remote sites<text:line-break/>D. multicast traffic from a server at one site to hosts at another location</text:p>
      <text:p text:style-name="P489"> </text:p>
      <text:p text:style-name="Normal"><text:span text:style-name="T490">Answer:</text:span><text:span text:style-name="T491"> B</text:span></text:p>
      <text:p text:style-name="Normal"><text:span text:style-name="T492">Explanation</text:span></text:p>
      <text:p text:style-name="P493">IPsec is designed primarily for securing unicast traffic, providing encryption, integrity, and authentication. It is commonly used to secure unicast messages (one-to-one communication) between two endpoints, such as a host at a remote site and a server at headquarters.</text:p>
      <text:p text:style-name="P494">IPsec does not natively support broadcast or multicast traffic, as these require additional handling mechanisms that IPsec does not inherently provide.</text:p>
      <text:p text:style-name="Normal"><text:span text:style-name="T495">Question 15.</text:span><text:span text:style-name="T496">38</text:span></text:p>
      <text:p text:style-name="P497">Refer to the exhibit.</text:p>
      <text:soft-page-break/>
      <text:p text:style-name="Normal"><text:span text:style-name="T498"><draw:frame draw:style-name="a17" draw:name="Picture 105" text:anchor-type="as-char" svg:x="0in" svg:y="0in" svg:width="6.5in" svg:height="2.12708in" style:rel-width="scale" style:rel-height="scale"><draw:image xlink:href="media/image17.jpeg" xlink:type="simple" xlink:show="embed" xlink:actuate="onLoad"/><svg:title/><svg:desc/></draw:frame></text:span></text:p>
      <text:p text:style-name="P499">With a reference bandwidth of 100 Gb on all routers, which path does router Y use to get to network 192.168.1.0/24?</text:p>
      <text:p text:style-name="P500">A. router C &gt; D &gt; A &gt; F<text:line-break/>B. router E &gt; B &gt; F<text:line-break/>C. router E &gt; F<text:line-break/>D. router C &gt; D &gt; A &gt; B &gt; F</text:p>
      <text:p text:style-name="P501"> </text:p>
      <text:p text:style-name="Normal"><text:span text:style-name="T502">Answer:</text:span><text:span text:style-name="T503"> D</text:span></text:p>
      <text:p text:style-name="Normal"><text:span text:style-name="T504">Explanation</text:span></text:p>
      <text:p text:style-name="P505">This question did not say what routing protocol it is using but maybe it is using OSPF. For OSPF, the cost is calculated as follows:</text:p>
      <text:p text:style-name="consolas">Cost = Reference Bandwidth / Interface Bandwidth</text:p>
      <text:p text:style-name="P506">Therefore with a reference bandwidth of 100Gb then:<text:line-break/>+ The cost of 100Gig link: cost = 100 / 100 = 1<text:line-break/>+ The cost of 10Gig link: cost = 100 / 10 = 10</text:p>
      <text:p text:style-name="P507">The cost of the path C &gt; D &gt; A &gt; B &gt; F is 10 + 1 + 1 + 1 + 1 = 14 which is lowest so this path will be chosen.</text:p>
      <text:p text:style-name="Normal"><text:span text:style-name="T508">Question 15.</text:span><text:span text:style-name="T509">39</text:span></text:p>
      <text:p text:style-name="P510">What is a characteristic of RSA?</text:p>
      <text:p text:style-name="P511">A. It requires both sides to have identical keys.<text:line-break/>B. it is a private-key gencryption algorithm.<text:line-break/><text:soft-page-break/>C. It uses preshared keys for encryption.<text:line-break/>D. it is a public-key cryptosystem.</text:p>
      <text:p text:style-name="P512"> </text:p>
      <text:p text:style-name="Normal"><text:span text:style-name="T513">Answer:</text:span><text:span text:style-name="T514"> D</text:span></text:p>
      <text:p text:style-name="Normal"><text:span text:style-name="T515">Explanation</text:span></text:p>
      <text:p text:style-name="Normal"><text:span text:style-name="T516">RSA (Rivest-Shamir-Adleman) is a </text:span><text:span text:style-name="T517">public-key cryptosystem</text:span><text:span text:style-name="T518"> that uses a pair of keys: a public key for encryption and a private key for decryption. This key pair allows secure data transmission without requiring both parties to have identical keys. Public-key cryptography like RSA enables one party to encrypt data using the recipient’s public key, which only the recipient can decrypt with their private key.</text:span></text:p>
      <text:p text:style-name="Normal"><text:span text:style-name="T519">Question 15.</text:span><text:span text:style-name="T520">40</text:span></text:p>
      <text:p text:style-name="P521">What is a functionality of the control plane in the network?</text:p>
      <text:p text:style-name="P522">A. It provides CLI access to the network device.<text:line-break/>B. It exchanges topology information with other routers.<text:line-break/>C. It looks up an egress interface in the forwarding information base.<text:line-break/>D. It forwards traffic to the next hop.</text:p>
      <text:p text:style-name="P523"> </text:p>
      <text:p text:style-name="Normal"><text:span text:style-name="T524">Answer:</text:span><text:span text:style-name="T525"> B</text:span></text:p>
      <text:p text:style-name="Normal"><text:span text:style-name="T526">Explanation</text:span></text:p>
      <text:p text:style-name="P527">The control plane is responsible for managing and exchanging routing and topology information within the network. This information allows routers to make decisions about the best paths across the network. The control plane handles functions like routing protocols (OSPF, EIGRP, BGP…), which are essential for building and maintaining routers’ routing table.</text:p>
      <text:p text:style-name="Normal"><text:span text:style-name="T528">Question 15.</text:span><text:span text:style-name="T529">41</text:span></text:p>
      <text:p text:style-name="P530">What is the purpose of the URI string in a REST request?</text:p>
      <text:soft-page-break/>
      <text:p text:style-name="P531">A. to specify the way in which a remote resource is modified<text:line-break/>B. to identify a resource on a target server<text:line-break/>C. to respond with the data content encoding for a request<text:line-break/>D. to transport data or payload to a remote resource</text:p>
      <text:p text:style-name="P532"> </text:p>
      <text:p text:style-name="Normal"><text:span text:style-name="T533">Answer:</text:span><text:span text:style-name="T534"> B</text:span></text:p>
      <text:p text:style-name="Normal"><text:span text:style-name="T535">Explanation</text:span></text:p>
      <text:p text:style-name="P536">In a RESTful request, the URI (Uniform Resource Identifier) is used primarily to identify the specific resource on a server that the client wants to interact with. The URI typically includes information about the path to the resource and any query parameters needed to locate it. For example, this is the URI of an online library system:</text:p>
      <text:p text:style-name="consolas">https://api.library.com/books/12345</text:p>
      <text:p text:style-name="P537">In this URI:</text:p>
      <text:list text:style-name="LFO1" text:continue-numbering="true">
        <text:list-item>
          <text:p text:style-name="P538"><text:span text:style-name="consolasChar">https://api.library.com</text:span><text:span text:style-name="T539">: This part is the base URL, which points to the library’s API server.</text:span></text:p>
        </text:list-item>
        <text:list-item>
          <text:p text:style-name="P540"><text:span text:style-name="consolasChar">/books</text:span><text:span text:style-name="T541">: This path identifies the collection of resources, in this case, “books.”</text:span></text:p>
        </text:list-item>
        <text:list-item>
          <text:p text:style-name="P542"><text:span text:style-name="consolasChar">/12345</text:span><text:span text:style-name="T543">: This is the unique identifier (ID) for a specific book. By adding this ID to the end of the URI, we’re identifying a single resource within the “books” collection.</text:span></text:p>
        </text:list-item>
      </text:list>
      <text:p text:style-name="Normal"><text:span text:style-name="T544">Question 15.</text:span><text:span text:style-name="T545">42</text:span></text:p>
      <text:p text:style-name="P546">Refer to the exhibit.</text:p>
      <text:p text:style-name="Normal"><text:span text:style-name="T547"><draw:frame draw:style-name="a18" draw:name="Picture 104" text:anchor-type="as-char" svg:x="0in" svg:y="0in" svg:width="4.75in" svg:height="1.86806in" style:rel-width="scale" style:rel-height="scale"><draw:image xlink:href="media/image18.jpeg" xlink:type="simple" xlink:show="embed" xlink:actuate="onLoad"/><svg:title/><svg:desc/></draw:frame></text:span></text:p>
      <text:soft-page-break/>
      <text:p text:style-name="consolas">Router1#show ip route</text:p>
      <text:p text:style-name="consolas">Gateway of last resort is 10.10.11.2 to network 0.0.0.0</text:p>
      <text:p text:style-name="consolas"/>
      <text:p text:style-name="consolas"><text:s text:c="3"/>209.165.200.0/27 is subnetted, 1 subnets</text:p>
      <text:p text:style-name="consolas">B <text:s text:c="3"/>209.165.200.224 [20/0] via 10.10.12.2, 03:03:03</text:p>
      <text:p text:style-name="consolas"><text:s text:c="3"/>209.165.201.0/27 is subnetted, 1 subnets</text:p>
      <text:p text:style-name="consolas">B <text:s text:c="3"/>209.165.201.0 [20/0] via 10.10.12.2, 03:03:03</text:p>
      <text:p text:style-name="consolas"><text:s text:c="3"/>209.165.202.0/27 is subnetted, 1 subnets</text:p>
      <text:p text:style-name="consolas">B <text:s text:c="3"/>209.165.202.128 [20/0] via 10.10.12.2, 03:03:03</text:p>
      <text:p text:style-name="consolas"><text:s text:c="3"/>10.0.0.0/8 is variably subnetted, 8 subnets, 4 masks</text:p>
      <text:p text:style-name="consolas">C <text:s text:c="3"/>10.10.10.0/28 is directly connected, GigabitEthernet0/0</text:p>
      <text:p text:style-name="consolas">C <text:s text:c="3"/>10.10.11.0/30 is directly connected, FastEthernet2/0</text:p>
      <text:p text:style-name="consolas">C <text:s text:c="3"/>10.10.12.0/30 is directly connected, GigabitEthernet0/1</text:p>
      <text:p text:style-name="P548">O <text:s text:c="3"/>10.10.13.0/25 [110/2] via 10.10.10.1, 00:00:03, GigabitEthernet0/0</text:p>
      <text:p text:style-name="P549">O <text:s text:c="3"/>10.10.13.128/28 [110/2] via 10.10.10.1, 00:00:03, GigabitEthernet0/0</text:p>
      <text:p text:style-name="P550">O <text:s text:c="3"/>10.10.13.144/28 [110/2] via 10.10.10.1, 00:00:03, GigabitEthernet0/0</text:p>
      <text:p text:style-name="P551">O <text:s text:c="3"/>10.10.13.160/29 [110/2] via 10.10.10.1, 00:00:03, GigabitEthernet0/0</text:p>
      <text:p text:style-name="P552">O <text:s text:c="3"/>10.10.13.208/29 [110/2] via 10.10.10.1, 00:00:03, GigabitEthernet0/0</text:p>
      <text:p text:style-name="P553">S* <text:s/>0.0.0.0/0 [1/0] via 10.10.11.2</text:p>
      <text:p text:style-name="P554">What is the prefix length for the route that router1 will use to reach host A?</text:p>
      <text:p text:style-name="P555">A. /25<text:line-break/>B. /27<text:line-break/>C. /28<text:line-break/>D. /29</text:p>
      <text:p text:style-name="P556"> </text:p>
      <text:p text:style-name="Normal"><text:span text:style-name="T557">Answer:</text:span><text:span text:style-name="T558"> D</text:span></text:p>
      <text:p text:style-name="Normal"><text:span text:style-name="T559">Question 15.</text:span><text:span text:style-name="T560">43</text:span></text:p>
      <text:soft-page-break/>
      <text:p text:style-name="P561">Under what condition would a FlexConnect wireless architecture be preferable over other architectural choices?</text:p>
      <text:p text:style-name="P562">A. when the connection latency to several remote offices is anticipated to surpass 300 milliseconds<text:line-break/>B. when there is a need for high-precision location-based services at various remote offices<text:line-break/>C. when centralized management is needed for several remote offices that lack individual WLCs<text:line-break/>D. when each remote office necessitates its own local WLC for network management</text:p>
      <text:p text:style-name="P563"> </text:p>
      <text:p text:style-name="Normal"><text:span text:style-name="T564">Answer:</text:span><text:span text:style-name="T565"> C</text:span></text:p>
      <text:p text:style-name="Normal"><text:span text:style-name="T566">Explanation</text:span></text:p>
      <text:p text:style-name="P567">FlexConnect is designed for environments where remote sites (such as branch offices) do not have a local WLC but require centralized management. It allows access points to function in “FlexConnect mode,” enabling them to switch traffic locally at the remote site while still being managed by a centralized WLC at the main office.</text:p>
      <text:p text:style-name="Normal"><text:span text:style-name="T568">Question 15.</text:span><text:span text:style-name="T569">44</text:span></text:p>
      <text:p text:style-name="P570">Refer to the exhibit.</text:p>
      <text:soft-page-break/>
      <text:p text:style-name="Normal"><text:span text:style-name="T571"><draw:frame draw:style-name="a19" draw:name="Picture 103" text:anchor-type="as-char" svg:x="0in" svg:y="0in" svg:width="3.04861in" svg:height="3.25in" style:rel-width="scale" style:rel-height="scale"><draw:image xlink:href="media/image19.jpeg" xlink:type="simple" xlink:show="embed" xlink:actuate="onLoad"/><svg:title/><svg:desc/></draw:frame></text:span></text:p>
      <text:p text:style-name="P572">Inter-VLAN routing is configured on SW1. Client A is running Linux as an OS in VLAN 10 with a default gateway IP 10.0.0.1 but cannot ping client B in VLAN 20 running Windows. What action must be taken to verify that client A has the correct IP settings?</text:p>
      <text:p text:style-name="Normal"><text:span text:style-name="T573">A. Run the </text:span><text:span text:style-name="T574">ifconfig</text:span><text:span text:style-name="T575"> command on client A to confirm that its IP and subnet mask fall within 255.254.0.0.</text:span><text:span text:style-name="T576"><text:line-break/>B. Run the </text:span><text:span text:style-name="T577">ipconfig</text:span><text:span text:style-name="T578"> command on client A and ensure that the IP address is within the host range of 10.0.0.1 – 10.0.255.254.</text:span><text:span text:style-name="T579"><text:line-break/>C. Run the </text:span><text:span text:style-name="T580">ipconfig</text:span><text:span text:style-name="T581"> command on client A to confirm that the correct 10.0.0.1 default gateway is used.</text:span><text:span text:style-name="T582"><text:line-break/>D. Run the </text:span><text:span text:style-name="T583">ifconfig</text:span><text:span text:style-name="T584"> command on client A to confirm that the subnet mask is set to 255.255.128.0</text:span></text:p>
      <text:p text:style-name="P585"> </text:p>
      <text:p text:style-name="Normal"><text:span text:style-name="T586">Answer:</text:span><text:span text:style-name="T587"> A</text:span></text:p>
      <text:p text:style-name="Normal"><text:span text:style-name="T588">Explanation</text:span></text:p>
      <text:p text:style-name="P589">We need to use the “ifconfig” on Linux to find out the IP address and subnet mask of an interface. For example:</text:p>
      <text:soft-page-break/>
      <text:p text:style-name="Normal"><text:span text:style-name="T590"><draw:frame draw:style-name="a20" draw:name="Picture 102" text:anchor-type="as-char" svg:x="0in" svg:y="0in" svg:width="4.78472in" svg:height="2.95139in" style:rel-width="scale" style:rel-height="scale"><draw:image xlink:href="media/image20.jpeg" xlink:type="simple" xlink:show="embed" xlink:actuate="onLoad"/><svg:title/><svg:desc/></draw:frame></text:span></text:p>
      <text:p text:style-name="Normal"><text:span text:style-name="T591">Question 15.</text:span><text:span text:style-name="T592">45</text:span></text:p>
      <text:p text:style-name="P593">Refer to the exhibit.</text:p>
      <text:p text:style-name="consolas">CPE# show ip access-list Services</text:p>
      <text:p text:style-name="consolas">Extended IP access list Services</text:p>
      <text:p text:style-name="consolas"><text:s text:c="3"/>10 permit tcp 10.0.0.0 0.255.255.255 any eq www</text:p>
      <text:p text:style-name="consolas"><text:s text:c="3"/>20 permit tcp 10.0.0.0 0.255.255.255 any eq 443</text:p>
      <text:p text:style-name="consolas"><text:s text:c="3"/>30 permit udp 10.0.0.0 0.255.255.255 host 198.51.100.11 eq domain</text:p>
      <text:p text:style-name="consolas"><text:s text:c="3"/>40 deny ip any any log</text:p>
      <text:p text:style-name="P594">This ACL is configured to allow client access only to HTTP, HTTPS, and DNS services via UDP. The new administrator wants to add TCP access to the DNS service. Which configuration updates the ACL efficiently?</text:p>
      <table:table table:style-name="Table595">
        <table:table-columns>
          <table:table-column table:style-name="TableColumn596"/>
          <table:table-column table:style-name="TableColumn597"/>
        </table:table-columns>
        <table:table-row table:style-name="TableRow598">
          <table:table-cell table:style-name="TableCell599">
            <text:p text:style-name="P600">Option A</text:p>
            <text:p text:style-name="consolas">ip access-list extended Services</text:p>
            <text:p text:style-name="consolas"><text:s/>permit tcp 10.0.0.0 0.255.255.255 host 198.51.100.11 eq domain</text:p>
          </table:table-cell>
          <table:table-cell table:style-name="TableCell601">
            <text:p text:style-name="P602">Option B</text:p>
            <text:p text:style-name="consolas">no ip access-list extended Services</text:p>
            <text:p text:style-name="consolas">ip access-list extended Services</text:p>
            <text:p text:style-name="consolas"><text:s/>30 permit tcp 10.0.0.0 0.255.255.255 host 198.51.100.11 eq domain</text:p>
          </table:table-cell>
        </table:table-row>
        <table:table-row table:style-name="TableRow603">
          <table:table-cell table:style-name="TableCell604">
            <text:p text:style-name="P605"/>
          </table:table-cell>
          <table:table-cell table:style-name="TableCell606">
            <text:p text:style-name="P607"/>
          </table:table-cell>
        </table:table-row>
        <text:soft-page-break/>
        <table:table-row table:style-name="TableRow608">
          <table:table-cell table:style-name="TableCell609">
            <text:p text:style-name="P610">Option C</text:p>
            <text:p text:style-name="consolas">no ip access-list extended Services</text:p>
            <text:p text:style-name="consolas">ip access-list extended Services</text:p>
            <text:p text:style-name="consolas"><text:s/>permit udp 10.0.0.0 0.255.255.255 any eq 53</text:p>
            <text:p text:style-name="consolas"><text:s/>permit tcp 10.0.0.0 0.255.255.255 host 198.51.100.11 eq domain</text:p>
            <text:p text:style-name="consolas"><text:s/>deny ip any any log</text:p>
          </table:table-cell>
          <table:table-cell table:style-name="TableCell611">
            <text:p text:style-name="P612">Option D</text:p>
            <text:p text:style-name="consolas">ip access-list extended Services</text:p>
            <text:p text:style-name="consolas"><text:s/>35 permit tcp 10.0.0.0 0.255.255.255 host 198.51.100.11 eq domain</text:p>
          </table:table-cell>
        </table:table-row>
      </table:table>
      <text:p text:style-name="P613">A. Option A<text:line-break/>B. Option B<text:line-break/>C. Option C<text:line-break/>D. Option D</text:p>
      <text:p text:style-name="P614"> </text:p>
      <text:p text:style-name="Normal"><text:span text:style-name="T615">Answer:</text:span><text:span text:style-name="T616"> D</text:span></text:p>
      <text:p text:style-name="Normal"><text:span text:style-name="T617">Explanation</text:span></text:p>
      <text:p text:style-name="P618">If we remove the ACL with “no ip access-list extended Services”, all configs will be lost. We should use a higher sequence number (mean smaller value) than 40 to write the new rule above the “40 deny ip any any log” statement.</text:p>
      <text:p text:style-name="Normal"><text:span text:style-name="T619">Question 15.</text:span><text:span text:style-name="T620">46</text:span></text:p>
      <text:p text:style-name="P621">Refer to the exhibit.</text:p>
      <text:soft-page-break/>
      <text:p text:style-name="Normal"><text:span text:style-name="T622"><draw:frame draw:style-name="a21" draw:name="Picture 101" text:anchor-type="as-char" svg:x="0in" svg:y="0in" svg:width="4.76389in" svg:height="3.35417in" style:rel-width="scale" style:rel-height="scale"><draw:image xlink:href="media/image21.jpeg" xlink:type="simple" xlink:show="embed" xlink:actuate="onLoad"/><svg:title/><svg:desc/></draw:frame></text:span></text:p>
      <text:p text:style-name="P623">The Wi-Fi SSID “Office_WLan” has Layer 2 Security configured with MAC filtering enabled. What additional security is provided by this specific feature?</text:p>
      <text:p text:style-name="P624">A. There is Galois cache algorithm configured that provides strong encryption and authentication.<text:line-break/>B. There is a strong mutual authentication used between NAC and the network devices using x.509 standard.<text:line-break/>C. There is an extra layer of security that ensures only authorized devices with known MAC addresses connect to the network.<text:line-break/>D. There is a robust security mechanism configured to protect against various Layer 2 and Layer 3 attacks.</text:p>
      <text:p text:style-name="P625"> </text:p>
      <text:p text:style-name="Normal"><text:span text:style-name="T626">Answer:</text:span><text:span text:style-name="T627"> C</text:span></text:p>
      <text:p text:style-name="Normal"><text:span text:style-name="T628">Explanation</text:span></text:p>
      <text:p text:style-name="P629">From the exhibit, we see “MAC Filtering” is being chosen. This option allows to control access to a network based on the MAC address of a device -&gt; Answer C is correct.</text:p>
      <text:p text:style-name="P630">Answer A is not correct as Galois/Counter Mode Protocol (GCMP) is an encryption, not authentication method.</text:p>
      <text:soft-page-break/>
      <text:p text:style-name="P631">Answer B is not correct as x.509 cert is not related to this config.</text:p>
      <text:p text:style-name="P632">Answer D is not correct as we only see “Layer 2” tab, not “Layer 3” tab so we cannot say anything about Layer 3 protection.</text:p>
      <text:p text:style-name="Normal"><text:span text:style-name="T633">Question 15.</text:span><text:span text:style-name="T634">47</text:span></text:p>
      <text:p text:style-name="P635">What are two reasons to configure PortFast on a switch port attached to an end host? (Choose two)</text:p>
      <text:p text:style-name="P636">A. to enable the number of MAC addresses learned on the port to 1<text:line-break/>B. to protect the operation of the port from topology change processes<text:line-break/>C. to enable the pod to enter the forwarding state immediately when the host boots up<text:line-break/>D. to prevent the port from participating in Spanning Tree Protocol operations<text:line-break/>E. to block another switch or host from communicating through the port</text:p>
      <text:p text:style-name="P637"> </text:p>
      <text:p text:style-name="Normal"><text:span text:style-name="T638">Answer:</text:span><text:span text:style-name="T639"> B C</text:span></text:p>
      <text:p text:style-name="Normal"><text:span text:style-name="T640">Explanation</text:span></text:p>
      <text:p text:style-name="P641">PortFast is a feature of the Spanning Tree Protocol (STP) that allows ports to quickly transition to the forwarding state. This reduces the time it takes for devices to connect to a network and communicate.</text:p>
      <text:p text:style-name="P642">Answer A is not correct as limiting MAC addresses is related to security features like port security, not PortFast.</text:p>
      <text:p text:style-name="P643">Answer B is correct as a switch will never generate a topology change notification for an interface that has PortFast enabled.</text:p>
      <text:p text:style-name="P644">Answer D is not correct as the port which runs PortFast still participate into STP process.</text:p>
      <text:p text:style-name="P645">Answer E is not correct as it is not the function of PortFast.</text:p>
      <text:p text:style-name="Normal"><text:span text:style-name="T646">Question 15.</text:span><text:span text:style-name="T647">48</text:span></text:p>
      <text:p text:style-name="P648">Refer to the exhibit.</text:p>
      <text:p text:style-name="consolas">C:\Users\ADMIN&gt;ipconfig</text:p>
      <text:p text:style-name="consolas"/>
      <text:p text:style-name="consolas">Windows IP Configuration</text:p>
      <text:p text:style-name="consolas"/>
      <text:p text:style-name="consolas">Ethernet adapter Ethernet:</text:p>
      <text:p text:style-name="consolas"/>
      <text:p text:style-name="consolas">&lt;...&gt;</text:p>
      <text:p text:style-name="consolas"><text:s text:c="3"/>Physical Address . . . . . . . . . . . : 04-42-1A-EE-AA-5E</text:p>
      <text:p text:style-name="consolas"><text:s text:c="3"/>DHCP Enabled . . . . . . . . . . . . . : Yes</text:p>
      <text:p text:style-name="consolas"><text:s text:c="3"/>Autoconfiguration Enabled. . . . . . . : Yes</text:p>
      <text:p text:style-name="consolas"><text:s text:c="3"/>Link-local IPv6 Address. . . . . . . . :<text:s/></text:p>
      <text:p text:style-name="consolas">fe80::8a79:bcde:34dc:c11e35%(Preferred)</text:p>
      <text:p text:style-name="consolas"><text:s text:c="3"/>Ipv4 Address . . . . . . . . . . . . . : 192.168.3.20(Preferred)</text:p>
      <text:p text:style-name="consolas"><text:s text:c="3"/>Subnet Mask. . . . . . . . . . . . . . : 255.255.255.0</text:p>
      <text:p text:style-name="consolas"><text:s text:c="3"/>Lease Obtained . . . . . . . . . . . . : Thursday, 16 March 2023</text:p>
      <text:p text:style-name="consolas">6:25:01 AM</text:p>
      <text:p text:style-name="consolas"><text:s text:c="3"/>Lease Expires. . . . . . . . . . . . . : Sunday, 26 March 2023</text:p>
      <text:p text:style-name="consolas">4:17:26 PM</text:p>
      <text:p text:style-name="consolas"><text:s text:c="3"/>Default Gateway. . . . . . . . . . . . : 192.168.3.1</text:p>
      <text:p text:style-name="consolas"><text:s text:c="3"/>DHCP Server. . . . . . . . . . . . . . : 192.168.3.1</text:p>
      <text:p text:style-name="consolas"><text:s text:c="3"/>DHCPv6 IAID. . . . . . . . . . . . . . : 201605658</text:p>
      <text:p text:style-name="consolas"><text:s text:c="3"/>DHCPv6 Client DUID . . . . . . . . . . : 00-01-00-01-2A-3F-45-34-03-</text:p>
      <text:p text:style-name="consolas">13-23-EE-AD-5E</text:p>
      <text:p text:style-name="consolas"><text:s text:c="3"/>DNS Servers. . . . . . . . . . . . . . : 10.10.1.254</text:p>
      <text:p text:style-name="consolas"><text:s text:c="3"/>NetBIOS over Tcpip . . . . . . . . . . : Enabled</text:p>
      <text:p text:style-name="P649">The user has connectivity to devices on network 192.168.3.0/24 but cannot reach users on the network 10.10.1.0/24. What is the first step to verify connectivity?</text:p>
      <text:soft-page-break/>
      <text:p text:style-name="P650">A. Is the internet reachable?<text:line-break/>B. Is the default gateway reachable?<text:line-break/>C. Is the DNS server reachable?</text:p>
      <text:p text:style-name="P651"> </text:p>
      <text:p text:style-name="Normal"><text:span text:style-name="T652">Answer:</text:span><text:span text:style-name="T653"> B</text:span></text:p>
      <text:p text:style-name="Normal"><text:span text:style-name="T654">Explanation</text:span></text:p>
      <text:p text:style-name="P655">If the local host can access local network but cannot reach outside then we must check the default gateway first as it is always the first hop between our host and outside network.</text:p>
      <text:p text:style-name="P656">Note: We cannot conclude that the default gateway is reachable right now just because the PC received a correct DHCP address (from the output we learned that the Default Gateway is also the DHCP server at 192.168.3.1). The gateway might have been working when it issued the IP address, but it may be down at the moment.</text:p>
      <text:p text:style-name="Normal"><text:span text:style-name="T657">Question 15.</text:span><text:span text:style-name="T658">49</text:span></text:p>
      <text:p text:style-name="P659">Which solution is appropriate when mitigating password attacks where the attacker was able to sniff the clear-text password of the system administrator?</text:p>
      <text:p text:style-name="P660">A. next-generation firewall to keep stateful packet inspection<text:line-break/>B. multifactor authentication using two separate authentication sources<text:line-break/>C. ACL to restrict incoming Telnet sessions “admin” accounts<text:line-break/>D. IPS with a block list of known attack vectors</text:p>
      <text:p text:style-name="P661"> </text:p>
      <text:p text:style-name="Normal"><text:span text:style-name="T662">Answer:</text:span><text:span text:style-name="T663"> B</text:span></text:p>
      <text:p text:style-name="Normal"><text:span text:style-name="T664">Explanation</text:span></text:p>
      <text:p text:style-name="P665">If an attacker is able to sniff a clear-text password, it suggests the authentication process is not secure enough. Multifactor authentication (MFA) enhances security by requiring an additional authentication factor, such as:</text:p>
      <text:soft-page-break/>
      <text:p text:style-name="P666">+ Something you know (password or PIN…).<text:line-break/>+ Something you have (a hardware token or mobile app…).<text:line-break/>+ Something you are (biometric authentication like a fingerprint…).</text:p>
      <text:p text:style-name="P667">Even if the attacker captures the password, they would still need the second factor to gain access, effectively mitigating the risk.</text:p>
      <text:p text:style-name="Normal"><text:span text:style-name="T668">Question 15.</text:span><text:span text:style-name="T669">50</text:span></text:p>
      <text:p text:style-name="P670">A network engineer starts to implement a new wireless LAN by configuring the authentication server and creating the dynamic interface. What must be performed next to complete the basic configuration?</text:p>
      <text:p text:style-name="P671">A. Install the management interface and add the management IP.<text:line-break/>B. Configure high availability and redundancy for the access points.<text:line-break/>C. Enable Telnet and RADIUS access on the management interface.<text:line-break/>D. Create the new WLAN and bind the dynamic interface to it.</text:p>
      <text:p text:style-name="P672"> </text:p>
      <text:p text:style-name="Normal"><text:span text:style-name="T673">Answer:</text:span><text:span text:style-name="T674"> D</text:span></text:p>
      <text:p text:style-name="Normal"><text:span text:style-name="T675">Explanation</text:span></text:p>
      <text:p text:style-name="Normal"><text:span text:style-name="T676">A dynamic interface is simply an interface that maps a WLAN to a wired vlan or subnet. To create a new interface, Choose </text:span><text:span text:style-name="T677">Controller &gt; Interfaces &gt; New</text:span><text:span text:style-name="T678"> to open the Interfaces page:</text:span></text:p>
      <text:p text:style-name="Normal"><text:span text:style-name="T679"><draw:frame draw:style-name="a22" draw:name="Picture 100" text:anchor-type="as-char" svg:x="0in" svg:y="0in" svg:width="6.5in" svg:height="1.81944in" style:rel-width="scale" style:rel-height="scale"><draw:image xlink:href="media/image22.jpeg" xlink:type="simple" xlink:show="embed" xlink:actuate="onLoad"/><svg:title/><svg:desc/></draw:frame></text:span></text:p>
      <text:p text:style-name="P680">Next, enter the IP address, subnet mask, and gateway address… for the interface.</text:p>
      <text:soft-page-break/>
      <text:p text:style-name="Normal"><text:span text:style-name="T681"><draw:frame draw:style-name="a23" draw:name="Picture 99" text:anchor-type="as-char" svg:x="0in" svg:y="0in" svg:width="6.5in" svg:height="7.01667in" style:rel-width="scale" style:rel-height="scale"><draw:image xlink:href="media/image23.jpeg" xlink:type="simple" xlink:show="embed" xlink:actuate="onLoad"/><svg:title/><svg:desc/></draw:frame></text:span></text:p>
      <text:p text:style-name="P682">Next, while creating a new WLAN, we assign above interface to it:</text:p>
      <text:soft-page-break/>
      <text:p text:style-name="Normal"><text:span text:style-name="T683"><draw:frame draw:style-name="a24" draw:name="Picture 98" text:anchor-type="as-char" svg:x="0in" svg:y="0in" svg:width="6.5in" svg:height="4.33333in" style:rel-width="scale" style:rel-height="scale"><draw:image xlink:href="media/image24.jpeg" xlink:type="simple" xlink:show="embed" xlink:actuate="onLoad"/><svg:title/><svg:desc/></draw:frame></text:span></text:p>
      <text:p text:style-name="Normal"><text:span text:style-name="T684">Question 15.</text:span><text:span text:style-name="T685">51</text:span></text:p>
      <text:p text:style-name="P686">Drag and drop the TCP and UDP characteristics from the left onto the supporting protocols on the right. Not all options are used.</text:p>
      <text:p text:style-name="Normal"><text:span text:style-name="T687"><draw:frame draw:style-name="a25" draw:name="Picture 97" text:anchor-type="as-char" svg:x="0in" svg:y="0in" svg:width="5.54167in" svg:height="3.35417in" style:rel-width="scale" style:rel-height="scale"><draw:image xlink:href="media/image25.jpeg" xlink:type="simple" xlink:show="embed" xlink:actuate="onLoad"/><svg:title/><svg:desc/></draw:frame></text:span></text:p>
      <text:soft-page-break/>
      <text:p text:style-name="P688"> </text:p>
      <text:p text:style-name="Normal"><text:span text:style-name="T689">Answer:</text:span></text:p>
      <text:p text:style-name="Normal"><text:span text:style-name="T690">TCP</text:span><text:span text:style-name="T691"><text:line-break/>+ uses sequence numbers</text:span><text:span text:style-name="T692"><text:line-break/>+ relies on acknowledgement packets</text:span><text:span text:style-name="T693"><text:line-break/>+ ensures data integrity</text:span></text:p>
      <text:p text:style-name="Normal"><text:span text:style-name="T694">UDP</text:span><text:span text:style-name="T695"><text:line-break/>+ supports real-time applications</text:span><text:span text:style-name="T696"><text:line-break/>+ connectionless at transport layer</text:span><text:span text:style-name="T697"><text:line-break/>+ minimal error checking</text:span></text:p>
      <text:p text:style-name="Normal"><text:span text:style-name="T698">Explanation</text:span></text:p>
      <text:p text:style-name="P699">TCP (Transmission Control Protocol) ensures data integrity by utilizing a checksum field within its header, which allows for error detection during transmission, and by implementing mechanisms like sequence numbers and retransmission of lost data to guarantee that data arrives at the destination in the correct order and without corruption; this makes TCP a reliable protocol for data transfer where data integrity is crucial.</text:p>
      <text:p text:style-name="Normal"><text:span text:style-name="T700">User Datagram Protocol (UDP) uses checksums to </text:span><text:span text:style-name="T701">detect errors</text:span><text:span text:style-name="T702"> in data packets. However, UDP doesn’t correct errors or resend lost packets. This makes UDP sometimes known as the Unreliable Data Protocol.</text:span></text:p>
      <text:p text:style-name="Normal"><text:span text:style-name="T703">Question 15.</text:span><text:span text:style-name="T704">52</text:span></text:p>
      <text:p text:style-name="P705">Which advantage does machine learning offer for network security?</text:p>
      <text:p text:style-name="P706">A. It improves real-time threat detection.<text:line-break/>B. It manages firewall rule sets.<text:line-break/>C. It enforces password complexity requirements.<text:line-break/>D. It controls VPN access permissions.</text:p>
      <text:p text:style-name="P707"> </text:p>
      <text:p text:style-name="Normal"><text:span text:style-name="T708">Answer:</text:span><text:span text:style-name="T709"> A</text:span></text:p>
      <text:p text:style-name="Normal"><text:span text:style-name="T710">Explanation</text:span></text:p>
      <text:soft-page-break/>
      <text:p text:style-name="Normal"><text:span text:style-name="T711">Machine learning detects threats by constantly monitoring the behavior of the network for anomalies. Machine learning engines process massive amounts of data </text:span><text:span text:style-name="T712">in near real time</text:span><text:span text:style-name="T713"> to discover critical incidents. These techniques allow for the detection of insider threats, unknown malware, and policy violations.</text:span></text:p>
      <text:p text:style-name="Normal"><text:span text:style-name="T714">Reference: </text:span><text:a xlink:href="https://www.cisco.com/c/en/us/products/security/machine-learning-security.html" office:target-frame-name="_blank" xlink:show="new"><text:span text:style-name="T715">https://www.cisco.com/c/en/us/products/security/machine-learning-security.html</text:span></text:a></text:p>
      <text:p text:style-name="Normal"><text:span text:style-name="T716">Question 15.</text:span><text:span text:style-name="T717">53</text:span></text:p>
      <text:p text:style-name="P718">Which AP feature provides a captive portal for users to authenticate register and accept terms before accessing the internet?</text:p>
      <text:p text:style-name="P719">A. One-Click<text:line-break/>B. Hotspot<text:line-break/>C. Enhanced Bluetooth<text:line-break/>D. Whole Home</text:p>
      <text:p text:style-name="P720"> </text:p>
      <text:p text:style-name="Normal"><text:span text:style-name="T721">Answer:</text:span><text:span text:style-name="T722"> B</text:span></text:p>
      <text:p text:style-name="Normal"><text:span text:style-name="T723">Explanation</text:span></text:p>
      <text:p text:style-name="P724">Hotspot (captive portal) – uses web-proxy and it is capable of using only the default routing table.</text:p>
      <text:p text:style-name="Normal"><text:span text:style-name="T725">Reference: </text:span><text:a xlink:href="https://help.mikrotik.com/docs/spaces/ROS/pages/56459266/HotSpot+-+Captive+portal" office:target-frame-name="_blank" xlink:show="new"><text:span text:style-name="T726">https://help.mikrotik.com/docs/spaces/ROS/pages/56459266/HotSpot+-+Captive+portal</text:span></text:a></text:p>
      <text:p text:style-name="P727">Hotspot feature in an Access Point provides a captive portal, which forces users to authenticate, register, or accept terms before accessing the internet. It is commonly used in public Wi-Fi networks, such as those in hotels, cafes, and airports.</text:p>
      <text:p text:style-name="Normal"><text:span text:style-name="T728">Question 15.</text:span><text:span text:style-name="T729">54</text:span></text:p>
      <text:p text:style-name="P730">What does the term “split MAC” refer to in a wireless architecture?</text:p>
      <text:p text:style-name="P731">A. divides data link layer functions between the AP and WLC<text:line-break/>B. combines the management and control functions from the data-forwarding functions<text:line-break/><text:soft-page-break/>C. uses different MAC addresses for 2.4 GHz and 5 GHz bands on the same AP<text:line-break/>D. leverages two APs to handle control and data traffic</text:p>
      <text:p text:style-name="P732"> </text:p>
      <text:p text:style-name="Normal"><text:span text:style-name="T733">Answer:</text:span><text:span text:style-name="T734"> A</text:span></text:p>
      <text:p text:style-name="Normal"><text:span text:style-name="T735">Explanation</text:span></text:p>
      <text:p text:style-name="P736">With Split MAC , the 802.11 protocol functionality is divided between AP &amp; WLC. General rule is all real-time tasks are handled by AP (such as Probe Response, Packet buffering, Fragmentation, Queuing) &amp; non real-time tasks handled by WLC (Such as Association / Di-association, Classifying, 802.1x/EAP authentication, etc)</text:p>
      <text:p text:style-name="Normal"><text:span text:style-name="T737">Question 15.</text:span><text:span text:style-name="T738">55</text:span></text:p>
      <text:p text:style-name="P739">Which plane is centralized in software-defined networking?</text:p>
      <text:p text:style-name="P740">A. application<text:line-break/>B. services<text:line-break/>C. control<text:line-break/>D. data</text:p>
      <text:p text:style-name="P741"> </text:p>
      <text:p text:style-name="Normal"><text:span text:style-name="T742">Answer:</text:span><text:span text:style-name="T743"> C</text:span></text:p>
      <text:p text:style-name="Normal"><text:span text:style-name="T744">Explanation</text:span></text:p>
      <text:p text:style-name="P745">Software-Defined Networking (SDN) is an approach to networking that centralizes the control plane into an application called a controller. Therefore a big advantage of SDN is we do not have to manually configure each device or each interface. We just plan a policy framework, and the SDN controller configures all related underlying devices. This approach is faster, more reliable and reduces errors.</text:p>
      <text:soft-page-break/>
      <text:p text:style-name="Normal"><text:span text:style-name="T746"><draw:frame draw:style-name="a26" draw:name="Picture 96" text:anchor-type="as-char" svg:x="0in" svg:y="0in" svg:width="6.0625in" svg:height="4.27083in" style:rel-width="scale" style:rel-height="scale"><draw:image xlink:href="media/image16.jpeg" xlink:type="simple" xlink:show="embed" xlink:actuate="onLoad"/><svg:title/><svg:desc/></draw:frame></text:span></text:p>
      <text:p text:style-name="Normal"><text:span text:style-name="T747">Question 15.</text:span><text:span text:style-name="T748">56</text:span></text:p>
      <text:p text:style-name="P749">How does machine learning improve the detection of unauthorized network access?</text:p>
      <text:p text:style-name="P750">A. It monitors for outdated software.<text:line-break/>B. It dictates security policy updates.<text:line-break/>C. It identifies patterns indicating intrusions.<text:line-break/>D. It assigns security clearance levels.</text:p>
      <text:p text:style-name="P751"> </text:p>
      <text:p text:style-name="Normal"><text:span text:style-name="T752">Answer:</text:span><text:span text:style-name="T753"> C</text:span></text:p>
      <text:p text:style-name="Normal"><text:span text:style-name="T754">Explanation</text:span></text:p>
      <text:p text:style-name="P755">In security, machine learning continuously learns by analyzing data to find patterns so we can better detect malware in encrypted traffic, find insider threats, predict where “bad neighborhoods” are online to keep people safe when browsing, or protect data in the cloud by uncovering suspicious user behavior.</text:p>
      <text:soft-page-break/>
      <text:p text:style-name="Normal"><text:span text:style-name="T756">Reference: </text:span><text:a xlink:href="https://www.cisco.com/c/en/us/products/security/machine-learning-security.html" office:target-frame-name="_blank" xlink:show="new"><text:span text:style-name="T757">https://www.cisco.com/c/en/us/products/security/machine-learning-security.html</text:span></text:a></text:p>
      <text:p text:style-name="Normal"><text:span text:style-name="T758">Question 15.</text:span><text:span text:style-name="T759">57</text:span></text:p>
      <text:p text:style-name="P760">Refer to the exhibit.</text:p>
      <text:p text:style-name="Normal"><text:span text:style-name="T761"><draw:frame draw:style-name="a27" draw:name="Picture 95" text:anchor-type="as-char" svg:x="0in" svg:y="0in" svg:width="6.5in" svg:height="4.69722in" style:rel-width="scale" style:rel-height="scale"><draw:image xlink:href="media/image26.jpeg" xlink:type="simple" xlink:show="embed" xlink:actuate="onLoad"/><svg:title/><svg:desc/></draw:frame></text:span></text:p>
      <text:p text:style-name="P762">The My_WLAN wireless LAN was configured with WPA2 Layer 2 PSK security. Which additional configuration must the administrator perform to allow users to connect to this WLAN on a different subnet called Data?</text:p>
      <text:p text:style-name="Normal"><text:span text:style-name="T763">A. Enable </text:span><text:span text:style-name="T764">Broadcast SSID</text:span><text:span text:style-name="T765"> and select </text:span><text:span text:style-name="T766">data</text:span><text:span text:style-name="T767"> from the </text:span><text:span text:style-name="T768">Interface/Interface Group</text:span><text:span text:style-name="T769"> drop-down list.</text:span><text:span text:style-name="T770"><text:line-break/>B. Enable </text:span><text:span text:style-name="T771">Status</text:span><text:span text:style-name="T772"> and select </text:span><text:span text:style-name="T773">data</text:span><text:span text:style-name="T774"> from the </text:span><text:span text:style-name="T775">Interface/Interface Group</text:span><text:span text:style-name="T776"> drop-down list.</text:span><text:span text:style-name="T777"><text:line-break/>C. Enable </text:span><text:span text:style-name="T778">Status</text:span><text:span text:style-name="T779"> and set the </text:span><text:span text:style-name="T780">NAS-ID</text:span><text:span text:style-name="T781"> to </text:span><text:span text:style-name="T782">data</text:span><text:span text:style-name="T783">.</text:span><text:span text:style-name="T784"><text:line-break/>D. Enable </text:span><text:span text:style-name="T785">Status</text:span><text:span text:style-name="T786"> and enable </text:span><text:span text:style-name="T787">Broadcast SSID</text:span><text:span text:style-name="T788">.</text:span></text:p>
      <text:p text:style-name="P789"> </text:p>
      <text:soft-page-break/>
      <text:p text:style-name="Normal"><text:span text:style-name="T790">Answer:</text:span><text:span text:style-name="T791"> B</text:span></text:p>
      <text:p text:style-name="Normal"><text:span text:style-name="T792">Explanation</text:span></text:p>
      <text:p text:style-name="P793">Answer A and answer D are not correct as “Enable Broadcast SSID” just makes the SSID visible to clients scanning for networks, but doesn’t place clients into a specific subnet.</text:p>
      <text:p text:style-name="P794">Answer C is not correct as NAS-ID is used for RADIUS identification in AAA, not for assigning subnets.</text:p>
      <text:p text:style-name="Normal"><text:span text:style-name="T795">The </text:span><text:span text:style-name="T796">Interface</text:span><text:span text:style-name="T797"> or </text:span><text:span text:style-name="T798">Interface Group</text:span><text:span text:style-name="T799"> assigned to the WLAN determines the subnet or VLAN that the clients will be placed into upon connecting.</text:span></text:p>
      <text:p text:style-name="P800">In this case, the subnet is called “Data”, so the administrator must assign the “Data” interface (or interface group) to the WLAN.</text:p>
      <text:p text:style-name="Normal"><text:span text:style-name="T801">Question 15.</text:span><text:span text:style-name="T802">58</text:span></text:p>
      <text:p text:style-name="P803">Refer to the exhibit.</text:p>
      <text:p text:style-name="Normal"><text:span text:style-name="T804"><draw:frame draw:style-name="a28" draw:name="Picture 94" text:anchor-type="as-char" svg:x="0in" svg:y="0in" svg:width="6.5in" svg:height="4.67153in" style:rel-width="scale" style:rel-height="scale"><draw:image xlink:href="media/image27.jpeg" xlink:type="simple" xlink:show="embed" xlink:actuate="onLoad"/><svg:title/><svg:desc/></draw:frame></text:span></text:p>
      <text:soft-page-break/>
      <text:p text:style-name="P805">Company A wants to use a RADIUS server to service all user and device authentication attempts with a more secure and granular authentication approach. Not all client devices support dot1x authentication. Which two configuration changes must be made to accomplish the task? (Choose two)</text:p>
      <text:p text:style-name="P806">A. Enable AutoConfig iPSK under the Layer 2 tab.<text:line-break/>B. Select Authentication server under the AAA servers tab.<text:line-break/>C. Configure Enterprise Security type under the Layer 2 tab.<text:line-break/>D. Set Authentication under the Layer 3 tab.<text:line-break/>E. Enable WPA2 Policy under the Layer 2 tab.</text:p>
      <text:p text:style-name="P807"> </text:p>
      <text:p text:style-name="Normal"><text:span text:style-name="T808">Answer:</text:span><text:span text:style-name="T809"> A B</text:span></text:p>
      <text:p text:style-name="Normal"><text:span text:style-name="T810">Explanation</text:span></text:p>
      <text:p text:style-name="P811">Answer A is correct as it enables Identity PSK (iPSK), allowing the WLC to assign different pre-shared keys to different users or devices based on RADIUS responses. iPSK also supports devices that do not support 802.1X</text:p>
      <text:p text:style-name="P812">Answer B is correct as it is required to specify the RADIUS server that will handle the authentication process for both 802.1X and iPSK clients.</text:p>
      <text:p text:style-name="Normal"><text:span text:style-name="T813">Question 15.</text:span><text:span text:style-name="T814">59</text:span></text:p>
      <text:p text:style-name="P815">A network architect planning a new Wi-Fi network must decide between autonomous, cloud-based, and split MAC architectures. Which two facts should the architect consider? (Choose two)</text:p>
      <text:p text:style-name="P816">A. Lightweight access points are solely used by split MAC architectures.<text:line-break/>B. Cloud-based architectures uniquely use the CAPWAP protocol to communicate between access points and clients.<text:line-break/>C. Each of the three architectures must use WLCs to manage their access points.<text:line-break/>D. All three architectures use access points to manage the wireless devices connected to the wired infrastructure.<text:line-break/>E. Autonomous architectures exclusively use tunneling protocols to manage access points remotely.</text:p>
      <text:p text:style-name="P817"> </text:p>
      <text:soft-page-break/>
      <text:p text:style-name="Normal"><text:span text:style-name="T818">Answer:</text:span><text:span text:style-name="T819"> A D</text:span></text:p>
      <text:p text:style-name="Normal"><text:span text:style-name="T820">Explanation</text:span></text:p>
      <text:p text:style-name="P821">The three architectures are summarized as follows:</text:p>
      <text:p text:style-name="Normal"><text:span text:style-name="T822">+ </text:span><text:span text:style-name="T823">Autonomous</text:span><text:span text:style-name="T824"> – Access points are standalone and make their own decisions.</text:span></text:p>
      <text:p text:style-name="Normal"><text:span text:style-name="T825">+ </text:span><text:span text:style-name="T826">Cloud-based</text:span><text:span text:style-name="T827"> – Management and control are handled in the cloud; APs are usually lightweight and cloud-managed.</text:span></text:p>
      <text:p text:style-name="Normal"><text:span text:style-name="T828">+ </text:span><text:span text:style-name="T829">Split MAC</text:span><text:span text:style-name="T830"> – APs split the MAC-layer processing: some tasks are done on the AP, others on a WLC (used in centralized deployments with lightweight APs and WLCs).</text:span></text:p>
      <text:p text:style-name="P831">Answer A is correct as Split MAC architecture specifically uses lightweight APs which rely on a WLC to perform control functions like authentication, roaming…</text:p>
      <text:p text:style-name="P832">Answer D is correct as regardless of architecture, all APs provide wireless access to client devices and bridge them to the wired network.</text:p>
      <text:p text:style-name="P833">Answer B is not correct as CAPWAP is used in split MAC architectures (between AP and WLC), not uniquely in cloud-based ones.</text:p>
      <text:p text:style-name="P834">Answer C is not correct as Autonomous APs and cloud-based APs don’t require traditional WLCs.</text:p>
      <text:p text:style-name="P835">Answer E is not correct as Autonomous APs are managed individually and do not require tunneling protocols for remote management. They use standard management protocols like SSH or HTTPS.</text:p>
      <text:p text:style-name="Normal"><text:span text:style-name="T836">Question 15.</text:span><text:span text:style-name="T837">60</text:span></text:p>
      <text:p text:style-name="P838">Which AP mode serves as the primary hub in a point-to-multipoint network topology?</text:p>
      <text:p text:style-name="P839">A. bridge<text:line-break/>B. SE-Connect<text:line-break/>C. FlexConnect<text:line-break/>D. local</text:p>
      <text:p text:style-name="P840"> </text:p>
      <text:soft-page-break/>
      <text:p text:style-name="Normal"><text:span text:style-name="T841">Answer:</text:span><text:span text:style-name="T842"> A</text:span></text:p>
      <text:p text:style-name="Normal"><text:span text:style-name="T843">Explanation</text:span></text:p>
      <text:p text:style-name="P844">An AP in bridge mode becomes a dedicated point-to-point or point-to-multipoint bridge between networks. Two bridge mode wireless access points can be used to link two remote locations.</text:p>
      <text:p text:style-name="Normal"><text:span text:style-name="T845">Reference: </text:span><text:a xlink:href="https://study-ccnp.com/cisco-wireless-access-point-ap-modes-explained/" office:target-frame-name="_blank" xlink:show="new"><text:span text:style-name="T846">https://study-ccnp.com/cisco-wireless-access-point-ap-modes-explained/</text:span></text:a></text:p>
      <text:p text:style-name="Normal"><text:span text:style-name="T847">Question 15.</text:span><text:span text:style-name="T848">61</text:span></text:p>
      <text:p text:style-name="P849">How does network automation help reduce network downtime?</text:p>
      <text:p text:style-name="P850">A. Emails can be generated based on when a network admin performs a network change, which increases visibility.<text:line-break/>B. Configuration templates and testing can be built into implementation, which increases the success rate of a network change.<text:line-break/>C. Changes can be implemented in parallel across multiple devices at once, which increases the speed of the change rate.<text:line-break/>D. By using automation platforms with intent-based configuration, all changes are checked for possible outages before being implemented.</text:p>
      <text:p text:style-name="P851"> </text:p>
      <text:p text:style-name="Normal"><text:span text:style-name="T852">Answer:</text:span><text:span text:style-name="T853"> B</text:span></text:p>
      <text:p text:style-name="Normal"><text:span text:style-name="T854">Explanation</text:span></text:p>
      <text:p text:style-name="P855">Using standardized templates reduces human error in configuration, and incorporating testing into the implementation process allows for identifying and fixing potential issues before they impact the live network. This directly contributes to reducing downtime by preventing failed or faulty changes.</text:p>
      <text:p text:style-name="P856">An example of using templates in DNA Center:</text:p>
      <text:soft-page-break/>
      <text:p text:style-name="Normal"><text:span text:style-name="T857"><draw:frame draw:style-name="a29" draw:name="Picture 93" text:anchor-type="as-char" svg:x="0in" svg:y="0in" svg:width="6.5in" svg:height="4.575in" style:rel-width="scale" style:rel-height="scale"><draw:image xlink:href="media/image28.jpeg" xlink:type="simple" xlink:show="embed" xlink:actuate="onLoad"/><svg:title/><svg:desc/></draw:frame></text:span></text:p>
      <text:p text:style-name="P858">Note: Although answer D is also correct but we believe answer B is clearer and better.</text:p>
      <text:p text:style-name="Normal"><text:span text:style-name="T859">Question 15.</text:span><text:span text:style-name="T860">62</text:span></text:p>
      <text:p text:style-name="P861">Drag and drop the network topology architecture types from the left onto the corresponding function on the right. Not all architecture types are used.</text:p>
      <text:p text:style-name="Normal"><text:span text:style-name="T862"><draw:frame draw:style-name="a30" draw:name="Picture 92" text:anchor-type="as-char" svg:x="0in" svg:y="0in" svg:width="5.53472in" svg:height="2.29167in" style:rel-width="scale" style:rel-height="scale"><draw:image xlink:href="media/image29.jpeg" xlink:type="simple" xlink:show="embed" xlink:actuate="onLoad"/><svg:title/><svg:desc/></draw:frame></text:span></text:p>
      <text:soft-page-break/>
      <text:p text:style-name="P863"> </text:p>
      <text:p text:style-name="Normal"><text:span text:style-name="T864">Answer:</text:span></text:p>
      <text:p text:style-name="P865">+ end user connectivity: access<text:line-break/>+ top-of-rack: spine-leaf<text:line-break/>+ provide routing, filtering, and WAN access: distribution<text:line-break/>+ switch packets as fast as possible: core</text:p>
      <text:p text:style-name="Normal"><text:span text:style-name="T866">Explanation</text:span></text:p>
      <text:p text:style-name="P867">In today’s leaf-spine topology, the Top-of-Rack (ToR) switches are the leaf switches and they are attached to the spine switches.</text:p>
      <text:p text:style-name="Normal"><text:span text:style-name="T868">Question 15.</text:span><text:span text:style-name="T869">63</text:span></text:p>
      <text:p text:style-name="P870">What is the difference between SNMP traps and SNMP polling?</text:p>
      <text:p text:style-name="P871">A. SNMP traps are initiated using a push model at the network device, and SNMP polling is initiated at the server.<text:line-break/>B. SNMP traps are used for proactive monitoring, and SNMP polling is used for reactive monitoring.<text:line-break/>C. SNMP traps are initiated by the network management system, and network devices initiate SNMP polling.<text:line-break/>D. SNMP traps send periodic updates via the MIB, and SNMP polling sends data on demand.</text:p>
      <text:p text:style-name="P872"> </text:p>
      <text:p text:style-name="Normal"><text:span text:style-name="T873">Answer:</text:span><text:span text:style-name="T874"> A</text:span></text:p>
      <text:p text:style-name="Normal"><text:span text:style-name="T875">Explanation</text:span></text:p>
      <text:p text:style-name="P876">In SNMP Polling, the SNMP manager initiates the conversation asking the network devices for information:</text:p>
      <text:soft-page-break/>
      <text:p text:style-name="Normal"><text:span text:style-name="T877"><draw:frame draw:style-name="a31" draw:name="Picture 91" text:anchor-type="as-char" svg:x="0in" svg:y="0in" svg:width="4.5625in" svg:height="2.49306in" style:rel-width="scale" style:rel-height="scale"><draw:image xlink:href="media/image30.jpeg" xlink:type="simple" xlink:show="embed" xlink:actuate="onLoad"/><svg:title/><svg:desc/></draw:frame></text:span></text:p>
      <text:p text:style-name="P878">SNMP traps are the opposite where the network devices are sending information to the SNMP Manager right away when something happens:</text:p>
      <text:p text:style-name="Normal"><text:span text:style-name="T879"><draw:frame draw:style-name="a32" draw:name="Picture 90" text:anchor-type="as-char" svg:x="0in" svg:y="0in" svg:width="4.5625in" svg:height="2.49306in" style:rel-width="scale" style:rel-height="scale"><draw:image xlink:href="media/image31.jpeg" xlink:type="simple" xlink:show="embed" xlink:actuate="onLoad"/><svg:title/><svg:desc/></draw:frame></text:span></text:p>
      <text:p text:style-name="Normal"><text:span text:style-name="T880">Question 15.</text:span><text:span text:style-name="T881">64</text:span></text:p>
      <text:p text:style-name="P882">Refer to the exhibit.</text:p>
      <text:soft-page-break/>
      <text:p text:style-name="Normal"><text:span text:style-name="T883"><draw:frame draw:style-name="a33" draw:name="Picture 89" text:anchor-type="as-char" svg:x="0in" svg:y="0in" svg:width="6.5in" svg:height="5.08333in" style:rel-width="scale" style:rel-height="scale"><draw:image xlink:href="media/image32.jpeg" xlink:type="simple" xlink:show="embed" xlink:actuate="onLoad"/><svg:title/><svg:desc/></draw:frame></text:span></text:p>
      <text:p text:style-name="P884">Which functionalities will this SSID have while being used by wireless clients?</text:p>
      <text:p text:style-name="P885">A. decreases network security against air sniffing attacks and discourages the use of complex passwords<text:line-break/>B. increases network security against offline dictionary attacks and discourages time-consuming brute force attacks<text:line-break/>C. increases network security against man in the middle attacks and discourages denial of service attacks<text:line-break/>D. decreases network security against offline dictionary attacks and encourages easy access to the network</text:p>
      <text:p text:style-name="P886"> </text:p>
      <text:p text:style-name="Normal"><text:span text:style-name="T887">Answer:</text:span><text:span text:style-name="T888"> B</text:span></text:p>
      <text:p text:style-name="Normal"><text:span text:style-name="T889">Explanation</text:span></text:p>
      <text:soft-page-break/>
      <text:p text:style-name="P890">In the exhibit, we see that the option “FT + SAE” in “Auth key Mgmt” tab was chosen.</text:p>
      <text:p text:style-name="Normal"><text:span text:style-name="T891">WPA3 provides improvements to the general Wi-Fi encryption, thanks to Simultaneous Authentication of Equals (</text:span><text:span text:style-name="T892">SAE</text:span><text:span text:style-name="T893">) replacing the Pre-Shared Key (PSK) authentication method used in prior WPA versions. With SAE, the user experience is the same (choose a passphrase to connect), but SAE automatically adds a step to the handshake, </text:span><text:span text:style-name="T894">which makes brute force attacks ineffective</text:span><text:span text:style-name="T895">. SAE enables individuals or home users to set Wi-Fi passwords that are easier to remember and provide the same security protection even if the passwords are not complex enough.</text:span></text:p>
      <text:p text:style-name="Normal"><text:span text:style-name="T896">Question 15.</text:span><text:span text:style-name="T897">65</text:span></text:p>
      <text:p text:style-name="P898">What is the role of syslog level 7 in network device health monitoring?</text:p>
      <text:p text:style-name="P899">A. It provides information about error conditions visible on the network device.<text:line-break/>B. It shares normal operational messages from the network equipment.<text:line-break/>C. It sends outputs from various debug commands on the device.<text:line-break/>D. It warns about emergency conditions on the network appliance.</text:p>
      <text:p text:style-name="P900"> </text:p>
      <text:p text:style-name="Normal"><text:span text:style-name="T901">Answer:</text:span><text:span text:style-name="T902"> C</text:span></text:p>
      <text:p text:style-name="Normal"><text:span text:style-name="T903">Explanation</text:span></text:p>
      <text:p text:style-name="P904">Syslog level 7 corresponds to the “Debugging” severity level. If you specify a level, that level and all the higher levels will be displayed. Therefore in this case, all levels (from 0 to 7) will be displayed.</text:p>
      <text:p text:style-name="Normal"><text:span text:style-name="T905">Question 15.</text:span><text:span text:style-name="T906">66</text:span></text:p>
      <text:p text:style-name="P907">Which architecture is best for small offices with minimal wireless needs and no central management?</text:p>
      <text:p text:style-name="P908">A. cloud-based AP<text:line-break/>B. split MAC<text:line-break/>C. autonomous AP<text:line-break/>D. mesh network</text:p>
      <text:soft-page-break/>
      <text:p text:style-name="P909"> </text:p>
      <text:p text:style-name="Normal"><text:span text:style-name="T910">Answer:</text:span><text:span text:style-name="T911"> C</text:span></text:p>
      <text:p text:style-name="Normal"><text:span text:style-name="T912">Explanation</text:span></text:p>
      <text:p text:style-name="Normal"><text:span text:style-name="T913">Autonomous AP</text:span><text:span text:style-name="T914">: self-sufficient and standalone. Used for small wireless networks. Each autonomous AP must be configured with a management IP address so that it can be remotely accessed using Telnet, SSH, or a web interface. Each AP must be individually managed and maintained unless you use a management platform such as Cisco DNA Center.</text:span></text:p>
      <text:p text:style-name="P915">Note: Split-MAC (architecture) refers to Lightweight AP, which requires a Wireless LAN Controller (WLC) to control.</text:p>
      <text:p text:style-name="Normal"><text:span text:style-name="T916">Question 15.</text:span><text:span text:style-name="T917">67</text:span></text:p>
      <text:p text:style-name="P918">Drag and drop the TCP and UDP characteristics from the lett onto the corresponding protocols on the right.</text:p>
      <text:p text:style-name="Normal"><text:span text:style-name="T919"><draw:frame draw:style-name="a34" draw:name="Picture 88" text:anchor-type="as-char" svg:x="0in" svg:y="0in" svg:width="5.54167in" svg:height="3.35417in" style:rel-width="scale" style:rel-height="scale"><draw:image xlink:href="media/image33.jpeg" xlink:type="simple" xlink:show="embed" xlink:actuate="onLoad"/><svg:title/><svg:desc/></draw:frame></text:span><text:span text:style-name="T920"><text:line-break/></text:span><text:span text:style-name="T921">Answer:</text:span></text:p>
      <text:p text:style-name="Normal"><text:span text:style-name="T922">TCP</text:span></text:p>
      <text:soft-page-break/>
      <text:p text:style-name="P923">+ Sends data in a specific order<text:line-break/>+ Requires an established connection<text:line-break/>+ Supports web browsing</text:p>
      <text:p text:style-name="Normal"><text:span text:style-name="T924">UDP</text:span></text:p>
      <text:p text:style-name="P925">+ Suited for live streaming<text:line-break/>+ Retransmission is unsupported<text:line-break/>+ Tolerates packet loss</text:p>
      <text:p text:style-name="Normal"><text:span text:style-name="T926">Question 15.</text:span><text:span text:style-name="T927">68</text:span></text:p>
      <text:p text:style-name="P928">What is a valid IPv6 address record in DNS?</text:p>
      <text:p text:style-name="P929">A. A<text:line-break/>B. MX<text:line-break/>C. AAAA<text:line-break/>D. CNAME</text:p>
      <text:p text:style-name="P930"> </text:p>
      <text:p text:style-name="Normal"><text:span text:style-name="T931">Answer:</text:span><text:span text:style-name="T932"> C</text:span></text:p>
      <text:p text:style-name="Normal"><text:span text:style-name="T933">Explanation</text:span></text:p>
      <text:p text:style-name="P934">An AAAA record type is a foundational DNS record when IPv6 addresses are used. AAAA records are assigned the IPv6 address for a destination which makes communication between the source and destination possible. The purpose of this record type is to map a hostname (e.g., www.example.com) to its corresponding IPv6 address (e.g., 2001:db8::1).</text:p>
      <text:p text:style-name="Normal"><text:span text:style-name="T935">Question 15.</text:span><text:span text:style-name="T936">69</text:span></text:p>
      <text:p text:style-name="P937">Refer to the exhibit.</text:p>
      <text:soft-page-break/>
      <text:p text:style-name="Normal"><text:span text:style-name="T938"><draw:frame draw:style-name="a35" draw:name="Picture 87" text:anchor-type="as-char" svg:x="0in" svg:y="0in" svg:width="4.29861in" svg:height="4.0625in" style:rel-width="scale" style:rel-height="scale"><draw:image xlink:href="media/image34.jpeg" xlink:type="simple" xlink:show="embed" xlink:actuate="onLoad"/><svg:title/><svg:desc/></draw:frame></text:span></text:p>
      <text:p text:style-name="P939">The routers R1-LAB and R2-LAB are configured with link-local addresses. What command must be applied to interface Gi0/0 on R1-LAB for an automated address self-assignment on the IPv6 network?</text:p>
      <text:p text:style-name="P940">A. ipv6 address 2001:db8:0:0FFA::/64 eui-64<text:line-break/>B. ipv6 address 2001:db8:0:0FFA::1/64<text:line-break/>C. ipv6 address 2001:db8:1:0FFA:0::/64<text:line-break/>D. ipv6 address 2001:db8:0:0FFA::/64 anycast</text:p>
      <text:p text:style-name="P941"> </text:p>
      <text:p text:style-name="Normal"><text:span text:style-name="T942">Answer:</text:span><text:span text:style-name="T943"> A</text:span></text:p>
      <text:p text:style-name="Normal"><text:span text:style-name="T944">Explanation</text:span></text:p>
      <text:p text:style-name="P945">Cisco devices use the EUI-64 (Extended Unique Identifier) process to automatically generate the interface identifier portion of an IPv6 address. This process takes the device’s 48-bit MAC address, inserts the hexadecimal value “FFFE” in the middle, and then flips the 7th bit (the universal/local bit) of the resulting 64-bit value to create the interface identifier. This identifier is then combined with a network prefix to form a complete IPv6 address.</text:p>
      <text:soft-page-break/>
      <text:p text:style-name="Normal"><text:span text:style-name="T946">Question 15.</text:span><text:span text:style-name="T947">70</text:span></text:p>
      <text:p text:style-name="P948">Which header must be included in a REST request from an application that requires JSON- formatted content?</text:p>
      <text:p text:style-name="P949">A. Content-Type: application/json<text:line-break/>B. Accept-Encoding: application/json<text:line-break/>C. Accept: application/json<text:line-break/>D. Accept-Language: application/json</text:p>
      <text:p text:style-name="P950"> </text:p>
      <text:p text:style-name="Normal"><text:span text:style-name="T951">Answer:</text:span><text:span text:style-name="T952"> A</text:span></text:p>
      <text:p text:style-name="Normal"><text:span text:style-name="T953">Explanation</text:span></text:p>
      <text:p text:style-name="Normal"><text:span text:style-name="T954">When making a REST request with JSON-formatted content in the request body, the </text:span><text:span text:style-name="T955">Content-Type</text:span><text:span text:style-name="T956"> HTTP header must be set to </text:span><text:span text:style-name="T957">application/json</text:span><text:span text:style-name="T958">. This header informs the server that the data being sent in the request body is in JSON format, allowing the server to correctly parse and process the payload.</text:span></text:p>
      <text:p text:style-name="Normal"><text:span text:style-name="T959">Question 15.</text:span><text:span text:style-name="T960">71</text:span></text:p>
      <text:p text:style-name="P961">Why would a network administrator choose to implement RFC 1918 address space?</text:p>
      <text:p text:style-name="P962">A. to route traffic on the internet<text:line-break/>B. to limit the number of hosts on the network<text:line-break/>C. to provide overlapping address space with another network<text:line-break/>D. to provide flexibility in the IP network design</text:p>
      <text:p text:style-name="P963"> </text:p>
      <text:p text:style-name="Normal"><text:span text:style-name="T964">Answer:</text:span><text:span text:style-name="T965"> D</text:span></text:p>
      <text:p text:style-name="Normal"><text:span text:style-name="T966">Explanation</text:span></text:p>
      <text:p text:style-name="P967">RFC 1918 defines private IP address ranges (e.g., 10.0.0.0/8, 172.16.0.0/16, 192.168.0.0/24) which are not routable on the public internet. These are used within private networks. There are several advantages to using the RFC 1918 addresses on your private network:</text:p>
      <text:soft-page-break/>
      <text:p text:style-name="P968">+ Administrators can assign IP addresses freely without coordinating with IANA or an ISP.<text:line-break/>+ It allows for efficient subnetting, reuse of addresses, and isolation of internal networks.</text:p>
      <text:p text:style-name="P969">-&gt; Answer D is correct.</text:p>
      <text:p text:style-name="Normal"><text:span text:style-name="T970">Question 15.</text:span><text:span text:style-name="T971">72</text:span></text:p>
      <text:p text:style-name="P972">What is the total number of users permitted to simultaneously browse the controller management pages when using the AireOS GUI?</text:p>
      <text:p text:style-name="P973">A. 2<text:line-break/>B. 5<text:line-break/>C. 8<text:line-break/>D. 9</text:p>
      <text:p text:style-name="P974"> </text:p>
      <text:p text:style-name="Normal"><text:span text:style-name="T975">Answer:</text:span><text:span text:style-name="T976"> B</text:span></text:p>
      <text:p text:style-name="Normal"><text:span text:style-name="T977">Explanation</text:span></text:p>
      <text:p text:style-name="Normal"><text:span text:style-name="T978">Using the Controller GUI</text:span><text:span text:style-name="T979"><text:line-break/>A browser-based GUI is built into each controller.</text:span><text:span text:style-name="T980"><text:line-break/></text:span><text:span text:style-name="T981">It allows up to five users</text:span><text:span text:style-name="T982"> to simultaneously browse into the controller HTTP or HTTPS (HTTP + SSL) management pages to configure parameters and monitor the operational status for the controller and its associated access points.</text:span></text:p>
      <text:p text:style-name="Normal"><text:span text:style-name="T983">Reference: </text:span><text:a xlink:href="https://www.cisco.com/c/en/us/td/docs/wireless/controller/8-5/config-guide/b_cg85/administration_of_cisco_wlc.html" office:target-frame-name="_blank" xlink:show="new"><text:span text:style-name="T984">https://www.cisco.com/c/en/us/td/docs/wireless/controller/8-5/config-guide/b_cg85/administration_of_cisco_wlc.html</text:span></text:a></text:p>
      <text:p text:style-name="P985">Note: The Cisco AireOS GUI refers to the web-based interface used to manage and configure Cisco Wireless LAN Controllers (WLCs) running the AireOS operating system.</text:p>
      <text:p text:style-name="Normal"><text:span text:style-name="T986">Question 15.</text:span><text:span text:style-name="T987">73</text:span></text:p>
      <text:p text:style-name="P988">What is the main purpose of SSH management access?</text:p>
      <text:p text:style-name="P989">A. To validate management access with username and domain name only<text:line-break/>B. To allow passwords protected with HTTPS encryption to be sent<text:line-break/><text:soft-page-break/>C. To support DES 56-bit and 3DES (168-bit) ciphers<text:line-break/>D. To enable secured access to the inbound management interface</text:p>
      <text:p text:style-name="P990"> </text:p>
      <text:p text:style-name="Normal"><text:span text:style-name="T991">Answer:</text:span><text:span text:style-name="T992"> D</text:span></text:p>
      <text:p text:style-name="Normal"><text:span text:style-name="T993">Explanation</text:span></text:p>
      <text:p text:style-name="P994">Answer A is not correct as SSH (Secure Shell) authentication using a domain name, username, and password involves connecting to a remote server using its domain name instead of its IP address, and then authenticating with a username and password.</text:p>
      <text:p text:style-name="P995">Answer B is not correct as SSH is different from HTTPS. HTTPS secures web traffic, while SSH secures terminal/CLI access.</text:p>
      <text:p text:style-name="P996">Answer C is not correct as this is not the main purpose of SSH.</text:p>
      <text:p text:style-name="P997">Answer D is correct as the main purpose of SSH is secure management.</text:p>
      <text:p text:style-name="Normal"><text:span text:style-name="T998">Question 15.</text:span><text:span text:style-name="T999">74</text:span></text:p>
      <text:p text:style-name="P1000">How does automation leverage data models to reduce the operational complexity of a managed network?</text:p>
      <text:p text:style-name="P1001">A. Reduces the response time for specific requests to devices with many interfaces<text:line-break/>B. Allows the controller to be vendor-agnostic<text:line-break/>C. Categorizes traffic and provides insights<text:line-break/>D. Streamlines monitoring using SNMP and other polling tools</text:p>
      <text:p text:style-name="P1002"> </text:p>
      <text:p text:style-name="Normal"><text:span text:style-name="T1003">Answer:</text:span><text:span text:style-name="T1004"> B</text:span></text:p>
      <text:p text:style-name="Normal"><text:span text:style-name="T1005">Explanation</text:span></text:p>
      <text:p text:style-name="Normal"><text:span text:style-name="T1006">Network automation uses the logical network model to define network policies, configurations and topologies </text:span><text:span text:style-name="T1007">in a vendor-agnostic manner</text:span><text:span text:style-name="T1008">. Network engineers can use automation libraries, such as NAPALM (Network Automation and Programmability Abstraction Layer with Multivendor support), to work in multivendor environments without worrying about proper command syntax for<text:s/></text:span><text:soft-page-break/><text:span text:style-name="T1009">each vendor. Python scripts and orchestration workflows can use this logical model to deploy consistent network configurations, manage virtualized network functions, and ensure network scalability and agility.</text:span></text:p>
      <text:p text:style-name="Normal"><text:span text:style-name="T1010">Reference: </text:span><text:a xlink:href="https://www.techtarget.com/searchnetworking/tip/How-network-data-models-work-with-automation" office:target-frame-name="_blank" xlink:show="new"><text:span text:style-name="T1011">https://www.techtarget.com/searchnetworking/tip/How-network-data-models-work-with-automation</text:span></text:a></text:p>
      <text:p text:style-name="Normal"><text:span text:style-name="T1012">Question 15.</text:span><text:span text:style-name="T1013">75</text:span></text:p>
      <text:p text:style-name="P1014">What is the function of generative AI in network operations?</text:p>
      <text:p text:style-name="P1015">A. It creates synthetic network configurations.<text:line-break/>B. It deploys network firmware updates.<text:line-break/>C. It disables unused services.<text:line-break/>D. It computes optimal data storage solutions.</text:p>
      <text:p text:style-name="P1016"> </text:p>
      <text:p text:style-name="Normal"><text:span text:style-name="T1017">Answer:</text:span><text:span text:style-name="T1018"> A</text:span></text:p>
      <text:p text:style-name="Normal"><text:span text:style-name="T1019">Explanation</text:span></text:p>
      <text:p text:style-name="Normal"><text:span text:style-name="T1020">Generative AI refers to algorithms capable of generating new content or solutions by learning patterns from existing data. Unlike traditional AI that focuses on classification or prediction, </text:span><text:span text:style-name="T1021">generative AI can create new configurations</text:span><text:span text:style-name="T1022">, automate processes, and simulate various scenarios in network environments.</text:span></text:p>
      <text:p text:style-name="Normal"><text:span text:style-name="T1023">Reference: </text:span><text:a xlink:href="https://www.netbraintech.com/blog/ai-in-network-operations/" office:target-frame-name="_blank" xlink:show="new"><text:span text:style-name="T1024">https://www.netbraintech.com/blog/ai-in-network-operations/</text:span></text:a></text:p>
      <text:p text:style-name="Normal"><text:span text:style-name="T1025">Question 15.</text:span><text:span text:style-name="T1026">76</text:span></text:p>
      <text:p text:style-name="P1027">An organization developed new security policies and decided to print the policies and distribute them to all personnel so that employees review and apply the policies. Which element of a security program is the organization implementing?</text:p>
      <text:p text:style-name="P1028">A. Asset identification<text:line-break/>B. User training<text:line-break/>C. Physical access control<text:line-break/>D. Vulnerability control</text:p>
      <text:p text:style-name="P1029"> </text:p>
      <text:soft-page-break/>
      <text:p text:style-name="Normal"><text:span text:style-name="T1030">Answer:</text:span><text:span text:style-name="T1031"> B</text:span></text:p>
      <text:p text:style-name="Normal"><text:span text:style-name="T1032">Explanation</text:span></text:p>
      <text:p text:style-name="P1033">User training: All users should be required to participate in periodic formal training so that they become familiar with all corporate security policies -&gt; Answer B is the best choice for this question.</text:p>
      <text:p text:style-name="P1034">Note:</text:p>
      <text:p text:style-name="P1035">In CCNA, security program only includes user awareness, user training and physical access control.</text:p>
      <text:p text:style-name="P1036">Physical access control: Infrastructure locations, such as network closets and data centers, should remain securely locked.</text:p>
      <text:p text:style-name="P1037">Asset identification is the systematic process of discovering, mapping, and documenting every single IT asset within an organization’s ecosystem.</text:p>
      <text:p text:style-name="Normal"><text:span text:style-name="T1038">Question 15.</text:span><text:span text:style-name="T1039">77</text:span></text:p>
      <text:p text:style-name="P1040">Which feature, when used on a WLC, allows it to bundle its distribution system ports into one 802.3ad group?</text:p>
      <text:p text:style-name="P1041">A. QinQ<text:line-break/>B. ISL<text:line-break/>C. PAgP<text:line-break/>D. LAG</text:p>
      <text:p text:style-name="P1042"> </text:p>
      <text:p text:style-name="Normal"><text:span text:style-name="T1043">Answer:</text:span><text:span text:style-name="T1044"> D</text:span></text:p>
      <text:p text:style-name="Normal"><text:span text:style-name="T1045">Explanation</text:span></text:p>
      <text:p text:style-name="P1046">Link aggregation (LAG) is a partial implementation of the 802.3ad port aggregation standard. It bundles all of the controller’s distribution system ports into a single 802.3ad port channel.</text:p>
      <text:p text:style-name="Normal"><text:span text:style-name="T1047">Question 15.</text:span><text:span text:style-name="T1048">78</text:span></text:p>
      <text:p text:style-name="P1049">What is represented by the word “switch” within this JSON schema?</text:p>
      <text:p text:style-name="consolas">1 <text:s text:c="2"/>[</text:p>
      <text:soft-page-break/>
      <text:p text:style-name="consolas">2 <text:s text:c="2"/>{"IDS": "IPS22", "port":"te3/46"},</text:p>
      <text:p text:style-name="consolas">3 <text:s text:c="2"/>{"load balancer": "LB12", "port":"te6/38"},</text:p>
      <text:p text:style-name="consolas">4 <text:s text:c="2"/>{"switch": "SW18", "port":"ge2/41"},</text:p>
      <text:p text:style-name="consolas">5 <text:s text:c="2"/>]</text:p>
      <text:p text:style-name="P1050">A. array<text:line-break/>B. value<text:line-break/>C. key<text:line-break/>D. object</text:p>
      <text:p text:style-name="P1051"> </text:p>
      <text:p text:style-name="Normal"><text:span text:style-name="T1052">Answer:</text:span><text:span text:style-name="T1053"> C</text:span></text:p>
      <text:p text:style-name="Normal"><text:span text:style-name="T1054">Explanation</text:span></text:p>
      <text:p text:style-name="Normal"><text:span text:style-name="T1055">JSON syntax structure:</text:span></text:p>
      <text:p text:style-name="P1056">+ A key/value pair consists of a key (must be a string in double quotation marks ""), followed by a colon :, followed by a value. For example: “name”:”John”</text:p>
      <text:p text:style-name="P1057">Therefore in this question, “switch” is the key while “SW18” is the value.</text:p>
      <text:p text:style-name="Normal"><text:span text:style-name="T1058">Question 15.</text:span><text:span text:style-name="T1059">79</text:span></text:p>
      <text:p text:style-name="P1060">What is the maximum length of characters used in an SSID?</text:p>
      <text:p text:style-name="P1061">A. 16<text:line-break/>B. 32<text:line-break/>C. 48<text:line-break/>D. 64</text:p>
      <text:p text:style-name="P1062"> </text:p>
      <text:p text:style-name="Normal"><text:span text:style-name="T1063">Answer:</text:span><text:span text:style-name="T1064"> B</text:span></text:p>
      <text:p text:style-name="Normal"><text:span text:style-name="T1065">Explanation</text:span></text:p>
      <text:p text:style-name="P1066">The WLAN name and SSID can have up to 32 characters.</text:p>
      <text:p text:style-name="Normal"><text:span text:style-name="T1067">Reference: </text:span><text:a xlink:href="https://www.cisco.com/c/en/us/td/docs/wireless/controller/8-5/config-guide/b_cg85/wlans.html" office:target-frame-name="_blank" xlink:show="new"><text:span text:style-name="T1068">https://www.cisco.com/c/en/us/td/docs/wireless/controller/8-5/config-guide/b_cg85/wlans.html</text:span></text:a></text:p>
      <text:soft-page-break/>
      <text:p text:style-name="Normal"><text:span text:style-name="T1069">Question 15.</text:span><text:span text:style-name="T1070">80</text:span></text:p>
      <text:p text:style-name="P1071">Which statement describes virtualization on containers?</text:p>
      <text:p text:style-name="P1072">A. It is a type of operating system virtualization that allows the host operating system to control the different CPU memory processes.<text:line-break/>B. It emulates a physical computer and enables multiple machines to run with many operating systems on a physical machine.<text:line-break/>C. It separates virtual machines from each other and allocates memory, processors, and storage to compute.<text:line-break/>D. It contains a guest operating system and virtual partition of hardware for OS and requires application libraries.</text:p>
      <text:p text:style-name="P1073"> </text:p>
      <text:p text:style-name="Normal"><text:span text:style-name="T1074">Answer:</text:span><text:span text:style-name="T1075"> A</text:span></text:p>
      <text:p text:style-name="Normal"><text:span text:style-name="T1076">Explanation</text:span></text:p>
      <text:p text:style-name="P1077">Each VM requires different Operating Systems (OS) while containers share a single host OS:</text:p>
      <text:p text:style-name="Normal"><text:span text:style-name="T1078"><draw:frame draw:style-name="a36" draw:name="Picture 86" text:anchor-type="as-char" svg:x="0in" svg:y="0in" svg:width="5.24306in" svg:height="3.11111in" style:rel-width="scale" style:rel-height="scale"><draw:image xlink:href="media/image35.jpeg" xlink:type="simple" xlink:show="embed" xlink:actuate="onLoad"/><svg:title/><svg:desc/></draw:frame></text:span></text:p>
      <text:p text:style-name="P1079">In a container, the host OS manages CPU, memory, and process isolation using container engines like Docker or container runtimes like containerd -&gt; Answer A is correct.</text:p>
      <text:soft-page-break/>
      <text:p text:style-name="Normal"><text:span text:style-name="T1080">Question 15.</text:span><text:span text:style-name="T1081">81</text:span></text:p>
      <text:p text:style-name="P1082">Why would a network administrator implement the HSRP protocol?</text:p>
      <text:p text:style-name="P1083">A. To provide network redundancy in the case of a router failure<text:line-break/>B. To use an open standard protocol that is configured on Cisco and third-party routers<text:line-break/>C. To allow hosts in a network to use the same default gateway virtual IP when load-balancing traffic<text:line-break/>D. To allow clients to be configured with multiple default gateway IPs</text:p>
      <text:p text:style-name="P1084"> </text:p>
      <text:p text:style-name="Normal"><text:span text:style-name="T1085">Answer:</text:span><text:span text:style-name="T1086"> A</text:span></text:p>
      <text:p text:style-name="Normal"><text:span text:style-name="T1087">Question 15.</text:span><text:span text:style-name="T1088">82</text:span></text:p>
      <text:p text:style-name="P1089">Refer to the exhibit.</text:p>
      <text:p text:style-name="P1090">SW1#show etherchannel summary<text:s/></text:p>
      <text:p text:style-name="P1091">Flags: <text:s text:c="2"/>D - down <text:s text:c="8"/>P - in port-channel</text:p>
      <text:p text:style-name="P1092"><text:s text:c="9"/>I - stand-alone <text:s/>s - suspended</text:p>
      <text:p text:style-name="P1093"><text:s text:c="9"/>H - Hot-standby (LACP only)</text:p>
      <text:p text:style-name="P1094"><text:s text:c="9"/>R - Layer3 <text:s text:c="6"/>S - Layer2</text:p>
      <text:p text:style-name="P1095"><text:s text:c="9"/>U - in use <text:s text:c="6"/>f - failed to allocate aggregator</text:p>
      <text:p text:style-name="P1096"><text:s text:c="9"/>u - unsuitable for bundling</text:p>
      <text:p text:style-name="P1097"><text:s text:c="9"/>w - waiting to be aggregated</text:p>
      <text:p text:style-name="P1098"><text:s text:c="9"/>d - default port</text:p>
      <text:p text:style-name="P1099"><text:s text:c="9"/>A - formed by auto LAG</text:p>
      <text:p text:style-name="P1100">Number of channel-groups in use: 1</text:p>
      <text:p text:style-name="P1101">Number of aggregators: 2</text:p>
      <text:p text:style-name="P1102"/>
      <text:p text:style-name="P1103">Group <text:s/>Port-channel <text:s/>Protocol <text:s text:c="3"/>Ports</text:p>
      <text:p text:style-name="P1104">------+-------------+-----------+-----------------------------------------------</text:p>
      <text:p text:style-name="P1105">1 <text:s text:c="5"/>Po1 (RU) <text:s text:c="7"/>LACP <text:s text:c="6"/>Et0/0(P) <text:s text:c="3"/>Et0/1(P) <text:s/></text:p>
      <text:soft-page-break/>
      <text:p text:style-name="P1106">A network engineer is adding another physical interface as a new member to the existing Port-Channel1 bundle. Which command set must be configured on the new interface to complete the process?</text:p>
      <text:p text:style-name="P1107">A. switchport mode trunk<text:line-break/>channel-group 1 mode active</text:p>
      <text:p text:style-name="P1108">B. no switchport<text:line-break/>channel-group 1 mode active</text:p>
      <text:p text:style-name="P1109">C. no switchport<text:line-break/>channel-group 1 mode on</text:p>
      <text:p text:style-name="P1110">D. switchport<text:line-break/>switchport mode trunk</text:p>
      <text:p text:style-name="P1111"> </text:p>
      <text:p text:style-name="Normal"><text:span text:style-name="T1112">Answer:</text:span><text:span text:style-name="T1113"> B</text:span></text:p>
      <text:p text:style-name="Normal"><text:span text:style-name="T1114">Explanation</text:span></text:p>
      <text:p text:style-name="P1115">From the last line of the output “Po1 (RU)”, we learn that this is a Layer 3 port (with letter “R”) so we need the command “no switchport” to make the new interface a Layer 3 interface.</text:p>
      <text:p text:style-name="P1116">The protocol in used is LACP so we use mode “active” or “passive” -&gt; Only answer B is correct.</text:p>
      <text:p text:style-name="Normal"><text:span text:style-name="T1117">Question 15.</text:span><text:span text:style-name="T1118">83</text:span></text:p>
      <text:p text:style-name="P1119">Refer to the exhibit.</text:p>
      <text:soft-page-break/>
      <text:p text:style-name="Normal"><text:span text:style-name="T1120"><draw:frame draw:style-name="a37" draw:name="Picture 85" text:anchor-type="as-char" svg:x="0in" svg:y="0in" svg:width="4.40972in" svg:height="4.25694in" style:rel-width="scale" style:rel-height="scale"><draw:image xlink:href="media/image36.jpeg" xlink:type="simple" xlink:show="embed" xlink:actuate="onLoad"/><svg:title/><svg:desc/></draw:frame></text:span></text:p>
      <text:p text:style-name="P1121">Configurations for the switch and PCs are complete. Which configuration must be applied so that VLANs 2 and 3 communicate back and forth?</text:p>
      <text:p text:style-name="P1122">A. interface GigabitEthernet0/0<text:line-break/>ip address 10.10.2.10 255.255.252.0</text:p>
      <text:p text:style-name="P1123">B. interface GigabitEthernet0/0.3<text:line-break/>encapsulation dot1Q 10<text:line-break/>ip address 10.10.2.10 255.255.255.252</text:p>
      <text:p text:style-name="P1124">C. interface GigabitEthernet0/0.10<text:line-break/>encapsulation dot1Q 3<text:line-break/>ip address 10.10.2.10 255.255.254.0</text:p>
      <text:p text:style-name="P1125">D. interface GigabitEthernet0/0.3<text:line-break/>encapsulation dot1Q 3 native<text:line-break/>ip address 10.10.2.10 255.255.252.0</text:p>
      <text:p text:style-name="P1126"> </text:p>
      <text:p text:style-name="Normal"><text:span text:style-name="T1127">Answer:</text:span><text:span text:style-name="T1128"> C</text:span></text:p>
      <text:soft-page-break/>
      <text:p text:style-name="Normal"><text:span text:style-name="T1129">Explanation</text:span></text:p>
      <text:p text:style-name="Normal"><text:span text:style-name="T1130">We had a tutorial of how to configure interVLAN routing at </text:span><text:a xlink:href="https://www.9tut.com/intervlan-routing-tutorial" office:target-frame-name="_blank" xlink:show="new"><text:span text:style-name="T1131">https://www.9tut.com/intervlan-routing-tutorial</text:span></text:a><text:span text:style-name="T1132"> so please check it.</text:span></text:p>
      <text:p text:style-name="Normal"><text:span text:style-name="T1133">Question 15.</text:span><text:span text:style-name="T1134">84</text:span></text:p>
      <text:p text:style-name="P1135">Refer to the exhibit.</text:p>
      <text:p text:style-name="Normal"><text:span text:style-name="T1136"><draw:frame draw:style-name="a38" draw:name="Picture 84" text:anchor-type="as-char" svg:x="0in" svg:y="0in" svg:width="5.29861in" svg:height="3.09028in" style:rel-width="scale" style:rel-height="scale"><draw:image xlink:href="media/image37.jpeg" xlink:type="simple" xlink:show="embed" xlink:actuate="onLoad"/><svg:title/><svg:desc/></draw:frame></text:span></text:p>
      <text:p text:style-name="consolas">Wireless LAN adapter Wi-Fi:</text:p>
      <text:p text:style-name="consolas"/>
      <text:p text:style-name="consolas"><text:s/>Connection-specific DNS Suffix <text:s/>. :</text:p>
      <text:p text:style-name="consolas"><text:s/>Description . . . . . . . . . . . : Intel(R) Wi-Fi 6 AX201 160MHz</text:p>
      <text:p text:style-name="consolas"><text:s/>Physical Address. . . . . . . . . : AC-63-DA-AC-B4-AD</text:p>
      <text:p text:style-name="consolas"><text:s/>DHCP Enabled. . . . . . . . . . . : No</text:p>
      <text:p text:style-name="consolas"><text:s/>Autoconfiguration Enabled . . . . : Yes</text:p>
      <text:p text:style-name="consolas"><text:s/>IPv6 Address. . . . . . . . . . . : ::70D6:5432:6D8A:90B2(Preferred)</text:p>
      <text:p text:style-name="consolas"><text:s/>Temporary IPv6 Address. . . . . . : ::dc3f:a66c:f996:bdb9(Preferred)</text:p>
      <text:p text:style-name="consolas"><text:s/>Link-local IPv6 Address . . . . . : fe80::7096:5693:6d8a:90ba%8(Preferred)</text:p>
      <text:p text:style-name="consolas"><text:s/>IPv4 Address. . . . . . . . . . . : 172.16.1.8(Preferred)</text:p>
      <text:p text:style-name="consolas"><text:s/>Subnet Mask . . . . . . . . . . . : 255.255.255.240</text:p>
      <text:p text:style-name="consolas"><text:s/>Default Gateway . . . . . . . . . : 172.16.1.1</text:p>
      <text:soft-page-break/>
      <text:p text:style-name="consolas"><text:s/>DHCPv6 IAID . . . . . . . . . . . : 116155351</text:p>
      <text:p text:style-name="consolas"><text:s/>DHCPv6 Client DUID. . . . . . . . : 00-01-00-01-2B-BE-0A-47-3C-15-AB-80-12-F6</text:p>
      <text:p text:style-name="consolas"><text:s/>DNS Servers . . . . . . . . . . . : 172.16.1.3</text:p>
      <text:p text:style-name="consolas"><text:s text:c="37"/>172.16.1.4</text:p>
      <text:p text:style-name="consolas"><text:s/>NetBIOS over Tcpip. . . . . . . . : Enabled</text:p>
      <text:p text:style-name="P1137">During initial configuration testing, the Windows workstation PC1 cannot connect with the 172.16.2.0/24 network. Which set of actions corrects the configuration?</text:p>
      <text:p text:style-name="P1138">A. Change the IP address to 172.16.1.9 and change the DNS server to 172.16.1.12 only.<text:line-break/>B. Change the IP address to 172.16.1.6 and change the DNS servers to 172.16.1.12 and 172.16.1.13.<text:line-break/>C. Change the IP address to 172.16.1.9 and change the default gateway to 172.16.1.7.<text:line-break/>D. Change the IP address to 172.16.1.6 and change the subnet mask to 255.255.255.248.</text:p>
      <text:p text:style-name="P1139"> </text:p>
      <text:p text:style-name="Normal"><text:span text:style-name="T1140">Answer:</text:span><text:span text:style-name="T1141"> D</text:span></text:p>
      <text:p text:style-name="Normal"><text:span text:style-name="T1142">Explanation</text:span></text:p>
      <text:p text:style-name="P1143">The IPv4 address of PC1 should be in the subnet 172.16.1.0/29 (usable IPs range from 172.16.1.1 to 172.16.1.6) -&gt; Answer D is correct.</text:p>
      <text:p text:style-name="Normal"><text:span text:style-name="T1144">Question 15.</text:span><text:span text:style-name="T1145">85</text:span></text:p>
      <text:p text:style-name="P1146">Refer to the exhibit.</text:p>
      <text:soft-page-break/>
      <text:p text:style-name="Normal"><text:span text:style-name="T1147"><draw:frame draw:style-name="a39" draw:name="Picture 83" text:anchor-type="as-char" svg:x="0in" svg:y="0in" svg:width="6.5in" svg:height="5.8375in" style:rel-width="scale" style:rel-height="scale"><draw:image xlink:href="media/image1.jpeg" xlink:type="simple" xlink:show="embed" xlink:actuate="onLoad"/><svg:title/><svg:desc/></draw:frame></text:span></text:p>
      <text:p text:style-name="P1148">Which configuration is needed to configure a WLAN with WPA2 only and with a password that is 63 characters long?</text:p>
      <text:p text:style-name="P1149">A. Disable WPA Encryption and then enable FT PSK.<text:line-break/>B. Enable PSK using Hex format and then disable WPA Policy.<text:line-break/>C. Disable WPA Policy and WPA Encryption and then enable PSK using ASCII.<text:line-break/>D. Enable PSK and FT PSK and then disable WPA Policy.</text:p>
      <text:p text:style-name="P1150"> </text:p>
      <text:p text:style-name="Normal"><text:span text:style-name="T1151">Answer:</text:span><text:span text:style-name="T1152"> C</text:span></text:p>
      <text:p text:style-name="Normal"><text:span text:style-name="T1153">Explanation</text:span></text:p>
      <text:soft-page-break/>
      <text:p text:style-name="P1154">Enter the Pre-Shared Key in hexadecimal characters.<text:line-break/>+ If you selected the PSK format as HEX, the key length must be exactly 64 characters.<text:line-break/>+ If you selected the PSK format as ASCII, the key length must be in the range of 8-63 characters.</text:p>
      <text:p text:style-name="Normal"><text:span text:style-name="T1155">Reference: </text:span><text:a xlink:href="https://www.cisco.com/c/en/us/td/docs/wireless/controller/ewc/17-3/config-guide/ewc_cg_17_3/private_psk.html" office:target-frame-name="_blank" xlink:show="new"><text:span text:style-name="T1156">https://www.cisco.com/c/en/us/td/docs/wireless/controller/ewc/17-3/config-guide/ewc_cg_17_3/private_psk.html</text:span></text:a></text:p>
      <text:p text:style-name="P1157">Therefore we need to choose PSK using ASCII so that the password can be 53 characters long.</text:p>
      <text:p text:style-name="Normal"><text:span text:style-name="T1158">Question 15.</text:span><text:span text:style-name="T1159">86</text:span></text:p>
      <text:p text:style-name="P1160">Refer to the exhibit.</text:p>
      <text:p text:style-name="consolas">AA#show ip route</text:p>
      <text:p text:style-name="consolas"/>
      <text:p text:style-name="consolas"><text:s text:c="3"/>10.0.0.0/8 is variably subnetted, 6 subnets, 2 masks</text:p>
      <text:p text:style-name="consolas">C <text:s text:c="3"/>10.0.0.0/30 is directly connected, GigabitEthernet0/0</text:p>
      <text:p text:style-name="consolas">L <text:s text:c="3"/>10.0.0.1/32 is directly connected, GigabitEthernet0/0</text:p>
      <text:p text:style-name="consolas">C <text:s text:c="3"/>10.10.0.0/30 is directly connected, GigabitEthernet0/1</text:p>
      <text:p text:style-name="consolas">L <text:s text:c="3"/>10.10.0.1/32 is directly connected, GigabitEthernet0/1</text:p>
      <text:p text:style-name="P1161">O <text:s text:c="3"/>10.20.0.0/30 [110/2] via 10.0.0.2, 00:00:40, GigabitEthernet0/0</text:p>
      <text:p text:style-name="P1162">O <text:s text:c="3"/>10.30.0.0/30 [110/2] via 10.0.0.2, 00:00:40, GigabitEthernet0/0</text:p>
      <text:p text:style-name="consolas"><text:span text:style-name="T1163"><text:s text:c="3"/></text:span>172.16.0.0/24 is subnetted, 1 subnets</text:p>
      <text:p text:style-name="consolas">S <text:s text:c="3"/>172.16.10.0 [1/0] via 10.0.0.2</text:p>
      <text:p text:style-name="consolas"><text:s text:c="3"/>192.168.10.0/24 is variably subnetted, 2 subnets, 2 masks</text:p>
      <text:p text:style-name="consolas">C <text:s text:c="3"/>192.168.10.0/24 is directly connected, GigabitEthernet0/2</text:p>
      <text:p text:style-name="consolas">L <text:s text:c="3"/>192.168.10.1/32 is directly connected, GigabitEthernet0/2</text:p>
      <text:p text:style-name="consolas">S <text:s text:c="3"/>192.168.20.0/24 [1/0] via 192.168.10.2</text:p>
      <text:p text:style-name="P1164">What is the administrative distance for the advertised prefix that includes the host IP address 10.30.0.1?</text:p>
      <text:soft-page-break/>
      <text:p text:style-name="P1165">A. 10.0.0.2<text:line-break/>B. 110<text:line-break/>C. 30<text:line-break/>D. 2</text:p>
      <text:p text:style-name="P1166"> </text:p>
      <text:p text:style-name="Normal"><text:span text:style-name="T1167">Answer:</text:span><text:span text:style-name="T1168"> B</text:span></text:p>
      <text:p text:style-name="Normal"><text:span text:style-name="T1169">Explanation</text:span></text:p>
      <text:p text:style-name="P1170">From the line “O 10.30.0.0/30 [110/2] via 10.0.0.2, 00:00:40, GigabitEthernet0/0”, the first parameter is the AD (110) while the second one is the metric (2).</text:p>
      <text:p text:style-name="Normal"><text:span text:style-name="T1171">Question 15.</text:span><text:span text:style-name="T1172">87</text:span></text:p>
      <text:p text:style-name="P1173">What is the term used to describe a method of connecting multiple switches in a network to allow traffic to flow between them, typically used for larger networks to increase bandwidth?</text:p>
      <text:p text:style-name="P1174">A. LAG<text:line-break/>B. trunk<text:line-break/>C. EtherChannel<text:line-break/>D. access</text:p>
      <text:p text:style-name="P1175"> </text:p>
      <text:p text:style-name="Normal"><text:span text:style-name="T1176">Answer:</text:span><text:span text:style-name="T1177"> B</text:span></text:p>
      <text:p text:style-name="Normal"><text:span text:style-name="T1178">Explanation</text:span></text:p>
      <text:p text:style-name="P1179">This question is a bit unclear but maybe it does not mention about LAG or EtherChannel or we will have two correct answers. Therefore answer B is the best choice here.</text:p>
      <text:p text:style-name="Normal"><text:span text:style-name="T1180">Question 15.</text:span><text:span text:style-name="T1181">88</text:span></text:p>
      <text:p text:style-name="P1182">What is an advantage of using SDN versus traditional networking when it comes to security?</text:p>
      <text:p text:style-name="P1183">A. It creates a unified control point making security policies consistent across all devices<text:line-break/><text:soft-page-break/>B. It exposes an API to configure locally per device for security policies<text:line-break/>C. Security is managed near the perimeter of the network with firewalls, VPNs, and IPS<text:line-break/>D. Devices communicate with each other to establish a security policy</text:p>
      <text:p text:style-name="P1184"> </text:p>
      <text:p text:style-name="Normal"><text:span text:style-name="T1185">Answer:</text:span><text:span text:style-name="T1186"> A</text:span></text:p>
      <text:p text:style-name="Normal"><text:span text:style-name="T1187">Explanation</text:span></text:p>
      <text:p text:style-name="P1188">Software-Defined Networking (SDN) is an approach to networking that centralizes the control plane into an application called a controller. Therefore a big advantage of SDN is we do not have to manually configure each device or each interface. We just plan a policy framework, and the SDN controller configures all related underlying devices. This approach is faster, more reliable and reduces errors.</text:p>
      <text:p text:style-name="Normal"><text:span text:style-name="T1189">Question 15.</text:span><text:span text:style-name="T1190">89 (repeated)</text:span></text:p>
      <text:p text:style-name="P1191">What is a difference between RADIUS and TACACS+?</text:p>
      <text:p text:style-name="P1192">A. RADIUS is most appropriate for dial authentication, but TACACS+ can be used for multiple types of authentication<text:line-break/>B. TACACS+ encrypts only password information and RADIUS encrypts the entire payload<text:line-break/>C. TACACS+ separates authentication and authorization, and RADIUS merges them<text:line-break/>D. RADIUS logs all commands that are entered by the administrator, but TACACS+ logs only start, stop, and interim commands</text:p>
      <text:p text:style-name="P1193"> </text:p>
      <text:p text:style-name="Normal"><text:span text:style-name="T1194">Answer:</text:span><text:span text:style-name="T1195"> C</text:span></text:p>
      <text:p text:style-name="Normal"><text:span text:style-name="T1196">Question 15.</text:span><text:span text:style-name="T1197">90 (repeated)</text:span></text:p>
      <text:p text:style-name="P1198">An engineer is tasked with verifying network configuration parameters on a client workstation to report back to the team lead. Drag and drop the node identifiers from the left onto the network parameters on the right.</text:p>
      <text:soft-page-break/>
      <text:p text:style-name="Normal"><text:span text:style-name="T1199"><draw:frame draw:style-name="a40" draw:name="Picture 82" text:anchor-type="as-char" svg:x="0in" svg:y="0in" svg:width="6.11111in" svg:height="4.875in" style:rel-width="scale" style:rel-height="scale"><draw:image xlink:href="media/image38.jpeg" xlink:type="simple" xlink:show="embed" xlink:actuate="onLoad"/><svg:title/><svg:desc/></draw:frame></text:span></text:p>
      <text:p text:style-name="Normal"><text:span text:style-name="T1200"><draw:frame draw:style-name="a41" draw:name="Picture 81" text:anchor-type="as-char" svg:x="0in" svg:y="0in" svg:width="4.60417in" svg:height="2.27778in" style:rel-width="scale" style:rel-height="scale"><draw:image xlink:href="media/image39.jpeg" xlink:type="simple" xlink:show="embed" xlink:actuate="onLoad"/><svg:title/><svg:desc/></draw:frame></text:span></text:p>
      <text:p text:style-name="P1201"> </text:p>
      <text:p text:style-name="Normal"><text:span text:style-name="T1202">Answer:</text:span></text:p>
      <text:p text:style-name="P1203">+ broadcast address: 192.168.1.255<text:line-break/>+ default gateway: 192.168.1.1<text:line-break/>+ host IP address: 192.168.1.20<text:line-break/><text:soft-page-break/>+ MAC address: B8-76-3F-7C-57-DF<text:line-break/>+ last assignable IP address in the subnet: 192.168.1.254</text:p>
      <text:p text:style-name="Normal"><text:span text:style-name="T1204">Explanation</text:span></text:p>
      <text:p text:style-name="P1205">In the output above, three lines under “Link-local IPv6 Address” line have been blacked out so we have to figure out what they are. They are the IP address of the Wireless card and the Default gateway of this computer.</text:p>
      <text:p text:style-name="Normal"><text:span text:style-name="T1206">Question 15.</text:span><text:span text:style-name="T1207">91</text:span></text:p>
      <text:p text:style-name="P1208">Refer to the exhibit.</text:p>
      <text:p text:style-name="consolas">R1#show ip route</text:p>
      <text:p text:style-name="consolas">Gateway of last resort is 10.0.0.2 to network 0.0.0.0</text:p>
      <text:p text:style-name="consolas">10.0.0.0/8 is variably subnetted, 10 subnets, 3 masks</text:p>
      <text:p text:style-name="consolas">C 10.0.0.0/24 is directly connected, FastEthernet0/0</text:p>
      <text:p text:style-name="consolas">L 10.0.0.1/32 is directly connected, FastEthernet0/0</text:p>
      <text:p text:style-name="consolas">C 10.0.1.0/24 is directly connected, FastEthernet0/1</text:p>
      <text:p text:style-name="consolas">L 10.0.1.1/32 is directly connected, FastEthernet0/1</text:p>
      <text:p text:style-name="consolas">C 10.0.2.0/24 is directly connected, FastEthernet1/0</text:p>
      <text:p text:style-name="consolas">L 10.0.2.1/32 is directly connected, FastEthernet1/0</text:p>
      <text:p text:style-name="consolas">C 10.0.3.0/24 is directly connected, FastEthernet1/1</text:p>
      <text:p text:style-name="consolas">L 10.0.3.1/32 is directly connected, GigabitEthernet1/l</text:p>
      <text:p text:style-name="P1209">O 10.0.4.0/29 [110/2] via 10.0.4.2 00:00:03, GigabitEthernet1/1</text:p>
      <text:p text:style-name="P1210">S 10.1.0.0/16 [1/0] via 10.0.3.2</text:p>
      <text:p text:style-name="consolas">S 10.1.3.0/24 [1/0] via 10.0.3.2</text:p>
      <text:p text:style-name="consolas">S* 0.0.0.0/0 [1/0] via 10.0.0.2</text:p>
      <text:p text:style-name="P1211">How does router R1 forward packets destined to 10.0.4.10?</text:p>
      <text:p text:style-name="P1212">A. via 10.0.4.2<text:line-break/>B. via FastEthernet1/1<text:line-break/>C. via FastEthernet0/1<text:line-break/>D. via 10.0.0.2</text:p>
      <text:soft-page-break/>
      <text:p text:style-name="P1213"> </text:p>
      <text:p text:style-name="Normal"><text:span text:style-name="T1214">Answer:</text:span><text:span text:style-name="T1215"> D</text:span></text:p>
      <text:p text:style-name="Normal"><text:span text:style-name="T1216">Explanation</text:span></text:p>
      <text:p text:style-name="Normal"><text:span text:style-name="T1217">For 10.0.4.10 destination, we only have to check if this destination falls into the range of the entry “O </text:span><text:span text:style-name="T1218">10.0.4.0/29</text:span><text:span text:style-name="T1219"> [110/2] via 10.0.4.2 00:00:03, GigabitEthernet1/1″.</text:span></text:p>
      <text:p text:style-name="P1220">Subnet 10.0.4.0/29<text:line-break/>-&gt; Increment: 8 -&gt; This subnet ranges from 10.0.4.0 to 10.0.4.7 only. Therefore 10.0.4.10 does not belong to this subnet. R1 will use the default route (S* 0.0.0.0/0 [1/0] via 10.0.0.2) for this destination -&gt; R1 will forward packets to the next-hop 10.0.0.2.</text:p>
      <text:p text:style-name="Normal"><text:span text:style-name="T1221">Question 15.</text:span><text:span text:style-name="T1222">92 (repeated)</text:span></text:p>
      <text:p text:style-name="P1223">Which configuration management mechanism uses TCP port 22 by default when communicating with managed nodes?</text:p>
      <text:p text:style-name="P1224">A. Ansible<text:line-break/>B. Python<text:line-break/>C. Puppet<text:line-break/>D. Chef</text:p>
      <text:p text:style-name="P1225"> </text:p>
      <text:p text:style-name="Normal"><text:span text:style-name="T1226">Answer:</text:span><text:span text:style-name="T1227"> A</text:span></text:p>
      <text:p text:style-name="Normal"><text:span text:style-name="T1228">Explanation</text:span></text:p>
      <text:p text:style-name="P1229">TCP port 22 is SSH, which is used by Ansible when communicating with the managed nodes.</text:p>
      <text:soft-page-break/>
      <text:p text:style-name="Normal"><text:span text:style-name="T1230"><draw:frame draw:style-name="a42" draw:name="Picture 80" text:anchor-type="as-char" svg:x="0in" svg:y="0in" svg:width="6.10417in" svg:height="3.10417in" style:rel-width="scale" style:rel-height="scale"><draw:image xlink:href="media/image15.jpeg" xlink:type="simple" xlink:show="embed" xlink:actuate="onLoad"/><svg:title/><svg:desc/></draw:frame></text:span></text:p>
      <text:p text:style-name="Normal"><text:span text:style-name="T1231">Question 15.</text:span><text:span text:style-name="T1232">93 (repeated)</text:span></text:p>
      <text:p text:style-name="P1233">How do AAA operations compare regarding user identification, user services and access control?</text:p>
      <text:p text:style-name="P1234">A. Authorization provides access control and authentication tracks user services<text:line-break/>B. Authentication identifies users and accounting tracks user services<text:line-break/>C. Accounting tracks user services, and authentication provides access control<text:line-break/>D. Authorization identifies users and authentication provides access control</text:p>
      <text:p text:style-name="P1235"> </text:p>
      <text:p text:style-name="Normal"><text:span text:style-name="T1236">Answer:</text:span><text:span text:style-name="T1237"> B</text:span></text:p>
      <text:p text:style-name="Normal"><text:span text:style-name="T1238">Question 15.</text:span><text:span text:style-name="T1239">94 (repeated)</text:span></text:p>
      <text:p text:style-name="P1240">Refer to the exhibit. </text:p>
      <text:p text:style-name="Normal"><text:span text:style-name="T1241"><draw:frame draw:style-name="a43" draw:name="Picture 79" text:anchor-type="as-char" svg:x="0in" svg:y="0in" svg:width="2.55556in" svg:height="1.58333in" style:rel-width="scale" style:rel-height="scale"><draw:image xlink:href="media/image40.jpeg" xlink:type="simple" xlink:show="embed" xlink:actuate="onLoad"/><svg:title/><svg:desc/></draw:frame></text:span></text:p>
      <text:p text:style-name="P1242">What are two conclusions about this configuration? (Choose two)</text:p>
      <text:soft-page-break/>
      <text:p text:style-name="P1243">A. The designated port is FastEthernet 2/1<text:line-break/>B. This is a root bridge<text:line-break/>C. The spanning-tree mode is Rapid PVST+<text:line-break/>D. The spanning-tree mode is PVST+<text:line-break/>E. The root port is FastEthernet 2/1</text:p>
      <text:p text:style-name="P1244"> </text:p>
      <text:p text:style-name="Normal"><text:span text:style-name="T1245">Answer:</text:span><text:span text:style-name="T1246"> C E</text:span></text:p>
      <text:p text:style-name="Normal"><text:span text:style-name="T1247">Explanation</text:span></text:p>
      <text:p text:style-name="P1248">This bridge is not the root bridge because it does not have the statement “This bridge is the root”. When the local switch is not the root bridge, the port it shows would be the root port to the root bridge. Therefore in this case FastEthernet2/1 is the root port that is connected to the root bridge.</text:p>
      <text:p text:style-name="Normal"><text:span text:style-name="T1249">Question 15.</text:span><text:span text:style-name="T1250">95 (repeated)</text:span></text:p>
      <text:p text:style-name="P1251">Refer to the exhibit. An extended ACL has been configured and applied to router R2. The configuration failed to work as intended. Which two changes stop outbound traffic on TCP ports 25 and 80 to 10.0.20.0/26 from the 10.0.10.0/26 subnet while still allowing all other traffic? (Choose two)</text:p>
      <text:p text:style-name="Normal"><text:span text:style-name="T1252"><draw:frame draw:style-name="a44" draw:name="Picture 78" text:anchor-type="as-char" svg:x="0in" svg:y="0in" svg:width="4.01389in" svg:height="2.33333in" style:rel-width="scale" style:rel-height="scale"><draw:image xlink:href="media/image41.jpeg" xlink:type="simple" xlink:show="embed" xlink:actuate="onLoad"/><svg:title/><svg:desc/></draw:frame></text:span></text:p>
      <table:table table:style-name="Table1253">
        <table:table-columns>
          <table:table-column table:style-name="TableColumn1254"/>
        </table:table-columns>
        <table:table-row table:style-name="TableRow1255">
          <table:table-cell table:style-name="TableCell1256">
            <text:p text:style-name="consolas">R2#config t<text:line-break/>R2(config)#access-list 101 deny tcp 10.0.20.0 0.0.0.63 10.0.10.0 0.0.0.63 eq smtp<text:line-break/>R2(config)#access-list 101 deny tcp 10.0.20.0 0.0.0.63 10.0.10.0 0.0.0.63 eq www<text:line-break/><text:soft-page-break/>R2(config)#int gi0/2<text:line-break/>R2(config-if)#ip access-group 101 in</text:p>
          </table:table-cell>
        </table:table-row>
      </table:table>
      <text:soft-page-break/>
      <text:p text:style-name="P1257">A. Add a “permit ip any any” statement to the beginning of ACL 101 for allowed traffic<text:line-break/>B. Add a “permit ip any any” statement at the end of ACL 101 for allowed traffic<text:line-break/>C. The source and destination IPs must be swapped in ACL 101<text:line-break/>D. The ACL must be configured the Gi0/2 interface inbound on R1<text:line-break/>E. The ACL must be moved to the Gi0/1 interface outbound on R2</text:p>
      <text:p text:style-name="P1258"> </text:p>
      <text:p text:style-name="Normal"><text:span text:style-name="T1259">Answer:</text:span><text:span text:style-name="T1260"> B C</text:span></text:p>
      <text:p text:style-name="Normal"><text:span text:style-name="T1261">Question 15.</text:span><text:span text:style-name="T1262">96 (repeated)</text:span></text:p>
      <text:p text:style-name="P1263">R1 has learned route 10.10.10.0/24 via numerous routing protocols. Which route is installed?</text:p>
      <text:p text:style-name="P1264">A. route with the lowest cost<text:line-break/>B. route with the next hop that has the highest IP<text:line-break/>C. route with the shortest prefix length<text:line-break/>D. route with the lowest administrative distance</text:p>
      <text:p text:style-name="P1265"> </text:p>
      <text:p text:style-name="Normal"><text:span text:style-name="T1266">Answer:</text:span><text:span text:style-name="T1267"> D</text:span></text:p>
      <text:p text:style-name="Normal"><text:span text:style-name="T1268">Question 15.</text:span><text:span text:style-name="T1269">97 (repeated)</text:span></text:p>
      <text:p text:style-name="P1270">Which command must be entered to configure a DHCP relay?</text:p>
      <text:p text:style-name="P1271">A. ip helper-address<text:line-break/>B. ip address dhcp<text:line-break/>C. ip dhcp relay<text:line-break/>D. ip dhcp pool</text:p>
      <text:p text:style-name="P1272"> </text:p>
      <text:p text:style-name="Normal"><text:span text:style-name="T1273">Answer:</text:span><text:span text:style-name="T1274"> A</text:span></text:p>
      <text:p text:style-name="Normal"><text:span text:style-name="T1275">Explanation</text:span></text:p>
      <text:soft-page-break/>
      <text:p text:style-name="Normal"><text:span text:style-name="T1276">If the DHCP Server is not on the same subnet with the DHCP Client, we need to configure the router on the DHCP client side to act as a DHCP Relay Agent so that it can forward DHCP messages between the DHCP Client &amp; DHCP Server. To make a router a DHCP Relay Agent, simply put the “ip helper-address &lt;</text:span><text:span text:style-name="T1277">IP-address-of-DHCP-Server</text:span><text:span text:style-name="T1278">&gt;” command under the interface that receives the DHCP messages from the DHCP Client.</text:span></text:p>
      <text:p text:style-name="Normal"><text:span text:style-name="T1279"><draw:frame draw:style-name="a45" draw:name="Picture 77" text:anchor-type="as-char" svg:x="0in" svg:y="0in" svg:width="6.20833in" svg:height="1.84722in" style:rel-width="scale" style:rel-height="scale"><draw:image xlink:href="media/image42.jpeg" xlink:type="simple" xlink:show="embed" xlink:actuate="onLoad"/><svg:title/><svg:desc/></draw:frame></text:span></text:p>
      <text:p text:style-name="P1280">As we know, router does not forward broadcast packets (it drops them instead) so DHCP messages like DHCPDISCOVER message will be dropped. But with the “ip helper-address …” command, the router will accept that broadcast message and cover it into a unicast packet and forward it to the DHCP Server. The destination IP address of the unicast packet is taken from the “ip helper-address …” command.</text:p>
      <text:p text:style-name="Normal"><text:span text:style-name="T1281">Question 15.</text:span><text:span text:style-name="T1282">98</text:span></text:p>
      <text:p text:style-name="P1283">Refer to the exhibit.</text:p>
      <text:soft-page-break/>
      <text:p text:style-name="Normal"><text:span text:style-name="T1284"><draw:frame draw:style-name="a46" draw:name="Picture 76" text:anchor-type="as-char" svg:x="0in" svg:y="0in" svg:width="4.5625in" svg:height="4.11806in" style:rel-width="scale" style:rel-height="scale"><draw:image xlink:href="media/image43.jpeg" xlink:type="simple" xlink:show="embed" xlink:actuate="onLoad"/><svg:title/><svg:desc/></draw:frame></text:span></text:p>
      <text:p text:style-name="P1285">Which settings must be verified on workstation 1 to establish IP connectivity to server 1 using the server’s fully qualified domain name?</text:p>
      <table:table table:style-name="Table1286">
        <table:table-columns>
          <table:table-column table:style-name="TableColumn1287"/>
          <table:table-column table:style-name="TableColumn1288"/>
        </table:table-columns>
        <table:table-row table:style-name="TableRow1289">
          <table:table-cell table:style-name="TableCell1290">
            <text:p text:style-name="P1291">Option A</text:p>
            <text:p text:style-name="P1292">IP address: 10.0.63.80<text:line-break/>Subnet mask: 255.255.255.224<text:line-break/>Default gateway: 10.0.71.0<text:line-break/>DHCP server: 10.0.63.8</text:p>
          </table:table-cell>
          <table:table-cell table:style-name="TableCell1293">
            <text:p text:style-name="P1294">Option B</text:p>
            <text:p text:style-name="P1295">IP address: 10.0.71.16<text:line-break/>Subnet mask: 255.255.255.224<text:line-break/>Default gateway: 10.0.71.1<text:line-break/>DNS server: 10.0.63.5</text:p>
          </table:table-cell>
        </table:table-row>
        <table:table-row table:style-name="TableRow1296">
          <table:table-cell table:style-name="TableCell1297">
            <text:p text:style-name="P1298">Option C</text:p>
            <text:p text:style-name="P1299">IP address: 10.0.63.80<text:line-break/>Subnet mask: 255.255.255.0<text:line-break/>Default gateway: 10.0.71.1<text:line-break/>DNS server: 10.0.63.5</text:p>
          </table:table-cell>
          <table:table-cell table:style-name="TableCell1300">
            <text:p text:style-name="P1301">Option D</text:p>
            <text:p text:style-name="P1302">IP address: 10.0.71.16<text:line-break/>Subnet mask: 255.255.255.0<text:line-break/>Default gateway: 10.0.71.0<text:line-break/>DHCP server: 10.0.63.8</text:p>
          </table:table-cell>
        </table:table-row>
      </table:table>
      <text:p text:style-name="P1303">A. Option A<text:line-break/>B. Option B<text:line-break/><text:soft-page-break/>C. Option C<text:line-break/>D. Option D</text:p>
      <text:p text:style-name="P1304"> </text:p>
      <text:p text:style-name="Normal"><text:span text:style-name="T1305">Answer:</text:span><text:span text:style-name="T1306"> B</text:span></text:p>
      <text:p text:style-name="Normal"><text:span text:style-name="T1307">Explanation</text:span></text:p>
      <text:p text:style-name="P1308">Workstation1 belongs to VLAN 71 so its IP address should be 10.0.71.x and the subnet mask should be /27 (255.255.255.224). Moreover, if Workstation 1 wants to connect to server 1 using the server’s fully qualified domain name then its DNS server must be correctly set to 10.0.63.5 as shown in the exhibit.</text:p>
      <text:p text:style-name="Normal"><text:span text:style-name="T1309">Question 15.</text:span><text:span text:style-name="T1310">99 (repeated)</text:span></text:p>
      <text:p text:style-name="P1311">Refer to the exhibit. Which path is used by the router for Internet traffic?</text:p>
      <text:p text:style-name="Normal"><text:span text:style-name="T1312"><draw:frame draw:style-name="a47" draw:name="Picture 75" text:anchor-type="as-char" svg:x="0in" svg:y="0in" svg:width="6.04167in" svg:height="1.72917in" style:rel-width="scale" style:rel-height="scale"><draw:image xlink:href="media/image44.jpeg" xlink:type="simple" xlink:show="embed" xlink:actuate="onLoad"/><svg:title/><svg:desc/></draw:frame></text:span></text:p>
      <text:p text:style-name="consolas">R1#show ip route</text:p>
      <text:p text:style-name="consolas">Gateway of last resort is 10.10.11.2 to network 0.0.0.0</text:p>
      <text:p text:style-name="consolas">209.165.200.0/27 is subnetted, 1 subnets</text:p>
      <text:p text:style-name="consolas">B<text:tab/>209.165.200.224 [20/0] via 10.10.12.2, 00:10:34</text:p>
      <text:p text:style-name="consolas"><text:tab/>10.0.0.0/8 is variably subnetted, 4 subnets, 3 masks</text:p>
      <text:p text:style-name="consolas">C<text:tab/><text:tab/>10.10.10.0/28 is directly connected, GigabitEthernet0/0</text:p>
      <text:p text:style-name="consolas">C<text:tab/><text:tab/>10.10.11.0/30 is directly connected, FastEthernet2/0</text:p>
      <text:p text:style-name="consolas">C<text:tab/><text:tab/>10.10.13.0/30 [110/2] via 10.10.10.1, 00:03:34, GigabitEthernet0/0</text:p>
      <text:p text:style-name="consolas">C<text:tab/><text:tab/>10.10.12.0/30 is directly connected, GigabitEthernet0/1</text:p>
      <text:p text:style-name="consolas">S*<text:tab/>0.0.0.0/0 [1/0] via 10.10.11.2</text:p>
      <text:p text:style-name="consolas"/>
      <text:p text:style-name="consolas">Switch1#show ip route</text:p>
      <text:p text:style-name="consolas">Gateway of last resort is not set</text:p>
      <text:p text:style-name="consolas"><text:tab/>10.0.0.0/8 is variably subnetted, 2 subnets, 2 masks</text:p>
      <text:p text:style-name="consolas">C<text:tab/><text:tab/>10.10.10.0/28 is directly connected, FastEthernet0/1</text:p>
      <text:p text:style-name="consolas">C<text:tab/><text:tab/>10.10.13.0/24 is directly connected, VLAN20</text:p>
      <text:p text:style-name="P1313">A. 209.165.200.0/27<text:line-break/>B. 10.10.10.0/28<text:line-break/>C. 0.0.0.0/0<text:line-break/>D. 10.10.13.0/24</text:p>
      <text:p text:style-name="P1314"> </text:p>
      <text:p text:style-name="Normal"><text:span text:style-name="T1315">Answer:</text:span><text:span text:style-name="T1316"> C</text:span></text:p>
      <text:p text:style-name="Normal"><text:span text:style-name="T1317">Question 15.</text:span><text:span text:style-name="T1318">100 (repeated)</text:span></text:p>
      <text:p text:style-name="P1319">Refer to the exhibit. If the network environment is operating normally, which type of device must be connected to interface FastEthernet 0/1?</text:p>
      <table:table table:style-name="Table1320">
        <table:table-columns>
          <table:table-column table:style-name="TableColumn1321"/>
        </table:table-columns>
        <table:table-row table:style-name="TableRow1322">
          <table:table-cell table:style-name="TableCell1323">
            <text:p text:style-name="consolas">ip arp inspection vlan 2-10<text:line-break/>interface fastethernet 0/1<text:line-break/>ip arp inspection trust</text:p>
          </table:table-cell>
        </table:table-row>
      </table:table>
      <text:p text:style-name="P1324">A. DHCP client<text:line-break/>B. access point<text:line-break/>C. router<text:line-break/>D. PC</text:p>
      <text:p text:style-name="P1325"> </text:p>
      <text:p text:style-name="Normal"><text:span text:style-name="T1326">Answer:</text:span><text:span text:style-name="T1327"> C</text:span></text:p>
      <text:p text:style-name="Normal"><text:span text:style-name="T1328">Explanation</text:span></text:p>
      <text:p text:style-name="P1329">To configure DHCP snooping feature, at least three steps must be done:</text:p>
      <table:table table:style-name="Table1330">
        <table:table-columns>
          <table:table-column table:style-name="TableColumn1331"/>
          <table:table-column table:style-name="TableColumn1332"/>
        </table:table-columns>
        <table:table-row table:style-name="TableRow1333">
          <table:table-cell table:style-name="TableCell1334">
            <text:p text:style-name="Normal"><text:span text:style-name="T1335">Sequence and Description</text:span></text:p>
          </table:table-cell>
          <table:table-cell table:style-name="TableCell1336">
            <text:p text:style-name="Normal"><text:span text:style-name="T1337">Command</text:span></text:p>
          </table:table-cell>
        </table:table-row>
        <text:soft-page-break/>
        <table:table-row table:style-name="TableRow1338">
          <table:table-cell table:style-name="TableCell1339">
            <text:p text:style-name="P1340">1. Configure global DHCP snooping</text:p>
          </table:table-cell>
          <table:table-cell table:style-name="TableCell1341">
            <text:p text:style-name="P1342">Switch(config)# ip dhcp snooping</text:p>
          </table:table-cell>
        </table:table-row>
        <table:table-row table:style-name="TableRow1343">
          <table:table-cell table:style-name="TableCell1344">
            <text:p text:style-name="P1345">2. Configure trusted ports (as least on 1 port).<text:line-break/>By default, all ports are untrusted</text:p>
          </table:table-cell>
          <table:table-cell table:style-name="TableCell1346">
            <text:p text:style-name="P1347">Switch(config-if)# ip dhcp snooping trust</text:p>
          </table:table-cell>
        </table:table-row>
        <table:table-row table:style-name="TableRow1348">
          <table:table-cell table:style-name="TableCell1349">
            <text:p text:style-name="P1350">3. Configure DHCP snooping for the selected VLANs</text:p>
          </table:table-cell>
          <table:table-cell table:style-name="TableCell1351">
            <text:p text:style-name="Normal"><text:span text:style-name="T1352">Switch(config)# ip dhcp snooping vlan </text:span><text:span text:style-name="T1353">{VLAN-ID | VLAN range}</text:span></text:p>
          </table:table-cell>
        </table:table-row>
      </table:table>
      <text:p text:style-name="Normal"><text:span text:style-name="T1354">Note: To configure DHCP snooping with Dynamic ARP Inspection we need to add the command “ip arp inspection vlan </text:span><text:span text:style-name="T1355">vlan-id</text:span><text:span text:style-name="T1356">” in global configuration mode and “ip arp inspection trust” in interface mode.</text:span></text:p>
      <text:p text:style-name="P1357">In a normal network environment, we should trust interfaces that are connected to routers, not end points.</text:p>
      <text:p text:style-name="Normal"><text:span text:style-name="T1358">Question 15.</text:span><text:span text:style-name="T1359">101 (repeated)</text:span></text:p>
      <text:p text:style-name="P1360">Refer to the exhibit. To which device does Router1 send packets that are destined to host 10.10.13.165?</text:p>
      <text:p text:style-name="Normal"><text:span text:style-name="T1361"><draw:frame draw:style-name="a48" draw:name="Picture 74" text:anchor-type="as-char" svg:x="0in" svg:y="0in" svg:width="4.50694in" svg:height="2.49306in" style:rel-width="scale" style:rel-height="scale"><draw:image xlink:href="media/image45.jpeg" xlink:type="simple" xlink:show="embed" xlink:actuate="onLoad"/><svg:title/><svg:desc/></draw:frame></text:span></text:p>
      <text:p text:style-name="consolas">Router1#show ip route</text:p>
      <text:p text:style-name="consolas">Gateway of last resort is 10.10.11.2 to network 0.0.0.0</text:p>
      <text:p text:style-name="consolas"><text:s text:c="4"/>209.165.200.0/27 is subnetted, 1 subnets<text:s/></text:p>
      <text:p text:style-name="consolas">B <text:s text:c="4"/>209.165.200.224 [20/0] via 10.10.12.2,03:32:14</text:p>
      <text:p text:style-name="consolas"><text:s text:c="4"/>209.165.201.0/27 is subnetted, 1 subnets<text:s/></text:p>
      <text:soft-page-break/>
      <text:p text:style-name="consolas">B <text:s text:c="4"/>209.165.201.0 [20/0] via 10.10.12.2,02:26:53</text:p>
      <text:p text:style-name="consolas"><text:s text:c="4"/>209.165.202.0/27 is subnetted, 1 subnets<text:s/></text:p>
      <text:p text:style-name="consolas">B <text:s text:c="4"/>209.165.202.128 [20/0] via 10.10.12.2,02:46:03</text:p>
      <text:p text:style-name="consolas"><text:s text:c="4"/>10.0.0.0/8 is variably subneted, 10 subnets, 4 masks<text:s/></text:p>
      <text:p text:style-name="consolas">O <text:s text:c="4"/>10.10.13.0/25 [110/2] via 10.10.10.1,00:00:04, GigabitEthernet0/0</text:p>
      <text:p text:style-name="P1362">O <text:s text:c="4"/>10.10.13.128/28 [110/2] via 10.10.10.5,00:00:12, GigabitEthernet0/1</text:p>
      <text:p text:style-name="P1363">O <text:s text:c="4"/>10.10.13.144/28 [110/2] via 10.10.10.9,00:01:57, GigabitEthernet0/2</text:p>
      <text:p text:style-name="P1364">O <text:s text:c="4"/>10.10.13.160/29 [110/2] via 10.10.10.5,00:00:12, GigabitEthernet0/1</text:p>
      <text:p text:style-name="P1365">O <text:s text:c="4"/>10.10.13.208/29 [110/2] via 10.10.10.13,00:01:57, GigabitEthernet0/3</text:p>
      <text:p text:style-name="consolas">S* <text:s/>0.0.0.0/0 [1/0] via 10.10.11.2</text:p>
      <text:p text:style-name="P1366">A. Router2<text:line-break/>B. Router3<text:line-break/>C. Router4<text:line-break/>D. Router5</text:p>
      <text:p text:style-name="P1367"> </text:p>
      <text:p text:style-name="Normal"><text:span text:style-name="T1368">Answer:</text:span><text:span text:style-name="T1369"> B</text:span></text:p>
      <text:p text:style-name="Normal"><text:span text:style-name="T1370">Explanation</text:span></text:p>
      <text:p text:style-name="P1371">The destination of 10.10.13.165 matches the entry “O 10.10.13.160/29 [110/2]…” because of the longest prefix length rule so the packet will be forwarded to 10.10.10.5, which is Router3.</text:p>
      <text:p text:style-name="Normal"><text:span text:style-name="T1372">Question 15.</text:span><text:span text:style-name="T1373">102 (repeated)</text:span></text:p>
      <text:p text:style-name="P1374">Refer to the exhibit. Router R1 is running three different routing protocols. Which route characteristic is used by the router to forward the packet that it receives for destination IP 172.16.32.1?</text:p>
      <text:p text:style-name="Normal"><text:span text:style-name="T1375"><draw:frame draw:style-name="a49" draw:name="Picture 73" text:anchor-type="as-char" svg:x="0in" svg:y="0in" svg:width="3.08333in" svg:height="0.68056in" style:rel-width="scale" style:rel-height="scale"><draw:image xlink:href="media/image46.jpeg" xlink:type="simple" xlink:show="embed" xlink:actuate="onLoad"/><svg:title/><svg:desc/></draw:frame></text:span></text:p>
      <text:p text:style-name="P1376">A. longest prefix<text:line-break/>B. metric<text:line-break/><text:soft-page-break/>C. cost<text:line-break/>D. administrative distance</text:p>
      <text:p text:style-name="P1377"> </text:p>
      <text:p text:style-name="Normal"><text:span text:style-name="T1378">Answer:</text:span><text:span text:style-name="T1379"> A</text:span></text:p>
      <text:p text:style-name="Normal"><text:span text:style-name="T1380">Explanation</text:span></text:p>
      <text:p text:style-name="P1381">A router evaluates routes in the following order.<text:line-break/>1. Prefix Length – The longest-matching route is preferred first. Prefix length trumps all other route attributes.<text:line-break/>2. Administrative Distance – In the event there are multiple routes to a destination with the same prefix length, the route learned by the protocol with the lowest administrative distance is preferred.<text:line-break/>3. Metric – In the event there are multiple routes learned by the same protocol with same prefix length, the route with the lowest metric is preferred. (If two or more of these routes have equal metrics, load balancing across them may occur.)</text:p>
      <text:p text:style-name="Normal"><text:span text:style-name="T1382">Question 15.</text:span><text:span text:style-name="T1383">103 (repeated)</text:span></text:p>
      <text:p text:style-name="P1384">Drag and drop the attack-mitigation techniques from the left onto the types of attack that they mitigate on the right.</text:p>
      <text:p text:style-name="Normal"><text:span text:style-name="T1385"><draw:frame draw:style-name="a50" draw:name="Picture 72" text:anchor-type="as-char" svg:x="0in" svg:y="0in" svg:width="6.5in" svg:height="2.12153in" style:rel-width="scale" style:rel-height="scale"><draw:image xlink:href="media/image47.jpeg" xlink:type="simple" xlink:show="embed" xlink:actuate="onLoad"/><svg:title/><svg:desc/></draw:frame></text:span></text:p>
      <text:p text:style-name="P1386"> </text:p>
      <text:p text:style-name="Normal"><text:span text:style-name="T1387">Answer:</text:span></text:p>
      <text:p text:style-name="P1388">+ 802.1q double-tagging VLAN-hopping attack: configure the native VLAN with a nondefault VLAN ID<text:line-break/>+ MAC flooding attack: configure 802.1x authenticate<text:line-break/><text:soft-page-break/>+ man-in-the-middle spoofing attack: configure DHCP snooping<text:line-break/>+ switch-spoofing VLAN-hopping attack: disable DTP</text:p>
      <text:p text:style-name="Normal"><text:span text:style-name="T1389">Explanation</text:span></text:p>
      <text:p text:style-name="Normal"><text:span text:style-name="T1390">VLAN Hopping</text:span><text:span text:style-name="T1391">: By altering the VLAN ID on packets encapsulated for trunking, an attacking device can send or receive packets on various VLANs, bypassing Layer 3 security measures. VLAN hopping can be accomplished by switch spoofing or double tagging.</text:span></text:p>
      <text:p text:style-name="Normal"><text:span text:style-name="T1392">a. Switch spoofing:</text:span></text:p>
      <text:p text:style-name="Normal"><text:span text:style-name="T1393"><draw:frame draw:style-name="a51" draw:name="Picture 71" text:anchor-type="as-char" svg:x="0in" svg:y="0in" svg:width="4.89583in" svg:height="1.35417in" style:rel-width="scale" style:rel-height="scale"><draw:image xlink:href="media/image48.jpeg" xlink:type="simple" xlink:show="embed" xlink:actuate="onLoad"/><svg:title/><svg:desc/></draw:frame></text:span></text:p>
      <text:p text:style-name="P1394">The attacker can connect an unauthorized Cisco switch to a Company switch port. The unauthorized switch can send DTP frames and form a trunk with the Company Switch. If the attacker can establish a trunk link to the Company switch, it receives traffic to all VLANs through the trunk because all VLANs are allowed on a trunk by default.</text:p>
      <text:p text:style-name="P1395">(Instead of using a Cisco Switch, the attacker can use a software to create and send DTP frames).</text:p>
      <text:p text:style-name="P1396">To mitigate this type of attack, we can disable DTP.</text:p>
      <text:p text:style-name="Normal"><text:span text:style-name="T1397">b. Double-Tagging attack:</text:span></text:p>
      <text:p text:style-name="Normal"><text:span text:style-name="T1398"><draw:frame draw:style-name="a52" draw:name="Picture 70" text:anchor-type="as-char" svg:x="0in" svg:y="0in" svg:width="5.9375in" svg:height="1.45833in" style:rel-width="scale" style:rel-height="scale"><draw:image xlink:href="media/image49.jpeg" xlink:type="simple" xlink:show="embed" xlink:actuate="onLoad"/><svg:title/><svg:desc/></draw:frame></text:span></text:p>
      <text:soft-page-break/>
      <text:p text:style-name="P1399">In this attack, the attacking computer generates frames with two 802.1Q tags. The first tag matches the native VLAN of the trunk port (VLAN 10 in this case), and the second matches the VLAN of a host it wants to attack (VLAN 20).</text:p>
      <text:p text:style-name="P1400">When the packet from the attacker reaches Switch A, Switch A only sees the first VLAN 10 and it matches with its native VLAN 10 so this VLAN tag is removed. Switch A forwards the frame out all links with the same native VLAN 10. Switch B receives the frame with an tag of VLAN 20 so it removes this tag and forwards out to the Victim computer.</text:p>
      <text:p text:style-name="P1401">Note: This attack only works if the trunk (between two switches) has the same native VLAN as the attacker.</text:p>
      <text:p text:style-name="P1402">To mitigate this type of attack, we can use VLAN access control lists (VACLs, which applies to all traffic within a VLAN. We can use VACL to drop attacker traffic to specific victims/servers) or implement Private VLANs.</text:p>
      <text:p text:style-name="Normal"><text:span text:style-name="T1403">Question 15.</text:span><text:span text:style-name="T1404">104 (repeated)</text:span></text:p>
      <text:p text:style-name="P1405">When a WPA2-PSK WLAN is configured in the Wireless LAN Controller, what is the minimum number of characters that is required for the passphrase?</text:p>
      <text:p text:style-name="P1406">A. 6<text:line-break/>B. 8<text:line-break/>C. 12<text:line-break/>D. 18</text:p>
      <text:p text:style-name="P1407"> </text:p>
      <text:p text:style-name="Normal"><text:span text:style-name="T1408">Answer:</text:span><text:span text:style-name="T1409"> B</text:span></text:p>
      <text:p text:style-name="Normal"><text:span text:style-name="T1410">Explanation</text:span></text:p>
      <text:p text:style-name="P1411">WPA/WPA2 preshared keys must contain 8 to 63 ASCII text characters or 64 hexadecimal characters.</text:p>
      <text:p text:style-name="Normal"><text:span text:style-name="T1412">Reference: </text:span><text:a xlink:href="https://www.cisco.com/c/en/us/td/docs/wireless/controller/7-4/configuration/guides/consolidated/b_cg74_CONSOLIDATED/b_cg74_CONSOLIDATED_chapter_01010001.html" office:target-frame-name="_blank" xlink:show="new"><text:span text:style-name="T1413">https://www.cisco.com/c/en/us/td/docs/wireless/controller/7-4/configuration/guides/consolidated/b_cg74_CONSOLIDATED/b_cg74_CONSOLIDATED_chapter_01010001.html</text:span></text:a></text:p>
      <text:p text:style-name="Normal"><text:span text:style-name="T1414">Question 15.</text:span><text:span text:style-name="T1415">105 (repeated)</text:span></text:p>
      <text:soft-page-break/>
      <text:p text:style-name="P1416">Which purpose does a northbound API serve in a controller-based networking architecture?</text:p>
      <text:p text:style-name="P1417">A. communicates between the controller and the physical network hardware<text:line-break/>B. reports device errors to a controller<text:line-break/>C. generates statistics for network hardware and traffic<text:line-break/>D. facilitates communication between the controller and the applications</text:p>
      <text:p text:style-name="P1418"> </text:p>
      <text:p text:style-name="Normal"><text:span text:style-name="T1419">Answer:</text:span><text:span text:style-name="T1420"> D</text:span></text:p>
      <text:p text:style-name="Normal"><text:span text:style-name="T1421">Question 15.</text:span><text:span text:style-name="T1422">106</text:span></text:p>
      <text:p text:style-name="P1423">Drag and drop the IPv6 addresses from the left onto the corresponding address types on the right.</text:p>
      <text:p text:style-name="Normal"><text:span text:style-name="T1424"><draw:frame draw:style-name="a53" draw:name="Picture 69" text:anchor-type="as-char" svg:x="0in" svg:y="0in" svg:width="5.91667in" svg:height="2.47917in" style:rel-width="scale" style:rel-height="scale"><draw:image xlink:href="media/image50.jpeg" xlink:type="simple" xlink:show="embed" xlink:actuate="onLoad"/><svg:title/><svg:desc/></draw:frame></text:span></text:p>
      <text:p text:style-name="P1425"> </text:p>
      <text:p text:style-name="Normal"><text:span text:style-name="T1426">Answer:</text:span></text:p>
      <text:p text:style-name="Normal"><text:span text:style-name="T1427">Global Unicast</text:span><text:span text:style-name="T1428"><text:line-break/>+ 2001:db8:600d:cafe::123</text:span><text:span text:style-name="T1429"><text:line-break/>+ 3ffe:e54d:620:a87a::f00d</text:span></text:p>
      <text:p text:style-name="Normal"><text:span text:style-name="T1430">Unique Local</text:span><text:span text:style-name="T1431"><text:line-break/>+ fd6d:c83b:5cef:b6b2::1</text:span><text:span text:style-name="T1432"><text:line-break/>+ fcba:926a:e8e:7a25:b1:c6d2:1a76:8fdc</text:span></text:p>
      <text:p text:style-name="Normal"><text:span text:style-name="T1433">Explanation</text:span></text:p>
      <text:soft-page-break/>
      <text:p text:style-name="P1434">Note: </text:p>
      <text:p text:style-name="Normal"><text:span text:style-name="T1435">Unique Local</text:span><text:span text:style-name="T1436"> is the counterpart of private IPv4 addresses so it is not routable on the global Internet. A Unique Local is an IPv6 address in the block FC00::/7.  They start with FC00::/7 (for used in private networks) -&gt; The first octet can be FC or FD.</text:span></text:p>
      <text:p text:style-name="Normal"><text:span text:style-name="T1437">Question 15.</text:span><text:span text:style-name="T1438">107 (repeated)</text:span></text:p>
      <text:p text:style-name="P1439">Refer to the exhibit. A packet is being sent across router R1 to host 172.16.3.14. To which destination does the router send the packet?</text:p>
      <text:p text:style-name="Normal"><text:span text:style-name="T1440"><draw:frame draw:style-name="a54" draw:name="Picture 68" text:anchor-type="as-char" svg:x="0in" svg:y="0in" svg:width="5.1875in" svg:height="2.47917in" style:rel-width="scale" style:rel-height="scale"><draw:image xlink:href="media/image51.jpeg" xlink:type="simple" xlink:show="embed" xlink:actuate="onLoad"/><svg:title/><svg:desc/></draw:frame></text:span></text:p>
      <text:p text:style-name="P1441">A. 207.165.200.246 via Serial0/1/0<text:line-break/>B. 207.165.200.254 via Serial0/0/0<text:line-break/>C. 207.165.200.254 via Serial0/0/1<text:line-break/>D. 207.165.200.250 via Serial0/0/0</text:p>
      <text:p text:style-name="P1442"> </text:p>
      <text:p text:style-name="Normal"><text:span text:style-name="T1443">Answer:</text:span><text:span text:style-name="T1444"> C</text:span></text:p>
      <text:p text:style-name="Normal"><text:span text:style-name="T1445">Question 15.</text:span><text:span text:style-name="T1446">108 (repeated)</text:span></text:p>
      <text:p text:style-name="P1447">Refer to the exhibit. An engineer must add a subnet for a new office that will add 20 users to the network. Which IPv4 network and subnet mask combination does the engineer assign to minimize wasting addresses?</text:p>
      <text:soft-page-break/>
      <text:p text:style-name="Normal"><text:span text:style-name="T1448"><draw:frame draw:style-name="a55" draw:name="Picture 67" text:anchor-type="as-char" svg:x="0in" svg:y="0in" svg:width="4.79167in" svg:height="1.09722in" style:rel-width="scale" style:rel-height="scale"><draw:image xlink:href="media/image52.jpeg" xlink:type="simple" xlink:show="embed" xlink:actuate="onLoad"/><svg:title/><svg:desc/></draw:frame></text:span></text:p>
      <text:p text:style-name="P1449">A. 10.10.225.48 255.255.255.240<text:line-break/>B. 10.10.225.32 255.255.255.240<text:line-break/>C. 10.10.225.48 255.255.255.224<text:line-break/>D. 10.10.225.32 255.255.255.224</text:p>
      <text:p text:style-name="P1450"> </text:p>
      <text:p text:style-name="Normal"><text:span text:style-name="T1451">Answer:</text:span><text:span text:style-name="T1452"> D</text:span></text:p>
      <text:p text:style-name="Normal"><text:span text:style-name="T1453">Explanation</text:span></text:p>
      <text:p text:style-name="Normal"><text:span text:style-name="T1454">We need a subnet with 20 users so we need 5 bits 0 in the subnet mask as 2</text:span><text:span text:style-name="T1455">5</text:span><text:span text:style-name="T1456"> – 2 = 30 &gt; 20. Therefore the subnet mask should be /27 (with last octet is 1110 0000 in binary). The increment is 32 so the valid network address is 10.10.225.32.</text:span></text:p>
      <text:p text:style-name="Normal"><text:span text:style-name="T1457">Question 15.</text:span><text:span text:style-name="T1458">109 (repeated)</text:span></text:p>
      <text:p text:style-name="P1459">What are two recommendations for protecting network ports from being exploited when located in an office space outside of an IT closet? (Choose two)</text:p>
      <text:p text:style-name="P1460">A. shut down unused ports<text:line-break/>B. enable the PortFast feature on ports<text:line-break/>C. implement port-based authentication<text:line-break/>D. configure ports to a fixed speed<text:line-break/>E. configure static ARP entries</text:p>
      <text:p text:style-name="P1461"> </text:p>
      <text:p text:style-name="Normal"><text:span text:style-name="T1462">Answer:</text:span><text:span text:style-name="T1463"> A C</text:span></text:p>
      <text:p text:style-name="Normal"><text:span text:style-name="T1464">Question 15.</text:span><text:span text:style-name="T1465">110 (repeated)</text:span></text:p>
      <text:p text:style-name="P1466">Which technology must be implemented to configure network device monitoring with the highest security?</text:p>
      <text:soft-page-break/>
      <text:p text:style-name="P1467">A. SNMPv3<text:line-break/>B. IP SLA<text:line-break/>C. NetFlow<text:line-break/>D. syslog</text:p>
      <text:p text:style-name="P1468"> </text:p>
      <text:p text:style-name="Normal"><text:span text:style-name="T1469">Answer:</text:span><text:span text:style-name="T1470"> A</text:span></text:p>
      <text:p text:style-name="Normal"><text:span text:style-name="T1471">Explanation</text:span></text:p>
      <text:p text:style-name="P1472">SNMPv3—The most up-to-date protocol focuses on security. SNMPv3 defines a security model, user-based security model (USM), and a view-based access control model (VACM). SNMPv3 USM provides data integrity, data origin authentication, message replay protection, and protection against disclosure of the message payload.</text:p>
      <text:p text:style-name="Normal"><text:span text:style-name="T1473">Reference: </text:span><text:a xlink:href="https://www.juniper.net/documentation/us/en/software/junos/network-mgmt/topics/topic-map/network-monitoring-by-using-snmp.html" office:target-frame-name="_blank" xlink:show="new"><text:span text:style-name="T1474">https://www.juniper.net/documentation/us/en/software/junos/network-mgmt/topics/topic-map/network-monitoring-by-using-snmp.html</text:span></text:a></text:p>
      <text:p text:style-name="Normal"><text:span text:style-name="T1475">Question 15.</text:span><text:span text:style-name="T1476">111 (repeated)</text:span></text:p>
      <text:p text:style-name="P1477">Which API is used in controller-based architectures to interact with edge devices?</text:p>
      <text:p text:style-name="P1478">A. overlay<text:line-break/>B. northbound<text:line-break/>C. underlay<text:line-break/>D. southbound</text:p>
      <text:p text:style-name="P1479"> </text:p>
      <text:p text:style-name="Normal"><text:span text:style-name="T1480">Answer:</text:span><text:span text:style-name="T1481"> D</text:span></text:p>
      <text:p text:style-name="Normal"><text:span text:style-name="T1482">Explanation</text:span></text:p>
      <text:p text:style-name="P1483">The Southbound API is used to communicate with network devices.</text:p>
      <text:soft-page-break/>
      <text:p text:style-name="Normal"><text:span text:style-name="T1484"><draw:frame draw:style-name="a56" draw:name="Picture 66" text:anchor-type="as-char" svg:x="0in" svg:y="0in" svg:width="1.78472in" svg:height="2.25in" style:rel-width="scale" style:rel-height="scale"><draw:image xlink:href="media/image53.jpeg" xlink:type="simple" xlink:show="embed" xlink:actuate="onLoad"/><svg:title/><svg:desc/></draw:frame></text:span></text:p>
      <text:p text:style-name="Normal"><text:span text:style-name="T1485">Question 15.</text:span><text:span text:style-name="T1486">112 (repeated)</text:span></text:p>
      <text:p text:style-name="P1487">Which IPv6 address block forwards packets to a multicast address rather than a unicast address?</text:p>
      <text:p text:style-name="P1488">A. 2000::/3<text:line-break/>B. FC00::/7<text:line-break/>C. FE80::/10<text:line-break/>D. FF00::/12</text:p>
      <text:p text:style-name="P1489"> </text:p>
      <text:p text:style-name="Normal"><text:span text:style-name="T1490">Answer:</text:span><text:span text:style-name="T1491"> D</text:span></text:p>
      <text:p text:style-name="Normal"><text:span text:style-name="T1492">Explanation</text:span></text:p>
      <text:p text:style-name="P1493">Well-known multicast addresses have the prefix ff00::/12.</text:p>
      <text:p text:style-name="P1494">FE80::/10 range is used for link-local addresses. Link-local addresses only used for communications within the local subnetwork (automatic address configuration, neighbor discovery, router discovery, and by many routing protocols). It is only valid on the current subnet. It is usually created dynamically using a link-local prefix of FE80::/10 and a 64-bit interface identifier (based on 48-bit MAC address).</text:p>
      <text:p text:style-name="Normal"><text:span text:style-name="T1495">Question 15.</text:span><text:span text:style-name="T1496">113 (repeated)</text:span></text:p>
      <text:p text:style-name="P1497">R1 has learned route 192.168.12.0/24 via IS-IS, OSPF, RIP and Internal EIGRP. Under normal operating conditions, which routing protocol is installed in the routing table?</text:p>
      <text:soft-page-break/>
      <text:p text:style-name="P1498">A. IS-IS<text:line-break/>B. RIP<text:line-break/>C. Internal EIGRP<text:line-break/>D. OSPF</text:p>
      <text:p text:style-name="P1499"> </text:p>
      <text:p text:style-name="Normal"><text:span text:style-name="T1500">Answer:</text:span><text:span text:style-name="T1501"> C</text:span></text:p>
      <text:p text:style-name="Normal"><text:span text:style-name="T1502">Explanation</text:span></text:p>
      <text:p text:style-name="P1503">With the same route (prefix), the router will choose the routing protocol with lowest Administrative Distance (AD) to install into the routing table. The AD of Internal EIGRP (90) is lowest so it would be chosen. The table below lists the ADs of popular routing protocols.</text:p>
      <text:p text:style-name="Normal"><text:span text:style-name="T1504"><draw:frame draw:style-name="a57" draw:name="Picture 65" text:anchor-type="as-char" svg:x="0in" svg:y="0in" svg:width="3.79861in" svg:height="1.85417in" style:rel-width="scale" style:rel-height="scale"><draw:image xlink:href="media/image54.jpeg" xlink:type="simple" xlink:show="embed" xlink:actuate="onLoad"/><svg:title/><svg:desc/></draw:frame></text:span></text:p>
      <text:p text:style-name="P1505">Note: The AD of IS-IS is 115. The “EIGRP” in the table above is “Internal EIGRP”. The AD of “External EIGRP” is 170. An EIGRP external route is a route that was redistributed into EIGRP.</text:p>
      <text:p text:style-name="Normal"><text:span text:style-name="T1506">Question 15.</text:span><text:span text:style-name="T1507">114</text:span></text:p>
      <text:p text:style-name="P1508">Which type of traffic is sent with pure IPsec?</text:p>
      <text:p text:style-name="P1509">A. multicast traffic from a server at one site to hosts at another location<text:line-break/>B. spanning-tree updates between switches that are at two different sites<text:line-break/>C. broadcast packets from a switch that is attempting to locate a MAC address at one of several remote sites<text:line-break/>D. unicast messages from a host at a remote site to a server at headquarters</text:p>
      <text:p text:style-name="P1510"> </text:p>
      <text:soft-page-break/>
      <text:p text:style-name="Normal"><text:span text:style-name="T1511">Answer:</text:span><text:span text:style-name="T1512"> D</text:span></text:p>
      <text:p text:style-name="Normal"><text:span text:style-name="T1513">Explanation</text:span></text:p>
      <text:p text:style-name="P1514">Pure IPsec refers to using IPsec directly for securing network traffic without additional encapsulation protocols like GRE. It does not support:<text:line-break/>+ Broadcast<text:line-break/>+ Multicast<text:line-break/>+ Non-IP traffic (e.g., STP)</text:p>
      <text:p text:style-name="P1515">“Unicast” is the correct answer as this is exactly what IPsec is designed for: secure, point-to-point IP communication.</text:p>
      <text:p text:style-name="Normal"><text:span text:style-name="T1516">Question 15.</text:span><text:span text:style-name="T1517">115</text:span></text:p>
      <text:p text:style-name="P1518">Refer to the exhibit.</text:p>
      <text:p text:style-name="consolas">R1# show ip route | begin gateway</text:p>
      <text:p text:style-name="consolas">Gateway of last resort is not set</text:p>
      <text:p text:style-name="consolas"/>
      <text:p text:style-name="consolas"><text:s text:c="5"/>172.16.0.0/16 is variably subnetted, 3 subnets, 2 masks</text:p>
      <text:p text:style-name="consolas">C <text:s text:c="6"/>172.16.1.0/24 is directly connected, FastEthernet0/0</text:p>
      <text:p text:style-name="consolas">L <text:s text:c="6"/>172.16.1.3/32 is directly connected, FastEthernet0/0</text:p>
      <text:p text:style-name="P1519">EX <text:s text:c="5"/>172.16.2.0/24 [170/2] via 207.165.200.250, 00:00:25, Serial0/0/0</text:p>
      <text:p text:style-name="P1520">O <text:s text:c="6"/>192.168.1.0/24 [110/84437] via 207.165.200.254, 00:00:17, Serial0/0/1</text:p>
      <text:p text:style-name="P1521">D <text:s text:c="6"/>192.168.2.0/24 [90/184437] via 207.165.200.254, 00:00:15, Serial0/0/1</text:p>
      <text:p text:style-name="P1522">E1 <text:s text:c="5"/>192.168.3.0/24 [110/1851437] via 207.165.200.254, 00:00:19, Serial0/0/1</text:p>
      <text:p text:style-name="P1523"/>
      <text:p text:style-name="consolas"><text:span text:style-name="T1524"><text:s text:c="5"/></text:span>207.165.200.0/24 is variably subnetted, 4 subnets, 2 masks</text:p>
      <text:p text:style-name="consolas">C <text:s text:c="6"/>207.165.200.248/30 is directly connected, Serial0/0/0</text:p>
      <text:p text:style-name="consolas">L <text:s text:c="6"/>207.165.200.249/32 is directly connected, Serial0/0/0</text:p>
      <text:p text:style-name="consolas">C <text:s text:c="6"/>207.165.200.252/30 is directly connected, Serial0/0/1</text:p>
      <text:p text:style-name="consolas">L <text:s text:c="6"/>207.165.200.253/32 is directly connected, Serial0/0/1</text:p>
      <text:soft-page-break/>
      <text:p text:style-name="P1525">Which prefix did router R1 learn from internal EIGRP?</text:p>
      <text:p text:style-name="P1526">A. 192.168.1.0/24<text:line-break/>B. 192.168.3.0/24<text:line-break/>C. 192.168.2.0/24<text:line-break/>D. 172.16.1.0/24</text:p>
      <text:p text:style-name="P1527"> </text:p>
      <text:p text:style-name="Normal"><text:span text:style-name="T1528">Answer:</text:span><text:span text:style-name="T1529"> C</text:span></text:p>
      <text:p text:style-name="Normal"><text:span text:style-name="T1530">Explanation</text:span></text:p>
      <text:p text:style-name="Normal"><text:span text:style-name="T1531">Interal EIGRP learned routes are symbolized by letter “D” and there is only one entry with this letter in the output above: “D </text:span><text:span text:style-name="T1532">192.168.2.0/24</text:span><text:span text:style-name="T1533"> [90/184437] via 207.165.200.254, 00:00:15, Serial0/0/1″. Therefore answer C is correct.</text:span></text:p>
      <text:p text:style-name="Normal"><text:span text:style-name="T1534">Question 15.</text:span><text:span text:style-name="T1535">116 (repeated)</text:span></text:p>
      <text:p text:style-name="P1536">An engineer is configuring NAT to translate the source subnet of 10.10.0.0/24 to any one of three addresses: 192.168.3.1, 192.168.3.2, or 192.168.3.3. Which configuration should be used?</text:p>
      <table:table table:style-name="Table1537">
        <table:table-columns>
          <table:table-column table:style-name="TableColumn1538"/>
          <table:table-column table:style-name="TableColumn1539"/>
        </table:table-columns>
        <table:table-row table:style-name="TableRow1540">
          <table:table-cell table:style-name="TableCell1541">
            <text:p text:style-name="Normal"><text:span text:style-name="T1542">Option A</text:span><text:span text:style-name="T1543"><text:line-break/>enable</text:span><text:span text:style-name="T1544"><text:line-break/>configure terminal</text:span><text:span text:style-name="T1545"><text:line-break/>ip nat pool mypool 192.168.3.1 192.168.3.3 prefix-length 30</text:span><text:span text:style-name="T1546"><text:line-break/>route-map permit 10.10.0.0 255.255.255.0</text:span><text:span text:style-name="T1547"><text:line-break/>ip nat outside destination list 1 pool mypool</text:span><text:span text:style-name="T1548"><text:line-break/>interface g1/1</text:span><text:span text:style-name="T1549"><text:line-break/>ip nat inside</text:span><text:span text:style-name="T1550"><text:line-break/>interface g1/2</text:span><text:span text:style-name="T1551"><text:line-break/>ip nat outside</text:span></text:p>
          </table:table-cell>
          <table:table-cell table:style-name="TableCell1552">
            <text:p text:style-name="Normal"><text:span text:style-name="T1553">Option B</text:span><text:span text:style-name="T1554"><text:line-break/>enable</text:span><text:span text:style-name="T1555"><text:line-break/>configure terminal</text:span><text:span text:style-name="T1556"><text:line-break/>ip nat pool mypool 192.168.3.1 192.168.3.3 prefix-length 30</text:span><text:span text:style-name="T1557"><text:line-break/>access-list 1 permit 10.10.0.0 0.0.0.255</text:span><text:span text:style-name="T1558"><text:line-break/>ip nat outside destination list 1 pool mypool</text:span><text:span text:style-name="T1559"><text:line-break/>interface g1/1</text:span><text:span text:style-name="T1560"><text:line-break/>ip nat inside</text:span><text:span text:style-name="T1561"><text:line-break/>interface g1/2</text:span><text:span text:style-name="T1562"><text:line-break/>ip nat outside</text:span></text:p>
          </table:table-cell>
        </table:table-row>
        <table:table-row table:style-name="TableRow1563">
          <table:table-cell table:style-name="TableCell1564">
            <text:p text:style-name="Normal"><text:span text:style-name="T1565">Option C</text:span><text:span text:style-name="T1566"><text:line-break/></text:span><text:span text:style-name="T1567">enable</text:span><text:span text:style-name="T1568"><text:line-break/></text:span><text:soft-page-break/><text:span text:style-name="T1569">configure terminal</text:span><text:span text:style-name="T1570"><text:line-break/>ip nat pool mypool 192.168.3.1 192.168.3.3 prefix-length 30</text:span><text:span text:style-name="T1571"><text:line-break/>access-list 1 permit 10.10.0.0 0.0.0.255</text:span><text:span text:style-name="T1572"><text:line-break/>ip nat inside source list 1 pool mypool</text:span><text:span text:style-name="T1573"><text:line-break/>interface g1/1</text:span><text:span text:style-name="T1574"><text:line-break/>ip nat inside</text:span><text:span text:style-name="T1575"><text:line-break/>interface g1/2</text:span><text:span text:style-name="T1576"><text:line-break/>ip nat outside</text:span></text:p>
          </table:table-cell>
          <table:table-cell table:style-name="TableCell1577">
            <text:p text:style-name="Normal"><text:span text:style-name="T1578">Option D</text:span><text:span text:style-name="T1579"><text:line-break/></text:span><text:span text:style-name="T1580">enable</text:span><text:span text:style-name="T1581"><text:line-break/></text:span><text:soft-page-break/><text:span text:style-name="T1582">configure terminal</text:span><text:span text:style-name="T1583"><text:line-break/>ip nat pool mypool 192.168.3.1 192.168.3.3 prefix-length 30</text:span><text:span text:style-name="T1584"><text:line-break/>access-list 1 permit 10.10.0.0 0.0.0.254</text:span><text:span text:style-name="T1585"><text:line-break/>ip nat inside source list 1 pool mypool</text:span><text:span text:style-name="T1586"><text:line-break/>interface g1/1</text:span><text:span text:style-name="T1587"><text:line-break/>ip nat inside</text:span><text:span text:style-name="T1588"><text:line-break/>interface g1/2</text:span><text:span text:style-name="T1589"><text:line-break/>ip nat outside</text:span></text:p>
          </table:table-cell>
        </table:table-row>
      </table:table>
      <text:soft-page-break/>
      <text:p text:style-name="P1590">A. Option A<text:line-break/>B. Option B<text:line-break/>C. Option C<text:line-break/>D. Option D</text:p>
      <text:p text:style-name="P1591"> </text:p>
      <text:p text:style-name="Normal"><text:span text:style-name="T1592">Answer:</text:span><text:span text:style-name="T1593"> C</text:span></text:p>
      <text:p text:style-name="Normal"><text:span text:style-name="T1594">Explanation</text:span></text:p>
      <text:p text:style-name="P1595">The command “ip nat inside source list 1 pool mypool” (notice the keyword “inside”, not “outside”).</text:p>
      <text:p text:style-name="P1596">This command translates all source addresses that pass access list 1, which means a source address from 10.10.0.0/24, into an address from the pool named mypool (the pool contains addresses from 192.168.3.1 to 192.168.3.3).</text:p>
      <text:p text:style-name="Normal"><text:span text:style-name="T1597">Question 15.</text:span><text:span text:style-name="T1598">117 (repeated)</text:span></text:p>
      <text:p text:style-name="P1599">Drag the characteristics of network architectures from the left onto the type of architecture on the right.</text:p>
      <text:soft-page-break/>
      <text:p text:style-name="Normal"><text:span text:style-name="T1600"><draw:frame draw:style-name="a58" draw:name="Picture 64" text:anchor-type="as-char" svg:x="0in" svg:y="0in" svg:width="6.5in" svg:height="2.76319in" style:rel-width="scale" style:rel-height="scale"><draw:image xlink:href="media/image55.jpeg" xlink:type="simple" xlink:show="embed" xlink:actuate="onLoad"/><svg:title/><svg:desc/></draw:frame></text:span></text:p>
      <text:p text:style-name="P1601"> </text:p>
      <text:p text:style-name="Normal"><text:span text:style-name="T1602">Answer:</text:span></text:p>
      <text:p text:style-name="Normal"><text:span text:style-name="T1603">Collapsed Core</text:span><text:span text:style-name="T1604"><text:line-break/>+ most appropriate for small network designs</text:span><text:span text:style-name="T1605"><text:line-break/>+ single device handles the core and the distribution layer</text:span><text:span text:style-name="T1606"><text:line-break/>+ more cost-effective than other options</text:span></text:p>
      <text:p text:style-name="Normal"><text:span text:style-name="T1607">Three-Tier</text:span><text:span text:style-name="T1608"><text:line-break/>+ separate devices handle the core and the distribution layer</text:span><text:span text:style-name="T1609"><text:line-break/>+ enhances network availability</text:span></text:p>
      <text:p text:style-name="Normal"><text:span text:style-name="T1610">Explanation</text:span></text:p>
      <text:p text:style-name="Normal"><text:span text:style-name="T1611">The three-tier hierarchical design maximizes performance, network availability, and the ability to scale the network design.</text:span><text:span text:style-name="T1612"><text:line-break/>However, many small enterprise networks do not grow significantly larger over time. Therefore, a two-tier hierarchical design where the core and distribution layers are collapsed into one layer is often more practical. </text:span><text:span text:style-name="T1613">A “collapsed core” is when the distribution layer and core layer functions are implemented by a single device</text:span><text:span text:style-name="T1614">. The primary motivation for the collapsed core design is reducing network cost, while maintaining most of the benefits of the three-tier hierarchical model.</text:span></text:p>
      <text:p text:style-name="Normal"><text:span text:style-name="T1615">Reference: </text:span><text:a xlink:href="https://www.ciscopress.com/articles/article.asp?p=2202410&amp;seqNum=4" office:target-frame-name="_blank" xlink:show="new"><text:span text:style-name="T1616">https://www.ciscopress.com/articles/article.asp?p=2202410&amp;seqNum=4</text:span></text:a></text:p>
      <text:soft-page-break/>
      <text:p text:style-name="P1617">A collapsed core network is shown below. The collapsed core network may be deployed with redundant core/distribution router, or consolidated core/distribution router.</text:p>
      <text:p text:style-name="Normal"><text:span text:style-name="T1618"><draw:frame draw:style-name="a59" draw:name="Picture 63" text:anchor-type="as-char" svg:x="0in" svg:y="0in" svg:width="6.5in" svg:height="4.02361in" style:rel-width="scale" style:rel-height="scale"><draw:image xlink:href="media/image56.jpeg" xlink:type="simple" xlink:show="embed" xlink:actuate="onLoad"/><svg:title/><svg:desc/></draw:frame></text:span></text:p>
      <text:p text:style-name="Normal"><text:span text:style-name="T1619">Question 15.</text:span><text:span text:style-name="T1620">118 (repeated)</text:span></text:p>
      <text:p text:style-name="P1621">How does HSRP provide first hop redundancy?</text:p>
      <text:p text:style-name="P1622">A. It load-balances traffic by assigning the same metric value to more than one route to the same destination in the IP routing table<text:line-break/>B. It load-balances Layer 2 traffic along the path by flooding traffic out all interfaces configured with the same VLAN<text:line-break/>C. It forwards multiple packets to the same destination over different routed links and data path<text:line-break/>D. It uses a shared virtual MAC and a virtual IP address to a group of routers that serve as the default gateway for hosts on a LAN</text:p>
      <text:p text:style-name="P1623"> </text:p>
      <text:p text:style-name="Normal"><text:span text:style-name="T1624">Answer:</text:span><text:span text:style-name="T1625"> D</text:span></text:p>
      <text:p text:style-name="Normal"><text:span text:style-name="T1626">Question 15.</text:span><text:span text:style-name="T1627">119 (repeated)</text:span></text:p>
      <text:soft-page-break/>
      <text:p text:style-name="P1628">What is a function of TFTP in network operations?</text:p>
      <text:p text:style-name="P1629">A. transfers a configuration files from a server to a router on a congested link<text:line-break/>B. transfers IOS images from a server to a router for firmware upgrades<text:line-break/>C. transfers a backup configuration file from a server to a switch using a username and password<text:line-break/>D. transfers files between file systems on a router</text:p>
      <text:p text:style-name="P1630"> </text:p>
      <text:p text:style-name="Normal"><text:span text:style-name="T1631">Answer:</text:span><text:span text:style-name="T1632"> B</text:span></text:p>
      <text:p text:style-name="Normal"><text:span text:style-name="T1633">Question 15.</text:span><text:span text:style-name="T1634">120</text:span></text:p>
      <text:p text:style-name="P1635">Drag and drop the protocol characteristics from the left onto the corresponding types on the right. Not all characteristics are used.</text:p>
      <text:p text:style-name="Normal"><text:span text:style-name="T1636"><draw:frame draw:style-name="a60" draw:name="Picture 62" text:anchor-type="as-char" svg:x="0in" svg:y="0in" svg:width="6.5in" svg:height="3.41042in" style:rel-width="scale" style:rel-height="scale"><draw:image xlink:href="media/image57.jpeg" xlink:type="simple" xlink:show="embed" xlink:actuate="onLoad"/><svg:title/><svg:desc/></draw:frame></text:span></text:p>
      <text:p text:style-name="Normal"><text:span text:style-name="T1637">Answer:</text:span></text:p>
      <text:p text:style-name="Normal"><text:span text:style-name="T1638">TCP</text:span><text:span text:style-name="T1639"><text:line-break/>+ acknowledgement mechanism</text:span><text:span text:style-name="T1640"><text:line-break/>+ guaranteed transmission</text:span></text:p>
      <text:soft-page-break/>
      <text:p text:style-name="Normal"><text:span text:style-name="T1641">UDP</text:span><text:span text:style-name="T1642"><text:line-break/>+ low overhead</text:span><text:span text:style-name="T1643"><text:line-break/>+ connectionless</text:span></text:p>
      <text:p text:style-name="Normal"><text:span text:style-name="T1644">Explanation</text:span></text:p>
      <text:p text:style-name="P1645">Note: UDP has error checking through a checksum. But it doesn’t recover from errors. It only detects them.</text:p>
      <text:p text:style-name="Normal"><text:span text:style-name="T1646">Question 15.</text:span><text:span text:style-name="T1647">121</text:span></text:p>
      <text:p text:style-name="P1648">Refer to the exhibit.</text:p>
      <text:p text:style-name="consolas">Router#show ip route</text:p>
      <text:p text:style-name="consolas"/>
      <text:p text:style-name="consolas">Gateway of last resort is 172.17.0.2 to network 0.0.0.0</text:p>
      <text:p text:style-name="consolas"/>
      <text:p text:style-name="consolas">S* 0.0.0.0/0 [1/0] via 172.17.0.2 <text:s/></text:p>
      <text:p text:style-name="consolas">10.0.0.0/8 is variably subnetted, 412 subnets, 10 masks <text:s/></text:p>
      <text:p text:style-name="P1649">O E2 10.0.0.0/16 [110/10] via 10.2.24.1, 7w0d, Vlan82 <text:s/></text:p>
      <text:p text:style-name="P1650">O 10.2.17.0/24 [110/6] via 10.2.24.1, 6w4d, vlan82 <text:s/></text:p>
      <text:p text:style-name="P1651">O 10.2.17.0/24 [110/6] via 10.2.24.1, 6w4d, vlan82 <text:s/></text:p>
      <text:p text:style-name="P1652">O 10.2.23.0/24 [110/6] via 10.2.24.1, 7w0d, vlan82 <text:s/></text:p>
      <text:p text:style-name="consolas">--output suppressed-- <text:s/></text:p>
      <text:p text:style-name="consolas">C 10.173.5.0/24 is directly connected, vlan283 <text:s/></text:p>
      <text:p text:style-name="consolas">L 10.173.5.2/32 is directly connected, vlan283</text:p>
      <text:p text:style-name="P1653">What is the value of the administrative distance for the default gateway?</text:p>
      <text:p text:style-name="P1654">A. 110<text:line-break/>B. 0<text:line-break/>C. 1<text:line-break/>D. 10</text:p>
      <text:p text:style-name="P1655"> </text:p>
      <text:p text:style-name="Normal"><text:span text:style-name="T1656">Answer:</text:span><text:span text:style-name="T1657"> C</text:span></text:p>
      <text:soft-page-break/>
      <text:p text:style-name="Normal"><text:span text:style-name="T1658">Explanation</text:span></text:p>
      <text:p text:style-name="P1659">From the line “Gateway of last resort is 172.17.0.2”, we learn that 172.17.0.2 is the default gateway of this router. And from the line “S* 0.0.0.0/0 [1/0] via 172.17.0.2”, we learn the AD of this route is 1 (the first parameter).</text:p>
      <text:p text:style-name="P16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consolas" style:display-name="consolas" style:family="paragraph" style:parent-style-name="Normal">
      <style:text-properties style:font-name="Consolas" style:font-name-complex="Times New Roman" fo:font-size="11pt" style:font-size-asian="11pt" style:font-size-complex="14pt" fo:hyphenate="false"/>
    </style:style>
    <style:style style:name="consolasChar" style:display-name="consolas Char" style:family="text" style:parent-style-name="DefaultParagraphFont">
      <style:text-properties style:font-name="Consolas" style:font-name-complex="Times New Roman" fo:font-size="11pt" style:font-size-asian="11pt" style:font-size-complex="14pt"/>
    </style:style>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ccnaquestionsnumber" style:display-name="ccnaquestionsnumber" style:family="text" style:parent-style-name="DefaultParagraphFont"/>
    <style:style style:name="ccnacorrectanswers" style:display-name="ccnacorrectanswers" style:family="text" style:parent-style-name="DefaultParagraphFont"/>
    <style:style style:name="ccnaexplanation" style:display-name="ccnaexplanation" style:family="text" style:parent-style-name="DefaultParagraphFon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pinkandbold" style:display-name="pinkandbold"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fontstyle0" style:display-name="fontstyle0" style:family="text" style:parent-style-name="DefaultParagraphFon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oang Ngoc Lien D24CC01</meta:initial-creator>
    <dc:creator>Hoang Ngoc Lien D24CC01</dc:creator>
    <meta:creation-date>2026-05-06T14:14:00Z</meta:creation-date>
    <dc:date>2026-05-06T14:36:00Z</dc:date>
    <meta:template xlink:href="Normal.dotm" xlink:type="simple"/>
    <meta:editing-cycles>2</meta:editing-cycles>
    <meta:editing-duration>PT720S</meta:editing-duration>
    <meta:document-statistic meta:page-count="107" meta:paragraph-count="188" meta:word-count="14109" meta:character-count="94348" meta:row-count="670" meta:non-whitespace-character-count="80427"/>
  </office:meta>
</office:document-meta>
</file>