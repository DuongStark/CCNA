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1.jpeg" manifest:media-type="image/jpe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P6" style:parent-style-name="Normal" style:family="paragraph">
      <style:text-properties style:font-name="Times New Roman" style:font-name-complex="Times New Roman" fo:font-size="14pt" style:font-size-asian="14pt" style:font-size-complex="14pt"/>
    </style:style>
    <style:style style:name="P7" style:parent-style-name="Normal" style:family="paragraph">
      <style:text-properties style:font-name="Times New Roman" style:font-name-complex="Times New Roman" fo:font-size="14pt" style:font-size-asian="14pt" style:font-size-complex="14pt"/>
    </style:style>
    <style:style style:name="P8" style:parent-style-name="Normal" style:family="paragraph">
      <style:text-properties style:font-name="Times New Roman" style:font-name-complex="Times New Roman" fo:font-size="14pt" style:font-size-asian="14pt" style:font-size-complex="14pt"/>
    </style:style>
    <style:style style:name="P9" style:parent-style-name="Normal" style:family="paragraph">
      <style:text-properties style:font-name="Times New Roman" style:font-name-complex="Times New Roman" fo:font-size="14pt" style:font-size-asian="14pt" style:font-size-complex="14pt"/>
    </style:style>
    <style:style style:name="P10" style:parent-style-name="Normal" style:family="paragraph">
      <style:text-properties style:font-name="Times New Roman" style:font-name-complex="Times New Roman" fo:font-size="14pt" style:font-size-asian="14pt" style:font-size-complex="14pt"/>
    </style:style>
    <style:style style:name="P11" style:parent-style-name="Normal" style:family="paragraph">
      <style:text-properties style:font-name="Times New Roman" style:font-name-complex="Times New Roman"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 style:parent-style-name="DefaultParagraphFont" style:family="text">
      <style:text-properties style:font-name="Times New Roman" style:font-name-complex="Times New Roman" fo:font-size="14pt" style:font-size-asian="14pt" style:font-size-complex="14pt"/>
    </style:style>
    <style:style style:name="T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 style:parent-style-name="Normal" style:family="paragraph">
      <style:text-properties style:font-name="Times New Roman" style:font-name-complex="Times New Roman" fo:font-size="14pt" style:font-size-asian="14pt" style:font-size-complex="14pt"/>
    </style:style>
    <style:style style:name="T18" style:parent-style-name="DefaultParagraphFont" style:family="text">
      <style:text-properties style:font-name="Times New Roman" style:font-name-complex="Times New Roman" fo:font-size="14pt" style:font-size-asian="14pt" style:font-size-complex="14pt"/>
    </style:style>
    <style:style style:name="P19" style:parent-style-name="Normal" style:family="paragraph">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size="14pt" style:font-size-asian="14pt" style:font-size-complex="14pt"/>
    </style:style>
    <style:style style:name="T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 style:parent-style-name="DefaultParagraphFont" style:family="text">
      <style:text-properties style:font-name="Times New Roman" style:font-name-complex="Times New Roman"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Hyperlink" style:family="text">
      <style:text-properties style:font-name="Times New Roman" style:font-name-complex="Times New Roman" fo:font-size="14pt" style:font-size-asian="14pt" style:font-size-complex="14pt"/>
    </style:style>
    <style:style style:name="T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size="14pt" style:font-size-asian="14pt" style:font-size-complex="14pt"/>
    </style:style>
    <style:style style:name="P40" style:parent-style-name="Normal" style:family="paragraph">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 style:parent-style-name="DefaultParagraphFont" style:family="text">
      <style:text-properties style:font-name="Times New Roman" style:font-name-complex="Times New Roman" fo:font-size="14pt" style:font-size-asian="14pt" style:font-size-complex="14pt"/>
    </style:style>
    <style:style style:name="T44" style:parent-style-name="DefaultParagraphFont" style:family="text">
      <style:text-properties style:font-name="Times New Roman" style:font-name-complex="Times New Roman" fo:font-size="14pt" style:font-size-asian="14pt" style:font-size-complex="14pt"/>
    </style:style>
    <style:style style:name="T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DefaultParagraphFont" style:family="text">
      <style:text-properties style:font-name="Times New Roman" style:font-name-complex="Times New Roman" fo:font-size="14pt" style:font-size-asian="14pt" style:font-size-complex="14pt"/>
    </style:style>
    <style:style style:name="T47" style:parent-style-name="DefaultParagraphFont" style:family="text">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 style:parent-style-name="Normal" style:family="paragraph">
      <style:text-properties style:font-name="Times New Roman" style:font-name-complex="Times New Roman" fo:font-size="14pt" style:font-size-asian="14pt" style:font-size-complex="14pt"/>
    </style:style>
    <style:style style:name="P51" style:parent-style-name="Normal" style:family="paragraph">
      <style:text-properties style:font-name="Times New Roman" style:font-name-complex="Times New Roman" fo:font-size="14pt" style:font-size-asian="14pt" style:font-size-complex="14pt"/>
    </style:style>
    <style:style style:name="P52" style:parent-style-name="Normal" style:family="paragraph">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 style:parent-style-name="Normal" style:family="paragraph">
      <style:text-properties style:font-name="Times New Roman" style:font-name-complex="Times New Roman" fo:font-size="14pt" style:font-size-asian="14pt" style:font-size-complex="14pt"/>
    </style:style>
    <style:style style:name="P58" style:parent-style-name="Normal" style:family="paragraph">
      <style:text-properties style:font-name="Times New Roman" style:font-name-complex="Times New Roman" fo:font-size="14pt" style:font-size-asian="14pt" style:font-size-complex="14pt"/>
    </style:style>
    <style:style style:name="P59" style:parent-style-name="Normal" style:family="paragraph">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 style:parent-style-name="DefaultParagraphFont" style:family="text">
      <style:text-properties style:font-name="Times New Roman" style:font-name-complex="Times New Roman" fo:font-size="14pt" style:font-size-asian="14pt" style:font-size-complex="14pt"/>
    </style:style>
    <style:style style:name="T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 style:parent-style-name="Normal" style:family="paragraph">
      <style:text-properties style:font-name="Times New Roman" style:font-name-complex="Times New Roman" fo:font-size="14pt" style:font-size-asian="14pt" style:font-size-complex="14pt"/>
    </style:style>
    <style:style style:name="T65" style:parent-style-name="DefaultParagraphFont" style:family="text">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T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 style:parent-style-name="DefaultParagraphFont" style:family="text">
      <style:text-properties style:font-name="Times New Roman" style:font-name-complex="Times New Roman" fo:font-size="14pt" style:font-size-asian="14pt" style:font-size-complex="14pt"/>
    </style:style>
    <style:style style:name="T70" style:parent-style-name="DefaultParagraphFont" style:family="text">
      <style:text-properties style:font-name="Times New Roman" style:font-name-complex="Times New Roman"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style:font-name-complex="Times New Roman"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T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 style:parent-style-name="DefaultParagraphFont" style:family="text">
      <style:text-properties style:font-name="Times New Roman" style:font-name-complex="Times New Roman" fo:font-size="14pt" style:font-size-asian="14pt" style:font-size-complex="14pt"/>
    </style:style>
    <style:style style:name="T76" style:parent-style-name="DefaultParagraphFont" style:family="text">
      <style:text-properties style:font-name="Times New Roman" style:font-name-complex="Times New Roman" fo:font-size="14pt" style:font-size-asian="14pt" style:font-size-complex="14pt"/>
    </style:style>
    <style:style style:name="T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 style:parent-style-name="DefaultParagraphFont" style:family="text">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T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 style:parent-style-name="DefaultParagraphFont" style:family="text">
      <style:text-properties style:font-name="Times New Roman" style:font-name-complex="Times New Roman" fo:font-size="14pt" style:font-size-asian="14pt" style:font-size-complex="14pt"/>
    </style:style>
    <style:style style:name="T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 style:parent-style-name="DefaultParagraphFont" style:family="text">
      <style:text-properties style:font-name="Times New Roman" style:font-name-complex="Times New Roman" fo:font-size="14pt" style:font-size-asian="14pt" style:font-size-complex="14pt"/>
    </style:style>
    <style:style style:name="T8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5" style:parent-style-name="DefaultParagraphFont" style:family="text">
      <style:text-properties style:font-name="Times New Roman" style:font-name-complex="Times New Roman" fo:font-size="14pt" style:font-size-asian="14pt" style:font-size-complex="14pt"/>
    </style:style>
    <style:style style:name="T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P89" style:parent-style-name="Normal" style:family="paragraph">
      <style:text-properties style:font-name="Times New Roman" style:font-name-complex="Times New Roman" fo:font-size="14pt" style:font-size-asian="14pt" style:font-size-complex="14pt"/>
    </style:style>
    <style:style style:name="T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 style:parent-style-name="DefaultParagraphFont" style:family="text">
      <style:text-properties style:font-name="Times New Roman" style:font-name-complex="Times New Roman" fo:font-size="14pt" style:font-size-asian="14pt" style:font-size-complex="14pt"/>
    </style:style>
    <style:style style:name="T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6" style:parent-style-name="Normal" style:family="paragraph">
      <style:text-properties style:font-name="Times New Roman" style:font-name-complex="Times New Roman" fo:font-size="14pt" style:font-size-asian="14pt" style:font-size-complex="14pt"/>
    </style:style>
    <style:style style:name="P97" style:parent-style-name="Normal" style:family="paragraph">
      <style:text-properties style:font-name="Times New Roman" style:font-name-complex="Times New Roman" fo:font-size="14pt" style:font-size-asian="14pt" style:font-size-complex="14pt"/>
    </style:style>
    <style:style style:name="P98" style:parent-style-name="Normal" style:family="paragraph">
      <style:text-properties style:font-name="Times New Roman" style:font-name-complex="Times New Roman" fo:font-size="14pt" style:font-size-asian="14pt" style:font-size-complex="14pt"/>
    </style:style>
    <style:style style:name="T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2" style:parent-style-name="Normal" style:family="paragraph">
      <style:text-properties style:font-name="Times New Roman" style:font-name-complex="Times New Roman"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T104" style:parent-style-name="DefaultParagraphFont" style:family="text">
      <style:text-properties style:font-name="Times New Roman" style:font-name-complex="Times New Roman" fo:font-size="14pt" style:font-size-asian="14pt" style:font-size-complex="14pt"/>
    </style:style>
    <style:style style:name="T105" style:parent-style-name="Hyperlink" style:family="text">
      <style:text-properties style:font-name="Times New Roman" style:font-name-complex="Times New Roman" fo:font-size="14pt" style:font-size-asian="14pt" style:font-size-complex="14pt"/>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 style:parent-style-name="Normal" style:family="paragraph">
      <style:text-properties style:font-name="Times New Roman" style:font-name-complex="Times New Roman" fo:font-size="14pt" style:font-size-asian="14pt" style:font-size-complex="14pt"/>
    </style:style>
    <style:style style:name="T109" style:parent-style-name="DefaultParagraphFont" style:family="text">
      <style:text-properties style:font-name="Times New Roman" style:font-name-complex="Times New Roman" fo:font-size="14pt" style:font-size-asian="14pt" style:font-size-complex="14pt"/>
    </style:style>
    <style:style style:name="P110" style:parent-style-name="Normal" style:family="paragraph">
      <style:text-properties style:font-name="Times New Roman" style:font-name-complex="Times New Roman" fo:font-size="14pt" style:font-size-asian="14pt" style:font-size-complex="14pt"/>
    </style:style>
    <style:style style:name="T1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 style:parent-style-name="DefaultParagraphFont" style:family="text">
      <style:text-properties style:font-name="Times New Roman" style:font-name-complex="Times New Roman" fo:font-size="14pt" style:font-size-asian="14pt" style:font-size-complex="14pt"/>
    </style:style>
    <style:style style:name="T114" style:parent-style-name="DefaultParagraphFont" style:family="text">
      <style:text-properties style:font-name="Times New Roman" style:font-name-complex="Times New Roman" fo:font-size="14pt" style:font-size-asian="14pt" style:font-size-complex="14pt"/>
    </style:style>
    <style:style style:name="T1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 style:parent-style-name="DefaultParagraphFont" style:family="text">
      <style:text-properties style:font-name="Times New Roman" style:font-name-complex="Times New Roman" fo:font-size="14pt" style:font-size-asian="14pt" style:font-size-complex="14pt"/>
    </style:style>
    <style:style style:name="T117" style:parent-style-name="DefaultParagraphFont" style:family="text">
      <style:text-properties style:font-name="Times New Roman" style:font-name-complex="Times New Roman" fo:font-size="14pt" style:font-size-asian="14pt" style:font-size-complex="14pt"/>
    </style:style>
    <style:style style:name="T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 style:parent-style-name="DefaultParagraphFont" style:family="text">
      <style:text-properties style:font-name="Times New Roman" style:font-name-complex="Times New Roman" fo:font-size="14pt" style:font-size-asian="14pt" style:font-size-complex="14pt"/>
    </style:style>
    <style:style style:name="T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 style:parent-style-name="DefaultParagraphFont" style:family="text">
      <style:text-properties style:font-name="Times New Roman" style:font-name-complex="Times New Roman"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4" style:parent-style-name="Normal" style:family="paragraph">
      <style:text-properties style:font-name="Times New Roman" style:font-name-complex="Times New Roman" fo:font-size="14pt" style:font-size-asian="14pt" style:font-size-complex="14pt"/>
    </style:style>
    <style:style style:name="P125" style:parent-style-name="Normal" style:family="paragraph">
      <style:text-properties style:font-name="Times New Roman" style:font-name-complex="Times New Roman" fo:font-size="14pt" style:font-size-asian="14pt" style:font-size-complex="14pt"/>
    </style:style>
    <style:style style:name="P126" style:parent-style-name="Normal" style:family="paragraph">
      <style:text-properties style:font-name="Times New Roman" style:font-name-complex="Times New Roman" fo:font-size="14pt" style:font-size-asian="14pt" style:font-size-complex="14pt"/>
    </style:style>
    <style:style style:name="T1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 style:parent-style-name="DefaultParagraphFont" style:family="text">
      <style:text-properties style:font-name="Times New Roman" style:font-name-complex="Times New Roman" fo:font-size="14pt" style:font-size-asian="14pt" style:font-size-complex="14pt"/>
    </style:style>
    <style:style style:name="T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0" style:parent-style-name="Normal" style:family="paragraph">
      <style:text-properties style:font-name="Times New Roman" style:font-name-complex="Times New Roman" fo:font-size="14pt" style:font-size-asian="14pt" style:font-size-complex="14pt"/>
    </style:style>
    <style:style style:name="T131" style:parent-style-name="DefaultParagraphFont" style:family="text">
      <style:text-properties style:font-name="Times New Roman" style:font-name-complex="Times New Roman" fo:font-size="14pt" style:font-size-asian="14pt" style:font-size-complex="14pt"/>
    </style:style>
    <style:style style:name="T132" style:parent-style-name="Hyperlink" style:family="text">
      <style:text-properties style:font-name="Times New Roman" style:font-name-complex="Times New Roman" fo:font-size="14pt" style:font-size-asian="14pt" style:font-size-complex="14pt"/>
    </style:style>
    <style:style style:name="T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5" style:parent-style-name="Normal" style:family="paragraph">
      <style:text-properties style:font-name="Times New Roman" style:font-name-complex="Times New Roman" fo:font-size="14pt" style:font-size-asian="14pt" style:font-size-complex="14pt"/>
    </style:style>
    <style:style style:name="P136" style:parent-style-name="Normal" style:family="paragraph">
      <style:text-properties style:font-name="Times New Roman" style:font-name-complex="Times New Roman" fo:font-size="14pt" style:font-size-asian="14pt" style:font-size-complex="14pt"/>
    </style:style>
    <style:style style:name="P137" style:parent-style-name="Normal" style:family="paragraph">
      <style:text-properties style:font-name="Times New Roman" style:font-name-complex="Times New Roman"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 style:parent-style-name="DefaultParagraphFont" style:family="text">
      <style:text-properties style:font-name="Times New Roman" style:font-name-complex="Times New Roman" fo:font-size="14pt" style:font-size-asian="14pt" style:font-size-complex="14pt"/>
    </style:style>
    <style:style style:name="T1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2" style:parent-style-name="Normal" style:family="paragraph">
      <style:text-properties style:font-name="Times New Roman" style:font-name-complex="Times New Roman" fo:font-size="14pt" style:font-size-asian="14pt" style:font-size-complex="14pt"/>
    </style:style>
    <style:style style:name="T143" style:parent-style-name="DefaultParagraphFont" style:family="text">
      <style:text-properties style:font-name="Times New Roman" style:font-name-complex="Times New Roman" fo:font-size="14pt" style:font-size-asian="14pt" style:font-size-complex="14pt"/>
    </style:style>
    <style:style style:name="P144" style:parent-style-name="Normal" style:family="paragraph">
      <style:text-properties style:font-name="Times New Roman" style:font-name-complex="Times New Roman" fo:font-size="14pt" style:font-size-asian="14pt" style:font-size-complex="14pt"/>
    </style:style>
    <style:style style:name="T1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7" style:parent-style-name="DefaultParagraphFont" style:family="text">
      <style:text-properties style:font-name="Times New Roman" style:font-name-complex="Times New Roman" fo:font-size="14pt" style:font-size-asian="14pt" style:font-size-complex="14pt"/>
    </style:style>
    <style:style style:name="T148" style:parent-style-name="DefaultParagraphFont" style:family="text">
      <style:text-properties style:font-name="Times New Roman" style:font-name-complex="Times New Roman" fo:font-size="14pt" style:font-size-asian="14pt" style:font-size-complex="14pt"/>
    </style:style>
    <style:style style:name="T1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0" style:parent-style-name="DefaultParagraphFont" style:family="text">
      <style:text-properties style:font-name="Times New Roman" style:font-name-complex="Times New Roman" fo:font-size="14pt" style:font-size-asian="14pt" style:font-size-complex="14pt"/>
    </style:style>
    <style:style style:name="T151" style:parent-style-name="DefaultParagraphFont" style:family="text">
      <style:text-properties style:font-name="Times New Roman" style:font-name-complex="Times New Roman" fo:font-size="14pt" style:font-size-asian="14pt" style:font-size-complex="14pt"/>
    </style:style>
    <style:style style:name="T1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 style:parent-style-name="DefaultParagraphFont" style:family="text">
      <style:text-properties style:font-name="Times New Roman" style:font-name-complex="Times New Roman" fo:font-size="14pt" style:font-size-asian="14pt" style:font-size-complex="14pt"/>
    </style:style>
    <style:style style:name="T15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55" style:parent-style-name="DefaultParagraphFont" style:family="text">
      <style:text-properties style:font-name="Times New Roman" style:font-name-complex="Times New Roman" fo:font-size="14pt" style:font-size-asian="14pt" style:font-size-complex="14pt"/>
    </style:style>
    <style:style style:name="T156" style:parent-style-name="DefaultParagraphFont" style:family="text">
      <style:text-properties style:font-name="Times New Roman" style:font-name-complex="Times New Roman" fo:font-size="14pt" style:font-size-asian="14pt" style:font-size-complex="14pt"/>
    </style:style>
    <style:style style:name="T157" style:parent-style-name="Hyperlink" style:family="text">
      <style:text-properties style:font-name="Times New Roman" style:font-name-complex="Times New Roman" fo:font-size="14pt" style:font-size-asian="14pt" style:font-size-complex="14pt"/>
    </style:style>
    <style:style style:name="T1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0" style:parent-style-name="Normal" style:family="paragraph">
      <style:text-properties style:font-name="Times New Roman" style:font-name-complex="Times New Roman" fo:font-size="14pt" style:font-size-asian="14pt" style:font-size-complex="14pt"/>
    </style:style>
    <style:style style:name="P161" style:parent-style-name="Normal" style:family="paragraph">
      <style:text-properties style:font-name="Times New Roman" style:font-name-complex="Times New Roman" fo:font-size="14pt" style:font-size-asian="14pt" style:font-size-complex="14pt"/>
    </style:style>
    <style:style style:name="P162" style:parent-style-name="Normal" style:family="paragraph">
      <style:text-properties style:font-name="Times New Roman" style:font-name-complex="Times New Roman" fo:font-size="14pt" style:font-size-asian="14pt" style:font-size-complex="14pt"/>
    </style:style>
    <style:style style:name="T1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4" style:parent-style-name="DefaultParagraphFont" style:family="text">
      <style:text-properties style:font-name="Times New Roman" style:font-name-complex="Times New Roman" fo:font-size="14pt" style:font-size-asian="14pt" style:font-size-complex="14pt"/>
    </style:style>
    <style:style style:name="T1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6" style:parent-style-name="DefaultParagraphFont" style:family="text">
      <style:text-properties style:font-name="Times New Roman" style:font-name-complex="Times New Roman"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68" style:parent-style-name="DefaultParagraphFont" style:family="text">
      <style:text-properties style:font-name="Times New Roman" style:font-name-complex="Times New Roman" fo:font-size="14pt" style:font-size-asian="14pt" style:font-size-complex="14pt"/>
    </style:style>
    <style:style style:name="T169" style:parent-style-name="DefaultParagraphFont" style:family="text">
      <style:text-properties style:font-name="Times New Roman" style:font-name-complex="Times New Roman" fo:font-size="14pt" style:font-size-asian="14pt" style:font-size-complex="14pt"/>
    </style:style>
    <style:style style:name="T170" style:parent-style-name="Hyperlink" style:family="text">
      <style:text-properties style:font-name="Times New Roman" style:font-name-complex="Times New Roman" fo:font-size="14pt" style:font-size-asian="14pt" style:font-size-complex="14pt"/>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3" style:parent-style-name="Normal" style:family="paragraph">
      <style:text-properties style:font-name="Times New Roman" style:font-name-complex="Times New Roman" fo:font-size="14pt" style:font-size-asian="14pt" style:font-size-complex="14pt"/>
    </style:style>
    <style:style style:name="P174" style:parent-style-name="Normal" style:family="paragraph">
      <style:text-properties style:font-name="Times New Roman" style:font-name-complex="Times New Roman" fo:font-size="14pt" style:font-size-asian="14pt" style:font-size-complex="14pt" fo:language="it" fo:country="I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6" style:parent-style-name="DefaultParagraphFont" style:family="text">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8" style:parent-style-name="Normal" style:family="paragraph">
      <style:text-properties style:font-name="Times New Roman" style:font-name-complex="Times New Roman" fo:font-size="14pt" style:font-size-asian="14pt" style:font-size-complex="14pt"/>
    </style:style>
    <style:style style:name="T1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1" style:parent-style-name="Normal" style:family="paragraph">
      <style:text-properties style:font-name="Times New Roman" style:font-name-complex="Times New Roman" fo:font-size="14pt" style:font-size-asian="14pt" style:font-size-complex="14pt"/>
    </style:style>
    <style:style style:name="P182" style:parent-style-name="Normal" style:family="paragraph">
      <style:text-properties style:font-name="Times New Roman" style:font-name-complex="Times New Roman" fo:font-size="14pt" style:font-size-asian="14pt" style:font-size-complex="14pt"/>
    </style:style>
    <style:style style:name="P183" style:parent-style-name="Normal" style:family="paragraph">
      <style:text-properties style:font-name="Times New Roman" style:font-name-complex="Times New Roman" fo:font-size="14pt" style:font-size-asian="14pt" style:font-size-complex="14pt"/>
    </style:style>
    <style:style style:name="P184" style:parent-style-name="Normal" style:family="paragraph">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6" style:parent-style-name="DefaultParagraphFont" style:family="text">
      <style:text-properties style:font-name="Times New Roman" style:font-name-complex="Times New Roman" fo:font-size="14pt" style:font-size-asian="14pt" style:font-size-complex="14pt"/>
    </style:style>
    <style:style style:name="T1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9" style:parent-style-name="DefaultParagraphFont" style:family="text">
      <style:text-properties style:font-name="Times New Roman" style:font-name-complex="Times New Roman" fo:font-size="14pt" style:font-size-asian="14pt" style:font-size-complex="14pt"/>
    </style:style>
    <style:style style:name="T190" style:parent-style-name="DefaultParagraphFont" style:family="text">
      <style:text-properties style:font-name="Times New Roman" style:font-name-complex="Times New Roman" fo:font-size="14pt" style:font-size-asian="14pt" style:font-size-complex="14pt"/>
    </style:style>
    <style:style style:name="T191" style:parent-style-name="DefaultParagraphFont" style:family="text">
      <style:text-properties style:font-name="Times New Roman" style:font-name-complex="Times New Roman" fo:font-size="14pt" style:font-size-asian="14pt" style:font-size-complex="14pt"/>
    </style:style>
    <style:style style:name="T192" style:parent-style-name="DefaultParagraphFont" style:family="text">
      <style:text-properties style:font-name="Times New Roman" style:font-name-complex="Times New Roman" fo:font-size="14pt" style:font-size-asian="14pt" style:font-size-complex="14pt"/>
    </style:style>
    <style:style style:name="T19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94" style:parent-style-name="DefaultParagraphFont" style:family="text">
      <style:text-properties style:font-name="Times New Roman" style:font-name-complex="Times New Roman" fo:font-size="14pt" style:font-size-asian="14pt" style:font-size-complex="14pt"/>
    </style:style>
    <style:style style:name="T195" style:parent-style-name="DefaultParagraphFont" style:family="text">
      <style:text-properties style:font-name="Times New Roman" style:font-name-complex="Times New Roman" fo:font-size="14pt" style:font-size-asian="14pt" style:font-size-complex="14pt"/>
    </style:style>
    <style:style style:name="T196" style:parent-style-name="Hyperlink" style:family="text">
      <style:text-properties style:font-name="Times New Roman" style:font-name-complex="Times New Roman" fo:font-size="14pt" style:font-size-asian="14pt" style:font-size-complex="14pt"/>
    </style:style>
    <style:style style:name="T197" style:parent-style-name="DefaultParagraphFont" style:family="text">
      <style:text-properties style:font-name="Times New Roman" style:font-name-complex="Times New Roman" fo:font-size="14pt" style:font-size-asian="14pt" style:font-size-complex="14pt"/>
    </style:style>
    <style:style style:name="T19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99" style:parent-style-name="DefaultParagraphFont" style:family="text">
      <style:text-properties style:font-name="Times New Roman" style:font-name-complex="Times New Roman" fo:font-size="14pt" style:font-size-asian="14pt" style:font-size-complex="14pt"/>
    </style:style>
    <style:style style:name="T2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2" style:parent-style-name="Normal" style:family="paragraph">
      <style:text-properties style:font-name="Times New Roman" style:font-name-complex="Times New Roman" fo:font-size="14pt" style:font-size-asian="14pt" style:font-size-complex="14pt"/>
    </style:style>
    <style:style style:name="P203" style:parent-style-name="Normal" style:family="paragraph">
      <style:text-properties style:font-name="Times New Roman" style:font-name-complex="Times New Roman" fo:font-size="14pt" style:font-size-asian="14pt" style:font-size-complex="14pt"/>
    </style:style>
    <style:style style:name="P204" style:parent-style-name="Normal" style:family="paragraph">
      <style:text-properties style:font-name="Times New Roman" style:font-name-complex="Times New Roman" fo:font-size="14pt" style:font-size-asian="14pt" style:font-size-complex="14pt"/>
    </style:style>
    <style:style style:name="T2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6" style:parent-style-name="DefaultParagraphFont" style:family="text">
      <style:text-properties style:font-name="Times New Roman" style:font-name-complex="Times New Roman" fo:font-size="14pt" style:font-size-asian="14pt" style:font-size-complex="14pt"/>
    </style:style>
    <style:style style:name="T2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8" style:parent-style-name="Normal" style:family="paragraph">
      <style:text-properties style:font-name="Times New Roman" style:font-name-complex="Times New Roman" fo:font-size="14pt" style:font-size-asian="14pt" style:font-size-complex="14pt"/>
    </style:style>
    <style:style style:name="P209" style:parent-style-name="Normal" style:family="paragraph">
      <style:text-properties style:font-name="Times New Roman" style:font-name-complex="Times New Roman" fo:font-size="14pt" style:font-size-asian="14pt" style:font-size-complex="14pt"/>
    </style:style>
    <style:style style:name="P210" style:parent-style-name="Normal" style:family="paragraph">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13" style:parent-style-name="Normal" style:family="paragraph">
      <style:text-properties style:font-name="Times New Roman" style:font-name-complex="Times New Roman" fo:font-size="14pt" style:font-size-asian="14pt" style:font-size-complex="14pt"/>
    </style:style>
    <style:style style:name="T214" style:parent-style-name="DefaultParagraphFont" style:family="text">
      <style:text-properties style:font-name="Times New Roman" style:font-name-complex="Times New Roman" fo:font-size="14pt" style:font-size-asian="14pt" style:font-size-complex="14pt"/>
    </style:style>
    <style:style style:name="P215" style:parent-style-name="Normal" style:family="paragraph">
      <style:text-properties style:font-name="Times New Roman" style:font-name-complex="Times New Roman" fo:font-size="14pt" style:font-size-asian="14pt" style:font-size-complex="14pt"/>
    </style:style>
    <style:style style:name="T2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8" style:parent-style-name="DefaultParagraphFont" style:family="text">
      <style:text-properties style:font-name="Times New Roman" style:font-name-complex="Times New Roman" fo:font-size="14pt" style:font-size-asian="14pt" style:font-size-complex="14pt"/>
    </style:style>
    <style:style style:name="T219" style:parent-style-name="DefaultParagraphFont" style:family="text">
      <style:text-properties style:font-name="Times New Roman" style:font-name-complex="Times New Roman" fo:font-size="14pt" style:font-size-asian="14pt" style:font-size-complex="14pt"/>
    </style:style>
    <style:style style:name="T2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1" style:parent-style-name="DefaultParagraphFont" style:family="text">
      <style:text-properties style:font-name="Times New Roman" style:font-name-complex="Times New Roman" fo:font-size="14pt" style:font-size-asian="14pt" style:font-size-complex="14pt"/>
    </style:style>
    <style:style style:name="T222" style:parent-style-name="DefaultParagraphFont" style:family="text">
      <style:text-properties style:font-name="Times New Roman" style:font-name-complex="Times New Roman" fo:font-size="14pt" style:font-size-asian="14pt" style:font-size-complex="14pt"/>
    </style:style>
    <style:style style:name="T2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25" style:parent-style-name="Normal" style:family="paragraph">
      <style:text-properties style:font-name="Times New Roman" style:font-name-complex="Times New Roman" fo:font-size="14pt" style:font-size-asian="14pt" style:font-size-complex="14pt"/>
    </style:style>
    <style:style style:name="P226" style:parent-style-name="Normal" style:family="paragraph">
      <style:text-properties style:font-name="Times New Roman" style:font-name-complex="Times New Roman" fo:font-size="14pt" style:font-size-asian="14pt" style:font-size-complex="14pt"/>
    </style:style>
    <style:style style:name="P227" style:parent-style-name="Normal" style:family="paragraph">
      <style:text-properties style:font-name="Times New Roman" style:font-name-complex="Times New Roman" fo:font-size="14pt" style:font-size-asian="14pt" style:font-size-complex="14pt"/>
    </style:style>
    <style:style style:name="T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9" style:parent-style-name="DefaultParagraphFont" style:family="text">
      <style:text-properties style:font-name="Times New Roman" style:font-name-complex="Times New Roman" fo:font-size="14pt" style:font-size-asian="14pt" style:font-size-complex="14pt"/>
    </style:style>
    <style:style style:name="T2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31" style:parent-style-name="Normal" style:family="paragraph">
      <style:text-properties style:font-name="Times New Roman" style:font-name-complex="Times New Roman" fo:font-size="14pt" style:font-size-asian="14pt" style:font-size-complex="14pt"/>
    </style:style>
    <style:style style:name="T2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34" style:parent-style-name="Normal" style:family="paragraph">
      <style:text-properties style:font-name="Times New Roman" style:font-name-complex="Times New Roman" fo:font-size="14pt" style:font-size-asian="14pt" style:font-size-complex="14pt"/>
    </style:style>
    <style:style style:name="P235" style:parent-style-name="Normal" style:family="paragraph">
      <style:text-properties style:font-name="Times New Roman" style:font-name-complex="Times New Roman" fo:font-size="14pt" style:font-size-asian="14pt" style:font-size-complex="14pt"/>
    </style:style>
    <style:style style:name="P236" style:parent-style-name="Normal" style:family="paragraph">
      <style:text-properties style:font-name="Times New Roman" style:font-name-complex="Times New Roman" fo:font-size="14pt" style:font-size-asian="14pt" style:font-size-complex="14pt"/>
    </style:style>
    <style:style style:name="T2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8" style:parent-style-name="DefaultParagraphFont" style:family="text">
      <style:text-properties style:font-name="Times New Roman" style:font-name-complex="Times New Roman" fo:font-size="14pt" style:font-size-asian="14pt" style:font-size-complex="14pt"/>
    </style:style>
    <style:style style:name="T2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0" style:parent-style-name="DefaultParagraphFont" style:family="text">
      <style:text-properties style:font-name="Times New Roman" style:font-name-complex="Times New Roman" fo:font-size="14pt" style:font-size-asian="14pt" style:font-size-complex="14pt"/>
    </style:style>
    <style:style style:name="T241" style:parent-style-name="DefaultParagraphFont" style:family="text">
      <style:text-properties style:font-name="Times New Roman" style:font-name-complex="Times New Roman" fo:font-size="14pt" style:font-size-asian="14pt" style:font-size-complex="14pt"/>
    </style:style>
    <style:style style:name="T24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43" style:parent-style-name="DefaultParagraphFont" style:family="text">
      <style:text-properties style:font-name="Times New Roman" style:font-name-complex="Times New Roman" fo:font-size="14pt" style:font-size-asian="14pt" style:font-size-complex="14pt"/>
    </style:style>
    <style:style style:name="T244" style:parent-style-name="DefaultParagraphFont" style:family="text">
      <style:text-properties style:font-name="Times New Roman" style:font-name-complex="Times New Roman" fo:font-size="14pt" style:font-size-asian="14pt" style:font-size-complex="14pt"/>
    </style:style>
    <style:style style:name="T245" style:parent-style-name="Hyperlink" style:family="text">
      <style:text-properties style:font-name="Times New Roman" style:font-name-complex="Times New Roman" fo:font-size="14pt" style:font-size-asian="14pt" style:font-size-complex="14pt"/>
    </style:style>
    <style:style style:name="T2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8" style:parent-style-name="Normal" style:family="paragraph">
      <style:text-properties style:font-name="Times New Roman"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T2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2" style:parent-style-name="DefaultParagraphFont" style:family="text">
      <style:text-properties style:font-name="Times New Roman" style:font-name-complex="Times New Roman" fo:font-size="14pt" style:font-size-asian="14pt" style:font-size-complex="14pt"/>
    </style:style>
    <style:style style:name="T2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55" style:parent-style-name="Normal" style:family="paragraph">
      <style:text-properties style:font-name="Times New Roman" style:font-name-complex="Times New Roman" fo:font-size="14pt" style:font-size-asian="14pt" style:font-size-complex="14pt"/>
    </style:style>
    <style:style style:name="P256" style:parent-style-name="Normal" style:family="paragraph">
      <style:text-properties style:font-name="Times New Roman" style:font-name-complex="Times New Roman" fo:font-size="14pt" style:font-size-asian="14pt" style:font-size-complex="14pt"/>
    </style:style>
    <style:style style:name="P257" style:parent-style-name="Normal" style:family="paragraph">
      <style:text-properties style:font-name="Times New Roman" style:font-name-complex="Times New Roman" fo:font-size="14pt" style:font-size-asian="14pt" style:font-size-complex="14pt"/>
    </style:style>
    <style:style style:name="T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style:font-name-complex="Times New Roman" fo:font-size="14pt" style:font-size-asian="14pt" style:font-size-complex="14pt"/>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1" style:parent-style-name="Normal" style:family="paragraph">
      <style:text-properties style:font-name="Times New Roman" style:font-name-complex="Times New Roman" fo:font-size="14pt" style:font-size-asian="14pt" style:font-size-complex="14pt"/>
    </style:style>
    <style:style style:name="T262" style:parent-style-name="DefaultParagraphFont" style:family="text">
      <style:text-properties style:font-name="Times New Roman" style:font-name-complex="Times New Roman" fo:font-size="14pt" style:font-size-asian="14pt" style:font-size-complex="14pt"/>
    </style:style>
    <style:style style:name="T263" style:parent-style-name="Hyperlink" style:family="text">
      <style:text-properties style:font-name="Times New Roman" style:font-name-complex="Times New Roman" fo:font-size="14pt" style:font-size-asian="14pt" style:font-size-complex="14pt"/>
    </style:style>
    <style:style style:name="T2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6" style:parent-style-name="Normal" style:family="paragraph">
      <style:text-properties style:font-name="Times New Roman" style:font-name-complex="Times New Roman" fo:font-size="14pt" style:font-size-asian="14pt" style:font-size-complex="14pt"/>
    </style:style>
    <style:style style:name="T267" style:parent-style-name="DefaultParagraphFont" style:family="text">
      <style:text-properties style:font-name="Times New Roman" style:font-name-complex="Times New Roman" fo:font-size="14pt" style:font-size-asian="14pt" style:font-size-complex="14pt"/>
    </style:style>
    <style:style style:name="P268" style:parent-style-name="Normal" style:family="paragraph">
      <style:text-properties style:font-name="Times New Roman" style:font-name-complex="Times New Roman" fo:font-size="14pt" style:font-size-asian="14pt" style:font-size-complex="14pt"/>
    </style:style>
    <style:style style:name="T2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1" style:parent-style-name="DefaultParagraphFont" style:family="text">
      <style:text-properties style:font-name="Times New Roman" style:font-name-complex="Times New Roman" fo:font-size="14pt" style:font-size-asian="14pt" style:font-size-complex="14pt"/>
    </style:style>
    <style:style style:name="T272" style:parent-style-name="DefaultParagraphFont" style:family="text">
      <style:text-properties style:font-name="Times New Roman" style:font-name-complex="Times New Roman" fo:font-size="14pt" style:font-size-asian="14pt" style:font-size-complex="14pt"/>
    </style:style>
    <style:style style:name="T273" style:parent-style-name="DefaultParagraphFont" style:family="text">
      <style:text-properties style:font-name="Times New Roman" style:font-name-complex="Times New Roman" fo:font-size="14pt" style:font-size-asian="14pt" style:font-size-complex="14pt"/>
    </style:style>
    <style:style style:name="T2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5" style:parent-style-name="DefaultParagraphFont" style:family="text">
      <style:text-properties style:font-name="Times New Roman" style:font-name-complex="Times New Roman" fo:font-size="14pt" style:font-size-asian="14pt" style:font-size-complex="14pt"/>
    </style:style>
    <style:style style:name="T276" style:parent-style-name="DefaultParagraphFont" style:family="text">
      <style:text-properties style:font-name="Times New Roman" style:font-name-complex="Times New Roman" fo:font-size="14pt" style:font-size-asian="14pt" style:font-size-complex="14pt"/>
    </style:style>
    <style:style style:name="T277" style:parent-style-name="DefaultParagraphFont" style:family="text">
      <style:text-properties style:font-name="Times New Roman" style:font-name-complex="Times New Roman" fo:font-size="14pt" style:font-size-asian="14pt" style:font-size-complex="14pt"/>
    </style:style>
    <style:style style:name="T2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0" style:parent-style-name="Normal" style:family="paragraph">
      <style:text-properties style:font-name="Times New Roman" style:font-name-complex="Times New Roman" fo:font-size="14pt" style:font-size-asian="14pt" style:font-size-complex="14pt"/>
    </style:style>
    <style:style style:name="P281" style:parent-style-name="Normal" style:family="paragraph">
      <style:text-properties style:font-name="Times New Roman" style:font-name-complex="Times New Roman" fo:font-size="14pt" style:font-size-asian="14pt" style:font-size-complex="14pt"/>
    </style:style>
    <style:style style:name="P282" style:parent-style-name="Normal" style:family="paragraph">
      <style:text-properties style:font-name="Times New Roman" style:font-name-complex="Times New Roman" fo:font-size="14pt" style:font-size-asian="14pt" style:font-size-complex="14pt"/>
    </style:style>
    <style:style style:name="T2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4" style:parent-style-name="DefaultParagraphFont" style:family="text">
      <style:text-properties style:font-name="Times New Roman" style:font-name-complex="Times New Roman" fo:font-size="14pt" style:font-size-asian="14pt" style:font-size-complex="14pt"/>
    </style:style>
    <style:style style:name="T2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7" style:parent-style-name="Normal" style:family="paragraph">
      <style:text-properties style:font-name="Times New Roman" style:font-name-complex="Times New Roman" fo:font-size="14pt" style:font-size-asian="14pt" style:font-size-complex="14pt"/>
    </style:style>
    <style:style style:name="P288" style:parent-style-name="Normal" style:family="paragraph">
      <style:text-properties style:font-name="Times New Roman" style:font-name-complex="Times New Roman" fo:font-size="14pt" style:font-size-asian="14pt" style:font-size-complex="14pt"/>
    </style:style>
    <style:style style:name="P289" style:parent-style-name="Normal" style:family="paragraph">
      <style:text-properties style:font-name="Times New Roman" style:font-name-complex="Times New Roman" fo:font-size="14pt" style:font-size-asian="14pt" style:font-size-complex="14pt"/>
    </style:style>
    <style:style style:name="T2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1" style:parent-style-name="DefaultParagraphFont" style:family="text">
      <style:text-properties style:font-name="Times New Roman" style:font-name-complex="Times New Roman" fo:font-size="14pt" style:font-size-asian="14pt" style:font-size-complex="14pt"/>
    </style:style>
    <style:style style:name="T2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3" style:parent-style-name="DefaultParagraphFont" style:family="text">
      <style:text-properties style:font-name="Times New Roman" style:font-name-complex="Times New Roman" fo:font-size="14pt" style:font-size-asian="14pt" style:font-size-complex="14pt"/>
    </style:style>
    <style:style style:name="T294" style:parent-style-name="DefaultParagraphFont" style:family="text">
      <style:text-properties style:font-name="Times New Roman" style:font-name-complex="Times New Roman" fo:font-size="14pt" style:font-size-asian="14pt" style:font-size-complex="14pt"/>
    </style:style>
    <style:style style:name="T2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6" style:parent-style-name="DefaultParagraphFont" style:family="text">
      <style:text-properties style:font-name="Times New Roman" style:font-name-complex="Times New Roman" fo:font-size="14pt" style:font-size-asian="14pt" style:font-size-complex="14pt"/>
    </style:style>
    <style:style style:name="T297" style:parent-style-name="DefaultParagraphFont" style:family="text">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T299" style:parent-style-name="DefaultParagraphFont" style:family="text">
      <style:text-properties style:font-name="Times New Roman" style:font-name-complex="Times New Roman" fo:font-size="14pt" style:font-size-asian="14pt" style:font-size-complex="14pt"/>
    </style:style>
    <style:style style:name="T300" style:parent-style-name="Hyperlink" style:family="text">
      <style:text-properties style:font-name="Times New Roman" style:font-name-complex="Times New Roman" fo:font-size="14pt" style:font-size-asian="14pt" style:font-size-complex="14pt"/>
    </style:style>
    <style:style style:name="T3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T304" style:parent-style-name="DefaultParagraphFont" style:family="text">
      <style:text-properties style:font-name="Times New Roman" style:font-name-complex="Times New Roman" fo:font-size="14pt" style:font-size-asian="14pt" style:font-size-complex="14pt"/>
    </style:style>
    <style:style style:name="P305" style:parent-style-name="Normal" style:family="paragraph">
      <style:text-properties style:font-name="Times New Roman" style:font-name-complex="Times New Roman" fo:font-size="14pt" style:font-size-asian="14pt" style:font-size-complex="14pt"/>
    </style:style>
    <style:style style:name="T3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8" style:parent-style-name="DefaultParagraphFont" style:family="text">
      <style:text-properties style:font-name="Times New Roman" style:font-name-complex="Times New Roman" fo:font-size="14pt" style:font-size-asian="14pt" style:font-size-complex="14pt"/>
    </style:style>
    <style:style style:name="T309" style:parent-style-name="DefaultParagraphFont" style:family="text">
      <style:text-properties style:font-name="Times New Roman" style:font-name-complex="Times New Roman" fo:font-size="14pt" style:font-size-asian="14pt" style:font-size-complex="14pt"/>
    </style:style>
    <style:style style:name="T3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1" style:parent-style-name="DefaultParagraphFont" style:family="text">
      <style:text-properties style:font-name="Times New Roman" style:font-name-complex="Times New Roman" fo:font-size="14pt" style:font-size-asian="14pt" style:font-size-complex="14pt"/>
    </style:style>
    <style:style style:name="T312" style:parent-style-name="DefaultParagraphFont" style:family="text">
      <style:text-properties style:font-name="Times New Roman" style:font-name-complex="Times New Roman" fo:font-size="14pt" style:font-size-asian="14pt" style:font-size-complex="14pt"/>
    </style:style>
    <style:style style:name="T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4" style:parent-style-name="Normal" style:family="paragraph">
      <style:text-properties style:font-name="Times New Roman" style:font-name-complex="Times New Roman" fo:font-size="14pt" style:font-size-asian="14pt" style:font-size-complex="14pt"/>
    </style:style>
    <style:style style:name="T315" style:parent-style-name="DefaultParagraphFont" style:family="text">
      <style:text-properties style:font-name="Times New Roman" style:font-name-complex="Times New Roman" fo:font-size="14pt" style:font-size-asian="14pt" style:font-size-complex="14pt"/>
    </style:style>
    <style:style style:name="T3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7" style:parent-style-name="DefaultParagraphFont" style:family="text">
      <style:text-properties style:font-name="Times New Roman" style:font-name-complex="Times New Roman" fo:font-size="14pt" style:font-size-asian="14pt" style:font-size-complex="14pt"/>
    </style:style>
    <style:style style:name="T3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0" style:parent-style-name="Normal" style:family="paragraph">
      <style:text-properties style:font-name="Times New Roman" style:font-name-complex="Times New Roman" fo:font-size="14pt" style:font-size-asian="14pt" style:font-size-complex="14pt"/>
    </style:style>
    <style:style style:name="P321" style:parent-style-name="Normal" style:family="paragraph">
      <style:text-properties style:font-name="Times New Roman" style:font-name-complex="Times New Roman" fo:font-size="14pt" style:font-size-asian="14pt" style:font-size-complex="14pt"/>
    </style:style>
    <style:style style:name="P322" style:parent-style-name="Normal" style:family="paragraph">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4" style:parent-style-name="DefaultParagraphFont" style:family="text">
      <style:text-properties style:font-name="Times New Roman" style:font-name-complex="Times New Roman" fo:font-size="14pt" style:font-size-asian="14pt" style:font-size-complex="14pt"/>
    </style:style>
    <style:style style:name="T3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6" style:parent-style-name="Normal" style:family="paragraph">
      <style:text-properties style:font-name="Times New Roman" style:font-name-complex="Times New Roman" fo:font-size="14pt" style:font-size-asian="14pt" style:font-size-complex="14pt"/>
    </style:style>
    <style:style style:name="T327" style:parent-style-name="DefaultParagraphFont" style:family="text">
      <style:text-properties style:font-name="Times New Roman" style:font-name-complex="Times New Roman" fo:font-size="14pt" style:font-size-asian="14pt" style:font-size-complex="14pt"/>
    </style:style>
    <style:style style:name="T328" style:parent-style-name="Hyperlink" style:family="text">
      <style:text-properties style:font-name="Times New Roman" style:font-name-complex="Times New Roman" fo:font-size="14pt" style:font-size-asian="14pt" style:font-size-complex="14pt"/>
    </style:style>
    <style:style style:name="P329" style:parent-style-name="Normal" style:family="paragraph">
      <style:text-properties style:font-name="Times New Roman" style:font-name-complex="Times New Roman" fo:font-size="14pt" style:font-size-asian="14pt" style:font-size-complex="14pt"/>
    </style:style>
    <style:style style:name="T3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T333" style:parent-style-name="DefaultParagraphFont" style:family="text">
      <style:text-properties style:font-name="Times New Roman" style:font-name-complex="Times New Roman" fo:font-size="14pt" style:font-size-asian="14pt" style:font-size-complex="14pt"/>
    </style:style>
    <style:style style:name="P334" style:parent-style-name="Normal" style:family="paragraph">
      <style:text-properties style:font-name="Times New Roman" style:font-name-complex="Times New Roman" fo:font-size="14pt" style:font-size-asian="14pt" style:font-size-complex="14pt"/>
    </style:style>
    <style:style style:name="T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6" style:parent-style-name="Normal" style:family="paragraph">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9" style:parent-style-name="Normal" style:family="paragraph">
      <style:text-properties style:font-name="Times New Roman" style:font-name-complex="Times New Roman" fo:font-size="14pt" style:font-size-asian="14pt" style:font-size-complex="14pt"/>
    </style:style>
    <style:style style:name="T340" style:parent-style-name="DefaultParagraphFont" style:family="text">
      <style:text-properties style:font-name="Times New Roman" style:font-name-complex="Times New Roman" fo:font-size="14pt" style:font-size-asian="14pt" style:font-size-complex="14pt"/>
    </style:style>
    <style:style style:name="P341" style:parent-style-name="Normal" style:family="paragraph">
      <style:text-properties style:font-name="Times New Roman" style:font-name-complex="Times New Roman" fo:font-size="14pt" style:font-size-asian="14pt" style:font-size-complex="14pt"/>
    </style:style>
    <style:style style:name="P342" style:parent-style-name="Normal" style:family="paragraph">
      <style:text-properties style:font-name="Times New Roman" style:font-name-complex="Times New Roman" fo:font-size="14pt" style:font-size-asian="14pt" style:font-size-complex="14pt"/>
    </style:style>
    <style:style style:name="P343" style:parent-style-name="Normal" style:family="paragraph">
      <style:text-properties style:font-name="Times New Roman" style:font-name-complex="Times New Roman" fo:font-size="14pt" style:font-size-asian="14pt" style:font-size-complex="14pt"/>
    </style:style>
    <style:style style:name="P344" style:parent-style-name="Normal" style:family="paragraph">
      <style:text-properties style:font-name="Times New Roman" style:font-name-complex="Times New Roman" fo:font-size="14pt" style:font-size-asian="14pt" style:font-size-complex="14pt"/>
    </style:style>
    <style:style style:name="P345" style:parent-style-name="Normal" style:family="paragraph">
      <style:text-properties style:font-name="Times New Roman" style:font-name-complex="Times New Roman" fo:font-size="14pt" style:font-size-asian="14pt" style:font-size-complex="14pt"/>
    </style:style>
    <style:style style:name="P346" style:parent-style-name="Normal" style:family="paragraph">
      <style:text-properties style:font-name="Times New Roman" style:font-name-complex="Times New Roman" fo:font-size="14pt" style:font-size-asian="14pt" style:font-size-complex="14pt"/>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8" style:parent-style-name="DefaultParagraphFont" style:family="text">
      <style:text-properties style:font-name="Times New Roman" style:font-name-complex="Times New Roman" fo:font-size="14pt" style:font-size-asian="14pt" style:font-size-complex="14pt"/>
    </style:style>
    <style:style style:name="T3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0" style:parent-style-name="Normal" style:family="paragraph">
      <style:text-properties style:font-name="Times New Roman" style:font-name-complex="Times New Roman" fo:font-size="14pt" style:font-size-asian="14pt" style:font-size-complex="14pt"/>
    </style:style>
    <style:style style:name="T3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3" style:parent-style-name="Normal" style:family="paragraph">
      <style:text-properties style:font-name="Times New Roman" style:font-name-complex="Times New Roman" fo:font-size="14pt" style:font-size-asian="14pt" style:font-size-complex="14pt"/>
    </style:style>
    <style:style style:name="T354" style:parent-style-name="DefaultParagraphFont" style:family="text">
      <style:text-properties style:font-name="Times New Roman" style:font-name-complex="Times New Roman" fo:font-size="14pt" style:font-size-asian="14pt" style:font-size-complex="14pt"/>
    </style:style>
    <style:style style:name="P355" style:parent-style-name="Normal" style:family="paragraph">
      <style:text-properties style:font-name="Times New Roman" style:font-name-complex="Times New Roman" fo:font-size="14pt" style:font-size-asian="14pt" style:font-size-complex="14pt"/>
    </style:style>
    <style:style style:name="P356" style:parent-style-name="Normal" style:family="paragraph">
      <style:text-properties style:font-name="Times New Roman" style:font-name-complex="Times New Roman" fo:font-size="14pt" style:font-size-asian="14pt" style:font-size-complex="14pt"/>
    </style:style>
    <style:style style:name="P357" style:parent-style-name="Normal" style:family="paragraph">
      <style:text-properties style:font-name="Times New Roman" style:font-name-complex="Times New Roman" fo:font-size="14pt" style:font-size-asian="14pt" style:font-size-complex="14pt"/>
    </style:style>
    <style:style style:name="T3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9" style:parent-style-name="DefaultParagraphFont" style:family="text">
      <style:text-properties style:font-name="Times New Roman" style:font-name-complex="Times New Roman" fo:font-size="14pt" style:font-size-asian="14pt" style:font-size-complex="14pt"/>
    </style:style>
    <style:style style:name="T3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1" style:parent-style-name="Normal" style:family="paragraph">
      <style:text-properties style:font-name="Times New Roman" style:font-name-complex="Times New Roman" fo:font-size="14pt" style:font-size-asian="14pt" style:font-size-complex="14pt"/>
    </style:style>
    <style:style style:name="T3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4" style:parent-style-name="Normal" style:family="paragraph">
      <style:text-properties style:font-name="Times New Roman" style:font-name-complex="Times New Roman" fo:font-size="14pt" style:font-size-asian="14pt" style:font-size-complex="14pt"/>
    </style:style>
    <style:style style:name="T365" style:parent-style-name="DefaultParagraphFont" style:family="text">
      <style:text-properties style:font-name="Times New Roman" style:font-name-complex="Times New Roman" fo:font-size="14pt" style:font-size-asian="14pt" style:font-size-complex="14pt"/>
    </style:style>
    <style:style style:name="T366" style:parent-style-name="DefaultParagraphFont" style:family="text">
      <style:text-properties style:font-name="Times New Roman" style:font-name-complex="Times New Roman" fo:font-size="14pt" style:font-size-asian="14pt" style:font-size-complex="14pt"/>
    </style:style>
    <style:style style:name="T3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8" style:parent-style-name="DefaultParagraphFont" style:family="text">
      <style:text-properties style:font-name="Times New Roman" style:font-name-complex="Times New Roman" fo:font-size="14pt" style:font-size-asian="14pt" style:font-size-complex="14pt"/>
    </style:style>
    <style:style style:name="T3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0" style:parent-style-name="DefaultParagraphFont" style:family="text">
      <style:text-properties style:font-name="Times New Roman" style:font-name-complex="Times New Roman" fo:font-size="14pt" style:font-size-asian="14pt" style:font-size-complex="14pt"/>
    </style:style>
    <style:style style:name="TableColumn372" style:family="table-column">
      <style:table-column-properties style:column-width="3.2444in"/>
    </style:style>
    <style:style style:name="TableColumn373" style:family="table-column">
      <style:table-column-properties style:column-width="3.2444in"/>
    </style:style>
    <style:style style:name="Table371" style:family="table">
      <style:table-properties style:width="6.4888in" fo:margin-left="0in" table:align="left"/>
    </style:style>
    <style:style style:name="TableRow374" style:family="table-row">
      <style:table-row-properties/>
    </style:style>
    <style:style style:name="TableCell37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3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77" style:parent-style-name="Normal" style:family="paragraph">
      <style:text-properties style:font-name="Times New Roman" style:font-name-complex="Times New Roman" fo:font-size="14pt" style:font-size-asian="14pt" style:font-size-complex="14pt"/>
    </style:style>
    <style:style style:name="P378" style:parent-style-name="Normal" style:family="paragraph">
      <style:text-properties style:font-name="Times New Roman" style:font-name-complex="Times New Roman" fo:font-size="14pt" style:font-size-asian="14pt" style:font-size-complex="14pt"/>
    </style:style>
    <style:style style:name="P379" style:parent-style-name="Normal" style:family="paragraph">
      <style:text-properties style:font-name="Times New Roman" style:font-name-complex="Times New Roman" fo:font-size="14pt" style:font-size-asian="14pt" style:font-size-complex="14pt"/>
    </style:style>
    <style:style style:name="P380" style:parent-style-name="Normal" style:family="paragraph">
      <style:text-properties style:font-name="Times New Roman" style:font-name-complex="Times New Roman" fo:font-size="14pt" style:font-size-asian="14pt" style:font-size-complex="14pt"/>
    </style:style>
    <style:style style:name="TableCell38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3" style:parent-style-name="Normal" style:family="paragraph">
      <style:text-properties style:font-name="Times New Roman" style:font-name-complex="Times New Roman" fo:font-size="14pt" style:font-size-asian="14pt" style:font-size-complex="14pt"/>
    </style:style>
    <style:style style:name="P384" style:parent-style-name="Normal" style:family="paragraph">
      <style:text-properties style:font-name="Times New Roman" style:font-name-complex="Times New Roman" fo:font-size="14pt" style:font-size-asian="14pt" style:font-size-complex="14pt"/>
    </style:style>
    <style:style style:name="P385" style:parent-style-name="Normal" style:family="paragraph">
      <style:text-properties style:font-name="Times New Roman" style:font-name-complex="Times New Roman" fo:font-size="14pt" style:font-size-asian="14pt" style:font-size-complex="14pt"/>
    </style:style>
    <style:style style:name="P386" style:parent-style-name="Normal" style:family="paragraph">
      <style:text-properties style:font-name="Times New Roman" style:font-name-complex="Times New Roman" fo:font-size="14pt" style:font-size-asian="14pt" style:font-size-complex="14pt"/>
    </style:style>
    <style:style style:name="P387" style:parent-style-name="Normal" style:family="paragraph">
      <style:text-properties style:font-name="Times New Roman" style:font-name-complex="Times New Roman" fo:font-size="14pt" style:font-size-asian="14pt" style:font-size-complex="14pt"/>
    </style:style>
    <style:style style:name="P388" style:parent-style-name="Normal" style:family="paragraph">
      <style:text-properties style:font-name="Times New Roman" style:font-name-complex="Times New Roman" fo:font-size="14pt" style:font-size-asian="14pt" style:font-size-complex="14pt"/>
    </style:style>
    <style:style style:name="TableRow389" style:family="table-row">
      <style:table-row-properties/>
    </style:style>
    <style:style style:name="TableCell39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3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2" style:parent-style-name="Normal" style:family="paragraph">
      <style:text-properties style:font-name="Times New Roman" style:font-name-complex="Times New Roman" fo:font-size="14pt" style:font-size-asian="14pt" style:font-size-complex="14pt"/>
    </style:style>
    <style:style style:name="P393" style:parent-style-name="Normal" style:family="paragraph">
      <style:text-properties style:font-name="Times New Roman" style:font-name-complex="Times New Roman" fo:font-size="14pt" style:font-size-asian="14pt" style:font-size-complex="14pt"/>
    </style:style>
    <style:style style:name="P394" style:parent-style-name="Normal" style:family="paragraph">
      <style:text-properties style:font-name="Times New Roman" style:font-name-complex="Times New Roman" fo:font-size="14pt" style:font-size-asian="14pt" style:font-size-complex="14pt"/>
    </style:style>
    <style:style style:name="P395" style:parent-style-name="Normal" style:family="paragraph">
      <style:text-properties style:font-name="Times New Roman" style:font-name-complex="Times New Roman" fo:font-size="14pt" style:font-size-asian="14pt" style:font-size-complex="14pt"/>
    </style:style>
    <style:style style:name="TableCell39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8" style:parent-style-name="Normal" style:family="paragraph">
      <style:text-properties style:font-name="Times New Roman" style:font-name-complex="Times New Roman" fo:font-size="14pt" style:font-size-asian="14pt" style:font-size-complex="14pt"/>
    </style:style>
    <style:style style:name="P399" style:parent-style-name="Normal" style:family="paragraph">
      <style:text-properties style:font-name="Times New Roman" style:font-name-complex="Times New Roman"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P401" style:parent-style-name="Normal" style:family="paragraph">
      <style:text-properties style:font-name="Times New Roman" style:font-name-complex="Times New Roman" fo:font-size="14pt" style:font-size-asian="14pt" style:font-size-complex="14pt"/>
    </style:style>
    <style:style style:name="P402" style:parent-style-name="Normal" style:family="paragraph">
      <style:text-properties style:font-name="Times New Roman" style:font-name-complex="Times New Roman" fo:font-size="14pt" style:font-size-asian="14pt" style:font-size-complex="14pt"/>
    </style:style>
    <style:style style:name="P403" style:parent-style-name="Normal" style:family="paragraph">
      <style:text-properties style:font-name="Times New Roman" style:font-name-complex="Times New Roman" fo:font-size="14pt" style:font-size-asian="14pt" style:font-size-complex="14pt"/>
    </style:style>
    <style:style style:name="P404" style:parent-style-name="Normal" style:family="paragraph">
      <style:text-properties style:font-name="Times New Roman" style:font-name-complex="Times New Roman" fo:font-size="14pt" style:font-size-asian="14pt" style:font-size-complex="14pt"/>
    </style:style>
    <style:style style:name="T4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6" style:parent-style-name="DefaultParagraphFont" style:family="text">
      <style:text-properties style:font-name="Times New Roman" style:font-name-complex="Times New Roman" fo:font-size="14pt" style:font-size-asian="14pt" style:font-size-complex="14pt"/>
    </style:style>
    <style:style style:name="T4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8" style:parent-style-name="Normal" style:family="paragraph">
      <style:text-properties style:font-name="Times New Roman" style:font-name-complex="Times New Roman" fo:font-size="14pt" style:font-size-asian="14pt" style:font-size-complex="14pt"/>
    </style:style>
    <style:style style:name="P409" style:parent-style-name="Normal" style:family="paragraph">
      <style:text-properties style:font-name="Times New Roman" style:font-name-complex="Times New Roman" fo:font-size="14pt" style:font-size-asian="14pt" style:font-size-complex="14pt"/>
    </style:style>
    <style:style style:name="T4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2" style:parent-style-name="Normal" style:family="paragraph">
      <style:text-properties style:font-name="Times New Roman" style:font-name-complex="Times New Roman" fo:font-size="14pt" style:font-size-asian="14pt" style:font-size-complex="14pt"/>
    </style:style>
    <style:style style:name="T413" style:parent-style-name="DefaultParagraphFont" style:family="text">
      <style:text-properties style:font-name="Times New Roman" style:font-name-complex="Times New Roman" fo:font-size="14pt" style:font-size-asian="14pt" style:font-size-complex="14pt"/>
    </style:style>
    <style:style style:name="P414" style:parent-style-name="Normal" style:family="paragraph">
      <style:text-properties style:font-name="Times New Roman" style:font-name-complex="Times New Roman" fo:font-size="14pt" style:font-size-asian="14pt" style:font-size-complex="14pt"/>
    </style:style>
    <style:style style:name="T4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7" style:parent-style-name="DefaultParagraphFont" style:family="text">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size="14pt" style:font-size-asian="14pt" style:font-size-complex="14pt"/>
    </style:style>
    <style:style style:name="T4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0" style:parent-style-name="DefaultParagraphFont" style:family="text">
      <style:text-properties style:font-name="Times New Roman" style:font-name-complex="Times New Roman" fo:font-size="14pt" style:font-size-asian="14pt" style:font-size-complex="14pt"/>
    </style:style>
    <style:style style:name="T421" style:parent-style-name="DefaultParagraphFont" style:family="text">
      <style:text-properties style:font-name="Times New Roman" style:font-name-complex="Times New Roman" fo:font-size="14pt" style:font-size-asian="14pt" style:font-size-complex="14pt"/>
    </style:style>
    <style:style style:name="T4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4" style:parent-style-name="DefaultParagraphFont" style:family="text">
      <style:text-properties style:font-name="Times New Roman" style:font-name-complex="Times New Roman" fo:font-size="14pt" style:font-size-asian="14pt" style:font-size-complex="14pt"/>
    </style:style>
    <style:style style:name="T425" style:parent-style-name="DefaultParagraphFont" style:family="text">
      <style:text-properties style:font-name="Times New Roman" style:font-name-complex="Times New Roman" fo:font-size="14pt" style:font-size-asian="14pt" style:font-size-complex="14pt"/>
    </style:style>
    <style:style style:name="T4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7" style:parent-style-name="DefaultParagraphFont" style:family="text">
      <style:text-properties style:font-name="Times New Roman" style:font-name-complex="Times New Roman" fo:font-size="14pt" style:font-size-asian="14pt" style:font-size-complex="14pt"/>
    </style:style>
    <style:style style:name="T428" style:parent-style-name="DefaultParagraphFont" style:family="text">
      <style:text-properties style:font-name="Times New Roman" style:font-name-complex="Times New Roman" fo:font-size="14pt" style:font-size-asian="14pt" style:font-size-complex="14pt"/>
    </style:style>
    <style:style style:name="T429" style:parent-style-name="Hyperlink" style:family="text">
      <style:text-properties style:font-name="Times New Roman" style:font-name-complex="Times New Roman" fo:font-size="14pt" style:font-size-asian="14pt" style:font-size-complex="14pt"/>
    </style:style>
    <style:style style:name="T4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2" style:parent-style-name="Normal" style:family="paragraph">
      <style:text-properties style:font-name="Times New Roman" style:font-name-complex="Times New Roman" fo:font-size="14pt" style:font-size-asian="14pt" style:font-size-complex="14pt"/>
    </style:style>
    <style:style style:name="P433" style:parent-style-name="Normal" style:family="paragraph">
      <style:text-properties style:font-name="Times New Roman" style:font-name-complex="Times New Roman" fo:font-size="14pt" style:font-size-asian="14pt" style:font-size-complex="14pt"/>
    </style:style>
    <style:style style:name="P434" style:parent-style-name="Normal" style:family="paragraph">
      <style:text-properties style:font-name="Times New Roman" style:font-name-complex="Times New Roman" fo:font-size="14pt" style:font-size-asian="14pt" style:font-size-complex="14pt"/>
    </style:style>
    <style:style style:name="T4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6" style:parent-style-name="DefaultParagraphFont" style:family="text">
      <style:text-properties style:font-name="Times New Roman" style:font-name-complex="Times New Roman" fo:font-size="14pt" style:font-size-asian="14pt" style:font-size-complex="14pt"/>
    </style:style>
    <style:style style:name="T4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9" style:parent-style-name="Normal" style:family="paragraph">
      <style:text-properties style:font-name="Times New Roman" style:font-name-complex="Times New Roman" fo:font-size="14pt" style:font-size-asian="14pt" style:font-size-complex="14pt"/>
    </style:style>
    <style:style style:name="TableColumn441" style:family="table-column">
      <style:table-column-properties style:column-width="2.6437in"/>
    </style:style>
    <style:style style:name="Table440" style:family="table">
      <style:table-properties style:width="2.6437in" fo:margin-left="0in" table:align="left"/>
    </style:style>
    <style:style style:name="TableRow442" style:family="table-row">
      <style:table-row-properties/>
    </style:style>
    <style:style style:name="TableCell4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444" style:parent-style-name="consolas" style:family="paragraph">
      <style:text-properties fo:language="it" fo:country="IT"/>
    </style:style>
    <style:style style:name="P445" style:parent-style-name="Normal" style:family="paragraph">
      <style:text-properties style:font-name="Times New Roman" style:font-name-complex="Times New Roman" fo:font-size="14pt" style:font-size-asian="14pt" style:font-size-complex="14pt"/>
    </style:style>
    <style:style style:name="P446" style:parent-style-name="Normal" style:family="paragraph">
      <style:text-properties style:font-name="Times New Roman" style:font-name-complex="Times New Roman" fo:font-size="14pt" style:font-size-asian="14pt" style:font-size-complex="14pt"/>
    </style:style>
    <style:style style:name="T4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8" style:parent-style-name="DefaultParagraphFont" style:family="text">
      <style:text-properties style:font-name="Times New Roman" style:font-name-complex="Times New Roman" fo:font-size="14pt" style:font-size-asian="14pt" style:font-size-complex="14pt"/>
    </style:style>
    <style:style style:name="T4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0" style:parent-style-name="Normal" style:family="paragraph">
      <style:text-properties style:font-name="Times New Roman" style:font-name-complex="Times New Roman" fo:font-size="14pt" style:font-size-asian="14pt" style:font-size-complex="14pt"/>
    </style:style>
    <style:style style:name="T4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3" style:parent-style-name="Normal" style:family="paragraph">
      <style:text-properties style:font-name="Times New Roman" style:font-name-complex="Times New Roman" fo:font-size="14pt" style:font-size-asian="14pt" style:font-size-complex="14pt"/>
    </style:style>
    <style:style style:name="P454" style:parent-style-name="consolas" style:family="paragraph">
      <style:text-properties fo:language="it" fo:country="IT"/>
    </style:style>
    <style:style style:name="P455" style:parent-style-name="consolas" style:family="paragraph">
      <style:text-properties fo:language="it" fo:country="IT"/>
    </style:style>
    <style:style style:name="P456" style:parent-style-name="Normal" style:family="paragraph">
      <style:text-properties style:font-name="Times New Roman" style:font-name-complex="Times New Roman" fo:font-size="14pt" style:font-size-asian="14pt" style:font-size-complex="14pt"/>
    </style:style>
    <style:style style:name="P457" style:parent-style-name="Normal" style:family="paragraph">
      <style:text-properties style:font-name="Times New Roman" style:font-name-complex="Times New Roman" fo:font-size="14pt" style:font-size-asian="14pt" style:font-size-complex="14pt"/>
    </style:style>
    <style:style style:name="P458" style:parent-style-name="Normal" style:family="paragraph">
      <style:text-properties style:font-name="Times New Roman" style:font-name-complex="Times New Roman" fo:font-size="14pt" style:font-size-asian="14pt" style:font-size-complex="14pt"/>
    </style:style>
    <style:style style:name="T4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0" style:parent-style-name="DefaultParagraphFont" style:family="text">
      <style:text-properties style:font-name="Times New Roman" style:font-name-complex="Times New Roman" fo:font-size="14pt" style:font-size-asian="14pt" style:font-size-complex="14pt"/>
    </style:style>
    <style:style style:name="T4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3" style:parent-style-name="Normal" style:family="paragraph">
      <style:text-properties style:font-name="Times New Roman" style:font-name-complex="Times New Roman" fo:font-size="14pt" style:font-size-asian="14pt" style:font-size-complex="14pt"/>
    </style:style>
    <style:style style:name="T464" style:parent-style-name="DefaultParagraphFont" style:family="text">
      <style:text-properties style:font-name="Times New Roman" style:font-name-complex="Times New Roman" fo:font-size="14pt" style:font-size-asian="14pt" style:font-size-complex="14pt"/>
    </style:style>
    <style:style style:name="P465" style:parent-style-name="Normal" style:family="paragraph">
      <style:text-properties style:font-name="Times New Roman" style:font-name-complex="Times New Roman" fo:font-size="14pt" style:font-size-asian="14pt" style:font-size-complex="14pt"/>
    </style:style>
    <style:style style:name="T4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8" style:parent-style-name="DefaultParagraphFont" style:family="text">
      <style:text-properties style:font-name="Times New Roman" style:font-name-complex="Times New Roman"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T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1" style:parent-style-name="DefaultParagraphFont" style:family="text">
      <style:text-properties style:font-name="Times New Roman" style:font-name-complex="Times New Roman" fo:font-size="14pt" style:font-size-asian="14pt" style:font-size-complex="14pt"/>
    </style:style>
    <style:style style:name="T472" style:parent-style-name="DefaultParagraphFont" style:family="text">
      <style:text-properties style:font-name="Times New Roman" style:font-name-complex="Times New Roman" fo:font-size="14pt" style:font-size-asian="14pt" style:font-size-complex="14pt"/>
    </style:style>
    <style:style style:name="T4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4" style:parent-style-name="DefaultParagraphFont" style:family="text">
      <style:text-properties style:font-name="Times New Roman" style:font-name-complex="Times New Roman" fo:font-size="14pt" style:font-size-asian="14pt" style:font-size-complex="14pt"/>
    </style:style>
    <style:style style:name="T475"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76" style:parent-style-name="DefaultParagraphFont" style:family="text">
      <style:text-properties style:font-name="Times New Roman" style:font-name-complex="Times New Roman" fo:font-size="14pt" style:font-size-asian="14pt" style:font-size-complex="14pt"/>
    </style:style>
    <style:style style:name="P477" style:parent-style-name="Normal" style:family="paragraph">
      <style:text-properties style:font-name="Times New Roman" style:font-name-complex="Times New Roman" fo:font-size="14pt" style:font-size-asian="14pt" style:font-size-complex="14pt"/>
    </style:style>
    <style:style style:name="T478" style:parent-style-name="DefaultParagraphFont" style:family="text">
      <style:text-properties style:font-name="Times New Roman" style:font-name-complex="Times New Roman" fo:font-size="14pt" style:font-size-asian="14pt" style:font-size-complex="14pt"/>
    </style:style>
    <style:style style:name="T479" style:parent-style-name="Hyperlink" style:family="text">
      <style:text-properties style:font-name="Times New Roman" style:font-name-complex="Times New Roman" fo:font-size="14pt" style:font-size-asian="14pt" style:font-size-complex="14pt"/>
    </style:style>
    <style:style style:name="T4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2" style:parent-style-name="Normal" style:family="paragraph">
      <style:text-properties style:font-name="Times New Roman" style:font-name-complex="Times New Roman" fo:font-size="14pt" style:font-size-asian="14pt" style:font-size-complex="14pt"/>
    </style:style>
    <style:style style:name="P483" style:parent-style-name="Normal" style:family="paragraph">
      <style:text-properties style:font-name="Times New Roman" style:font-name-complex="Times New Roman" fo:font-size="14pt" style:font-size-asian="14pt" style:font-size-complex="14pt"/>
    </style:style>
    <style:style style:name="P484" style:parent-style-name="Normal" style:family="paragraph">
      <style:text-properties style:font-name="Times New Roman" style:font-name-complex="Times New Roman" fo:font-size="14pt" style:font-size-asian="14pt" style:font-size-complex="14pt"/>
    </style:style>
    <style:style style:name="T4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6" style:parent-style-name="DefaultParagraphFont" style:family="text">
      <style:text-properties style:font-name="Times New Roman" style:font-name-complex="Times New Roman" fo:font-size="14pt" style:font-size-asian="14pt" style:font-size-complex="14pt"/>
    </style:style>
    <style:style style:name="T4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9" style:parent-style-name="Normal" style:family="paragraph">
      <style:text-properties style:font-name="Times New Roman" style:font-name-complex="Times New Roman" fo:font-size="14pt" style:font-size-asian="14pt" style:font-size-complex="14pt"/>
    </style:style>
    <style:style style:name="P490" style:parent-style-name="Normal" style:family="paragraph">
      <style:text-properties style:font-name="Times New Roman" style:font-name-complex="Times New Roman" fo:font-size="14pt" style:font-size-asian="14pt" style:font-size-complex="14pt"/>
    </style:style>
    <style:style style:name="P491" style:parent-style-name="Normal" style:family="paragraph">
      <style:text-properties style:font-name="Times New Roman" style:font-name-complex="Times New Roman" fo:font-size="14pt" style:font-size-asian="14pt" style:font-size-complex="14pt"/>
    </style:style>
    <style:style style:name="T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3" style:parent-style-name="DefaultParagraphFont" style:family="text">
      <style:text-properties style:font-name="Times New Roman" style:font-name-complex="Times New Roman" fo:font-size="14pt" style:font-size-asian="14pt" style:font-size-complex="14pt"/>
    </style:style>
    <style:style style:name="T4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6" style:parent-style-name="Normal" style:family="paragraph">
      <style:text-properties style:font-name="Times New Roman" style:font-name-complex="Times New Roman" fo:font-size="14pt" style:font-size-asian="14pt" style:font-size-complex="14pt"/>
    </style:style>
    <style:style style:name="T497" style:parent-style-name="DefaultParagraphFont" style:family="text">
      <style:text-properties style:font-name="Times New Roman" style:font-name-complex="Times New Roman" fo:font-size="14pt" style:font-size-asian="14pt" style:font-size-complex="14pt"/>
    </style:style>
    <style:style style:name="P498" style:parent-style-name="Normal" style:family="paragraph">
      <style:text-properties style:font-name="Times New Roman" style:font-name-complex="Times New Roman" fo:font-size="14pt" style:font-size-asian="14pt" style:font-size-complex="14pt"/>
    </style:style>
    <style:style style:name="T4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0" style:parent-style-name="Normal" style:family="paragraph">
      <style:text-properties style:font-name="Times New Roman" style:font-name-complex="Times New Roman" fo:font-size="14pt" style:font-size-asian="14pt" style:font-size-complex="14pt"/>
    </style:style>
    <style:style style:name="T5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3" style:parent-style-name="Normal" style:family="paragraph">
      <style:text-properties style:font-name="Times New Roman" style:font-name-complex="Times New Roman" fo:font-size="14pt" style:font-size-asian="14pt" style:font-size-complex="14pt"/>
    </style:style>
    <style:style style:name="T504" style:parent-style-name="DefaultParagraphFont" style:family="text">
      <style:text-properties style:font-name="Times New Roman" style:font-name-complex="Times New Roman" fo:font-size="14pt" style:font-size-asian="14pt" style:font-size-complex="14pt"/>
    </style:style>
    <style:style style:name="P505" style:parent-style-name="Normal" style:family="paragraph">
      <style:text-properties style:font-name="Times New Roman" style:font-name-complex="Times New Roman" fo:font-size="14pt" style:font-size-asian="14pt" style:font-size-complex="14pt"/>
    </style:style>
    <style:style style:name="T5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8" style:parent-style-name="DefaultParagraphFont" style:family="text">
      <style:text-properties style:font-name="Times New Roman" style:font-name-complex="Times New Roman" fo:font-size="14pt" style:font-size-asian="14pt" style:font-size-complex="14pt"/>
    </style:style>
    <style:style style:name="T509" style:parent-style-name="DefaultParagraphFont" style:family="text">
      <style:text-properties style:font-name="Times New Roman" style:font-name-complex="Times New Roman" fo:font-size="14pt" style:font-size-asian="14pt" style:font-size-complex="14pt"/>
    </style:style>
    <style:style style:name="T510" style:parent-style-name="DefaultParagraphFont" style:family="text">
      <style:text-properties style:font-name="Times New Roman" style:font-name-complex="Times New Roman"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2" style:parent-style-name="DefaultParagraphFont" style:family="text">
      <style:text-properties style:font-name="Times New Roman" style:font-name-complex="Times New Roman" fo:font-size="14pt" style:font-size-asian="14pt" style:font-size-complex="14pt"/>
    </style:style>
    <style:style style:name="T513" style:parent-style-name="DefaultParagraphFont" style:family="text">
      <style:text-properties style:font-name="Times New Roman" style:font-name-complex="Times New Roman" fo:font-size="14pt" style:font-size-asian="14pt" style:font-size-complex="14pt"/>
    </style:style>
    <style:style style:name="T514" style:parent-style-name="DefaultParagraphFont" style:family="text">
      <style:text-properties style:font-name="Times New Roman" style:font-name-complex="Times New Roman" fo:font-size="14pt" style:font-size-asian="14pt" style:font-size-complex="14pt"/>
    </style:style>
    <style:style style:name="T5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7" style:parent-style-name="Normal" style:family="paragraph">
      <style:text-properties style:font-name="Times New Roman" style:font-name-complex="Times New Roman" fo:font-size="14pt" style:font-size-asian="14pt" style:font-size-complex="14pt"/>
    </style:style>
    <style:style style:name="P518" style:parent-style-name="Normal" style:family="paragraph">
      <style:text-properties style:font-name="Times New Roman" style:font-name-complex="Times New Roman" fo:font-size="14pt" style:font-size-asian="14pt" style:font-size-complex="14pt"/>
    </style:style>
    <style:style style:name="P519" style:parent-style-name="Normal" style:family="paragraph">
      <style:text-properties style:font-name="Times New Roman" style:font-name-complex="Times New Roman" fo:font-size="14pt" style:font-size-asian="14pt" style:font-size-complex="14pt"/>
    </style:style>
    <style:style style:name="T5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1" style:parent-style-name="DefaultParagraphFont" style:family="text">
      <style:text-properties style:font-name="Times New Roman" style:font-name-complex="Times New Roman" fo:font-size="14pt" style:font-size-asian="14pt" style:font-size-complex="14pt"/>
    </style:style>
    <style:style style:name="T5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4" style:parent-style-name="Normal" style:family="paragraph">
      <style:text-properties style:font-name="Times New Roman" style:font-name-complex="Times New Roman" fo:font-size="14pt" style:font-size-asian="14pt" style:font-size-complex="14pt"/>
    </style:style>
    <style:style style:name="P525" style:parent-style-name="Normal" style:family="paragraph">
      <style:text-properties style:font-name="Times New Roman" style:font-name-complex="Times New Roman" fo:font-size="14pt" style:font-size-asian="14pt" style:font-size-complex="14pt"/>
    </style:style>
    <style:style style:name="T5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8" style:parent-style-name="Normal" style:family="paragraph">
      <style:text-properties style:font-name="Times New Roman" style:font-name-complex="Times New Roman" fo:font-size="14pt" style:font-size-asian="14pt" style:font-size-complex="14pt"/>
    </style:style>
    <style:style style:name="T529" style:parent-style-name="DefaultParagraphFont" style:family="text">
      <style:text-properties style:font-name="Times New Roman" style:font-name-complex="Times New Roman" fo:font-size="14pt" style:font-size-asian="14pt" style:font-size-complex="14pt"/>
    </style:style>
    <style:style style:name="P530" style:parent-style-name="Normal" style:family="paragraph">
      <style:text-properties style:font-name="Times New Roman" style:font-name-complex="Times New Roman" fo:font-size="14pt" style:font-size-asian="14pt" style:font-size-complex="14pt"/>
    </style:style>
    <style:style style:name="T5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3" style:parent-style-name="DefaultParagraphFont" style:family="text">
      <style:text-properties style:font-name="Times New Roman" style:font-name-complex="Times New Roman" fo:font-size="14pt" style:font-size-asian="14pt" style:font-size-complex="14pt"/>
    </style:style>
    <style:style style:name="T534" style:parent-style-name="DefaultParagraphFont" style:family="text">
      <style:text-properties style:font-name="Times New Roman" style:font-name-complex="Times New Roman" fo:font-size="14pt" style:font-size-asian="14pt" style:font-size-complex="14pt"/>
    </style:style>
    <style:style style:name="T5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6" style:parent-style-name="DefaultParagraphFont" style:family="text">
      <style:text-properties style:font-name="Times New Roman" style:font-name-complex="Times New Roman" fo:font-size="14pt" style:font-size-asian="14pt" style:font-size-complex="14pt"/>
    </style:style>
    <style:style style:name="T537" style:parent-style-name="DefaultParagraphFont" style:family="text">
      <style:text-properties style:font-name="Times New Roman" style:font-name-complex="Times New Roman" fo:font-size="14pt" style:font-size-asian="14pt" style:font-size-complex="14pt"/>
    </style:style>
    <style:style style:name="T5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0" style:parent-style-name="Normal" style:family="paragraph">
      <style:text-properties style:font-name="Times New Roman" style:font-name-complex="Times New Roman" fo:font-size="14pt" style:font-size-asian="14pt" style:font-size-complex="14pt"/>
    </style:style>
    <style:style style:name="P541" style:parent-style-name="Normal" style:family="paragraph">
      <style:text-properties style:font-name="Times New Roman" style:font-name-complex="Times New Roman" fo:font-size="14pt" style:font-size-asian="14pt" style:font-size-complex="14pt"/>
    </style:style>
    <style:style style:name="P542" style:parent-style-name="Normal" style:family="paragraph">
      <style:text-properties style:font-name="Times New Roman" style:font-name-complex="Times New Roman" fo:font-size="14pt" style:font-size-asian="14pt" style:font-size-complex="14pt"/>
    </style:style>
    <style:style style:name="T5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4" style:parent-style-name="DefaultParagraphFont" style:family="text">
      <style:text-properties style:font-name="Times New Roman" style:font-name-complex="Times New Roman" fo:font-size="14pt" style:font-size-asian="14pt" style:font-size-complex="14pt"/>
    </style:style>
    <style:style style:name="T5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6" style:parent-style-name="Normal" style:family="paragraph">
      <style:text-properties style:font-name="Times New Roman" style:font-name-complex="Times New Roman" fo:font-size="14pt" style:font-size-asian="14pt" style:font-size-complex="14pt"/>
    </style:style>
    <style:style style:name="T547" style:parent-style-name="DefaultParagraphFont" style:family="text">
      <style:text-properties style:font-name="Times New Roman" style:font-name-complex="Times New Roman" fo:font-size="14pt" style:font-size-asian="14pt" style:font-size-complex="14pt"/>
    </style:style>
    <style:style style:name="T548" style:parent-style-name="Hyperlink" style:family="text">
      <style:text-properties style:font-name="Times New Roman" style:font-name-complex="Times New Roman" fo:font-size="14pt" style:font-size-asian="14pt" style:font-size-complex="14pt"/>
    </style:style>
    <style:style style:name="T5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1" style:parent-style-name="Normal" style:family="paragraph">
      <style:text-properties style:font-name="Times New Roman" style:font-name-complex="Times New Roman" fo:font-size="14pt" style:font-size-asian="14pt" style:font-size-complex="14pt"/>
    </style:style>
    <style:style style:name="P552" style:parent-style-name="Normal" style:family="paragraph">
      <style:text-properties style:font-name="Times New Roman" style:font-name-complex="Times New Roman" fo:font-size="14pt" style:font-size-asian="14pt" style:font-size-complex="14pt"/>
    </style:style>
    <style:style style:name="P553" style:parent-style-name="Normal" style:family="paragraph">
      <style:text-properties style:font-name="Times New Roman" style:font-name-complex="Times New Roman" fo:font-size="14pt" style:font-size-asian="14pt" style:font-size-complex="14pt"/>
    </style:style>
    <style:style style:name="T5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5" style:parent-style-name="DefaultParagraphFont" style:family="text">
      <style:text-properties style:font-name="Times New Roman" style:font-name-complex="Times New Roman" fo:font-size="14pt" style:font-size-asian="14pt" style:font-size-complex="14pt"/>
    </style:style>
    <style:style style:name="T5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7" style:parent-style-name="Normal" style:family="paragraph">
      <style:text-properties style:font-name="Times New Roman" style:font-name-complex="Times New Roman" fo:font-size="14pt" style:font-size-asian="14pt" style:font-size-complex="14pt"/>
    </style:style>
    <style:style style:name="T5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0" style:parent-style-name="Normal" style:family="paragraph">
      <style:text-properties style:font-name="Times New Roman" style:font-name-complex="Times New Roman" fo:font-size="14pt" style:font-size-asian="14pt" style:font-size-complex="14pt"/>
    </style:style>
    <style:style style:name="TableColumn562" style:family="table-column">
      <style:table-column-properties style:column-width="3.5687in"/>
    </style:style>
    <style:style style:name="Table561" style:family="table">
      <style:table-properties style:width="3.5687in" fo:margin-left="0in" table:align="left"/>
    </style:style>
    <style:style style:name="TableRow563" style:family="table-row">
      <style:table-row-properties/>
    </style:style>
    <style:style style:name="TableCell56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65" style:parent-style-name="consolas" style:family="paragraph">
      <style:text-properties fo:language="it" fo:country="IT"/>
    </style:style>
    <style:style style:name="P566" style:parent-style-name="Normal" style:family="paragraph">
      <style:text-properties style:font-name="Times New Roman" style:font-name-complex="Times New Roman" fo:font-size="14pt" style:font-size-asian="14pt" style:font-size-complex="14pt"/>
    </style:style>
    <style:style style:name="P567" style:parent-style-name="Normal" style:family="paragraph">
      <style:text-properties style:font-name="Times New Roman" style:font-name-complex="Times New Roman" fo:font-size="14pt" style:font-size-asian="14pt" style:font-size-complex="14pt"/>
    </style:style>
    <style:style style:name="T5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9" style:parent-style-name="DefaultParagraphFont" style:family="text">
      <style:text-properties style:font-name="Times New Roman" style:font-name-complex="Times New Roman" fo:font-size="14pt" style:font-size-asian="14pt" style:font-size-complex="14pt"/>
    </style:style>
    <style:style style:name="T5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1" style:parent-style-name="Normal" style:family="paragraph">
      <style:text-properties style:font-name="Times New Roman" style:font-name-complex="Times New Roman" fo:font-size="14pt" style:font-size-asian="14pt" style:font-size-complex="14pt"/>
    </style:style>
    <style:style style:name="T5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4" style:parent-style-name="Normal" style:family="paragraph">
      <style:text-properties style:font-name="Times New Roman" style:font-name-complex="Times New Roman" fo:font-size="14pt" style:font-size-asian="14pt" style:font-size-complex="14pt"/>
    </style:style>
    <style:style style:name="TableColumn576" style:family="table-column">
      <style:table-column-properties style:column-width="3.6527in"/>
    </style:style>
    <style:style style:name="Table575" style:family="table">
      <style:table-properties style:width="3.6527in" fo:margin-left="0in" table:align="left"/>
    </style:style>
    <style:style style:name="TableRow577" style:family="table-row">
      <style:table-row-properties/>
    </style:style>
    <style:style style:name="TableCell57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579" style:parent-style-name="consolas" style:family="paragraph">
      <style:text-properties fo:language="it" fo:country="IT"/>
    </style:style>
    <style:style style:name="P580" style:parent-style-name="Normal" style:family="paragraph">
      <style:text-properties style:font-name="Times New Roman" style:font-name-complex="Times New Roman" fo:font-size="14pt" style:font-size-asian="14pt" style:font-size-complex="14pt"/>
    </style:style>
    <style:style style:name="P581" style:parent-style-name="Normal" style:family="paragraph">
      <style:text-properties style:font-name="Times New Roman" style:font-name-complex="Times New Roman" fo:font-size="14pt" style:font-size-asian="14pt" style:font-size-complex="14pt"/>
    </style:style>
    <style:style style:name="T5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3" style:parent-style-name="DefaultParagraphFont" style:family="text">
      <style:text-properties style:font-name="Times New Roman" style:font-name-complex="Times New Roman" fo:font-size="14pt" style:font-size-asian="14pt" style:font-size-complex="14pt"/>
    </style:style>
    <style:style style:name="T5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5" style:parent-style-name="Normal" style:family="paragraph">
      <style:text-properties style:font-name="Times New Roman" style:font-name-complex="Times New Roman" fo:font-size="14pt" style:font-size-asian="14pt" style:font-size-complex="14pt"/>
    </style:style>
    <style:style style:name="T5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8" style:parent-style-name="Normal" style:family="paragraph">
      <style:text-properties style:font-name="Times New Roman" style:font-name-complex="Times New Roman" fo:font-size="14pt" style:font-size-asian="14pt" style:font-size-complex="14pt"/>
    </style:style>
    <style:style style:name="T589" style:parent-style-name="DefaultParagraphFont" style:family="text">
      <style:text-properties style:font-name="Times New Roman" style:font-name-complex="Times New Roman" fo:font-size="14pt" style:font-size-asian="14pt" style:font-size-complex="14pt"/>
    </style:style>
    <style:style style:name="T5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1" style:parent-style-name="Normal" style:family="paragraph">
      <style:text-properties style:font-name="Times New Roman" style:font-name-complex="Times New Roman" fo:font-size="14pt" style:font-size-asian="14pt" style:font-size-complex="14pt"/>
    </style:style>
    <style:style style:name="P592" style:parent-style-name="Normal" style:family="paragraph">
      <style:text-properties style:font-name="Times New Roman" style:font-name-complex="Times New Roman" fo:font-size="14pt" style:font-size-asian="14pt" style:font-size-complex="14pt"/>
    </style:style>
    <style:style style:name="T5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5" style:parent-style-name="Normal" style:family="paragraph">
      <style:text-properties style:font-name="Times New Roman" style:font-name-complex="Times New Roman" fo:font-size="14pt" style:font-size-asian="14pt" style:font-size-complex="14pt"/>
    </style:style>
    <style:style style:name="P596" style:parent-style-name="Normal" style:family="paragraph">
      <style:text-properties style:font-name="Times New Roman" style:font-name-complex="Times New Roman" fo:font-size="14pt" style:font-size-asian="14pt" style:font-size-complex="14pt"/>
    </style:style>
    <style:style style:name="P597" style:parent-style-name="Normal" style:family="paragraph">
      <style:text-properties style:font-name="Times New Roman" style:font-name-complex="Times New Roman" fo:font-size="14pt" style:font-size-asian="14pt" style:font-size-complex="14pt"/>
    </style:style>
    <style:style style:name="T5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9" style:parent-style-name="DefaultParagraphFont" style:family="text">
      <style:text-properties style:font-name="Times New Roman" style:font-name-complex="Times New Roman" fo:font-size="14pt" style:font-size-asian="14pt" style:font-size-complex="14pt"/>
    </style:style>
    <style:style style:name="T6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2" style:parent-style-name="Normal" style:family="paragraph">
      <style:text-properties style:font-name="Times New Roman" style:font-name-complex="Times New Roman" fo:font-size="14pt" style:font-size-asian="14pt" style:font-size-complex="14pt"/>
    </style:style>
    <style:style style:name="T603" style:parent-style-name="DefaultParagraphFont" style:family="text">
      <style:text-properties style:font-name="Times New Roman" style:font-name-complex="Times New Roman" fo:font-size="14pt" style:font-size-asian="14pt" style:font-size-complex="14pt"/>
    </style:style>
    <style:style style:name="P604" style:parent-style-name="Normal" style:family="paragraph">
      <style:text-properties style:font-name="Times New Roman" style:font-name-complex="Times New Roman" fo:font-size="14pt" style:font-size-asian="14pt" style:font-size-complex="14pt"/>
    </style:style>
    <style:style style:name="P605" style:parent-style-name="Normal" style:family="paragraph">
      <style:text-properties style:font-name="Times New Roman" style:font-name-complex="Times New Roman" fo:font-size="14pt" style:font-size-asian="14pt" style:font-size-complex="14pt"/>
    </style:style>
    <style:style style:name="P606" style:parent-style-name="Normal" style:family="paragraph">
      <style:text-properties style:font-name="Times New Roman" style:font-name-complex="Times New Roman" fo:font-size="14pt" style:font-size-asian="14pt" style:font-size-complex="14pt"/>
    </style:style>
    <style:style style:name="T6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08" style:parent-style-name="DefaultParagraphFont" style:family="text">
      <style:text-properties style:font-name="Times New Roman" style:font-name-complex="Times New Roman" fo:font-size="14pt" style:font-size-asian="14pt" style:font-size-complex="14pt"/>
    </style:style>
    <style:style style:name="T6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1" style:parent-style-name="Normal" style:family="paragraph">
      <style:text-properties style:font-name="Times New Roman" style:font-name-complex="Times New Roman" fo:font-size="14pt" style:font-size-asian="14pt" style:font-size-complex="14pt"/>
    </style:style>
    <style:style style:name="T612" style:parent-style-name="DefaultParagraphFont" style:family="text">
      <style:text-properties style:font-name="Times New Roman" style:font-name-complex="Times New Roman" fo:font-size="14pt" style:font-size-asian="14pt" style:font-size-complex="14pt"/>
    </style:style>
    <style:style style:name="T613" style:parent-style-name="Hyperlink" style:family="text">
      <style:text-properties style:font-name="Times New Roman" style:font-name-complex="Times New Roman" fo:font-size="14pt" style:font-size-asian="14pt" style:font-size-complex="14pt"/>
    </style:style>
    <style:style style:name="T6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6" style:parent-style-name="Normal" style:family="paragraph">
      <style:text-properties style:font-name="Times New Roman" style:font-name-complex="Times New Roman" fo:font-size="14pt" style:font-size-asian="14pt" style:font-size-complex="14pt"/>
    </style:style>
    <style:style style:name="T617" style:parent-style-name="DefaultParagraphFont" style:family="text">
      <style:text-properties style:font-name="Times New Roman" style:font-name-complex="Times New Roman" fo:font-size="14pt" style:font-size-asian="14pt" style:font-size-complex="14pt"/>
    </style:style>
    <style:style style:name="P618" style:parent-style-name="Normal" style:family="paragraph">
      <style:text-properties style:font-name="Times New Roman" style:font-name-complex="Times New Roman" fo:font-size="14pt" style:font-size-asian="14pt" style:font-size-complex="14pt"/>
    </style:style>
    <style:style style:name="T6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4pt" style:font-size-asian="14pt" style:font-size-complex="14pt"/>
    </style:style>
    <style:style style:name="T622" style:parent-style-name="DefaultParagraphFont" style:family="text">
      <style:text-properties style:font-name="Times New Roman" style:font-name-complex="Times New Roman" fo:font-size="14pt" style:font-size-asian="14pt" style:font-size-complex="14pt"/>
    </style:style>
    <style:style style:name="T623" style:parent-style-name="DefaultParagraphFont" style:family="text">
      <style:text-properties style:font-name="Times New Roman" style:font-name-complex="Times New Roman" fo:font-size="14pt" style:font-size-asian="14pt" style:font-size-complex="14pt"/>
    </style:style>
    <style:style style:name="T624" style:parent-style-name="DefaultParagraphFont" style:family="text">
      <style:text-properties style:font-name="Times New Roman" style:font-name-complex="Times New Roman" fo:font-size="14pt" style:font-size-asian="14pt" style:font-size-complex="14pt"/>
    </style:style>
    <style:style style:name="T6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6" style:parent-style-name="DefaultParagraphFont" style:family="text">
      <style:text-properties style:font-name="Times New Roman" style:font-name-complex="Times New Roman" fo:font-size="14pt" style:font-size-asian="14pt" style:font-size-complex="14pt"/>
    </style:style>
    <style:style style:name="T627" style:parent-style-name="DefaultParagraphFont" style:family="text">
      <style:text-properties style:font-name="Times New Roman" style:font-name-complex="Times New Roman" fo:font-size="14pt" style:font-size-asian="14pt" style:font-size-complex="14pt"/>
    </style:style>
    <style:style style:name="T628" style:parent-style-name="DefaultParagraphFont" style:family="text">
      <style:text-properties style:font-name="Times New Roman" style:font-name-complex="Times New Roman" fo:font-size="14pt" style:font-size-asian="14pt" style:font-size-complex="14pt"/>
    </style:style>
    <style:style style:name="T6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1" style:parent-style-name="Normal" style:family="paragraph">
      <style:text-properties style:font-name="Times New Roman" style:font-name-complex="Times New Roman" fo:font-size="14pt" style:font-size-asian="14pt" style:font-size-complex="14pt"/>
    </style:style>
    <style:style style:name="P632" style:parent-style-name="Normal" style:family="paragraph">
      <style:text-properties style:font-name="Times New Roman" style:font-name-complex="Times New Roman" fo:font-size="14pt" style:font-size-asian="14pt" style:font-size-complex="14pt"/>
    </style:style>
    <style:style style:name="P633" style:parent-style-name="Normal" style:family="paragraph">
      <style:text-properties style:font-name="Times New Roman" style:font-name-complex="Times New Roman" fo:font-size="14pt" style:font-size-asian="14pt" style:font-size-complex="14pt"/>
    </style:style>
    <style:style style:name="T6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5" style:parent-style-name="DefaultParagraphFont" style:family="text">
      <style:text-properties style:font-name="Times New Roman" style:font-name-complex="Times New Roman" fo:font-size="14pt" style:font-size-asian="14pt" style:font-size-complex="14pt"/>
    </style:style>
    <style:style style:name="T6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8" style:parent-style-name="Normal" style:family="paragraph">
      <style:text-properties style:font-name="Times New Roman" style:font-name-complex="Times New Roman" fo:font-size="14pt" style:font-size-asian="14pt" style:font-size-complex="14pt"/>
    </style:style>
    <style:style style:name="P639" style:parent-style-name="Normal" style:family="paragraph">
      <style:text-properties style:font-name="Times New Roman" style:font-name-complex="Times New Roman" fo:font-size="14pt" style:font-size-asian="14pt" style:font-size-complex="14pt"/>
    </style:style>
    <style:style style:name="P640" style:parent-style-name="Normal" style:family="paragraph">
      <style:text-properties style:font-name="Times New Roman" style:font-name-complex="Times New Roman" fo:font-size="14pt" style:font-size-asian="14pt" style:font-size-complex="14pt"/>
    </style:style>
    <style:style style:name="P641" style:parent-style-name="Normal" style:family="paragraph">
      <style:text-properties style:font-name="Times New Roman" style:font-name-complex="Times New Roman"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3" style:parent-style-name="DefaultParagraphFont" style:family="text">
      <style:text-properties style:font-name="Times New Roman" style:font-name-complex="Times New Roman" fo:font-size="14pt" style:font-size-asian="14pt" style:font-size-complex="14pt"/>
    </style:style>
    <style:style style:name="T6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5" style:parent-style-name="Normal" style:family="paragraph">
      <style:text-properties style:font-name="Times New Roman" style:font-name-complex="Times New Roman" fo:font-size="14pt" style:font-size-asian="14pt" style:font-size-complex="14pt"/>
    </style:style>
    <style:style style:name="T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8" style:parent-style-name="Normal" style:family="paragraph">
      <style:text-properties style:font-name="Times New Roman" style:font-name-complex="Times New Roman" fo:font-size="14pt" style:font-size-asian="14pt" style:font-size-complex="14pt"/>
    </style:style>
    <style:style style:name="P649" style:parent-style-name="Normal" style:family="paragraph">
      <style:text-properties style:font-name="Times New Roman" style:font-name-complex="Times New Roman" fo:font-size="14pt" style:font-size-asian="14pt" style:font-size-complex="14pt"/>
    </style:style>
    <style:style style:name="P650" style:parent-style-name="Normal" style:family="paragraph">
      <style:text-properties style:font-name="Times New Roman" style:font-name-complex="Times New Roman" fo:font-size="14pt" style:font-size-asian="14pt" style:font-size-complex="14pt"/>
    </style:style>
    <style:style style:name="T6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2" style:parent-style-name="DefaultParagraphFont" style:family="text">
      <style:text-properties style:font-name="Times New Roman" style:font-name-complex="Times New Roman" fo:font-size="14pt" style:font-size-asian="14pt" style:font-size-complex="14pt"/>
    </style:style>
    <style:style style:name="T6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4" style:parent-style-name="DefaultParagraphFont" style:family="text">
      <style:text-properties style:font-name="Times New Roman" style:font-name-complex="Times New Roman" fo:font-size="14pt" style:font-size-asian="14pt" style:font-size-complex="14pt"/>
    </style:style>
    <style:style style:name="T6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6" style:parent-style-name="DefaultParagraphFont" style:family="text">
      <style:text-properties style:font-name="Times New Roman" style:font-name-complex="Times New Roman" fo:font-size="14pt" style:font-size-asian="14pt" style:font-size-complex="14pt"/>
    </style:style>
    <style:style style:name="T6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9" style:parent-style-name="Normal" style:family="paragraph">
      <style:text-properties style:font-name="Times New Roman" style:font-name-complex="Times New Roman" fo:font-size="14pt" style:font-size-asian="14pt" style:font-size-complex="14pt"/>
    </style:style>
    <style:style style:name="T660" style:parent-style-name="DefaultParagraphFont" style:family="text">
      <style:text-properties style:font-name="Times New Roman" style:font-name-complex="Times New Roman" fo:font-size="14pt" style:font-size-asian="14pt" style:font-size-complex="14pt"/>
    </style:style>
    <style:style style:name="P661" style:parent-style-name="Normal" style:family="paragraph">
      <style:text-properties style:font-name="Times New Roman" style:font-name-complex="Times New Roman" fo:font-size="14pt" style:font-size-asian="14pt" style:font-size-complex="14pt"/>
    </style:style>
    <style:style style:name="P662" style:parent-style-name="Normal" style:family="paragraph">
      <style:text-properties style:font-name="Times New Roman" style:font-name-complex="Times New Roman" fo:font-size="14pt" style:font-size-asian="14pt" style:font-size-complex="14pt"/>
    </style:style>
    <style:style style:name="P663" style:parent-style-name="Normal" style:family="paragraph">
      <style:text-properties style:font-name="Times New Roman" style:font-name-complex="Times New Roman" fo:font-size="14pt" style:font-size-asian="14pt" style:font-size-complex="14pt"/>
    </style:style>
    <style:style style:name="T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5" style:parent-style-name="DefaultParagraphFont" style:family="text">
      <style:text-properties style:font-name="Times New Roman" style:font-name-complex="Times New Roman" fo:font-size="14pt" style:font-size-asian="14pt" style:font-size-complex="14pt"/>
    </style:style>
    <style:style style:name="T6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67" style:parent-style-name="Normal" style:family="paragraph">
      <style:text-properties style:font-name="Times New Roman" style:font-name-complex="Times New Roman" fo:font-size="14pt" style:font-size-asian="14pt" style:font-size-complex="14pt"/>
    </style:style>
    <style:style style:name="P668" style:parent-style-name="Normal" style:family="paragraph">
      <style:text-properties style:font-name="Times New Roman" style:font-name-complex="Times New Roman" fo:font-size="14pt" style:font-size-asian="14pt" style:font-size-complex="14pt"/>
    </style:style>
    <style:style style:name="T6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1" style:parent-style-name="Normal" style:family="paragraph">
      <style:text-properties style:font-name="Times New Roman" style:font-name-complex="Times New Roman" fo:font-size="14pt" style:font-size-asian="14pt" style:font-size-complex="14pt"/>
    </style:style>
    <style:style style:name="P672" style:parent-style-name="Normal" style:family="paragraph">
      <style:text-properties style:font-name="Times New Roman" style:font-name-complex="Times New Roman" fo:font-size="14pt" style:font-size-asian="14pt" style:font-size-complex="14pt"/>
    </style:style>
    <style:style style:name="P673" style:parent-style-name="Normal" style:family="paragraph">
      <style:text-properties style:font-name="Times New Roman" style:font-name-complex="Times New Roman" fo:font-size="14pt" style:font-size-asian="14pt" style:font-size-complex="14pt"/>
    </style:style>
    <style:style style:name="T6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5" style:parent-style-name="DefaultParagraphFont" style:family="text">
      <style:text-properties style:font-name="Times New Roman" style:font-name-complex="Times New Roman" fo:font-size="14pt" style:font-size-asian="14pt" style:font-size-complex="14pt"/>
    </style:style>
    <style:style style:name="T6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8" style:parent-style-name="Normal" style:family="paragraph">
      <style:text-properties style:font-name="Times New Roman" style:font-name-complex="Times New Roman" fo:font-size="14pt" style:font-size-asian="14pt" style:font-size-complex="14pt"/>
    </style:style>
    <style:style style:name="T6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0" style:parent-style-name="DefaultParagraphFont" style:family="text">
      <style:text-properties style:font-name="Times New Roman" style:font-name-complex="Times New Roman" fo:font-size="14pt" style:font-size-asian="14pt" style:font-size-complex="14pt"/>
    </style:style>
    <style:style style:name="T68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82" style:parent-style-name="DefaultParagraphFont" style:family="text">
      <style:text-properties style:font-name="Times New Roman" style:font-name-complex="Times New Roman" fo:font-size="14pt" style:font-size-asian="14pt" style:font-size-complex="14pt"/>
    </style:style>
    <style:style style:name="T683" style:parent-style-name="DefaultParagraphFont" style:family="text">
      <style:text-properties style:font-name="Times New Roman" style:font-name-complex="Times New Roman" fo:font-size="14pt" style:font-size-asian="14pt" style:font-size-complex="14pt"/>
    </style:style>
    <style:style style:name="T684" style:parent-style-name="Hyperlink" style:family="text">
      <style:text-properties style:font-name="Times New Roman" style:font-name-complex="Times New Roman" fo:font-size="14pt" style:font-size-asian="14pt" style:font-size-complex="14pt"/>
    </style:style>
    <style:style style:name="T6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7" style:parent-style-name="Normal" style:family="paragraph">
      <style:text-properties style:font-name="Times New Roman" style:font-name-complex="Times New Roman" fo:font-size="14pt" style:font-size-asian="14pt" style:font-size-complex="14pt"/>
    </style:style>
    <style:style style:name="P688" style:parent-style-name="Normal" style:family="paragraph">
      <style:text-properties style:font-name="Times New Roman" style:font-name-complex="Times New Roman" fo:font-size="14pt" style:font-size-asian="14pt" style:font-size-complex="14pt"/>
    </style:style>
    <style:style style:name="P689" style:parent-style-name="Normal" style:family="paragraph">
      <style:text-properties style:font-name="Times New Roman" style:font-name-complex="Times New Roman" fo:font-size="14pt" style:font-size-asian="14pt" style:font-size-complex="14pt"/>
    </style:style>
    <style:style style:name="T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1" style:parent-style-name="DefaultParagraphFont" style:family="text">
      <style:text-properties style:font-name="Times New Roman" style:font-name-complex="Times New Roman" fo:font-size="14pt" style:font-size-asian="14pt" style:font-size-complex="14pt"/>
    </style:style>
    <style:style style:name="T6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3" style:parent-style-name="Normal" style:family="paragraph">
      <style:text-properties style:font-name="Times New Roman" style:font-name-complex="Times New Roman" fo:font-size="14pt" style:font-size-asian="14pt" style:font-size-complex="14pt"/>
    </style:style>
    <style:style style:name="T6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6" style:parent-style-name="Normal" style:family="paragraph">
      <style:text-properties style:font-name="Times New Roman" style:font-name-complex="Times New Roman" fo:font-size="14pt" style:font-size-asian="14pt" style:font-size-complex="14pt"/>
    </style:style>
    <style:style style:name="P697" style:parent-style-name="Normal" style:family="paragraph">
      <style:text-properties style:font-name="Times New Roman" style:font-name-complex="Times New Roman" fo:font-size="14pt" style:font-size-asian="14pt" style:font-size-complex="14pt"/>
    </style:style>
    <style:style style:name="P698" style:parent-style-name="Normal" style:family="paragraph">
      <style:text-properties style:font-name="Times New Roman" style:font-name-complex="Times New Roman" fo:font-size="14pt" style:font-size-asian="14pt" style:font-size-complex="14pt"/>
    </style:style>
    <style:style style:name="P699" style:parent-style-name="Normal" style:family="paragraph">
      <style:text-properties style:font-name="Times New Roman" style:font-name-complex="Times New Roman" fo:font-size="14pt" style:font-size-asian="14pt" style:font-size-complex="14pt"/>
    </style:style>
    <style:style style:name="T7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1" style:parent-style-name="DefaultParagraphFont" style:family="text">
      <style:text-properties style:font-name="Times New Roman" style:font-name-complex="Times New Roman" fo:font-size="14pt" style:font-size-asian="14pt" style:font-size-complex="14pt"/>
    </style:style>
    <style:style style:name="T7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3" style:parent-style-name="Normal" style:family="paragraph">
      <style:text-properties style:font-name="Times New Roman" style:font-name-complex="Times New Roman" fo:font-size="14pt" style:font-size-asian="14pt" style:font-size-complex="14pt"/>
    </style:style>
    <style:style style:name="P704" style:parent-style-name="Normal" style:family="paragraph">
      <style:text-properties style:font-name="Times New Roman" style:font-name-complex="Times New Roman" fo:font-size="14pt" style:font-size-asian="14pt" style:font-size-complex="14pt"/>
    </style:style>
    <style:style style:name="P705" style:parent-style-name="Normal" style:family="paragraph">
      <style:text-properties style:font-name="Times New Roman" style:font-name-complex="Times New Roman" fo:font-size="14pt" style:font-size-asian="14pt" style:font-size-complex="14pt"/>
    </style:style>
    <style:style style:name="P706" style:parent-style-name="Normal" style:family="paragraph">
      <style:text-properties style:font-name="Times New Roman" style:font-name-complex="Times New Roman" fo:font-size="14pt" style:font-size-asian="14pt" style:font-size-complex="14pt"/>
    </style:style>
    <style:style style:name="T7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9" style:parent-style-name="Normal" style:family="paragraph">
      <style:text-properties style:font-name="Times New Roman" style:font-name-complex="Times New Roman" fo:font-size="14pt" style:font-size-asian="14pt" style:font-size-complex="14pt"/>
    </style:style>
    <style:style style:name="T710" style:parent-style-name="DefaultParagraphFont" style:family="text">
      <style:text-properties style:font-name="Times New Roman" style:font-name-complex="Times New Roman" fo:font-size="14pt" style:font-size-asian="14pt" style:font-size-complex="14pt"/>
    </style:style>
    <style:style style:name="T7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2" style:parent-style-name="DefaultParagraphFont" style:family="text">
      <style:text-properties style:font-name="Times New Roman" style:font-name-complex="Times New Roman" fo:font-size="14pt" style:font-size-asian="14pt" style:font-size-complex="14pt"/>
    </style:style>
    <style:style style:name="P713" style:parent-style-name="Normal" style:family="paragraph">
      <style:text-properties style:font-name="Times New Roman" style:font-name-complex="Times New Roman" fo:font-size="14pt" style:font-size-asian="14pt" style:font-size-complex="14pt"/>
    </style:style>
    <style:style style:name="P714" style:parent-style-name="Normal" style:family="paragraph">
      <style:text-properties style:font-name="Times New Roman" style:font-name-complex="Times New Roman" fo:font-size="14pt" style:font-size-asian="14pt" style:font-size-complex="14pt"/>
    </style:style>
    <style:style style:name="P715" style:parent-style-name="Normal" style:family="paragraph">
      <style:text-properties style:font-name="Times New Roman" style:font-name-complex="Times New Roman" fo:font-size="14pt" style:font-size-asian="14pt" style:font-size-complex="14pt"/>
    </style:style>
    <style:style style:name="P716" style:parent-style-name="Normal" style:family="paragraph">
      <style:text-properties style:font-name="Times New Roman" style:font-name-complex="Times New Roman" fo:font-size="14pt" style:font-size-asian="14pt" style:font-size-complex="14pt"/>
    </style:style>
    <style:style style:name="P717" style:parent-style-name="Normal" style:family="paragraph">
      <style:text-properties style:font-name="Times New Roman" style:font-name-complex="Times New Roman" fo:font-size="14pt" style:font-size-asian="14pt" style:font-size-complex="14pt"/>
    </style:style>
    <style:style style:name="T7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9" style:parent-style-name="DefaultParagraphFont" style:family="text">
      <style:text-properties style:font-name="Times New Roman" style:font-name-complex="Times New Roman" fo:font-size="14pt" style:font-size-asian="14pt" style:font-size-complex="14pt"/>
    </style:style>
    <style:style style:name="T7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21" style:parent-style-name="Normal" style:family="paragraph">
      <style:text-properties style:font-name="Times New Roman" style:font-name-complex="Times New Roman" fo:font-size="14pt" style:font-size-asian="14pt" style:font-size-complex="14pt"/>
    </style:style>
    <style:style style:name="T7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24" style:parent-style-name="Normal" style:family="paragraph">
      <style:text-properties style:font-name="Times New Roman" style:font-name-complex="Times New Roman" fo:font-size="14pt" style:font-size-asian="14pt" style:font-size-complex="14pt"/>
    </style:style>
    <style:style style:name="T725" style:parent-style-name="DefaultParagraphFont" style:family="text">
      <style:text-properties style:font-name="Times New Roman" style:font-name-complex="Times New Roman" fo:font-size="14pt" style:font-size-asian="14pt" style:font-size-complex="14pt"/>
    </style:style>
    <style:style style:name="P726" style:parent-style-name="consolas" style:family="paragraph">
      <style:text-properties fo:language="it" fo:country="IT"/>
    </style:style>
    <style:style style:name="P727" style:parent-style-name="consolas" style:family="paragraph">
      <style:text-properties fo:language="it" fo:country="IT"/>
    </style:style>
    <style:style style:name="P728" style:parent-style-name="consolas" style:family="paragraph">
      <style:text-properties fo:language="it" fo:country="IT"/>
    </style:style>
    <style:style style:name="P729" style:parent-style-name="Normal" style:family="paragraph">
      <style:text-properties style:font-name="Times New Roman" style:font-name-complex="Times New Roman" fo:font-size="14pt" style:font-size-asian="14pt" style:font-size-complex="14pt"/>
    </style:style>
    <style:style style:name="P730" style:parent-style-name="Normal" style:family="paragraph">
      <style:text-properties style:font-name="Times New Roman" style:font-name-complex="Times New Roman" fo:font-size="14pt" style:font-size-asian="14pt" style:font-size-complex="14pt"/>
    </style:style>
    <style:style style:name="P731" style:parent-style-name="Normal" style:family="paragraph">
      <style:text-properties style:font-name="Times New Roman" style:font-name-complex="Times New Roman" fo:font-size="14pt" style:font-size-asian="14pt" style:font-size-complex="14pt"/>
    </style:style>
    <style:style style:name="T7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3" style:parent-style-name="DefaultParagraphFont" style:family="text">
      <style:text-properties style:font-name="Times New Roman" style:font-name-complex="Times New Roman" fo:font-size="14pt" style:font-size-asian="14pt" style:font-size-complex="14pt"/>
    </style:style>
    <style:style style:name="T7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5" style:parent-style-name="DefaultParagraphFont" style:family="text">
      <style:text-properties style:font-name="Times New Roman" style:font-name-complex="Times New Roman" fo:font-size="14pt" style:font-size-asian="14pt" style:font-size-complex="14pt"/>
    </style:style>
    <style:style style:name="T7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7" style:parent-style-name="DefaultParagraphFont" style:family="text">
      <style:text-properties style:font-name="Times New Roman" style:font-name-complex="Times New Roman" fo:font-size="14pt" style:font-size-asian="14pt" style:font-size-complex="14pt"/>
    </style:style>
    <style:style style:name="T7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40" style:parent-style-name="Normal" style:family="paragraph">
      <style:text-properties style:font-name="Times New Roman" style:font-name-complex="Times New Roman" fo:font-size="14pt" style:font-size-asian="14pt" style:font-size-complex="14pt"/>
    </style:style>
    <style:style style:name="P741" style:parent-style-name="Normal" style:family="paragraph">
      <style:text-properties style:font-name="Times New Roman" style:font-name-complex="Times New Roman" fo:font-size="14pt" style:font-size-asian="14pt" style:font-size-complex="14pt"/>
    </style:style>
    <style:style style:name="P742" style:parent-style-name="Normal" style:family="paragraph">
      <style:text-properties style:font-name="Times New Roman" style:font-name-complex="Times New Roman" fo:font-size="14pt" style:font-size-asian="14pt" style:font-size-complex="14pt"/>
    </style:style>
    <style:style style:name="T7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4" style:parent-style-name="DefaultParagraphFont" style:family="text">
      <style:text-properties style:font-name="Times New Roman" style:font-name-complex="Times New Roman" fo:font-size="14pt" style:font-size-asian="14pt" style:font-size-complex="14pt"/>
    </style:style>
    <style:style style:name="T7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7" style:parent-style-name="DefaultParagraphFont" style:family="text">
      <style:text-properties style:font-name="Times New Roman" style:font-name-complex="Times New Roman" fo:font-size="14pt" style:font-size-asian="14pt" style:font-size-complex="14pt"/>
    </style:style>
    <style:style style:name="P748" style:parent-style-name="Normal" style:family="paragraph">
      <style:text-properties style:font-name="Times New Roman" style:font-name-complex="Times New Roman" fo:font-size="14pt" style:font-size-asian="14pt" style:font-size-complex="14pt"/>
    </style:style>
    <style:style style:name="T7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0" style:parent-style-name="DefaultParagraphFont" style:family="text">
      <style:text-properties style:font-name="Times New Roman" style:font-name-complex="Times New Roman" fo:font-size="14pt" style:font-size-asian="14pt" style:font-size-complex="14pt"/>
    </style:style>
    <style:style style:name="T7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2" style:parent-style-name="DefaultParagraphFont" style:family="text">
      <style:text-properties style:font-name="Times New Roman" style:font-name-complex="Times New Roman" fo:font-size="14pt" style:font-size-asian="14pt" style:font-size-complex="14pt"/>
    </style:style>
    <style:style style:name="T753" style:parent-style-name="DefaultParagraphFont" style:family="text">
      <style:text-properties style:font-name="Times New Roman" style:font-name-complex="Times New Roman" fo:font-size="14pt" style:font-size-asian="14pt" style:font-size-complex="14pt"/>
    </style:style>
    <style:style style:name="T7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5" style:parent-style-name="DefaultParagraphFont" style:family="text">
      <style:text-properties style:font-name="Times New Roman" style:font-name-complex="Times New Roman" fo:font-size="14pt" style:font-size-asian="14pt" style:font-size-complex="14pt"/>
    </style:style>
    <style:style style:name="T7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8" style:parent-style-name="Normal" style:family="paragraph">
      <style:text-properties style:font-name="Times New Roman" style:font-name-complex="Times New Roman" fo:font-size="14pt" style:font-size-asian="14pt" style:font-size-complex="14pt"/>
    </style:style>
    <style:style style:name="P759" style:parent-style-name="Normal" style:family="paragraph">
      <style:text-properties style:font-name="Times New Roman" style:font-name-complex="Times New Roman"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T7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2" style:parent-style-name="DefaultParagraphFont" style:family="text">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4" style:parent-style-name="DefaultParagraphFont" style:family="text">
      <style:text-properties style:font-name="Times New Roman" style:font-name-complex="Times New Roman" fo:font-size="14pt" style:font-size-asian="14pt" style:font-size-complex="14pt"/>
    </style:style>
    <style:style style:name="T765"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766" style:parent-style-name="DefaultParagraphFont" style:family="text">
      <style:text-properties style:font-name="Times New Roman" style:font-name-complex="Times New Roman" fo:font-size="14pt" style:font-size-asian="14pt" style:font-size-complex="14pt"/>
    </style:style>
    <style:style style:name="T767" style:parent-style-name="DefaultParagraphFont" style:family="text">
      <style:text-properties style:font-name="Times New Roman" style:font-name-complex="Times New Roman" fo:font-size="14pt" style:font-size-asian="14pt" style:font-size-complex="14pt"/>
    </style:style>
    <style:style style:name="T768" style:parent-style-name="Hyperlink" style:family="text">
      <style:text-properties style:font-name="Times New Roman" style:font-name-complex="Times New Roman" fo:font-size="14pt" style:font-size-asian="14pt" style:font-size-complex="14pt"/>
    </style:style>
    <style:style style:name="T7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1" style:parent-style-name="Normal" style:family="paragraph">
      <style:text-properties style:font-name="Times New Roman" style:font-name-complex="Times New Roman" fo:font-size="14pt" style:font-size-asian="14pt" style:font-size-complex="14pt"/>
    </style:style>
    <style:style style:name="P772" style:parent-style-name="Normal" style:family="paragraph">
      <style:text-properties style:font-name="Times New Roman" style:font-name-complex="Times New Roman" fo:font-size="14pt" style:font-size-asian="14pt" style:font-size-complex="14pt"/>
    </style:style>
    <style:style style:name="P773" style:parent-style-name="Normal" style:family="paragraph">
      <style:text-properties style:font-name="Times New Roman" style:font-name-complex="Times New Roman" fo:font-size="14pt" style:font-size-asian="14pt" style:font-size-complex="14pt"/>
    </style:style>
    <style:style style:name="T7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5" style:parent-style-name="DefaultParagraphFont" style:family="text">
      <style:text-properties style:font-name="Times New Roman" style:font-name-complex="Times New Roman" fo:font-size="14pt" style:font-size-asian="14pt" style:font-size-complex="14pt"/>
    </style:style>
    <style:style style:name="T7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78" style:parent-style-name="Normal" style:family="paragraph">
      <style:text-properties style:font-name="Times New Roman" style:font-name-complex="Times New Roman" fo:font-size="14pt" style:font-size-asian="14pt" style:font-size-complex="14pt"/>
    </style:style>
    <style:style style:name="P779" style:parent-style-name="Normal" style:family="paragraph">
      <style:text-properties style:font-name="Times New Roman" style:font-name-complex="Times New Roman" fo:font-size="14pt" style:font-size-asian="14pt" style:font-size-complex="14pt"/>
    </style:style>
    <style:style style:name="P780" style:parent-style-name="Normal" style:family="paragraph">
      <style:text-properties style:font-name="Times New Roman" style:font-name-complex="Times New Roman" fo:font-size="14pt" style:font-size-asian="14pt" style:font-size-complex="14pt"/>
    </style:style>
    <style:style style:name="T7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2" style:parent-style-name="DefaultParagraphFont" style:family="text">
      <style:text-properties style:font-name="Times New Roman" style:font-name-complex="Times New Roman" fo:font-size="14pt" style:font-size-asian="14pt" style:font-size-complex="14pt"/>
    </style:style>
    <style:style style:name="T7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85" style:parent-style-name="Normal" style:family="paragraph">
      <style:text-properties style:font-name="Times New Roman" style:font-name-complex="Times New Roman" fo:font-size="14pt" style:font-size-asian="14pt" style:font-size-complex="14pt"/>
    </style:style>
    <style:style style:name="P786" style:parent-style-name="Normal" style:family="paragraph">
      <style:text-properties style:font-name="Times New Roman" style:font-name-complex="Times New Roman" fo:font-size="14pt" style:font-size-asian="14pt" style:font-size-complex="14pt"/>
    </style:style>
    <style:style style:name="P787" style:parent-style-name="Normal" style:family="paragraph">
      <style:text-properties style:font-name="Times New Roman" style:font-name-complex="Times New Roman" fo:font-size="14pt" style:font-size-asian="14pt" style:font-size-complex="14pt"/>
    </style:style>
    <style:style style:name="T7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9" style:parent-style-name="DefaultParagraphFont" style:family="text">
      <style:text-properties style:font-name="Times New Roman" style:font-name-complex="Times New Roman" fo:font-size="14pt" style:font-size-asian="14pt" style:font-size-complex="14pt"/>
    </style:style>
    <style:style style:name="T7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1" style:parent-style-name="Normal" style:family="paragraph">
      <style:text-properties style:font-name="Times New Roman" style:font-name-complex="Times New Roman" fo:font-size="14pt" style:font-size-asian="14pt" style:font-size-complex="14pt"/>
    </style:style>
    <style:style style:name="T792" style:parent-style-name="DefaultParagraphFont" style:family="text">
      <style:text-properties style:font-name="Times New Roman" style:font-name-complex="Times New Roman" fo:font-size="14pt" style:font-size-asian="14pt" style:font-size-complex="14pt"/>
    </style:style>
    <style:style style:name="P793" style:parent-style-name="Normal" style:family="paragraph">
      <style:text-properties style:font-name="Times New Roman" style:font-name-complex="Times New Roman" fo:font-size="14pt" style:font-size-asian="14pt" style:font-size-complex="14pt"/>
    </style:style>
    <style:style style:name="T794" style:parent-style-name="DefaultParagraphFont" style:family="text">
      <style:text-properties style:font-name="Times New Roman" style:font-name-complex="Times New Roman" fo:font-size="14pt" style:font-size-asian="14pt" style:font-size-complex="14pt"/>
    </style:style>
    <style:style style:name="P795" style:parent-style-name="Normal" style:family="paragraph">
      <style:text-properties style:font-name="Times New Roman" style:font-name-complex="Times New Roman" fo:font-size="14pt" style:font-size-asian="14pt" style:font-size-complex="14pt"/>
    </style:style>
    <style:style style:name="T7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8" style:parent-style-name="Normal" style:family="paragraph">
      <style:text-properties style:font-name="Times New Roman" style:font-name-complex="Times New Roman" fo:font-size="14pt" style:font-size-asian="14pt" style:font-size-complex="14pt"/>
    </style:style>
    <style:style style:name="P799" style:parent-style-name="Normal" style:family="paragraph">
      <style:text-properties style:font-name="Times New Roman" style:font-name-complex="Times New Roman" fo:font-size="14pt" style:font-size-asian="14pt" style:font-size-complex="14pt"/>
    </style:style>
    <style:style style:name="P800" style:parent-style-name="Normal" style:family="paragraph">
      <style:text-properties style:font-name="Times New Roman" style:font-name-complex="Times New Roman" fo:font-size="14pt" style:font-size-asian="14pt" style:font-size-complex="14pt"/>
    </style:style>
    <style:style style:name="T8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2" style:parent-style-name="DefaultParagraphFont" style:family="text">
      <style:text-properties style:font-name="Times New Roman" style:font-name-complex="Times New Roman" fo:font-size="14pt" style:font-size-asian="14pt" style:font-size-complex="14pt"/>
    </style:style>
    <style:style style:name="T8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4" style:parent-style-name="DefaultParagraphFont" style:family="text">
      <style:text-properties style:font-name="Times New Roman" style:font-name-complex="Times New Roman" fo:font-size="14pt" style:font-size-asian="14pt" style:font-size-complex="14pt"/>
    </style:style>
    <style:style style:name="T805"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06" style:parent-style-name="DefaultParagraphFont" style:family="text">
      <style:text-properties style:font-name="Times New Roman" style:font-name-complex="Times New Roman" fo:font-size="14pt" style:font-size-asian="14pt" style:font-size-complex="14pt"/>
    </style:style>
    <style:style style:name="T807" style:parent-style-name="DefaultParagraphFont" style:family="text">
      <style:text-properties style:font-name="Times New Roman" style:font-name-complex="Times New Roman" fo:font-size="14pt" style:font-size-asian="14pt" style:font-size-complex="14pt"/>
    </style:style>
    <style:style style:name="T80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809" style:parent-style-name="DefaultParagraphFont" style:family="text">
      <style:text-properties style:font-name="Times New Roman" style:font-name-complex="Times New Roman" fo:font-size="14pt" style:font-size-asian="14pt" style:font-size-complex="14pt"/>
    </style:style>
    <style:style style:name="P810" style:parent-style-name="Normal" style:family="paragraph">
      <style:text-properties style:font-name="Times New Roman" style:font-name-complex="Times New Roman" fo:font-size="14pt" style:font-size-asian="14pt" style:font-size-complex="14pt"/>
    </style:style>
    <style:style style:name="T811" style:parent-style-name="DefaultParagraphFont" style:family="text">
      <style:text-properties style:font-name="Times New Roman" style:font-name-complex="Times New Roman" fo:font-size="14pt" style:font-size-asian="14pt" style:font-size-complex="14pt"/>
    </style:style>
    <style:style style:name="T812" style:parent-style-name="Hyperlink" style:family="text">
      <style:text-properties style:font-name="Times New Roman" style:font-name-complex="Times New Roman" fo:font-size="14pt" style:font-size-asian="14pt" style:font-size-complex="14pt"/>
    </style:style>
    <style:style style:name="P813" style:parent-style-name="Normal" style:family="paragraph">
      <style:text-properties style:font-name="Times New Roman" style:font-name-complex="Times New Roman" fo:font-size="14pt" style:font-size-asian="14pt" style:font-size-complex="14pt"/>
    </style:style>
    <style:style style:name="P814" style:parent-style-name="Normal" style:family="paragraph">
      <style:text-properties style:font-name="Times New Roman" style:font-name-complex="Times New Roman" fo:font-size="14pt" style:font-size-asian="14pt" style:font-size-complex="14pt"/>
    </style:style>
    <style:style style:name="T8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7" style:parent-style-name="Normal" style:family="paragraph">
      <style:text-properties style:font-name="Times New Roman" style:font-name-complex="Times New Roman" fo:font-size="14pt" style:font-size-asian="14pt" style:font-size-complex="14pt"/>
    </style:style>
    <style:style style:name="P818" style:parent-style-name="Normal" style:family="paragraph">
      <style:text-properties style:font-name="Times New Roman" style:font-name-complex="Times New Roman" fo:font-size="14pt" style:font-size-asian="14pt" style:font-size-complex="14pt"/>
    </style:style>
    <style:style style:name="P819" style:parent-style-name="Normal" style:family="paragraph">
      <style:text-properties style:font-name="Times New Roman" style:font-name-complex="Times New Roman" fo:font-size="14pt" style:font-size-asian="14pt" style:font-size-complex="14pt"/>
    </style:style>
    <style:style style:name="T8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1" style:parent-style-name="DefaultParagraphFont" style:family="text">
      <style:text-properties style:font-name="Times New Roman" style:font-name-complex="Times New Roman" fo:font-size="14pt" style:font-size-asian="14pt" style:font-size-complex="14pt"/>
    </style:style>
    <style:style style:name="T8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4" style:parent-style-name="Normal" style:family="paragraph">
      <style:text-properties style:font-name="Times New Roman" style:font-name-complex="Times New Roman" fo:font-size="14pt" style:font-size-asian="14pt" style:font-size-complex="14pt"/>
    </style:style>
    <style:style style:name="P825" style:parent-style-name="Normal" style:family="paragraph">
      <style:text-properties style:font-name="Times New Roman" style:font-name-complex="Times New Roman" fo:font-size="14pt" style:font-size-asian="14pt" style:font-size-complex="14pt"/>
    </style:style>
    <style:style style:name="P826" style:parent-style-name="Normal" style:family="paragraph">
      <style:text-properties style:font-name="Times New Roman" style:font-name-complex="Times New Roman" fo:font-size="14pt" style:font-size-asian="14pt" style:font-size-complex="14pt"/>
    </style:style>
    <style:style style:name="T8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8" style:parent-style-name="DefaultParagraphFont" style:family="text">
      <style:text-properties style:font-name="Times New Roman" style:font-name-complex="Times New Roman" fo:font-size="14pt" style:font-size-asian="14pt" style:font-size-complex="14pt"/>
    </style:style>
    <style:style style:name="T8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1" style:parent-style-name="Normal" style:family="paragraph">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T833" style:parent-style-name="DefaultParagraphFont" style:family="text">
      <style:text-properties style:font-name="Times New Roman" style:font-name-complex="Times New Roman" fo:font-size="14pt" style:font-size-asian="14pt" style:font-size-complex="14pt"/>
    </style:style>
    <style:style style:name="P834" style:parent-style-name="Normal" style:family="paragraph">
      <style:text-properties style:font-name="Times New Roman" style:font-name-complex="Times New Roman" fo:font-size="14pt" style:font-size-asian="14pt" style:font-size-complex="14pt"/>
    </style:style>
    <style:style style:name="T8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7" style:parent-style-name="Normal" style:family="paragraph">
      <style:text-properties style:font-name="Times New Roman" style:font-name-complex="Times New Roman" fo:font-size="14pt" style:font-size-asian="14pt" style:font-size-complex="14pt"/>
    </style:style>
    <style:style style:name="T838" style:parent-style-name="DefaultParagraphFont" style:family="text">
      <style:text-properties style:font-name="Times New Roman" style:font-name-complex="Times New Roman" fo:font-size="14pt" style:font-size-asian="14pt" style:font-size-complex="14pt"/>
    </style:style>
    <style:style style:name="P839" style:parent-style-name="Normal" style:family="paragraph">
      <style:text-properties style:font-name="Times New Roman" style:font-name-complex="Times New Roman" fo:font-size="14pt" style:font-size-asian="14pt" style:font-size-complex="14pt"/>
    </style:style>
    <style:style style:name="T8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2" style:parent-style-name="Normal" style:family="paragraph">
      <style:text-properties style:font-name="Times New Roman" style:font-name-complex="Times New Roman" fo:font-size="14pt" style:font-size-asian="14pt" style:font-size-complex="14pt"/>
    </style:style>
    <style:style style:name="P843" style:parent-style-name="Normal" style:family="paragraph">
      <style:text-properties style:font-name="Times New Roman" style:font-name-complex="Times New Roman" fo:font-size="14pt" style:font-size-asian="14pt" style:font-size-complex="14pt"/>
    </style:style>
    <style:style style:name="P844" style:parent-style-name="Normal" style:family="paragraph">
      <style:text-properties style:font-name="Times New Roman" style:font-name-complex="Times New Roman" fo:font-size="14pt" style:font-size-asian="14pt" style:font-size-complex="14pt"/>
    </style:style>
    <style:style style:name="T8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6" style:parent-style-name="DefaultParagraphFont" style:family="text">
      <style:text-properties style:font-name="Times New Roman" style:font-name-complex="Times New Roman" fo:font-size="14pt" style:font-size-asian="14pt" style:font-size-complex="14pt"/>
    </style:style>
    <style:style style:name="T8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9" style:parent-style-name="Normal" style:family="paragraph">
      <style:text-properties style:font-name="Times New Roman" style:font-name-complex="Times New Roman" fo:font-size="14pt" style:font-size-asian="14pt" style:font-size-complex="14pt"/>
    </style:style>
    <style:style style:name="P850" style:parent-style-name="Normal" style:family="paragraph">
      <style:text-properties style:font-name="Times New Roman" style:font-name-complex="Times New Roman" fo:font-size="14pt" style:font-size-asian="14pt" style:font-size-complex="14pt"/>
    </style:style>
    <style:style style:name="P851" style:parent-style-name="Normal" style:family="paragraph">
      <style:text-properties style:font-name="Times New Roman" style:font-name-complex="Times New Roman" fo:font-size="14pt" style:font-size-asian="14pt" style:font-size-complex="14pt"/>
    </style:style>
    <style:style style:name="T8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3" style:parent-style-name="DefaultParagraphFont" style:family="text">
      <style:text-properties style:font-name="Times New Roman" style:font-name-complex="Times New Roman" fo:font-size="14pt" style:font-size-asian="14pt" style:font-size-complex="14pt"/>
    </style:style>
    <style:style style:name="T8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56" style:parent-style-name="Normal" style:family="paragraph">
      <style:text-properties style:font-name="Times New Roman" style:font-name-complex="Times New Roman" fo:font-size="14pt" style:font-size-asian="14pt" style:font-size-complex="14pt"/>
    </style:style>
    <style:style style:name="TableColumn858" style:family="table-column">
      <style:table-column-properties style:column-width="6.4888in"/>
    </style:style>
    <style:style style:name="Table857" style:family="table">
      <style:table-properties style:width="6.4888in" fo:margin-left="0in" table:align="left"/>
    </style:style>
    <style:style style:name="TableRow859" style:family="table-row">
      <style:table-row-properties/>
    </style:style>
    <style:style style:name="TableCell86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61" style:parent-style-name="Normal" style:family="paragraph">
      <style:text-properties style:font-name="Times New Roman" style:font-name-complex="Times New Roman" fo:font-size="14pt" style:font-size-asian="14pt" style:font-size-complex="14pt"/>
    </style:style>
    <style:style style:name="TableRow862" style:family="table-row">
      <style:table-row-properties/>
    </style:style>
    <style:style style:name="TableCell86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64" style:parent-style-name="Normal" style:family="paragraph">
      <style:text-properties style:font-name="Times New Roman" style:font-name-complex="Times New Roman" fo:font-size="14pt" style:font-size-asian="14pt" style:font-size-complex="14pt"/>
    </style:style>
    <style:style style:name="TableRow865" style:family="table-row">
      <style:table-row-properties/>
    </style:style>
    <style:style style:name="TableCell86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67" style:parent-style-name="Normal" style:family="paragraph">
      <style:text-properties style:font-name="Times New Roman" style:font-name-complex="Times New Roman" fo:font-size="14pt" style:font-size-asian="14pt" style:font-size-complex="14pt"/>
    </style:style>
    <style:style style:name="TableRow868" style:family="table-row">
      <style:table-row-properties/>
    </style:style>
    <style:style style:name="TableCell86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870" style:parent-style-name="Normal" style:family="paragraph">
      <style:text-properties style:font-name="Times New Roman" style:font-name-complex="Times New Roman" fo:font-size="14pt" style:font-size-asian="14pt" style:font-size-complex="14pt"/>
    </style:style>
    <style:style style:name="P871" style:parent-style-name="Normal" style:family="paragraph">
      <style:text-properties style:font-name="Times New Roman" style:font-name-complex="Times New Roman" fo:font-size="14pt" style:font-size-asian="14pt" style:font-size-complex="14pt"/>
    </style:style>
    <style:style style:name="P872" style:parent-style-name="Normal" style:family="paragraph">
      <style:text-properties style:font-name="Times New Roman" style:font-name-complex="Times New Roman" fo:font-size="14pt" style:font-size-asian="14pt" style:font-size-complex="14pt"/>
    </style:style>
    <style:style style:name="T8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4" style:parent-style-name="DefaultParagraphFont" style:family="text">
      <style:text-properties style:font-name="Times New Roman" style:font-name-complex="Times New Roman" fo:font-size="14pt" style:font-size-asian="14pt" style:font-size-complex="14pt"/>
    </style:style>
    <style:style style:name="T8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6" style:parent-style-name="Normal" style:family="paragraph">
      <style:text-properties style:font-name="Times New Roman" style:font-name-complex="Times New Roman" fo:font-size="14pt" style:font-size-asian="14pt" style:font-size-complex="14pt"/>
    </style:style>
    <style:style style:name="T8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9" style:parent-style-name="Normal" style:family="paragraph">
      <style:text-properties style:font-name="Times New Roman" style:font-name-complex="Times New Roman" fo:font-size="14pt" style:font-size-asian="14pt" style:font-size-complex="14pt"/>
    </style:style>
    <style:style style:name="P880" style:parent-style-name="Normal" style:family="paragraph">
      <style:text-properties style:font-name="Times New Roman" style:font-name-complex="Times New Roman" fo:font-size="14pt" style:font-size-asian="14pt" style:font-size-complex="14pt"/>
    </style:style>
    <style:style style:name="P881" style:parent-style-name="Normal" style:family="paragraph">
      <style:text-properties style:font-name="Times New Roman" style:font-name-complex="Times New Roman" fo:font-size="14pt" style:font-size-asian="14pt" style:font-size-complex="14pt"/>
    </style:style>
    <style:style style:name="T8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3" style:parent-style-name="DefaultParagraphFont" style:family="text">
      <style:text-properties style:font-name="Times New Roman" style:font-name-complex="Times New Roman" fo:font-size="14pt" style:font-size-asian="14pt" style:font-size-complex="14pt"/>
    </style:style>
    <style:style style:name="T8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6" style:parent-style-name="Normal" style:family="paragraph">
      <style:text-properties style:font-name="Times New Roman" style:font-name-complex="Times New Roman" fo:font-size="14pt" style:font-size-asian="14pt" style:font-size-complex="14pt"/>
    </style:style>
    <style:style style:name="P887" style:parent-style-name="Normal" style:family="paragraph">
      <style:text-properties style:font-name="Times New Roman" style:font-name-complex="Times New Roman" fo:font-size="14pt" style:font-size-asian="14pt" style:font-size-complex="14pt"/>
    </style:style>
    <style:style style:name="P888" style:parent-style-name="Normal" style:family="paragraph">
      <style:text-properties style:font-name="Times New Roman" style:font-name-complex="Times New Roman" fo:font-size="14pt" style:font-size-asian="14pt" style:font-size-complex="14pt"/>
    </style:style>
    <style:style style:name="T8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0" style:parent-style-name="DefaultParagraphFont" style:family="text">
      <style:text-properties style:font-name="Times New Roman" style:font-name-complex="Times New Roman" fo:font-size="14pt" style:font-size-asian="14pt" style:font-size-complex="14pt"/>
    </style:style>
    <style:style style:name="T8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2" style:parent-style-name="Normal" style:family="paragraph">
      <style:text-properties style:font-name="Times New Roman" style:font-name-complex="Times New Roman" fo:font-size="14pt" style:font-size-asian="14pt" style:font-size-complex="14pt"/>
    </style:style>
    <style:style style:name="T8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5" style:parent-style-name="Normal" style:family="paragraph">
      <style:text-properties style:font-name="Times New Roman" style:font-name-complex="Times New Roman" fo:font-size="14pt" style:font-size-asian="14pt" style:font-size-complex="14pt"/>
    </style:style>
    <style:style style:name="P896" style:parent-style-name="Normal" style:family="paragraph">
      <style:text-properties style:font-name="Times New Roman" style:font-name-complex="Times New Roman" fo:font-size="14pt" style:font-size-asian="14pt" style:font-size-complex="14pt"/>
    </style:style>
    <style:style style:name="P897" style:parent-style-name="Normal" style:family="paragraph">
      <style:text-properties style:font-name="Times New Roman" style:font-name-complex="Times New Roman" fo:font-size="14pt" style:font-size-asian="14pt" style:font-size-complex="14pt"/>
    </style:style>
    <style:style style:name="P898" style:parent-style-name="Normal" style:family="paragraph">
      <style:text-properties style:font-name="Times New Roman" style:font-name-complex="Times New Roman" fo:font-size="14pt" style:font-size-asian="14pt" style:font-size-complex="14pt"/>
    </style:style>
    <style:style style:name="T8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0" style:parent-style-name="DefaultParagraphFont" style:family="text">
      <style:text-properties style:font-name="Times New Roman" style:font-name-complex="Times New Roman" fo:font-size="14pt" style:font-size-asian="14pt" style:font-size-complex="14pt"/>
    </style:style>
    <style:style style:name="T9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2" style:parent-style-name="Normal" style:family="paragraph">
      <style:text-properties style:font-name="Times New Roman" style:font-name-complex="Times New Roman" fo:font-size="14pt" style:font-size-asian="14pt" style:font-size-complex="14pt"/>
    </style:style>
    <style:style style:name="T9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5" style:parent-style-name="Normal" style:family="paragraph">
      <style:text-properties style:font-name="Times New Roman" style:font-name-complex="Times New Roman" fo:font-size="14pt" style:font-size-asian="14pt" style:font-size-complex="14pt"/>
    </style:style>
    <style:style style:name="P906" style:parent-style-name="Normal" style:family="paragraph">
      <style:text-properties style:font-name="Times New Roman" style:font-name-complex="Times New Roman" fo:font-size="14pt" style:font-size-asian="14pt" style:font-size-complex="14pt"/>
    </style:style>
    <style:style style:name="P907" style:parent-style-name="Normal" style:family="paragraph">
      <style:text-properties style:font-name="Times New Roman" style:font-name-complex="Times New Roman" fo:font-size="14pt" style:font-size-asian="14pt" style:font-size-complex="14pt"/>
    </style:style>
    <style:style style:name="T9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9" style:parent-style-name="DefaultParagraphFont" style:family="text">
      <style:text-properties style:font-name="Times New Roman" style:font-name-complex="Times New Roman" fo:font-size="14pt" style:font-size-asian="14pt" style:font-size-complex="14pt"/>
    </style:style>
    <style:style style:name="T9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1" style:parent-style-name="DefaultParagraphFont" style:family="text">
      <style:text-properties style:font-name="Times New Roman" style:font-name-complex="Times New Roman" fo:font-size="14pt" style:font-size-asian="14pt" style:font-size-complex="14pt"/>
    </style:style>
    <style:style style:name="T9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3" style:parent-style-name="DefaultParagraphFont" style:family="text">
      <style:text-properties style:font-name="Times New Roman" style:font-name-complex="Times New Roman" fo:font-size="14pt" style:font-size-asian="14pt" style:font-size-complex="14pt"/>
    </style:style>
    <style:style style:name="T914" style:parent-style-name="DefaultParagraphFont" style:family="text">
      <style:text-properties style:font-name="Times New Roman" style:font-name-complex="Times New Roman" fo:font-size="14pt" style:font-size-asian="14pt" style:font-size-complex="14pt"/>
    </style:style>
    <style:style style:name="T9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6" style:parent-style-name="DefaultParagraphFont" style:family="text">
      <style:text-properties style:font-name="Times New Roman" style:font-name-complex="Times New Roman" fo:font-size="14pt" style:font-size-asian="14pt" style:font-size-complex="14pt"/>
    </style:style>
    <style:style style:name="T9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9" style:parent-style-name="Normal" style:family="paragraph">
      <style:text-properties style:font-name="Times New Roman" style:font-name-complex="Times New Roman" fo:font-size="14pt" style:font-size-asian="14pt" style:font-size-complex="14pt"/>
    </style:style>
    <style:style style:name="P920" style:parent-style-name="Normal" style:family="paragraph">
      <style:text-properties style:font-name="Times New Roman" style:font-name-complex="Times New Roman" fo:font-size="14pt" style:font-size-asian="14pt" style:font-size-complex="14pt"/>
    </style:style>
    <style:style style:name="P921" style:parent-style-name="Normal" style:family="paragraph">
      <style:text-properties style:font-name="Times New Roman" style:font-name-complex="Times New Roman" fo:font-size="14pt" style:font-size-asian="14pt" style:font-size-complex="14pt"/>
    </style:style>
    <style:style style:name="T9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3" style:parent-style-name="DefaultParagraphFont" style:family="text">
      <style:text-properties style:font-name="Times New Roman" style:font-name-complex="Times New Roman" fo:font-size="14pt" style:font-size-asian="14pt" style:font-size-complex="14pt"/>
    </style:style>
    <style:style style:name="T9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5" style:parent-style-name="Normal" style:family="paragraph">
      <style:text-properties style:font-name="Times New Roman" style:font-name-complex="Times New Roman" fo:font-size="14pt" style:font-size-asian="14pt" style:font-size-complex="14pt"/>
    </style:style>
    <style:style style:name="P926" style:parent-style-name="Normal" style:family="paragraph">
      <style:text-properties style:font-name="Times New Roman" style:font-name-complex="Times New Roman"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9" style:parent-style-name="Normal" style:family="paragraph">
      <style:text-properties style:font-name="Times New Roman" style:font-name-complex="Times New Roman" fo:font-size="14pt" style:font-size-asian="14pt" style:font-size-complex="14pt"/>
    </style:style>
    <style:style style:name="P930" style:parent-style-name="Normal" style:family="paragraph">
      <style:text-properties style:font-name="Times New Roman" style:font-name-complex="Times New Roman" fo:font-size="14pt" style:font-size-asian="14pt" style:font-size-complex="14pt"/>
    </style:style>
    <style:style style:name="P931" style:parent-style-name="Normal" style:family="paragraph">
      <style:text-properties style:font-name="Times New Roman" style:font-name-complex="Times New Roman" fo:font-size="14pt" style:font-size-asian="14pt" style:font-size-complex="14pt"/>
    </style:style>
    <style:style style:name="T9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3" style:parent-style-name="DefaultParagraphFont" style:family="text">
      <style:text-properties style:font-name="Times New Roman" style:font-name-complex="Times New Roman" fo:font-size="14pt" style:font-size-asian="14pt" style:font-size-complex="14pt"/>
    </style:style>
    <style:style style:name="T9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6" style:parent-style-name="DefaultParagraphFont" style:family="text">
      <style:text-properties style:font-name="Times New Roman" style:font-name-complex="Times New Roman" fo:font-size="14pt" style:font-size-asian="14pt" style:font-size-complex="14pt"/>
    </style:style>
    <style:style style:name="T9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9" style:parent-style-name="Normal" style:family="paragraph">
      <style:text-properties style:font-name="Times New Roman" style:font-name-complex="Times New Roman" fo:font-size="14pt" style:font-size-asian="14pt" style:font-size-complex="14pt"/>
    </style:style>
    <style:style style:name="P940" style:parent-style-name="Normal" style:family="paragraph">
      <style:text-properties style:font-name="Times New Roman" style:font-name-complex="Times New Roman" fo:font-size="14pt" style:font-size-asian="14pt" style:font-size-complex="14pt"/>
    </style:style>
    <style:style style:name="P941" style:parent-style-name="Normal" style:family="paragraph">
      <style:text-properties style:font-name="Times New Roman" style:font-name-complex="Times New Roman" fo:font-size="14pt" style:font-size-asian="14pt" style:font-size-complex="14pt"/>
    </style:style>
    <style:style style:name="T9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3" style:parent-style-name="DefaultParagraphFont" style:family="text">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46" style:parent-style-name="Normal" style:family="paragraph">
      <style:text-properties style:font-name="Times New Roman" style:font-name-complex="Times New Roman" fo:font-size="14pt" style:font-size-asian="14pt" style:font-size-complex="14pt"/>
    </style:style>
    <style:style style:name="P947" style:parent-style-name="Normal" style:family="paragraph">
      <style:text-properties style:font-name="Times New Roman" style:font-name-complex="Times New Roman" fo:font-size="14pt" style:font-size-asian="14pt" style:font-size-complex="14pt"/>
    </style:style>
    <style:style style:name="P948" style:parent-style-name="Normal" style:family="paragraph">
      <style:text-properties style:font-name="Times New Roman" style:font-name-complex="Times New Roman" fo:font-size="14pt" style:font-size-asian="14pt" style:font-size-complex="14pt"/>
    </style:style>
    <style:style style:name="T9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0" style:parent-style-name="DefaultParagraphFont" style:family="text">
      <style:text-properties style:font-name="Times New Roman" style:font-name-complex="Times New Roman" fo:font-size="14pt" style:font-size-asian="14pt" style:font-size-complex="14pt"/>
    </style:style>
    <style:style style:name="T9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52" style:parent-style-name="Normal" style:family="paragraph">
      <style:text-properties style:font-name="Times New Roman" style:font-name-complex="Times New Roman" fo:font-size="14pt" style:font-size-asian="14pt" style:font-size-complex="14pt"/>
    </style:style>
    <style:style style:name="T953" style:parent-style-name="DefaultParagraphFont" style:family="text">
      <style:text-properties style:font-name="Times New Roman" style:font-name-complex="Times New Roman" fo:font-size="14pt" style:font-size-asian="14pt" style:font-size-complex="14pt"/>
    </style:style>
    <style:style style:name="T95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55" style:parent-style-name="DefaultParagraphFont" style:family="text">
      <style:text-properties style:font-name="Times New Roman" style:font-name-complex="Times New Roman" fo:font-size="14pt" style:font-size-asian="14pt" style:font-size-complex="14pt"/>
    </style:style>
    <style:style style:name="T956" style:parent-style-name="DefaultParagraphFont" style:family="text">
      <style:text-properties style:font-name="Times New Roman" style:font-name-complex="Times New Roman" fo:font-size="14pt" style:font-size-asian="14pt" style:font-size-complex="14pt"/>
    </style:style>
    <style:style style:name="T957" style:parent-style-name="Hyperlink" style:family="text">
      <style:text-properties style:font-name="Times New Roman" style:font-name-complex="Times New Roman" fo:font-size="14pt" style:font-size-asian="14pt" style:font-size-complex="14pt"/>
    </style:style>
    <style:style style:name="T958" style:parent-style-name="DefaultParagraphFont" style:family="text">
      <style:text-properties style:font-name="Times New Roman" style:font-name-complex="Times New Roman" fo:font-size="14pt" style:font-size-asian="14pt" style:font-size-complex="14pt"/>
    </style:style>
    <style:style style:name="T9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0" style:parent-style-name="DefaultParagraphFont" style:family="text">
      <style:text-properties style:font-name="Times New Roman" style:font-name-complex="Times New Roman" fo:font-size="14pt" style:font-size-asian="14pt" style:font-size-complex="14pt"/>
    </style:style>
    <style:style style:name="T9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63" style:parent-style-name="Normal" style:family="paragraph">
      <style:text-properties style:font-name="Times New Roman" style:font-name-complex="Times New Roman" fo:font-size="14pt" style:font-size-asian="14pt" style:font-size-complex="14pt"/>
    </style:style>
    <style:style style:name="P964" style:parent-style-name="Normal" style:family="paragraph">
      <style:text-properties style:font-name="Times New Roman" style:font-name-complex="Times New Roman" fo:font-size="14pt" style:font-size-asian="14pt" style:font-size-complex="14pt"/>
    </style:style>
    <style:style style:name="P965" style:parent-style-name="Normal" style:family="paragraph">
      <style:text-properties style:font-name="Times New Roman" style:font-name-complex="Times New Roman" fo:font-size="14pt" style:font-size-asian="14pt" style:font-size-complex="14pt"/>
    </style:style>
    <style:style style:name="T9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7" style:parent-style-name="DefaultParagraphFont" style:family="text">
      <style:text-properties style:font-name="Times New Roman" style:font-name-complex="Times New Roman" fo:font-size="14pt" style:font-size-asian="14pt" style:font-size-complex="14pt"/>
    </style:style>
    <style:style style:name="T9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69" style:parent-style-name="Normal" style:family="paragraph">
      <style:text-properties style:font-name="Times New Roman" style:font-name-complex="Times New Roman" fo:font-size="14pt" style:font-size-asian="14pt" style:font-size-complex="14pt"/>
    </style:style>
    <style:style style:name="T9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2" style:parent-style-name="Normal" style:family="paragraph">
      <style:text-properties style:font-name="Times New Roman" style:font-name-complex="Times New Roman" fo:font-size="14pt" style:font-size-asian="14pt" style:font-size-complex="14pt"/>
    </style:style>
    <style:style style:name="P973" style:parent-style-name="Normal" style:family="paragraph">
      <style:text-properties style:font-name="Times New Roman" style:font-name-complex="Times New Roman" fo:font-size="14pt" style:font-size-asian="14pt" style:font-size-complex="14pt"/>
    </style:style>
    <style:style style:name="P974" style:parent-style-name="Normal" style:family="paragraph">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6" style:parent-style-name="DefaultParagraphFont" style:family="text">
      <style:text-properties style:font-name="Times New Roman" style:font-name-complex="Times New Roman" fo:font-size="14pt" style:font-size-asian="14pt" style:font-size-complex="14pt"/>
    </style:style>
    <style:style style:name="T9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8" style:parent-style-name="Normal" style:family="paragraph">
      <style:text-properties style:font-name="Times New Roman" style:font-name-complex="Times New Roman" fo:font-size="14pt" style:font-size-asian="14pt" style:font-size-complex="14pt"/>
    </style:style>
    <style:style style:name="P979" style:parent-style-name="Normal" style:family="paragraph">
      <style:text-properties style:font-name="Times New Roman" style:font-name-complex="Times New Roman" fo:font-size="14pt" style:font-size-asian="14pt" style:font-size-complex="14pt"/>
    </style:style>
    <style:style style:name="P980" style:parent-style-name="Normal" style:family="paragraph">
      <style:text-properties style:font-name="Times New Roman" style:font-name-complex="Times New Roman" fo:font-size="14pt" style:font-size-asian="14pt" style:font-size-complex="14pt"/>
    </style:style>
    <style:style style:name="P981" style:parent-style-name="Normal" style:family="paragraph">
      <style:text-properties style:font-name="Times New Roman" style:font-name-complex="Times New Roman" fo:font-size="14pt" style:font-size-asian="14pt" style:font-size-complex="14pt"/>
    </style:style>
    <style:style style:name="T9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4" style:parent-style-name="Normal" style:family="paragraph">
      <style:text-properties style:font-name="Times New Roman" style:font-name-complex="Times New Roman" fo:font-size="14pt" style:font-size-asian="14pt" style:font-size-complex="14pt"/>
    </style:style>
    <style:style style:name="P985" style:parent-style-name="Normal" style:family="paragraph">
      <style:text-properties style:font-name="Times New Roman" style:font-name-complex="Times New Roman" fo:font-size="14pt" style:font-size-asian="14pt" style:font-size-complex="14pt"/>
    </style:style>
    <style:style style:name="P986" style:parent-style-name="Normal" style:family="paragraph">
      <style:text-properties style:font-name="Times New Roman" style:font-name-complex="Times New Roman" fo:font-size="14pt" style:font-size-asian="14pt" style:font-size-complex="14pt"/>
    </style:style>
    <style:style style:name="T9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8" style:parent-style-name="DefaultParagraphFont" style:family="text">
      <style:text-properties style:font-name="Times New Roman" style:font-name-complex="Times New Roman" fo:font-size="14pt" style:font-size-asian="14pt" style:font-size-complex="14pt"/>
    </style:style>
    <style:style style:name="T9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90" style:parent-style-name="Normal" style:family="paragraph">
      <style:text-properties style:font-name="Times New Roman" style:font-name-complex="Times New Roman" fo:font-size="14pt" style:font-size-asian="14pt" style:font-size-complex="14pt"/>
    </style:style>
    <style:style style:name="T9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93" style:parent-style-name="Normal" style:family="paragraph">
      <style:text-properties style:font-name="Times New Roman" style:font-name-complex="Times New Roman" fo:font-size="14pt" style:font-size-asian="14pt" style:font-size-complex="14pt"/>
    </style:style>
    <style:style style:name="T994" style:parent-style-name="DefaultParagraphFont" style:family="text">
      <style:text-properties style:font-name="Times New Roman" style:font-name-complex="Times New Roman" fo:font-size="14pt" style:font-size-asian="14pt" style:font-size-complex="14pt"/>
    </style:style>
    <style:style style:name="P995" style:parent-style-name="Normal" style:family="paragraph">
      <style:text-properties style:font-name="Times New Roman" style:font-name-complex="Times New Roman" fo:font-size="14pt" style:font-size-asian="14pt" style:font-size-complex="14pt"/>
    </style:style>
    <style:style style:name="TableColumn997" style:family="table-column">
      <style:table-column-properties style:column-width="3.277in"/>
    </style:style>
    <style:style style:name="TableColumn998" style:family="table-column">
      <style:table-column-properties style:column-width="3.2118in"/>
    </style:style>
    <style:style style:name="Table996" style:family="table">
      <style:table-properties style:width="6.4888in" fo:margin-left="0in" table:align="left"/>
    </style:style>
    <style:style style:name="TableRow999" style:family="table-row">
      <style:table-row-properties/>
    </style:style>
    <style:style style:name="TableCell100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01" style:parent-style-name="Normal" style:family="paragraph">
      <style:text-properties style:font-name="Times New Roman" style:font-name-complex="Times New Roman" fo:font-size="14pt" style:font-size-asian="14pt" style:font-size-complex="14pt"/>
    </style:style>
    <style:style style:name="P1002" style:parent-style-name="Normal" style:family="paragraph">
      <style:text-properties style:font-name="Times New Roman" style:font-name-complex="Times New Roman" fo:font-size="14pt" style:font-size-asian="14pt" style:font-size-complex="14pt"/>
    </style:style>
    <style:style style:name="TableCell100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04" style:parent-style-name="Normal" style:family="paragraph">
      <style:text-properties style:font-name="Times New Roman" style:font-name-complex="Times New Roman" fo:font-size="14pt" style:font-size-asian="14pt" style:font-size-complex="14pt"/>
    </style:style>
    <style:style style:name="P1005" style:parent-style-name="Normal" style:family="paragraph">
      <style:text-properties style:font-name="Times New Roman" style:font-name-complex="Times New Roman" fo:font-size="14pt" style:font-size-asian="14pt" style:font-size-complex="14pt"/>
    </style:style>
    <style:style style:name="TableRow1006" style:family="table-row">
      <style:table-row-properties/>
    </style:style>
    <style:style style:name="TableCell100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08" style:parent-style-name="Normal" style:family="paragraph">
      <style:text-properties style:font-name="Times New Roman" style:font-name-complex="Times New Roman" fo:font-size="14pt" style:font-size-asian="14pt" style:font-size-complex="14pt"/>
    </style:style>
    <style:style style:name="P1009" style:parent-style-name="Normal" style:family="paragraph">
      <style:text-properties style:font-name="Times New Roman" style:font-name-complex="Times New Roman" fo:font-size="14pt" style:font-size-asian="14pt" style:font-size-complex="14pt"/>
    </style:style>
    <style:style style:name="TableCell101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11" style:parent-style-name="Normal" style:family="paragraph">
      <style:text-properties style:font-name="Times New Roman" style:font-name-complex="Times New Roman" fo:font-size="14pt" style:font-size-asian="14pt" style:font-size-complex="14pt"/>
    </style:style>
    <style:style style:name="P1012" style:parent-style-name="Normal" style:family="paragraph">
      <style:text-properties style:font-name="Times New Roman" style:font-name-complex="Times New Roman" fo:font-size="14pt" style:font-size-asian="14pt" style:font-size-complex="14pt"/>
    </style:style>
    <style:style style:name="P1013" style:parent-style-name="Normal" style:family="paragraph">
      <style:text-properties style:font-name="Times New Roman" style:font-name-complex="Times New Roman" fo:font-size="14pt" style:font-size-asian="14pt" style:font-size-complex="14pt"/>
    </style:style>
    <style:style style:name="P1014" style:parent-style-name="Normal" style:family="paragraph">
      <style:text-properties style:font-name="Times New Roman" style:font-name-complex="Times New Roman" fo:font-size="14pt" style:font-size-asian="14pt" style:font-size-complex="14pt"/>
    </style:style>
    <style:style style:name="T10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6" style:parent-style-name="DefaultParagraphFont" style:family="text">
      <style:text-properties style:font-name="Times New Roman" style:font-name-complex="Times New Roman" fo:font-size="14pt" style:font-size-asian="14pt" style:font-size-complex="14pt"/>
    </style:style>
    <style:style style:name="T10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19" style:parent-style-name="Normal" style:family="paragraph">
      <style:text-properties style:font-name="Times New Roman" style:font-name-complex="Times New Roman" fo:font-size="14pt" style:font-size-asian="14pt" style:font-size-complex="14pt"/>
    </style:style>
    <style:style style:name="P1020" style:parent-style-name="Normal" style:family="paragraph">
      <style:text-properties style:font-name="Times New Roman" style:font-name-complex="Times New Roman" fo:font-size="14pt" style:font-size-asian="14pt" style:font-size-complex="14pt"/>
    </style:style>
    <style:style style:name="P1021" style:parent-style-name="Normal" style:family="paragraph">
      <style:text-properties style:font-name="Times New Roman" style:font-name-complex="Times New Roman" fo:font-size="14pt" style:font-size-asian="14pt" style:font-size-complex="14pt"/>
    </style:style>
    <style:style style:name="P1022" style:parent-style-name="Normal" style:family="paragraph">
      <style:text-properties style:font-name="Times New Roman" style:font-name-complex="Times New Roman" fo:font-size="14pt" style:font-size-asian="14pt" style:font-size-complex="14pt"/>
    </style:style>
    <style:style style:name="P1023" style:parent-style-name="Normal" style:family="paragraph">
      <style:text-properties style:font-name="Times New Roman" style:font-name-complex="Times New Roman" fo:font-size="14pt" style:font-size-asian="14pt" style:font-size-complex="14pt"/>
    </style:style>
    <style:style style:name="P1024" style:parent-style-name="Normal" style:family="paragraph">
      <style:text-properties style:font-name="Times New Roman" style:font-name-complex="Times New Roman" fo:font-size="14pt" style:font-size-asian="14pt" style:font-size-complex="14pt"/>
    </style:style>
    <style:style style:name="P1025" style:parent-style-name="Normal" style:family="paragraph">
      <style:text-properties style:font-name="Times New Roman" style:font-name-complex="Times New Roman" fo:font-size="14pt" style:font-size-asian="14pt" style:font-size-complex="14pt"/>
    </style:style>
    <style:style style:name="T10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7" style:parent-style-name="DefaultParagraphFont" style:family="text">
      <style:text-properties style:font-name="Times New Roman" style:font-name-complex="Times New Roman" fo:font-size="14pt" style:font-size-asian="14pt" style:font-size-complex="14pt"/>
    </style:style>
    <style:style style:name="T10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29" style:parent-style-name="Normal" style:family="paragraph">
      <style:text-properties style:font-name="Times New Roman" style:font-name-complex="Times New Roman" fo:font-size="14pt" style:font-size-asian="14pt" style:font-size-complex="14pt"/>
    </style:style>
    <style:style style:name="P1030" style:parent-style-name="Normal" style:family="paragraph">
      <style:text-properties style:font-name="Times New Roman" style:font-name-complex="Times New Roman" fo:font-size="14pt" style:font-size-asian="14pt" style:font-size-complex="14pt"/>
    </style:style>
    <style:style style:name="P1031" style:parent-style-name="Normal" style:family="paragraph">
      <style:text-properties style:font-name="Times New Roman" style:font-name-complex="Times New Roman"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T10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5" style:parent-style-name="Normal" style:family="paragraph">
      <style:text-properties style:font-name="Times New Roman" style:font-name-complex="Times New Roman" fo:font-size="14pt" style:font-size-asian="14pt" style:font-size-complex="14pt"/>
    </style:style>
    <style:style style:name="P1036" style:parent-style-name="Normal" style:family="paragraph">
      <style:text-properties style:font-name="Times New Roman" style:font-name-complex="Times New Roman" fo:font-size="14pt" style:font-size-asian="14pt" style:font-size-complex="14pt"/>
    </style:style>
    <style:style style:name="P1037" style:parent-style-name="Normal" style:family="paragraph">
      <style:text-properties style:font-name="Times New Roman" style:font-name-complex="Times New Roman" fo:font-size="14pt" style:font-size-asian="14pt" style:font-size-complex="14pt"/>
    </style:style>
    <style:style style:name="T10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9" style:parent-style-name="DefaultParagraphFont" style:family="text">
      <style:text-properties style:font-name="Times New Roman" style:font-name-complex="Times New Roman" fo:font-size="14pt" style:font-size-asian="14pt" style:font-size-complex="14pt"/>
    </style:style>
    <style:style style:name="T10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1" style:parent-style-name="DefaultParagraphFont" style:family="text">
      <style:text-properties style:font-name="Times New Roman" style:font-name-complex="Times New Roman" fo:font-size="14pt" style:font-size-asian="14pt" style:font-size-complex="14pt"/>
    </style:style>
    <style:style style:name="T104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043" style:parent-style-name="DefaultParagraphFont" style:family="text">
      <style:text-properties style:font-name="Times New Roman" style:font-name-complex="Times New Roman" fo:font-size="14pt" style:font-size-asian="14pt" style:font-size-complex="14pt"/>
    </style:style>
    <style:style style:name="T1044" style:parent-style-name="DefaultParagraphFont" style:family="text">
      <style:text-properties style:font-name="Times New Roman" style:font-name-complex="Times New Roman" fo:font-size="14pt" style:font-size-asian="14pt" style:font-size-complex="14pt"/>
    </style:style>
    <style:style style:name="T1045" style:parent-style-name="Hyperlink" style:family="text">
      <style:text-properties style:font-name="Times New Roman" style:font-name-complex="Times New Roman" fo:font-size="14pt" style:font-size-asian="14pt" style:font-size-complex="14pt"/>
    </style:style>
    <style:style style:name="T10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8" style:parent-style-name="Normal" style:family="paragraph">
      <style:text-properties style:font-name="Times New Roman" style:font-name-complex="Times New Roman" fo:font-size="14pt" style:font-size-asian="14pt" style:font-size-complex="14pt"/>
    </style:style>
    <style:style style:name="T1049" style:parent-style-name="DefaultParagraphFont" style:family="text">
      <style:text-properties style:font-name="Times New Roman" style:font-name-complex="Times New Roman" fo:font-size="14pt" style:font-size-asian="14pt" style:font-size-complex="14pt"/>
    </style:style>
    <style:style style:name="P1050" style:parent-style-name="Normal" style:family="paragraph">
      <style:text-properties style:font-name="Times New Roman" style:font-name-complex="Times New Roman" fo:font-size="14pt" style:font-size-asian="14pt" style:font-size-complex="14pt"/>
    </style:style>
    <style:style style:name="TableColumn1052" style:family="table-column">
      <style:table-column-properties style:column-width="3.2083in"/>
    </style:style>
    <style:style style:name="TableColumn1053" style:family="table-column">
      <style:table-column-properties style:column-width="3.2805in"/>
    </style:style>
    <style:style style:name="Table1051" style:family="table">
      <style:table-properties style:width="6.4888in" fo:margin-left="0in" table:align="left"/>
    </style:style>
    <style:style style:name="TableRow1054" style:family="table-row">
      <style:table-row-properties/>
    </style:style>
    <style:style style:name="TableCell105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56" style:parent-style-name="Normal" style:family="paragraph">
      <style:text-properties style:font-name="Times New Roman" style:font-name-complex="Times New Roman"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TableCell105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59" style:parent-style-name="Normal" style:family="paragraph">
      <style:text-properties style:font-name="Times New Roman" style:font-name-complex="Times New Roman" fo:font-size="14pt" style:font-size-asian="14pt" style:font-size-complex="14pt"/>
    </style:style>
    <style:style style:name="P1060" style:parent-style-name="Normal" style:family="paragraph">
      <style:text-properties style:font-name="Times New Roman" style:font-name-complex="Times New Roman" fo:font-size="14pt" style:font-size-asian="14pt" style:font-size-complex="14pt"/>
    </style:style>
    <style:style style:name="TableRow1061" style:family="table-row">
      <style:table-row-properties/>
    </style:style>
    <style:style style:name="TableCell106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63" style:parent-style-name="Normal" style:family="paragraph">
      <style:text-properties style:font-name="Times New Roman" style:font-name-complex="Times New Roman" fo:font-size="14pt" style:font-size-asian="14pt" style:font-size-complex="14pt"/>
    </style:style>
    <style:style style:name="P1064" style:parent-style-name="Normal" style:family="paragraph">
      <style:text-properties style:font-name="Times New Roman" style:font-name-complex="Times New Roman" fo:font-size="14pt" style:font-size-asian="14pt" style:font-size-complex="14pt"/>
    </style:style>
    <style:style style:name="TableCell106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066" style:parent-style-name="Normal" style:family="paragraph">
      <style:text-properties style:font-name="Times New Roman" style:font-name-complex="Times New Roman" fo:font-size="14pt" style:font-size-asian="14pt" style:font-size-complex="14pt"/>
    </style:style>
    <style:style style:name="P1067" style:parent-style-name="Normal" style:family="paragraph">
      <style:text-properties style:font-name="Times New Roman" style:font-name-complex="Times New Roman" fo:font-size="14pt" style:font-size-asian="14pt" style:font-size-complex="14pt"/>
    </style:style>
    <style:style style:name="P1068" style:parent-style-name="Normal" style:family="paragraph">
      <style:text-properties style:font-name="Times New Roman" style:font-name-complex="Times New Roman" fo:font-size="14pt" style:font-size-asian="14pt" style:font-size-complex="14pt"/>
    </style:style>
    <style:style style:name="P1069" style:parent-style-name="Normal" style:family="paragraph">
      <style:text-properties style:font-name="Times New Roman" style:font-name-complex="Times New Roman" fo:font-size="14pt" style:font-size-asian="14pt" style:font-size-complex="14pt"/>
    </style:style>
    <style:style style:name="T10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1" style:parent-style-name="DefaultParagraphFont" style:family="text">
      <style:text-properties style:font-name="Times New Roman" style:font-name-complex="Times New Roman" fo:font-size="14pt" style:font-size-asian="14pt" style:font-size-complex="14pt"/>
    </style:style>
    <style:style style:name="T10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3" style:parent-style-name="Normal" style:family="paragraph">
      <style:text-properties style:font-name="Times New Roman" style:font-name-complex="Times New Roman" fo:font-size="14pt" style:font-size-asian="14pt" style:font-size-complex="14pt"/>
    </style:style>
    <style:style style:name="T10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6" style:parent-style-name="Normal" style:family="paragraph">
      <style:text-properties style:font-name="Times New Roman" style:font-name-complex="Times New Roman" fo:font-size="14pt" style:font-size-asian="14pt" style:font-size-complex="14pt"/>
    </style:style>
    <style:style style:name="P1077" style:parent-style-name="Normal" style:family="paragraph">
      <style:text-properties style:font-name="Times New Roman" style:font-name-complex="Times New Roman" fo:font-size="14pt" style:font-size-asian="14pt" style:font-size-complex="14pt"/>
    </style:style>
    <style:style style:name="P1078" style:parent-style-name="Normal" style:family="paragraph">
      <style:text-properties style:font-name="Times New Roman" style:font-name-complex="Times New Roman" fo:font-size="14pt" style:font-size-asian="14pt" style:font-size-complex="14pt"/>
    </style:style>
    <style:style style:name="T10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0" style:parent-style-name="DefaultParagraphFont" style:family="text">
      <style:text-properties style:font-name="Times New Roman" style:font-name-complex="Times New Roman"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3" style:parent-style-name="Normal" style:family="paragraph">
      <style:text-properties style:font-name="Times New Roman" style:font-name-complex="Times New Roman" fo:font-size="14pt" style:font-size-asian="14pt" style:font-size-complex="14pt"/>
    </style:style>
    <style:style style:name="P1084" style:parent-style-name="Normal" style:family="paragraph">
      <style:text-properties style:font-name="Times New Roman" style:font-name-complex="Times New Roman" fo:font-size="14pt" style:font-size-asian="14pt" style:font-size-complex="14pt"/>
    </style:style>
    <style:style style:name="P1085" style:parent-style-name="Normal" style:family="paragraph">
      <style:text-properties style:font-name="Times New Roman" style:font-name-complex="Times New Roman" fo:font-size="14pt" style:font-size-asian="14pt" style:font-size-complex="14pt"/>
    </style:style>
    <style:style style:name="T10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7" style:parent-style-name="DefaultParagraphFont" style:family="text">
      <style:text-properties style:font-name="Times New Roman" style:font-name-complex="Times New Roman" fo:font-size="14pt" style:font-size-asian="14pt" style:font-size-complex="14pt"/>
    </style:style>
    <style:style style:name="T10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0" style:parent-style-name="Normal" style:family="paragraph">
      <style:text-properties style:font-name="Times New Roman" style:font-name-complex="Times New Roman" fo:font-size="14pt" style:font-size-asian="14pt" style:font-size-complex="14pt"/>
    </style:style>
    <style:style style:name="P1091" style:parent-style-name="Normal" style:family="paragraph">
      <style:text-properties style:font-name="Times New Roman" style:font-name-complex="Times New Roman" fo:font-size="14pt" style:font-size-asian="14pt" style:font-size-complex="14pt"/>
    </style:style>
    <style:style style:name="P1092" style:parent-style-name="Normal" style:family="paragraph">
      <style:text-properties style:font-name="Times New Roman" style:font-name-complex="Times New Roman" fo:font-size="14pt" style:font-size-asian="14pt" style:font-size-complex="14pt"/>
    </style:style>
    <style:style style:name="T10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4" style:parent-style-name="DefaultParagraphFont" style:family="text">
      <style:text-properties style:font-name="Times New Roman" style:font-name-complex="Times New Roman" fo:font-size="14pt" style:font-size-asian="14pt" style:font-size-complex="14pt"/>
    </style:style>
    <style:style style:name="T10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96" style:parent-style-name="Normal" style:family="paragraph">
      <style:text-properties style:font-name="Times New Roman" style:font-name-complex="Times New Roman" fo:font-size="14pt" style:font-size-asian="14pt" style:font-size-complex="14pt"/>
    </style:style>
    <style:style style:name="T10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8" style:parent-style-name="DefaultParagraphFont" style:family="text">
      <style:text-properties style:font-name="Times New Roman" style:font-name-complex="Times New Roman" fo:font-size="14pt" style:font-size-asian="14pt" style:font-size-complex="14pt"/>
    </style:style>
    <style:style style:name="T10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01" style:parent-style-name="Normal" style:family="paragraph">
      <style:text-properties style:font-name="Times New Roman" style:font-name-complex="Times New Roman" fo:font-size="14pt" style:font-size-asian="14pt" style:font-size-complex="14pt"/>
    </style:style>
    <style:style style:name="T1102" style:parent-style-name="DefaultParagraphFont" style:family="text">
      <style:text-properties style:font-name="Times New Roman" style:font-name-complex="Times New Roman" fo:font-size="14pt" style:font-size-asian="14pt" style:font-size-complex="14pt"/>
    </style:style>
    <style:style style:name="P1103" style:parent-style-name="Normal" style:family="paragraph">
      <style:text-properties style:font-name="Times New Roman" style:font-name-complex="Times New Roman" fo:font-size="14pt" style:font-size-asian="14pt" style:font-size-complex="14pt"/>
    </style:style>
    <style:style style:name="P1104" style:parent-style-name="Normal" style:family="paragraph">
      <style:text-properties style:font-name="Times New Roman" style:font-name-complex="Times New Roman" fo:font-size="14pt" style:font-size-asian="14pt" style:font-size-complex="14pt"/>
    </style:style>
    <style:style style:name="P1105" style:parent-style-name="Normal" style:family="paragraph">
      <style:text-properties style:font-name="Times New Roman" style:font-name-complex="Times New Roman" fo:font-size="14pt" style:font-size-asian="14pt" style:font-size-complex="14pt"/>
    </style:style>
    <style:style style:name="P1106" style:parent-style-name="Normal" style:family="paragraph">
      <style:text-properties style:font-name="Times New Roman" style:font-name-complex="Times New Roman" fo:font-size="14pt" style:font-size-asian="14pt" style:font-size-complex="14pt"/>
    </style:style>
    <style:style style:name="P1107" style:parent-style-name="Normal" style:family="paragraph">
      <style:text-properties style:font-name="Times New Roman" style:font-name-complex="Times New Roman" fo:font-size="14pt" style:font-size-asian="14pt" style:font-size-complex="14pt"/>
    </style:style>
    <style:style style:name="P1108" style:parent-style-name="Normal" style:family="paragraph">
      <style:text-properties style:font-name="Times New Roman" style:font-name-complex="Times New Roman" fo:font-size="14pt" style:font-size-asian="14pt" style:font-size-complex="14pt"/>
    </style:style>
    <style:style style:name="T1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0" style:parent-style-name="DefaultParagraphFont" style:family="text">
      <style:text-properties style:font-name="Times New Roman" style:font-name-complex="Times New Roman" fo:font-size="14pt" style:font-size-asian="14pt" style:font-size-complex="14pt"/>
    </style:style>
    <style:style style:name="T11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3" style:parent-style-name="Normal" style:family="paragraph">
      <style:text-properties style:font-name="Times New Roman" style:font-name-complex="Times New Roman" fo:font-size="14pt" style:font-size-asian="14pt" style:font-size-complex="14pt"/>
    </style:style>
    <style:style style:name="P1114" style:parent-style-name="Normal" style:family="paragraph">
      <style:text-properties style:font-name="Times New Roman" style:font-name-complex="Times New Roman" fo:font-size="14pt" style:font-size-asian="14pt" style:font-size-complex="14pt"/>
    </style:style>
    <style:style style:name="P1115" style:parent-style-name="Normal" style:family="paragraph">
      <style:text-properties style:font-name="Times New Roman" style:font-name-complex="Times New Roman" fo:font-size="14pt" style:font-size-asian="14pt" style:font-size-complex="14pt"/>
    </style:style>
    <style:style style:name="T11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7" style:parent-style-name="DefaultParagraphFont" style:family="text">
      <style:text-properties style:font-name="Times New Roman" style:font-name-complex="Times New Roman" fo:font-size="14pt" style:font-size-asian="14pt" style:font-size-complex="14pt"/>
    </style:style>
    <style:style style:name="T1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20" style:parent-style-name="Normal" style:family="paragraph">
      <style:text-properties style:font-name="Times New Roman" style:font-name-complex="Times New Roman" fo:font-size="14pt" style:font-size-asian="14pt" style:font-size-complex="14pt"/>
    </style:style>
    <style:style style:name="T1121" style:parent-style-name="DefaultParagraphFont" style:family="text">
      <style:text-properties style:font-name="Times New Roman" style:font-name-complex="Times New Roman" fo:font-size="14pt" style:font-size-asian="14pt" style:font-size-complex="14pt"/>
    </style:style>
    <style:style style:name="P1122" style:parent-style-name="Normal" style:family="paragraph">
      <style:text-properties style:font-name="Times New Roman" style:font-name-complex="Times New Roman" fo:font-size="14pt" style:font-size-asian="14pt" style:font-size-complex="14pt"/>
    </style:style>
    <style:style style:name="TableColumn1124" style:family="table-column">
      <style:table-column-properties style:column-width="3.2444in"/>
    </style:style>
    <style:style style:name="TableColumn1125" style:family="table-column">
      <style:table-column-properties style:column-width="3.2444in"/>
    </style:style>
    <style:style style:name="Table1123" style:family="table">
      <style:table-properties style:width="6.4888in" fo:margin-left="0in" table:align="left"/>
    </style:style>
    <style:style style:name="TableRow1126" style:family="table-row">
      <style:table-row-properties/>
    </style:style>
    <style:style style:name="TableCell112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28" style:parent-style-name="Normal" style:family="paragraph">
      <style:text-properties style:font-name="Times New Roman" style:font-name-complex="Times New Roman" fo:font-size="14pt" style:font-size-asian="14pt" style:font-size-complex="14pt"/>
    </style:style>
    <style:style style:name="P1129" style:parent-style-name="Normal" style:family="paragraph">
      <style:text-properties style:font-name="Times New Roman" style:font-name-complex="Times New Roman" fo:font-size="14pt" style:font-size-asian="14pt" style:font-size-complex="14pt"/>
    </style:style>
    <style:style style:name="TableCell113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31" style:parent-style-name="Normal" style:family="paragraph">
      <style:text-properties style:font-name="Times New Roman" style:font-name-complex="Times New Roman" fo:font-size="14pt" style:font-size-asian="14pt" style:font-size-complex="14pt"/>
    </style:style>
    <style:style style:name="P1132" style:parent-style-name="Normal" style:family="paragraph">
      <style:text-properties style:font-name="Times New Roman" style:font-name-complex="Times New Roman" fo:font-size="14pt" style:font-size-asian="14pt" style:font-size-complex="14pt"/>
    </style:style>
    <style:style style:name="TableRow1133" style:family="table-row">
      <style:table-row-properties/>
    </style:style>
    <style:style style:name="TableCell113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35" style:parent-style-name="Normal" style:family="paragraph">
      <style:text-properties style:font-name="Times New Roman" style:font-name-complex="Times New Roman" fo:font-size="14pt" style:font-size-asian="14pt" style:font-size-complex="14pt"/>
    </style:style>
    <style:style style:name="P1136" style:parent-style-name="Normal" style:family="paragraph">
      <style:text-properties style:font-name="Times New Roman" style:font-name-complex="Times New Roman" fo:font-size="14pt" style:font-size-asian="14pt" style:font-size-complex="14pt"/>
    </style:style>
    <style:style style:name="TableCell113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38" style:parent-style-name="Normal" style:family="paragraph">
      <style:text-properties style:font-name="Times New Roman" style:font-name-complex="Times New Roman" fo:font-size="14pt" style:font-size-asian="14pt" style:font-size-complex="14pt"/>
    </style:style>
    <style:style style:name="P1139" style:parent-style-name="Normal" style:family="paragraph">
      <style:text-properties style:font-name="Times New Roman" style:font-name-complex="Times New Roman" fo:font-size="14pt" style:font-size-asian="14pt" style:font-size-complex="14pt"/>
    </style:style>
    <style:style style:name="P1140" style:parent-style-name="Normal" style:family="paragraph">
      <style:text-properties style:font-name="Times New Roman" style:font-name-complex="Times New Roman" fo:font-size="14pt" style:font-size-asian="14pt" style:font-size-complex="14pt"/>
    </style:style>
    <style:style style:name="P1141" style:parent-style-name="Normal" style:family="paragraph">
      <style:text-properties style:font-name="Times New Roman" style:font-name-complex="Times New Roman" fo:font-size="14pt" style:font-size-asian="14pt" style:font-size-complex="14pt"/>
    </style:style>
    <style:style style:name="T11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3" style:parent-style-name="DefaultParagraphFont" style:family="text">
      <style:text-properties style:font-name="Times New Roman" style:font-name-complex="Times New Roman" fo:font-size="14pt" style:font-size-asian="14pt" style:font-size-complex="14pt"/>
    </style:style>
    <style:style style:name="T1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5" style:parent-style-name="Normal" style:family="paragraph">
      <style:text-properties style:font-name="Times New Roman" style:font-name-complex="Times New Roman" fo:font-size="14pt" style:font-size-asian="14pt" style:font-size-complex="14pt"/>
    </style:style>
    <style:style style:name="T11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8" style:parent-style-name="Normal" style:family="paragraph">
      <style:text-properties style:font-name="Times New Roman" style:font-name-complex="Times New Roman" fo:font-size="14pt" style:font-size-asian="14pt" style:font-size-complex="14pt"/>
    </style:style>
    <style:style style:name="P1149" style:parent-style-name="Normal" style:family="paragraph">
      <style:text-properties style:font-name="Times New Roman" style:font-name-complex="Times New Roman"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T1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2" style:parent-style-name="DefaultParagraphFont" style:family="text">
      <style:text-properties style:font-name="Times New Roman" style:font-name-complex="Times New Roman"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5" style:parent-style-name="Normal" style:family="paragraph">
      <style:text-properties style:font-name="Times New Roman" style:font-name-complex="Times New Roman" fo:font-size="14pt" style:font-size-asian="14pt" style:font-size-complex="14pt"/>
    </style:style>
    <style:style style:name="P1156" style:parent-style-name="Normal" style:family="paragraph">
      <style:text-properties style:font-name="Times New Roman" style:font-name-complex="Times New Roman" fo:font-size="14pt" style:font-size-asian="14pt" style:font-size-complex="14pt"/>
    </style:style>
    <style:style style:name="P1157" style:parent-style-name="Normal" style:family="paragraph">
      <style:text-properties style:font-name="Times New Roman" style:font-name-complex="Times New Roman" fo:font-size="14pt" style:font-size-asian="14pt" style:font-size-complex="14pt"/>
    </style:style>
    <style:style style:name="P1158" style:parent-style-name="Normal" style:family="paragraph">
      <style:text-properties style:font-name="Times New Roman" style:font-name-complex="Times New Roman" fo:font-size="14pt" style:font-size-asian="14pt" style:font-size-complex="14pt"/>
    </style:style>
    <style:style style:name="T1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0" style:parent-style-name="DefaultParagraphFont" style:family="text">
      <style:text-properties style:font-name="Times New Roman" style:font-name-complex="Times New Roman" fo:font-size="14pt" style:font-size-asian="14pt" style:font-size-complex="14pt"/>
    </style:style>
    <style:style style:name="T1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2" style:parent-style-name="DefaultParagraphFont" style:family="text">
      <style:text-properties style:font-name="Times New Roman" style:font-name-complex="Times New Roman" fo:font-size="14pt" style:font-size-asian="14pt" style:font-size-complex="14pt"/>
    </style:style>
    <style:style style:name="T116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164" style:parent-style-name="DefaultParagraphFont" style:family="text">
      <style:text-properties style:font-name="Times New Roman" style:font-name-complex="Times New Roman" fo:font-size="14pt" style:font-size-asian="14pt" style:font-size-complex="14pt"/>
    </style:style>
    <style:style style:name="T1165" style:parent-style-name="DefaultParagraphFont" style:family="text">
      <style:text-properties style:font-name="Times New Roman" style:font-name-complex="Times New Roman" fo:font-size="14pt" style:font-size-asian="14pt" style:font-size-complex="14pt"/>
    </style:style>
    <style:style style:name="T1166" style:parent-style-name="Hyperlink" style:family="text">
      <style:text-properties style:font-name="Times New Roman" style:font-name-complex="Times New Roman" fo:font-size="14pt" style:font-size-asian="14pt" style:font-size-complex="14pt"/>
    </style:style>
    <style:style style:name="T1167" style:parent-style-name="DefaultParagraphFont" style:family="text">
      <style:text-properties style:font-name="Times New Roman" style:font-name-complex="Times New Roman" fo:font-size="14pt" style:font-size-asian="14pt" style:font-size-complex="14pt"/>
    </style:style>
    <style:style style:name="T1168" style:parent-style-name="DefaultParagraphFont" style:family="text">
      <style:text-properties style:font-name="Times New Roman" style:font-name-complex="Times New Roman" fo:font-size="14pt" style:font-size-asian="14pt" style:font-size-complex="14pt"/>
    </style:style>
    <style:style style:name="T11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0" style:parent-style-name="DefaultParagraphFont" style:family="text">
      <style:text-properties style:font-name="Times New Roman" style:font-name-complex="Times New Roman" fo:font-size="14pt" style:font-size-asian="14pt" style:font-size-complex="14pt"/>
    </style:style>
    <style:style style:name="T1171" style:parent-style-name="DefaultParagraphFont" style:family="text">
      <style:text-properties style:font-name="Times New Roman" style:font-name-complex="Times New Roman" fo:font-size="14pt" style:font-size-asian="14pt" style:font-size-complex="14pt"/>
    </style:style>
    <style:style style:name="T1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3" style:parent-style-name="DefaultParagraphFont" style:family="text">
      <style:text-properties style:font-name="Times New Roman" style:font-name-complex="Times New Roman" fo:font-size="14pt" style:font-size-asian="14pt" style:font-size-complex="14pt"/>
    </style:style>
    <style:style style:name="T1174" style:parent-style-name="DefaultParagraphFont" style:family="text">
      <style:text-properties style:font-name="Times New Roman" style:font-name-complex="Times New Roman" fo:font-size="14pt" style:font-size-asian="14pt" style:font-size-complex="14pt"/>
    </style:style>
    <style:style style:name="T1175" style:parent-style-name="DefaultParagraphFont" style:family="text">
      <style:text-properties style:font-name="Times New Roman" style:font-name-complex="Times New Roman" fo:font-size="14pt" style:font-size-asian="14pt" style:font-size-complex="14pt"/>
    </style:style>
    <style:style style:name="T1176" style:parent-style-name="DefaultParagraphFont" style:family="text">
      <style:text-properties style:font-name="Times New Roman" style:font-name-complex="Times New Roman" fo:font-size="14pt" style:font-size-asian="14pt" style:font-size-complex="14pt"/>
    </style:style>
    <style:style style:name="T11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9" style:parent-style-name="Normal" style:family="paragraph">
      <style:text-properties style:font-name="Times New Roman" style:font-name-complex="Times New Roman" fo:font-size="14pt" style:font-size-asian="14pt" style:font-size-complex="14pt"/>
    </style:style>
    <style:style style:name="T1180" style:parent-style-name="DefaultParagraphFont" style:family="text">
      <style:text-properties style:font-name="Times New Roman" style:font-name-complex="Times New Roman" fo:font-size="14pt" style:font-size-asian="14pt" style:font-size-complex="14pt"/>
    </style:style>
    <style:style style:name="P1181" style:parent-style-name="Normal" style:family="paragraph">
      <style:text-properties style:font-name="Times New Roman" style:font-name-complex="Times New Roman" fo:font-size="14pt" style:font-size-asian="14pt" style:font-size-complex="14pt"/>
    </style:style>
    <style:style style:name="P1182" style:parent-style-name="Normal" style:family="paragraph">
      <style:text-properties style:font-name="Times New Roman" style:font-name-complex="Times New Roman" fo:font-size="14pt" style:font-size-asian="14pt" style:font-size-complex="14pt"/>
    </style:style>
    <style:style style:name="P1183" style:parent-style-name="Normal" style:family="paragraph">
      <style:text-properties style:font-name="Times New Roman" style:font-name-complex="Times New Roman" fo:font-size="14pt" style:font-size-asian="14pt" style:font-size-complex="14pt"/>
    </style:style>
    <style:style style:name="P1184" style:parent-style-name="Normal" style:family="paragraph">
      <style:text-properties style:font-name="Times New Roman" style:font-name-complex="Times New Roman" fo:font-size="14pt" style:font-size-asian="14pt" style:font-size-complex="14pt"/>
    </style:style>
    <style:style style:name="T1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6" style:parent-style-name="DefaultParagraphFont" style:family="text">
      <style:text-properties style:font-name="Times New Roman" style:font-name-complex="Times New Roman" fo:font-size="14pt" style:font-size-asian="14pt" style:font-size-complex="14pt"/>
    </style:style>
    <style:style style:name="T11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88" style:parent-style-name="Normal" style:family="paragraph">
      <style:text-properties style:font-name="Times New Roman" style:font-name-complex="Times New Roman" fo:font-size="14pt" style:font-size-asian="14pt" style:font-size-complex="14pt"/>
    </style:style>
    <style:style style:name="T1189" style:parent-style-name="DefaultParagraphFont" style:family="text">
      <style:text-properties style:font-name="Times New Roman" style:font-name-complex="Times New Roman" fo:font-size="14pt" style:font-size-asian="14pt" style:font-size-complex="14pt"/>
    </style:style>
    <style:style style:name="T1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1" style:parent-style-name="DefaultParagraphFont" style:family="text">
      <style:text-properties style:font-name="Times New Roman" style:font-name-complex="Times New Roman" fo:font-size="14pt" style:font-size-asian="14pt" style:font-size-complex="14pt"/>
    </style:style>
    <style:style style:name="T1192" style:parent-style-name="DefaultParagraphFont" style:family="text">
      <style:text-properties style:font-name="Times New Roman" style:font-name-complex="Times New Roman" fo:font-size="14pt" style:font-size-asian="14pt" style:font-size-complex="14pt"/>
    </style:style>
    <style:style style:name="T1193" style:parent-style-name="DefaultParagraphFont" style:family="text">
      <style:text-properties style:font-name="Times New Roman" style:font-name-complex="Times New Roman" fo:font-size="14pt" style:font-size-asian="14pt" style:font-size-complex="14pt"/>
    </style:style>
    <style:style style:name="T119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195" style:parent-style-name="DefaultParagraphFont" style:family="text">
      <style:text-properties style:font-name="Times New Roman" style:font-name-complex="Times New Roman" fo:font-size="14pt" style:font-size-asian="14pt" style:font-size-complex="14pt"/>
    </style:style>
    <style:style style:name="T1196" style:parent-style-name="DefaultParagraphFont" style:family="text">
      <style:text-properties style:font-name="Times New Roman" style:font-name-complex="Times New Roman" fo:font-size="14pt" style:font-size-asian="14pt" style:font-size-complex="14pt"/>
    </style:style>
    <style:style style:name="T1197" style:parent-style-name="Hyperlink" style:family="text">
      <style:text-properties style:font-name="Times New Roman" style:font-name-complex="Times New Roman" fo:font-size="14pt" style:font-size-asian="14pt" style:font-size-complex="14pt"/>
    </style:style>
    <style:style style:name="T11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0" style:parent-style-name="Normal" style:family="paragraph">
      <style:text-properties style:font-name="Times New Roman" style:font-name-complex="Times New Roman" fo:font-size="14pt" style:font-size-asian="14pt" style:font-size-complex="14pt"/>
    </style:style>
    <style:style style:name="P1201" style:parent-style-name="Normal" style:family="paragraph">
      <style:text-properties style:font-name="Times New Roman" style:font-name-complex="Times New Roman" fo:font-size="14pt" style:font-size-asian="14pt" style:font-size-complex="14pt"/>
    </style:style>
    <style:style style:name="P1202" style:parent-style-name="Normal" style:family="paragraph">
      <style:text-properties style:font-name="Times New Roman" style:font-name-complex="Times New Roman" fo:font-size="14pt" style:font-size-asian="14pt" style:font-size-complex="14pt"/>
    </style:style>
    <style:style style:name="T1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4" style:parent-style-name="DefaultParagraphFont" style:family="text">
      <style:text-properties style:font-name="Times New Roman" style:font-name-complex="Times New Roman" fo:font-size="14pt" style:font-size-asian="14pt" style:font-size-complex="14pt"/>
    </style:style>
    <style:style style:name="T12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7" style:parent-style-name="Normal" style:family="paragraph">
      <style:text-properties style:font-name="Times New Roman" style:font-name-complex="Times New Roman" fo:font-size="14pt" style:font-size-asian="14pt" style:font-size-complex="14pt"/>
    </style:style>
    <style:style style:name="P1208" style:parent-style-name="Normal" style:family="paragraph">
      <style:text-properties style:font-name="Times New Roman" style:font-name-complex="Times New Roman" fo:font-size="14pt" style:font-size-asian="14pt" style:font-size-complex="14pt"/>
    </style:style>
    <style:style style:name="P1209" style:parent-style-name="Normal" style:family="paragraph">
      <style:text-properties style:font-name="Times New Roman" style:font-name-complex="Times New Roman" fo:font-size="14pt" style:font-size-asian="14pt" style:font-size-complex="14pt"/>
    </style:style>
    <style:style style:name="T12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1" style:parent-style-name="DefaultParagraphFont" style:family="text">
      <style:text-properties style:font-name="Times New Roman" style:font-name-complex="Times New Roman" fo:font-size="14pt" style:font-size-asian="14pt" style:font-size-complex="14pt"/>
    </style:style>
    <style:style style:name="T12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3" style:parent-style-name="Normal" style:family="paragraph">
      <style:text-properties style:font-name="Times New Roman" style:font-name-complex="Times New Roman" fo:font-size="14pt" style:font-size-asian="14pt" style:font-size-complex="14pt"/>
    </style:style>
    <style:style style:name="T1214" style:parent-style-name="DefaultParagraphFont" style:family="text">
      <style:text-properties style:font-name="Times New Roman" style:font-name-complex="Times New Roman" fo:font-size="14pt" style:font-size-asian="14pt" style:font-size-complex="14pt"/>
    </style:style>
    <style:style style:name="T1215" style:parent-style-name="Hyperlink" style:family="text">
      <style:text-properties style:font-name="Times New Roman" style:font-name-complex="Times New Roman" fo:font-size="14pt" style:font-size-asian="14pt" style:font-size-complex="14pt"/>
    </style:style>
    <style:style style:name="T12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8" style:parent-style-name="Normal" style:family="paragraph">
      <style:text-properties style:font-name="Times New Roman" style:font-name-complex="Times New Roman" fo:font-size="14pt" style:font-size-asian="14pt" style:font-size-complex="14pt"/>
    </style:style>
    <style:style style:name="P1219" style:parent-style-name="Normal" style:family="paragraph">
      <style:text-properties style:font-name="Times New Roman" style:font-name-complex="Times New Roman" fo:font-size="14pt" style:font-size-asian="14pt" style:font-size-complex="14pt"/>
    </style:style>
    <style:style style:name="P1220" style:parent-style-name="Normal" style:family="paragraph">
      <style:text-properties style:font-name="Times New Roman" style:font-name-complex="Times New Roman" fo:font-size="14pt" style:font-size-asian="14pt" style:font-size-complex="14pt"/>
    </style:style>
    <style:style style:name="T12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2" style:parent-style-name="DefaultParagraphFont" style:family="text">
      <style:text-properties style:font-name="Times New Roman" style:font-name-complex="Times New Roman" fo:font-size="14pt" style:font-size-asian="14pt" style:font-size-complex="14pt"/>
    </style:style>
    <style:style style:name="T12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25" style:parent-style-name="Normal" style:family="paragraph">
      <style:text-properties style:font-name="Times New Roman" style:font-name-complex="Times New Roman" fo:font-size="14pt" style:font-size-asian="14pt" style:font-size-complex="14pt"/>
    </style:style>
    <style:style style:name="P1226" style:parent-style-name="Normal" style:family="paragraph">
      <style:text-properties style:font-name="Times New Roman" style:font-name-complex="Times New Roman" fo:font-size="14pt" style:font-size-asian="14pt" style:font-size-complex="14pt"/>
    </style:style>
    <style:style style:name="P1227" style:parent-style-name="Normal" style:family="paragraph">
      <style:text-properties style:font-name="Times New Roman" style:font-name-complex="Times New Roman" fo:font-size="14pt" style:font-size-asian="14pt" style:font-size-complex="14pt"/>
    </style:style>
    <style:style style:name="T1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9" style:parent-style-name="DefaultParagraphFont" style:family="text">
      <style:text-properties style:font-name="Times New Roman" style:font-name-complex="Times New Roman" fo:font-size="14pt" style:font-size-asian="14pt" style:font-size-complex="14pt"/>
    </style:style>
    <style:style style:name="T12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2" style:parent-style-name="Normal" style:family="paragraph">
      <style:text-properties style:font-name="Times New Roman" style:font-name-complex="Times New Roman" fo:font-size="14pt" style:font-size-asian="14pt" style:font-size-complex="14pt"/>
    </style:style>
    <style:style style:name="P1233" style:parent-style-name="Normal" style:family="paragraph">
      <style:text-properties style:font-name="Times New Roman" style:font-name-complex="Times New Roman" fo:font-size="14pt" style:font-size-asian="14pt" style:font-size-complex="14pt"/>
    </style:style>
    <style:style style:name="P1234" style:parent-style-name="Normal" style:family="paragraph">
      <style:text-properties style:font-name="Times New Roman" style:font-name-complex="Times New Roman" fo:font-size="14pt" style:font-size-asian="14pt" style:font-size-complex="14pt"/>
    </style:style>
    <style:style style:name="T12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6" style:parent-style-name="DefaultParagraphFont" style:family="text">
      <style:text-properties style:font-name="Times New Roman" style:font-name-complex="Times New Roman" fo:font-size="14pt" style:font-size-asian="14pt" style:font-size-complex="14pt"/>
    </style:style>
    <style:style style:name="T12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9" style:parent-style-name="Normal" style:family="paragraph">
      <style:text-properties style:font-name="Times New Roman" style:font-name-complex="Times New Roman" fo:font-size="14pt" style:font-size-asian="14pt" style:font-size-complex="14pt"/>
    </style:style>
    <style:style style:name="P1240" style:parent-style-name="Normal" style:family="paragraph">
      <style:text-properties style:font-name="Times New Roman" style:font-name-complex="Times New Roman" fo:font-size="14pt" style:font-size-asian="14pt" style:font-size-complex="14pt"/>
    </style:style>
    <style:style style:name="P1241" style:parent-style-name="Normal" style:family="paragraph">
      <style:text-properties style:font-name="Times New Roman" style:font-name-complex="Times New Roman" fo:font-size="14pt" style:font-size-asian="14pt" style:font-size-complex="14pt"/>
    </style:style>
    <style:style style:name="T12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43" style:parent-style-name="DefaultParagraphFont" style:family="text">
      <style:text-properties style:font-name="Times New Roman" style:font-name-complex="Times New Roman" fo:font-size="14pt" style:font-size-asian="14pt" style:font-size-complex="14pt"/>
    </style:style>
    <style:style style:name="T12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46" style:parent-style-name="Normal" style:family="paragraph">
      <style:text-properties style:font-name="Times New Roman" style:font-name-complex="Times New Roman" fo:font-size="14pt" style:font-size-asian="14pt" style:font-size-complex="14pt"/>
    </style:style>
    <style:style style:name="P1247" style:parent-style-name="Normal" style:family="paragraph">
      <style:text-properties style:font-name="Times New Roman" style:font-name-complex="Times New Roman" fo:font-size="14pt" style:font-size-asian="14pt" style:font-size-complex="14pt"/>
    </style:style>
    <style:style style:name="P1248" style:parent-style-name="Normal" style:family="paragraph">
      <style:text-properties style:font-name="Times New Roman" style:font-name-complex="Times New Roman" fo:font-size="14pt" style:font-size-asian="14pt" style:font-size-complex="14pt"/>
    </style:style>
    <style:style style:name="T12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0" style:parent-style-name="DefaultParagraphFont" style:family="text">
      <style:text-properties style:font-name="Times New Roman" style:font-name-complex="Times New Roman" fo:font-size="14pt" style:font-size-asian="14pt" style:font-size-complex="14pt"/>
    </style:style>
    <style:style style:name="T12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52" style:parent-style-name="Normal" style:family="paragraph">
      <style:text-properties style:font-name="Times New Roman" style:font-name-complex="Times New Roman" fo:font-size="14pt" style:font-size-asian="14pt" style:font-size-complex="14pt"/>
    </style:style>
    <style:style style:name="TableColumn1254" style:family="table-column">
      <style:table-column-properties style:column-width="6.4888in"/>
    </style:style>
    <style:style style:name="Table1253" style:family="table">
      <style:table-properties style:width="6.4888in" fo:margin-left="0in" table:align="left"/>
    </style:style>
    <style:style style:name="TableRow1255" style:family="table-row">
      <style:table-row-properties/>
    </style:style>
    <style:style style:name="TableCell125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257" style:parent-style-name="DefaultParagraphFont" style:family="text">
      <style:text-properties style:font-name="Times New Roman" style:font-name-complex="Times New Roman" fo:font-size="14pt" style:font-size-asian="14pt" style:font-size-complex="14pt"/>
    </style:style>
    <style:style style:name="T1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9" style:parent-style-name="DefaultParagraphFont" style:family="text">
      <style:text-properties style:font-name="Times New Roman" style:font-name-complex="Times New Roman" fo:font-size="14pt" style:font-size-asian="14pt" style:font-size-complex="14pt"/>
    </style:style>
    <style:style style:name="T1260" style:parent-style-name="DefaultParagraphFont" style:family="text">
      <style:text-properties style:font-name="Times New Roman" style:font-name-complex="Times New Roman" fo:font-size="14pt" style:font-size-asian="14pt" style:font-size-complex="14pt"/>
    </style:style>
    <style:style style:name="T12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2" style:parent-style-name="DefaultParagraphFont" style:family="text">
      <style:text-properties style:font-name="Times New Roman" style:font-name-complex="Times New Roman" fo:font-size="14pt" style:font-size-asian="14pt" style:font-size-complex="14pt"/>
    </style:style>
    <style:style style:name="P1263" style:parent-style-name="Normal" style:family="paragraph">
      <style:text-properties style:font-name="Times New Roman" style:font-name-complex="Times New Roman" fo:font-size="14pt" style:font-size-asian="14pt" style:font-size-complex="14pt"/>
    </style:style>
    <style:style style:name="TableColumn1265" style:family="table-column">
      <style:table-column-properties style:column-width="0.6625in"/>
    </style:style>
    <style:style style:name="TableColumn1266" style:family="table-column">
      <style:table-column-properties style:column-width="1.2673in"/>
    </style:style>
    <style:style style:name="TableColumn1267" style:family="table-column">
      <style:table-column-properties style:column-width="3.3409in"/>
    </style:style>
    <style:style style:name="Table1264" style:family="table">
      <style:table-properties style:width="5.2708in" fo:margin-left="0in" table:align="left"/>
    </style:style>
    <style:style style:name="TableRow1268" style:family="table-row">
      <style:table-row-properties/>
    </style:style>
    <style:style style:name="TableCell126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2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27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2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27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2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Row1275" style:family="table-row">
      <style:table-row-properties/>
    </style:style>
    <style:style style:name="TableCell127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77" style:parent-style-name="Normal" style:family="paragraph">
      <style:text-properties style:font-name="Times New Roman" style:font-name-complex="Times New Roman" fo:font-size="14pt" style:font-size-asian="14pt" style:font-size-complex="14pt"/>
    </style:style>
    <style:style style:name="TableCell127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79" style:parent-style-name="Normal" style:family="paragraph">
      <style:text-properties style:font-name="Times New Roman" style:font-name-complex="Times New Roman" fo:font-size="14pt" style:font-size-asian="14pt" style:font-size-complex="14pt"/>
    </style:style>
    <style:style style:name="TableCell128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81" style:parent-style-name="Normal" style:family="paragraph">
      <style:text-properties style:font-name="Times New Roman" style:font-name-complex="Times New Roman" fo:font-size="14pt" style:font-size-asian="14pt" style:font-size-complex="14pt"/>
    </style:style>
    <style:style style:name="TableRow1282" style:family="table-row">
      <style:table-row-properties/>
    </style:style>
    <style:style style:name="TableCell128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84" style:parent-style-name="Normal" style:family="paragraph">
      <style:text-properties style:font-name="Times New Roman" style:font-name-complex="Times New Roman" fo:font-size="14pt" style:font-size-asian="14pt" style:font-size-complex="14pt"/>
    </style:style>
    <style:style style:name="TableCell128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86" style:parent-style-name="Normal" style:family="paragraph">
      <style:text-properties style:font-name="Times New Roman" style:font-name-complex="Times New Roman" fo:font-size="14pt" style:font-size-asian="14pt" style:font-size-complex="14pt"/>
    </style:style>
    <style:style style:name="TableCell128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88" style:parent-style-name="Normal" style:family="paragraph">
      <style:text-properties style:font-name="Times New Roman" style:font-name-complex="Times New Roman" fo:font-size="14pt" style:font-size-asian="14pt" style:font-size-complex="14pt"/>
    </style:style>
    <style:style style:name="TableRow1289" style:family="table-row">
      <style:table-row-properties/>
    </style:style>
    <style:style style:name="TableCell129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1" style:parent-style-name="Normal" style:family="paragraph">
      <style:text-properties style:font-name="Times New Roman" style:font-name-complex="Times New Roman" fo:font-size="14pt" style:font-size-asian="14pt" style:font-size-complex="14pt"/>
    </style:style>
    <style:style style:name="TableCell129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3" style:parent-style-name="Normal" style:family="paragraph">
      <style:text-properties style:font-name="Times New Roman" style:font-name-complex="Times New Roman" fo:font-size="14pt" style:font-size-asian="14pt" style:font-size-complex="14pt"/>
    </style:style>
    <style:style style:name="TableCell129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5" style:parent-style-name="Normal" style:family="paragraph">
      <style:text-properties style:font-name="Times New Roman" style:font-name-complex="Times New Roman" fo:font-size="14pt" style:font-size-asian="14pt" style:font-size-complex="14pt"/>
    </style:style>
    <style:style style:name="TableRow1296" style:family="table-row">
      <style:table-row-properties/>
    </style:style>
    <style:style style:name="TableCell129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8" style:parent-style-name="Normal" style:family="paragraph">
      <style:text-properties style:font-name="Times New Roman" style:font-name-complex="Times New Roman" fo:font-size="14pt" style:font-size-asian="14pt" style:font-size-complex="14pt"/>
    </style:style>
    <style:style style:name="TableCell129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0" style:parent-style-name="Normal" style:family="paragraph">
      <style:text-properties style:font-name="Times New Roman" style:font-name-complex="Times New Roman" fo:font-size="14pt" style:font-size-asian="14pt" style:font-size-complex="14pt"/>
    </style:style>
    <style:style style:name="TableCell130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2" style:parent-style-name="Normal" style:family="paragraph">
      <style:text-properties style:font-name="Times New Roman" style:font-name-complex="Times New Roman" fo:font-size="14pt" style:font-size-asian="14pt" style:font-size-complex="14pt"/>
    </style:style>
    <style:style style:name="TableRow1303" style:family="table-row">
      <style:table-row-properties/>
    </style:style>
    <style:style style:name="TableCell130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5" style:parent-style-name="Normal" style:family="paragraph">
      <style:text-properties style:font-name="Times New Roman" style:font-name-complex="Times New Roman" fo:font-size="14pt" style:font-size-asian="14pt" style:font-size-complex="14pt"/>
    </style:style>
    <style:style style:name="TableCell130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7" style:parent-style-name="Normal" style:family="paragraph">
      <style:text-properties style:font-name="Times New Roman" style:font-name-complex="Times New Roman" fo:font-size="14pt" style:font-size-asian="14pt" style:font-size-complex="14pt"/>
    </style:style>
    <style:style style:name="TableCell130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9" style:parent-style-name="Normal" style:family="paragraph">
      <style:text-properties style:font-name="Times New Roman" style:font-name-complex="Times New Roman" fo:font-size="14pt" style:font-size-asian="14pt" style:font-size-complex="14pt"/>
    </style:style>
    <style:style style:name="TableRow1310" style:family="table-row">
      <style:table-row-properties/>
    </style:style>
    <style:style style:name="TableCell131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12" style:parent-style-name="Normal" style:family="paragraph">
      <style:text-properties style:font-name="Times New Roman" style:font-name-complex="Times New Roman" fo:font-size="14pt" style:font-size-asian="14pt" style:font-size-complex="14pt"/>
    </style:style>
    <style:style style:name="TableCell131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14" style:parent-style-name="Normal" style:family="paragraph">
      <style:text-properties style:font-name="Times New Roman" style:font-name-complex="Times New Roman" fo:font-size="14pt" style:font-size-asian="14pt" style:font-size-complex="14pt"/>
    </style:style>
    <style:style style:name="TableCell131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16" style:parent-style-name="Normal" style:family="paragraph">
      <style:text-properties style:font-name="Times New Roman" style:font-name-complex="Times New Roman" fo:font-size="14pt" style:font-size-asian="14pt" style:font-size-complex="14pt"/>
    </style:style>
    <style:style style:name="TableRow1317" style:family="table-row">
      <style:table-row-properties/>
    </style:style>
    <style:style style:name="TableCell131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19" style:parent-style-name="Normal" style:family="paragraph">
      <style:text-properties style:font-name="Times New Roman" style:font-name-complex="Times New Roman" fo:font-size="14pt" style:font-size-asian="14pt" style:font-size-complex="14pt"/>
    </style:style>
    <style:style style:name="TableCell132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21" style:parent-style-name="Normal" style:family="paragraph">
      <style:text-properties style:font-name="Times New Roman" style:font-name-complex="Times New Roman" fo:font-size="14pt" style:font-size-asian="14pt" style:font-size-complex="14pt"/>
    </style:style>
    <style:style style:name="TableCell132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23" style:parent-style-name="Normal" style:family="paragraph">
      <style:text-properties style:font-name="Times New Roman" style:font-name-complex="Times New Roman" fo:font-size="14pt" style:font-size-asian="14pt" style:font-size-complex="14pt"/>
    </style:style>
    <style:style style:name="TableRow1324" style:family="table-row">
      <style:table-row-properties/>
    </style:style>
    <style:style style:name="TableCell132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26" style:parent-style-name="Normal" style:family="paragraph">
      <style:text-properties style:font-name="Times New Roman" style:font-name-complex="Times New Roman" fo:font-size="14pt" style:font-size-asian="14pt" style:font-size-complex="14pt"/>
    </style:style>
    <style:style style:name="TableCell132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28" style:parent-style-name="Normal" style:family="paragraph">
      <style:text-properties style:font-name="Times New Roman" style:font-name-complex="Times New Roman" fo:font-size="14pt" style:font-size-asian="14pt" style:font-size-complex="14pt"/>
    </style:style>
    <style:style style:name="TableCell132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30" style:parent-style-name="Normal" style:family="paragraph">
      <style:text-properties style:font-name="Times New Roman" style:font-name-complex="Times New Roman" fo:font-size="14pt" style:font-size-asian="14pt" style:font-size-complex="14pt"/>
    </style:style>
    <style:style style:name="P1331" style:parent-style-name="Normal" style:family="paragraph">
      <style:text-properties style:font-name="Times New Roman" style:font-name-complex="Times New Roman" fo:font-size="14pt" style:font-size-asian="14pt" style:font-size-complex="14pt"/>
    </style:style>
    <style:style style:name="T13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34" style:parent-style-name="Normal" style:family="paragraph">
      <style:text-properties style:font-name="Times New Roman" style:font-name-complex="Times New Roman" fo:font-size="14pt" style:font-size-asian="14pt" style:font-size-complex="14pt"/>
    </style:style>
    <style:style style:name="P1335" style:parent-style-name="Normal" style:family="paragraph">
      <style:text-properties style:font-name="Times New Roman" style:font-name-complex="Times New Roman" fo:font-size="14pt" style:font-size-asian="14pt" style:font-size-complex="14pt"/>
    </style:style>
    <style:style style:name="P1336" style:parent-style-name="Normal" style:family="paragraph">
      <style:text-properties style:font-name="Times New Roman" style:font-name-complex="Times New Roman" fo:font-size="14pt" style:font-size-asian="14pt" style:font-size-complex="14pt"/>
    </style:style>
    <style:style style:name="T1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38" style:parent-style-name="DefaultParagraphFont" style:family="text">
      <style:text-properties style:font-name="Times New Roman" style:font-name-complex="Times New Roman" fo:font-size="14pt" style:font-size-asian="14pt" style:font-size-complex="14pt"/>
    </style:style>
    <style:style style:name="P1339" style:parent-style-name="Normal" style:family="paragraph">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text:span text:style-name="T2">Question 13.</text:span><text:span text:style-name="T3">1</text:span></text:p>
      <text:p text:style-name="P4">Refer to the exhibit.</text:p>
      <text:p text:style-name="Normal"><text:span text:style-name="T5"><draw:frame draw:style-name="a0" draw:name="Picture 64" text:anchor-type="as-char" svg:x="0in" svg:y="0in" svg:width="5.27778in" svg:height="4.47917in" style:rel-width="scale" style:rel-height="scale"><draw:image xlink:href="media/image1.jpeg" xlink:type="simple" xlink:show="embed" xlink:actuate="onLoad"/><svg:title/><svg:desc/></draw:frame></text:span></text:p>
      <text:p text:style-name="P6">A new VLAN and switch are added to the network. A remote engineer configures OldSwitch and must ensure that the configuration meets these requirements:<text:line-break/>* accommodates current configured VLANs<text:line-break/>* expands the range to include VLAN 20<text:line-break/>* allows for IEEE standard support for virtual LANs</text:p>
      <text:p text:style-name="P7">Which configuration on the NewSwitch side of the link meets these requirements?</text:p>
      <text:p text:style-name="P8">A.<text:line-break/>no switchport trunk encapsulation isl<text:line-break/>switchport trunk encapsulation dot1q<text:line-break/>switchport trunk allowed vlan add 20</text:p>
      <text:p text:style-name="P9">B.<text:line-break/>switchport nonnegotiate<text:line-break/><text:soft-page-break/>no switchport trunk allowed vlan 5,10<text:line-break/>switchport trunk allowed vlan 5,10,15,20</text:p>
      <text:p text:style-name="P10">C.<text:line-break/>no switchport mode trunk<text:line-break/>switchport trunk encapsulation isl<text:line-break/>switchport mode access vlan 20</text:p>
      <text:p text:style-name="P11">D.<text:line-break/>switchport mode dynamic<text:line-break/>channel-group 1 mode active<text:line-break/>switchport trunk allowed vlan 5,10,15,20</text:p>
      <text:p text:style-name="P12"> </text:p>
      <text:p text:style-name="Normal"><text:span text:style-name="T13">Answer:</text:span><text:span text:style-name="T14"> A</text:span></text:p>
      <text:p text:style-name="Normal"><text:span text:style-name="T15">Question 13.</text:span><text:span text:style-name="T16">2</text:span></text:p>
      <text:p text:style-name="P17">Drag and drop the characteristic from the left onto the IPv6 address type on the right.</text:p>
      <text:p text:style-name="Normal"><text:span text:style-name="T18"><draw:frame draw:style-name="a1" draw:name="Picture 63" text:anchor-type="as-char" svg:x="0in" svg:y="0in" svg:width="6.5in" svg:height="2.72708in" style:rel-width="scale" style:rel-height="scale"><draw:image xlink:href="media/image2.jpeg" xlink:type="simple" xlink:show="embed" xlink:actuate="onLoad"/><svg:title/><svg:desc/></draw:frame></text:span></text:p>
      <text:p text:style-name="P19"> </text:p>
      <text:p text:style-name="Normal"><text:span text:style-name="T20">Answer:</text:span></text:p>
      <text:soft-page-break/>
      <text:p text:style-name="Normal"><text:span text:style-name="T21">Multicast</text:span><text:span text:style-name="T22"><text:line-break/>+ sends packets to a group address rather than a single address</text:span><text:span text:style-name="T23"><text:line-break/>+ has a unicast source sent to a group</text:span></text:p>
      <text:p text:style-name="Normal"><text:span text:style-name="T24">Anycast</text:span><text:span text:style-name="T25"><text:line-break/>+ is used exclusively by a non-host device</text:span><text:span text:style-name="T26"><text:line-break/>+ is routed to the nearest interface that has the address</text:span></text:p>
      <text:p text:style-name="Normal"><text:span text:style-name="T27">Explanation</text:span></text:p>
      <text:p text:style-name="Normal"><text:span text:style-name="T28">An anycast address is an address that is assigned to a set of interfaces that typically belong to different nodes. A packet sent to an anycast address is delivered to the </text:span><text:span text:style-name="T29">closest interface</text:span><text:span text:style-name="T30"> (as defined by the routing protocols in use) identified by the anycast address.</text:span></text:p>
      <text:p text:style-name="Normal"><text:span text:style-name="T31">Anycast addresses can be used only </text:span><text:span text:style-name="T32">by a device, not a host</text:span><text:span text:style-name="T33">, and anycast addresses must not be used as the source address of an IPv6 packet.</text:span></text:p>
      <text:p text:style-name="Normal"><text:span text:style-name="T34">Reference: </text:span><text:a xlink:href="https://www.cisco.com/c/en/us/td/docs/ios-xml/ios/ipv6_basic/configuration/xe-3se/5700/ip6-anycast-add-xe.html" office:target-frame-name="_blank" xlink:show="new"><text:span text:style-name="T35">https://www.cisco.com/c/en/us/td/docs/ios-xml/ios/ipv6_basic/configuration/xe-3se/5700/ip6-anycast-add-xe.html</text:span></text:a></text:p>
      <text:p text:style-name="Normal"><text:span text:style-name="T36">Question 13.</text:span><text:span text:style-name="T37">3</text:span></text:p>
      <text:p text:style-name="P38">Drag and drop the characteristic from the left onto the IPv6 address type on the right.</text:p>
      <text:p text:style-name="Normal"><text:span text:style-name="T39"><draw:frame draw:style-name="a2" draw:name="Picture 62" text:anchor-type="as-char" svg:x="0in" svg:y="0in" svg:width="6.5in" svg:height="2.72708in" style:rel-width="scale" style:rel-height="scale"><draw:image xlink:href="media/image3.jpeg" xlink:type="simple" xlink:show="embed" xlink:actuate="onLoad"/><svg:title/><svg:desc/></draw:frame></text:span></text:p>
      <text:p text:style-name="P40"> </text:p>
      <text:soft-page-break/>
      <text:p text:style-name="Normal"><text:span text:style-name="T41">Answer:</text:span></text:p>
      <text:p text:style-name="Normal"><text:span text:style-name="T42">Global Unicast Address</text:span><text:span text:style-name="T43"><text:line-break/>+ enables aggregation of routing prefixes</text:span><text:span text:style-name="T44"><text:line-break/>+ is routable and reachable via the Internet</text:span></text:p>
      <text:p text:style-name="Normal"><text:span text:style-name="T45">Multicast</text:span><text:span text:style-name="T46"><text:line-break/>+ provides one-to-many communications</text:span><text:span text:style-name="T47"><text:line-break/>+ has a unicast source sent to a group</text:span></text:p>
      <text:p text:style-name="Normal"><text:span text:style-name="T48">Question 13.</text:span><text:span text:style-name="T49">4</text:span></text:p>
      <text:p text:style-name="P50">How does frame switching function on a switch?</text:p>
      <text:p text:style-name="P51">A. forwards frames to a neighbor port using CDP<text:line-break/>B. modifies frames that contain a known source VLAN<text:line-break/>C. inspects and drops frames from unknown destinations<text:line-break/>D. forwards known destinations to the destination port</text:p>
      <text:p text:style-name="P52"> </text:p>
      <text:p text:style-name="Normal"><text:span text:style-name="T53">Answer:</text:span><text:span text:style-name="T54"> D</text:span></text:p>
      <text:p text:style-name="Normal"><text:span text:style-name="T55">Question 13.</text:span><text:span text:style-name="T56">5</text:span></text:p>
      <text:p text:style-name="P57">What is used as a solution for protecting an individual network endpoint from attack?</text:p>
      <text:p text:style-name="P58">A. Router<text:line-break/>B. Wireless controller<text:line-break/>C. Antivirus software<text:line-break/>D. Cisco DNA Center</text:p>
      <text:p text:style-name="P59"> </text:p>
      <text:p text:style-name="Normal"><text:span text:style-name="T60">Answer:</text:span><text:span text:style-name="T61"> C</text:span></text:p>
      <text:p text:style-name="Normal"><text:span text:style-name="T62">Question 13.</text:span><text:span text:style-name="T63">6</text:span></text:p>
      <text:p text:style-name="P64">Refer to Exhibit.</text:p>
      <text:soft-page-break/>
      <text:p text:style-name="Normal"><text:span text:style-name="T65"><draw:frame draw:style-name="a3" draw:name="Picture 61" text:anchor-type="as-char" svg:x="0in" svg:y="0in" svg:width="3.77083in" svg:height="4.79167in" style:rel-width="scale" style:rel-height="scale"><draw:image xlink:href="media/image4.jpeg" xlink:type="simple" xlink:show="embed" xlink:actuate="onLoad"/><svg:title/><svg:desc/></draw:frame></text:span></text:p>
      <text:p text:style-name="P66">An engineer is building a new Layer 2 LACP EtherChannel between SW1 and SW2. and they executed the given show commands to verify the work. Which additional task must be performed so that the switches successfully bundle the second member in the LACP port-channel?</text:p>
      <text:p text:style-name="Normal"><text:span text:style-name="T67">A. Configure the </text:span><text:span text:style-name="T68">switchport trunk allowed vlan 300</text:span><text:span text:style-name="T69"> command on SW1 port-channel 1</text:span><text:span text:style-name="T70"><text:line-break/>B. Configure the </text:span><text:span text:style-name="T71">switchport trunk allowed vlan 300</text:span><text:span text:style-name="T72"> command on interface Fa0/2 on SW1</text:span><text:span text:style-name="T73"><text:line-break/>C. Configure the </text:span><text:span text:style-name="T74">switchport trunk allowed vlan add 300</text:span><text:span text:style-name="T75"> command on interface Fa0/2 on SW2</text:span><text:span text:style-name="T76"><text:line-break/>D. Configure the </text:span><text:span text:style-name="T77">switchport trunk allowed vlan add 300</text:span><text:span text:style-name="T78"> command on SW1 port-channel 1</text:span></text:p>
      <text:p text:style-name="P79"> </text:p>
      <text:p text:style-name="Normal"><text:span text:style-name="T80">Answer:</text:span><text:span text:style-name="T81"> D</text:span></text:p>
      <text:soft-page-break/>
      <text:p text:style-name="Normal"><text:span text:style-name="T82">Explanation</text:span></text:p>
      <text:p text:style-name="Normal"><text:span text:style-name="T83">All of the member interfaces of an Etherchannel port must have the same configuration or the Etherchannel interface would not be formed. Therefore we must add VLAN 300 to the interface Fa0/2 on SW1 to match the configuration on interface Fa0/1 by the command “switchport trunk allowed vlan </text:span><text:span text:style-name="T84">add</text:span><text:span text:style-name="T85"> 300″ on interface Fa0/2 of SW1. But this command does not exist in the four choices so the best alternative command should be answer D. After using this command, two physical interfaces will have the same configuration.</text:span></text:p>
      <text:p text:style-name="Normal"><text:span text:style-name="T86">Question 13.</text:span><text:span text:style-name="T87">7</text:span></text:p>
      <text:p text:style-name="P88">Which two HTTP methods are suitable for actions performed by REST-based APIs? (Choose two)</text:p>
      <text:p text:style-name="P89">A. REMOVE<text:line-break/>B. REDIRECT<text:line-break/>C. POST<text:line-break/>D. GET<text:line-break/>E. POP</text:p>
      <text:p text:style-name="Normal"><text:span text:style-name="T90">Answer:</text:span><text:span text:style-name="T91"> C D</text:span></text:p>
      <text:p text:style-name="Normal"><text:span text:style-name="T92">Explanation</text:span></text:p>
      <text:p text:style-name="P93">GET: retrieve data<text:line-break/>POST: create data<text:line-break/>PUT: fully update (i.e. replace) an existing record<text:line-break/>PATCH: update part of an existing record<text:line-break/>DELETE: delete records</text:p>
      <text:p text:style-name="Normal"><text:span text:style-name="T94">Question 13.</text:span><text:span text:style-name="T95">8</text:span></text:p>
      <text:p text:style-name="P96">What provides connection redundancy increased bandwidth and load sharing between a wireless LAN controller and a Layer 2 switch?</text:p>
      <text:p text:style-name="P97">A. VLAN trunking<text:line-break/>B. tunneling<text:line-break/>C. first hop redundancy<text:line-break/>D. link aggregation</text:p>
      <text:soft-page-break/>
      <text:p text:style-name="P98"> </text:p>
      <text:p text:style-name="Normal"><text:span text:style-name="T99">Answer:</text:span><text:span text:style-name="T100"> D</text:span></text:p>
      <text:p text:style-name="Normal"><text:span text:style-name="T101">Explanation</text:span></text:p>
      <text:p text:style-name="P102">Cisco Wireless LAN Controller Configuration Guide, Release 7.4<text:line-break/>…</text:p>
      <text:p text:style-name="P103">When using Link aggregation (LAG) make sure all ports of the controller have the same Layer 2 configuration on the switch side.</text:p>
      <text:p text:style-name="Normal"><text:span text:style-name="T104">Reference: </text:span><text:a xlink:href="https://www.cisco.com/c/en/us/td/docs/wireless/controller/7-4/configuration/guides/consolidated/b_cg74_CONSOLIDATED/b_cg74_CONSOLIDATED_chapter_010100001.html" office:target-frame-name="_blank" xlink:show="new"><text:span text:style-name="T105">https://www.cisco.com/c/en/us/td/docs/wireless/controller/7-4/configuration/guides/consolidated/b_cg74_CONSOLIDATED/b_cg74_CONSOLIDATED_chapter_010100001.html</text:span></text:a></text:p>
      <text:p text:style-name="Normal"><text:span text:style-name="T106">Question 13.</text:span><text:span text:style-name="T107">9</text:span></text:p>
      <text:p text:style-name="P108">Drag and drop the characteristic from the left onto the IPv6 address type on the right.</text:p>
      <text:p text:style-name="Normal"><text:span text:style-name="T109"><draw:frame draw:style-name="a4" draw:name="Picture 60" text:anchor-type="as-char" svg:x="0in" svg:y="0in" svg:width="6.5in" svg:height="2.72708in" style:rel-width="scale" style:rel-height="scale"><draw:image xlink:href="media/image5.jpeg" xlink:type="simple" xlink:show="embed" xlink:actuate="onLoad"/><svg:title/><svg:desc/></draw:frame></text:span></text:p>
      <text:p text:style-name="P110"> </text:p>
      <text:p text:style-name="Normal"><text:span text:style-name="T111">Answer:</text:span></text:p>
      <text:p text:style-name="Normal"><text:span text:style-name="T112">Global Unicast Address</text:span><text:span text:style-name="T113"><text:line-break/>+ provides for one-to-one communication</text:span><text:span text:style-name="T114"><text:line-break/>+ is publicly routable in the same way as IPv4 addresses</text:span></text:p>
      <text:soft-page-break/>
      <text:p text:style-name="Normal"><text:span text:style-name="T115">Unique Local</text:span><text:span text:style-name="T116"><text:line-break/>+ allows sites to be combined without address conflicts</text:span><text:span text:style-name="T117"><text:line-break/>+ is a counterpart of private IPv4 addresses</text:span></text:p>
      <text:p text:style-name="Normal"><text:span text:style-name="T118">Explanation</text:span></text:p>
      <text:p text:style-name="Normal"><text:span text:style-name="T119">A IPv6 </text:span><text:span text:style-name="T120">Unique Local Address</text:span><text:span text:style-name="T121"> is an IPv6 address in the block FC00::/7. It is the approximate IPv6 counterpart of the IPv4 private address. It is not routable on the global Internet.</text:span></text:p>
      <text:p text:style-name="Normal"><text:span text:style-name="T122">Question 13.</text:span><text:span text:style-name="T123">10</text:span></text:p>
      <text:p text:style-name="P124">When the LAG configuration is updated on a Cisco WLC, which additional task must be performed when changes are complete?</text:p>
      <text:p text:style-name="P125">A. Flush all MAC addresses from the WLC<text:line-break/>B. Re-associate the WLC with the access point.<text:line-break/>C. Re-enable the WLC interfaces<text:line-break/>D. Reboot the WLC</text:p>
      <text:p text:style-name="P126"> </text:p>
      <text:p text:style-name="Normal"><text:span text:style-name="T127">Answer:</text:span><text:span text:style-name="T128"> D</text:span></text:p>
      <text:p text:style-name="Normal"><text:span text:style-name="T129">Explanation</text:span></text:p>
      <text:p text:style-name="P130">When you enable LAG or make any changes to the LAG configuration, you must immediately reboot the controller.</text:p>
      <text:p text:style-name="Normal"><text:span text:style-name="T131">Reference: </text:span><text:a xlink:href="https://www.cisco.com/c/en/us/td/docs/wireless/controller/7-4/configuration/guides/consolidated/b_cg74_CONSOLIDATED/b_cg74_CONSOLIDATED_chapter_010100001.html" office:target-frame-name="_blank" xlink:show="new"><text:span text:style-name="T132">https://www.cisco.com/c/en/us/td/docs/wireless/controller/7-4/configuration/guides/consolidated/b_cg74_CONSOLIDATED/b_cg74_CONSOLIDATED_chapter_010100001.html</text:span></text:a></text:p>
      <text:p text:style-name="Normal"><text:span text:style-name="T133">Question 13.</text:span><text:span text:style-name="T134">11</text:span></text:p>
      <text:p text:style-name="P135">Which Cisco proprietary protocol ensures traffic recovers immediately, transparently, and automatically when edge devices or access circuits fail?</text:p>
      <text:p text:style-name="P136">A. SLB<text:line-break/>B. FHRP<text:line-break/>C. VRRP<text:line-break/>D. HSRP</text:p>
      <text:soft-page-break/>
      <text:p text:style-name="P137"> </text:p>
      <text:p text:style-name="Normal"><text:span text:style-name="T138">Answer:</text:span><text:span text:style-name="T139"> D</text:span></text:p>
      <text:p text:style-name="Normal"><text:span text:style-name="T140">Question 13.</text:span><text:span text:style-name="T141">12</text:span></text:p>
      <text:p text:style-name="P142">Drag and drop the characteristic from the left onto the IPv6 address type on the right.</text:p>
      <text:p text:style-name="Normal"><text:span text:style-name="T143"><draw:frame draw:style-name="a5" draw:name="Picture 59" text:anchor-type="as-char" svg:x="0in" svg:y="0in" svg:width="6.5in" svg:height="2.72708in" style:rel-width="scale" style:rel-height="scale"><draw:image xlink:href="media/image6.jpeg" xlink:type="simple" xlink:show="embed" xlink:actuate="onLoad"/><svg:title/><svg:desc/></draw:frame></text:span></text:p>
      <text:p text:style-name="P144"> </text:p>
      <text:p text:style-name="Normal"><text:span text:style-name="T145">Answer:</text:span></text:p>
      <text:p text:style-name="Normal"><text:span text:style-name="T146">Global Unicast Address</text:span><text:span text:style-name="T147"><text:line-break/>+ is publicly routable in the same way as IPv4 addresses</text:span><text:span text:style-name="T148"><text:line-break/>+ provides for one-to-one communication</text:span></text:p>
      <text:p text:style-name="Normal"><text:span text:style-name="T149">Link-Local Address</text:span><text:span text:style-name="T150"><text:line-break/>+ serves as the next-hop addresses</text:span><text:span text:style-name="T151"><text:line-break/>+ required on all IPv6 devices</text:span></text:p>
      <text:p text:style-name="Normal"><text:span text:style-name="T152">Explanation</text:span></text:p>
      <text:p text:style-name="Normal"><text:span text:style-name="T153">To be an IPv6-enabled device, a device must have an IPv6 </text:span><text:span text:style-name="T154">link-local</text:span><text:span text:style-name="T155"> address. The device doesn’t have to have an IPv6 global unicast address, but it must have a link-local address.</text:span></text:p>
      <text:p text:style-name="Normal"><text:span text:style-name="T156">Reference: </text:span><text:a xlink:href="https://www.ciscopress.com/articles/article.asp?p=2803866&amp;seqNum=4" office:target-frame-name="_blank" xlink:show="new"><text:span text:style-name="T157">https://www.ciscopress.com/articles/article.asp?p=2803866&amp;seqNum=4</text:span></text:a></text:p>
      <text:soft-page-break/>
      <text:p text:style-name="Normal"><text:span text:style-name="T158">Question 13.</text:span><text:span text:style-name="T159">13</text:span></text:p>
      <text:p text:style-name="P160">What is an enhancement implemented in WPA3?</text:p>
      <text:p text:style-name="P161">A. employs PKI and RADIUS to identify access points<text:line-break/>B. applies 802.1x authentication and AES-128 encryption<text:line-break/>C. uses TKIP and per-packet keying<text:line-break/>D. defends against deauthentication and disassociation attacks</text:p>
      <text:p text:style-name="P162"> </text:p>
      <text:p text:style-name="Normal"><text:span text:style-name="T163">Answer:</text:span><text:span text:style-name="T164"> D</text:span></text:p>
      <text:p text:style-name="Normal"><text:span text:style-name="T165">Explanation</text:span></text:p>
      <text:p text:style-name="Normal"><text:span text:style-name="T166">WPA3 security overcomes this limitation and does not allows TKIP and WEP. Additionally, WPA3 personal and enterprise connections requires PMF (Protected Management Frame) negotiation mandatorily. PMF provides an additional layer of protection from </text:span><text:span text:style-name="T167">de-authentication and disassociation attacks</text:span><text:span text:style-name="T168">.</text:span></text:p>
      <text:p text:style-name="Normal"><text:span text:style-name="T169">Reference: </text:span><text:a xlink:href="https://blogs.cisco.com/networking/wpa3-bringing-robust-security-for-wi-fi-networks" office:target-frame-name="_blank" xlink:show="new"><text:span text:style-name="T170">https://blogs.cisco.com/networking/wpa3-bringing-robust-security-for-wi-fi-networks</text:span></text:a></text:p>
      <text:p text:style-name="Normal"><text:span text:style-name="T171">Question 13.</text:span><text:span text:style-name="T172">14</text:span></text:p>
      <text:p text:style-name="P173">What is a link-local all-nodes IPv6 multicast address?</text:p>
      <text:p text:style-name="P174">A. ff02:0:0:0:0:0:0:1<text:line-break/>B. 2004:31c:73d9:683e:255::<text:line-break/>C. fffe:034:0dd:45d6:789e::<text:line-break/>D. fe80:4433:034:0dd::2</text:p>
      <text:p text:style-name="Normal"><text:span text:style-name="T175">Answer:</text:span><text:span text:style-name="T176"> A</text:span></text:p>
      <text:p text:style-name="Normal"><text:span text:style-name="T177">Explanation</text:span></text:p>
      <text:p text:style-name="P178">FF02::1 – the link-local scope address to reach all nodes.</text:p>
      <text:p text:style-name="Normal"><text:span text:style-name="T179">Question 13.</text:span><text:span text:style-name="T180">15</text:span></text:p>
      <text:p text:style-name="P181">Refer to the exhibit.</text:p>
      <text:p text:style-name="consolas">GigabitEthernet1 it up, line protocol is up</text:p>
      <text:soft-page-break/>
      <text:p text:style-name="consolas">Hardware it CSR vNIC, address it 5000.0004.0000 (bia 5000.0004.0000)<text:s/></text:p>
      <text:p text:style-name="consolas">Internet address is 192.168.1.1/24<text:s/></text:p>
      <text:p text:style-name="consolas">MTU 1500 bytes, BW 1000000 Kbit/sec, DLY 10 usec,<text:s/></text:p>
      <text:p text:style-name="consolas"><text:s text:c="2"/>reliability 255/255, txload 1/255, rxload 1/255<text:s/></text:p>
      <text:p text:style-name="consolas">Encapsulation ARPA, loopback not set<text:s/></text:p>
      <text:p text:style-name="consolas">Keepalive set (10 sec)</text:p>
      <text:p text:style-name="consolas">Full Duplex, 1000MBps, link type is auto, media type it RJ45</text:p>
      <text:p text:style-name="P182">Which format matches the Modified EUI-64 IPv6 interface address for the network 2001:db8::/64?</text:p>
      <text:p text:style-name="P183">A. 2001:db8::5000:0004:5678:0090/64<text:line-break/>B. 2001:db8:4425:5400:77ff:fe07:/64<text:line-break/>C. 2001:db8::5000:00ff:fe04:0000/64<text:line-break/>D. 2001:db8::5200:00ff:fe04:0000/64</text:p>
      <text:p text:style-name="P184"> </text:p>
      <text:p text:style-name="Normal"><text:span text:style-name="T185">Answer:</text:span><text:span text:style-name="T186"> D</text:span></text:p>
      <text:p text:style-name="Normal"><text:span text:style-name="T187">Explanation</text:span></text:p>
      <text:p text:style-name="Normal"><text:span text:style-name="T188">Converting 48-Bit MAC Addresses to IPv6 Modified EUI-64 Identifiers</text:span><text:span text:style-name="T189"><text:line-break/>Of course, most devices still use the older 48-bit MAC address format. These can be converted to EUI-64 and then to modified EUI-64 form for creating an IPv6 interface ID. The process is as follows:</text:span><text:span text:style-name="T190"><text:line-break/>1. We take the 24-bit OUI portion, the left-most 24 bits of the Ethernet address, and put them into the left-most 24 bits of the interface ID. We take the 24-bit local portion (the right-most 24 bits of the Ethernet address) and put it into the right-most 24 bits of the interface ID.</text:span><text:span text:style-name="T191"><text:line-break/>2. In the remaining 16 bits in the middle of the interface ID we put the value “11111111 11111110” (“FFFE” in hexadecimal).</text:span><text:span text:style-name="T192"><text:line-break/>3. The address is now in EUI-64 form. </text:span><text:span text:style-name="T193">We change the “universal/local” bit (bit 7 from the left) from a zero to a one</text:span><text:span text:style-name="T194">. This gives us the modified EUI-64 interface ID.</text:span></text:p>
      <text:p text:style-name="Normal"><text:span text:style-name="T195">Reference: </text:span><text:a xlink:href="http://www.tcpipguide.com/free/t_IPv6InterfaceIdentifiersandPhysicalAddressMapping-2.htm" office:target-frame-name="_blank" xlink:show="new"><text:span text:style-name="T196">http://www.tcpipguide.com/free/t_IPv6InterfaceIdentifiersandPhysicalAddressMapping-2.htm</text:span></text:a></text:p>
      <text:soft-page-break/>
      <text:p text:style-name="Normal"><text:span text:style-name="T197">Note: By flipping the 7th bit from the left from 0 to 1, we will have “52” instead of “50” (50 = 010100</text:span><text:span text:style-name="T198">0</text:span><text:span text:style-name="T199">0)</text:span></text:p>
      <text:p text:style-name="Normal"><text:span text:style-name="T200">Question 13.</text:span><text:span text:style-name="T201">16</text:span></text:p>
      <text:p text:style-name="P202">What are two disadvantages of a full-mesh topology? (Choose two)</text:p>
      <text:p text:style-name="P203">A. It needs a high MTU between sites.<text:line-break/>B. It has a high implementation cost.<text:line-break/>C. It must have point-to-point communication.<text:line-break/>D. It requires complex configuration.<text:line-break/>E. It works only with BGP between sites.</text:p>
      <text:p text:style-name="P204"> </text:p>
      <text:p text:style-name="Normal"><text:span text:style-name="T205">Answer:</text:span><text:span text:style-name="T206"> B D</text:span></text:p>
      <text:p text:style-name="Normal"><text:span text:style-name="T207">Explanation</text:span></text:p>
      <text:p text:style-name="P208">We don’t need to set high MTU between sites -&gt; Answer A is not correct.</text:p>
      <text:p text:style-name="P209">We can use any connection types (broadcast, point-to-point…) between two devices -&gt; Answer C is not correct.</text:p>
      <text:p text:style-name="P210">We can use full-mesh topology with all routing protocols, not only BGP -&gt; Answer E is not correct.</text:p>
      <text:p text:style-name="Normal"><text:span text:style-name="T211">Question 13.</text:span><text:span text:style-name="T212">17</text:span></text:p>
      <text:p text:style-name="P213">Drag and drop the characteristic from the left onto the IPv6 address type on the right.</text:p>
      <text:soft-page-break/>
      <text:p text:style-name="Normal"><text:span text:style-name="T214"><draw:frame draw:style-name="a6" draw:name="Picture 58" text:anchor-type="as-char" svg:x="0in" svg:y="0in" svg:width="6.5in" svg:height="2.72708in" style:rel-width="scale" style:rel-height="scale"><draw:image xlink:href="media/image7.jpeg" xlink:type="simple" xlink:show="embed" xlink:actuate="onLoad"/><svg:title/><svg:desc/></draw:frame></text:span></text:p>
      <text:p text:style-name="P215"> </text:p>
      <text:p text:style-name="Normal"><text:span text:style-name="T216">Answer:</text:span></text:p>
      <text:p text:style-name="Normal"><text:span text:style-name="T217">Global Unicast Address</text:span><text:span text:style-name="T218"><text:line-break/>+ provides for one-to-one communication</text:span><text:span text:style-name="T219"><text:line-break/>+ is routable and reachable via the Internet</text:span></text:p>
      <text:p text:style-name="Normal"><text:span text:style-name="T220">Link-Local Address</text:span><text:span text:style-name="T221"><text:line-break/>+ confined to a single link</text:span><text:span text:style-name="T222"><text:line-break/>+ serves as the next-hop addresses</text:span></text:p>
      <text:p text:style-name="Normal"><text:span text:style-name="T223">Question 13.</text:span><text:span text:style-name="T224">18</text:span></text:p>
      <text:p text:style-name="P225">How does MAC learning function on a switch?</text:p>
      <text:p text:style-name="P226">A. broadcasts frames to all ports without queueing<text:line-break/>B. adds unknown source MAC addresses to the address table<text:line-break/>C. sends a retransmission request when a new frame is received<text:line-break/>D. sends frames with unknown destinations to a multicast group</text:p>
      <text:p text:style-name="P227"> </text:p>
      <text:p text:style-name="Normal"><text:span text:style-name="T228">Answer:</text:span><text:span text:style-name="T229"> B</text:span></text:p>
      <text:p text:style-name="Normal"><text:span text:style-name="T230">Explanation</text:span></text:p>
      <text:p text:style-name="P231">If the source MAC address does not exist, the switch adds the source MAC address to the MAC address table along with the incoming port number.</text:p>
      <text:soft-page-break/>
      <text:p text:style-name="Normal"><text:span text:style-name="T232">Question 13.</text:span><text:span text:style-name="T233">19</text:span></text:p>
      <text:p text:style-name="P234">What is the purpose of classifying network traffic in QoS?</text:p>
      <text:p text:style-name="P235">A. services traffic according to its class<text:line-break/>B. identifies the type of traffic that will receive a particular treatment<text:line-break/>C. writes the class identifier of a packet to a dedicated field in the packet header<text:line-break/>D. configures traffic-matching rules on network devices</text:p>
      <text:p text:style-name="P236"> </text:p>
      <text:p text:style-name="Normal"><text:span text:style-name="T237">Answer:</text:span><text:span text:style-name="T238"> B</text:span></text:p>
      <text:p text:style-name="Normal"><text:span text:style-name="T239">Explanation</text:span></text:p>
      <text:p text:style-name="Normal"><text:span text:style-name="T240">The goal of network traffic classification is to group traffic based on user-defined criteria so that the resulting</text:span><text:span text:style-name="T241"><text:line-break/>groups of network traffic can then be subjected to </text:span><text:span text:style-name="T242">specific QoS treatments</text:span><text:span text:style-name="T243">.</text:span></text:p>
      <text:p text:style-name="Normal"><text:span text:style-name="T244">Reference: </text:span><text:a xlink:href="https://www.cisco.com/c/en/us/td/docs/ios-xml/ios/qos_classn/configuration/15-mt/qos-classn-15-mt-book/qos-classn-ntwk-trfc.pdf" office:target-frame-name="_blank" xlink:show="new"><text:span text:style-name="T245">https://www.cisco.com/c/en/us/td/docs/ios-xml/ios/qos_classn/configuration/15-mt/qos-classn-15-mt-book/qos-classn-ntwk-trfc.pdf</text:span></text:a></text:p>
      <text:p text:style-name="Normal"><text:span text:style-name="T246">Question 13.</text:span><text:span text:style-name="T247">20</text:span></text:p>
      <text:p text:style-name="P248">What is a benefit of using private IPv4 addressing?</text:p>
      <text:p text:style-name="P249">A. Multiple companies can use the same addresses without conflicts.<text:line-break/>B. Direct connectivity is provided to internal hosts from outside an enterprise network.<text:line-break/>C. Communication to the internet is reachable without the use of NAT.<text:line-break/>D. All external hosts are provided with secure communication to the Internet.</text:p>
      <text:p text:style-name="P250"> </text:p>
      <text:p text:style-name="Normal"><text:span text:style-name="T251">Answer:</text:span><text:span text:style-name="T252"> A</text:span></text:p>
      <text:p text:style-name="Normal"><text:span text:style-name="T253">Question 13.</text:span><text:span text:style-name="T254">21</text:span></text:p>
      <text:p text:style-name="P255">What is the advantage of separating the control plane from the data plane within an SDN network?</text:p>
      <text:soft-page-break/>
      <text:p text:style-name="P256">A. decreases overall network complexity<text:line-break/>B. limits data queries to the control plane<text:line-break/>C. reduces cost<text:line-break/>D. offloads the creation of virtual machines to the data plane</text:p>
      <text:p text:style-name="P257"> </text:p>
      <text:p text:style-name="Normal"><text:span text:style-name="T258">Answer:</text:span><text:span text:style-name="T259"> A</text:span></text:p>
      <text:p text:style-name="Normal"><text:span text:style-name="T260">Explanation</text:span></text:p>
      <text:p text:style-name="P261">Software Defined Networking (SDN) has redefined the way data center networks are deployed and function. The ability to separate the control plane and data plane has lead to simpler design and easy management.</text:p>
      <text:p text:style-name="Normal"><text:span text:style-name="T262">Reference: </text:span><text:a xlink:href="https://ieeexplore.ieee.org/document/8644332" office:target-frame-name="_blank" xlink:show="new"><text:span text:style-name="T263">https://ieeexplore.ieee.org/document/8644332</text:span></text:a></text:p>
      <text:p text:style-name="Normal"><text:span text:style-name="T264">Question 13.</text:span><text:span text:style-name="T265">22</text:span></text:p>
      <text:p text:style-name="P266">Drag and drop the use cases for device-management technologies from the left onto the corresponding.</text:p>
      <text:p text:style-name="Normal"><text:span text:style-name="T267"><draw:frame draw:style-name="a7" draw:name="Picture 57" text:anchor-type="as-char" svg:x="0in" svg:y="0in" svg:width="5.77083in" svg:height="3.34722in" style:rel-width="scale" style:rel-height="scale"><draw:image xlink:href="media/image8.jpeg" xlink:type="simple" xlink:show="embed" xlink:actuate="onLoad"/><svg:title/><svg:desc/></draw:frame></text:span></text:p>
      <text:p text:style-name="P268"> </text:p>
      <text:p text:style-name="Normal"><text:span text:style-name="T269">Answer:</text:span></text:p>
      <text:soft-page-break/>
      <text:p text:style-name="Normal"><text:span text:style-name="T270">Cisco DNA Center</text:span><text:span text:style-name="T271"><text:line-break/>+ overlay and underlay configuration</text:span><text:span text:style-name="T272"><text:line-break/>+ routed access deployment</text:span><text:span text:style-name="T273"><text:line-break/>+ VXLAN and LISP configuration</text:span></text:p>
      <text:p text:style-name="Normal"><text:span text:style-name="T274">Traditional</text:span><text:span text:style-name="T275"><text:line-break/>+ STP deployment</text:span><text:span text:style-name="T276"><text:line-break/>+ VLAN and HSRP configuration</text:span><text:span text:style-name="T277"><text:line-break/>+ configuration via console</text:span></text:p>
      <text:p text:style-name="Normal"><text:span text:style-name="T278">Question 13.</text:span><text:span text:style-name="T279">23</text:span></text:p>
      <text:p text:style-name="P280">Why is a first-hop redundancy protocol implemented?</text:p>
      <text:p text:style-name="P281">A. to protect against default gateway failures<text:line-break/>B. to prevent loops in a network<text:line-break/>C. to enable multiple switches to operate as a single unit<text:line-break/>D. to provide load-sharing for a multilink segment</text:p>
      <text:p text:style-name="P282"> </text:p>
      <text:p text:style-name="Normal"><text:span text:style-name="T283">Answer:</text:span><text:span text:style-name="T284"> A</text:span></text:p>
      <text:p text:style-name="Normal"><text:span text:style-name="T285">Question 13.</text:span><text:span text:style-name="T286">24</text:span></text:p>
      <text:p text:style-name="P287">Which WPA mode uses PSK authentication?</text:p>
      <text:p text:style-name="P288">A. Local<text:line-break/>B. Client<text:line-break/>C. Enterprise<text:line-break/>D. Personal</text:p>
      <text:p text:style-name="P289"> </text:p>
      <text:p text:style-name="Normal"><text:span text:style-name="T290">Answer:</text:span><text:span text:style-name="T291"> D</text:span></text:p>
      <text:p text:style-name="Normal"><text:span text:style-name="T292">Explanation</text:span></text:p>
      <text:p text:style-name="Normal"><text:span text:style-name="T293">Both versions of Wi-Fi Protected Access (WPA/WPA2) can be implemented in either of two modes:</text:span><text:span text:style-name="T294"><text:line-break/>+ </text:span><text:span text:style-name="T295">Personal or Pre-Shared Key (PSK) Mode</text:span><text:span text:style-name="T296">: This mode is appropriate for most home networks—but not business networks. You define an encryption passphrase<text:s/></text:span><text:soft-page-break/><text:span text:style-name="T297">on the wireless router and any other access points (APs). Then the passphrase must be entered by users when connecting to the Wi-Fi network.</text:span></text:p>
      <text:p text:style-name="P298">Though this mode seems very easy to implement, it actually makes properly securing a business network nearly impossible. Unlike with the Enterprise mode, wireless access can’t be individually or centrally managed. One passphrase applies to all users. If the global passphrase should need to be changed, it must be manually changed on all the APs and computers. This would be a big headache when you need to change it; for instance, when an employee leaves the company or when any computers are stolen or compromised. Unlike with the Enterprise mode, the encryption passphrase is stored on the computers. Therefore, anyone on the computer—whether it be employees or thieves—can connect to the network and also recover the encryption passphrase.</text:p>
      <text:p text:style-name="Normal"><text:span text:style-name="T299">Reference: </text:span><text:a xlink:href="https://www.ciscopress.com/articles/article.asp?p=1576225" office:target-frame-name="_blank" xlink:show="new"><text:span text:style-name="T300">https://www.ciscopress.com/articles/article.asp?p=1576225</text:span></text:a></text:p>
      <text:p text:style-name="Normal"><text:span text:style-name="T301">Question 13.</text:span><text:span text:style-name="T302">25</text:span></text:p>
      <text:p text:style-name="P303">Drag and drop the AAA features from the left onto the corresponding AAA security services on the right. Not all options are used.</text:p>
      <text:p text:style-name="Normal"><text:span text:style-name="T304"><draw:frame draw:style-name="a8" draw:name="Picture 56" text:anchor-type="as-char" svg:x="0in" svg:y="0in" svg:width="6.5in" svg:height="3.15278in" style:rel-width="scale" style:rel-height="scale"><draw:image xlink:href="media/image9.jpeg" xlink:type="simple" xlink:show="embed" xlink:actuate="onLoad"/><svg:title/><svg:desc/></draw:frame></text:span></text:p>
      <text:p text:style-name="P305"> </text:p>
      <text:p text:style-name="Normal"><text:span text:style-name="T306">Answer:</text:span></text:p>
      <text:soft-page-break/>
      <text:p text:style-name="Normal"><text:span text:style-name="T307">Accounting</text:span><text:span text:style-name="T308"><text:line-break/>+ It records the amount of time for which a user accesses the network on a remote server</text:span><text:span text:style-name="T309"><text:line-break/>+ It uses TACACS+ to log the configuration commands entered by a network administrator</text:span></text:p>
      <text:p text:style-name="Normal"><text:span text:style-name="T310">Authorization</text:span><text:span text:style-name="T311"><text:line-break/>+ It enables the device to allow user- or group-based access</text:span><text:span text:style-name="T312"><text:line-break/>+ It restricts the CLI commands that a user is able to perform</text:span></text:p>
      <text:p text:style-name="Normal"><text:span text:style-name="T313">Explanation</text:span></text:p>
      <text:p text:style-name="P314">To use RADIUS server to allow a reverse Telnet session we have to use such command “aaa authentication login reverse-access group radius”. Therefore the option “It leverages a RADIUS server to grant user access to a reverse Telnet session” should belong to Authentication, not Authorization.</text:p>
      <text:p text:style-name="Normal"><text:span text:style-name="T315">Note: </text:span><text:span text:style-name="T316">Reverse telnet</text:span><text:span text:style-name="T317"> allows you to telnet to a device then from that device connect to the console of another device.</text:span></text:p>
      <text:p text:style-name="Normal"><text:span text:style-name="T318">Question 13.</text:span><text:span text:style-name="T319">26</text:span></text:p>
      <text:p text:style-name="P320">What is a function of the core and distribution layers in a collapsed-core architecture?</text:p>
      <text:p text:style-name="P321">A. The router must use IPv4 and IPv6 addresses at Layer 3.<text:line-break/>B. The core and distribution layers are deployed on two different devices to enable failover.<text:line-break/>C. The router can support HSRP for Layer 2 redundancy in an IPv6 network.<text:line-break/>D. The router operates on a single device or a redundant pair.</text:p>
      <text:p text:style-name="P322"> </text:p>
      <text:p text:style-name="Normal"><text:span text:style-name="T323">Answer:</text:span><text:span text:style-name="T324"> D</text:span></text:p>
      <text:p text:style-name="Normal"><text:span text:style-name="T325">Explanation</text:span></text:p>
      <text:p text:style-name="P326">A “collapsed core” is when the distribution layer and core layer functions are implemented by a single device.</text:p>
      <text:soft-page-break/>
      <text:p text:style-name="Normal"><text:span text:style-name="T327">Reference: </text:span><text:a xlink:href="https://www.ciscopress.com/articles/article.asp?p=2202410&amp;seqNum=4" office:target-frame-name="_blank" xlink:show="new"><text:span text:style-name="T328">https://www.ciscopress.com/articles/article.asp?p=2202410&amp;seqNum=4</text:span></text:a></text:p>
      <text:p text:style-name="P329">But in reality, we often use redundant pair to increase reliability.</text:p>
      <text:p text:style-name="Normal"><text:span text:style-name="T330">Question 13.</text:span><text:span text:style-name="T331">27</text:span></text:p>
      <text:p text:style-name="P332">Drag and drop the IPv6 addresses from the left onto the corresponding address types on the right.</text:p>
      <text:p text:style-name="Normal"><text:span text:style-name="T333"><draw:frame draw:style-name="a9" draw:name="Picture 55" text:anchor-type="as-char" svg:x="0in" svg:y="0in" svg:width="5.5625in" svg:height="3.11111in" style:rel-width="scale" style:rel-height="scale"><draw:image xlink:href="media/image10.jpeg" xlink:type="simple" xlink:show="embed" xlink:actuate="onLoad"/><svg:title/><svg:desc/></draw:frame></text:span></text:p>
      <text:p text:style-name="P334"> </text:p>
      <text:p text:style-name="Normal"><text:span text:style-name="T335">Answer:</text:span></text:p>
      <text:p text:style-name="P336">Global unicast: 3ffe:e54d:620:a87a::f00d<text:line-break/>Link-Local unicast: fe80::a00:23ff:feeb:89aa<text:line-break/>Multicast: ff05::1:3<text:line-break/>Unique Local: fd6d:c83b:5cef:b6b2::1</text:p>
      <text:p text:style-name="Normal"><text:span text:style-name="T337">Question 13.</text:span><text:span text:style-name="T338">28</text:span></text:p>
      <text:p text:style-name="P339">Refer to the exhibit.</text:p>
      <text:soft-page-break/>
      <text:p text:style-name="Normal"><text:span text:style-name="T340"><draw:frame draw:style-name="a10" draw:name="Picture 54" text:anchor-type="as-char" svg:x="0in" svg:y="0in" svg:width="2.75694in" svg:height="1.49306in" style:rel-width="scale" style:rel-height="scale"><draw:image xlink:href="media/image11.jpeg" xlink:type="simple" xlink:show="embed" xlink:actuate="onLoad"/><svg:title/><svg:desc/></draw:frame></text:span></text:p>
      <text:p text:style-name="P341">Which switch becomes the root bridge?</text:p>
      <text:p text:style-name="P342">A. SW 1<text:line-break/>Bridge Priority – 32768<text:line-break/>mac-address 0f:d7:9e:13:ab:82</text:p>
      <text:p text:style-name="P343">B. SW 4<text:line-break/>Bridge Priority – 40960<text:line-break/>mac-address 05:d8:33:09:8f:89</text:p>
      <text:p text:style-name="P344">C. SW3<text:line-break/>Bridge Priority – 32768<text:line-break/>mac-address 01:1c:6c:66:b7:70</text:p>
      <text:p text:style-name="P345">D. SW2<text:line-break/>Bridge Priority – 40960<text:line-break/>mac-address 04:44:97:51:63:17</text:p>
      <text:p text:style-name="P346"> </text:p>
      <text:p text:style-name="Normal"><text:span text:style-name="T347">Answer:</text:span><text:span text:style-name="T348"> C</text:span></text:p>
      <text:p text:style-name="Normal"><text:span text:style-name="T349">Explanation</text:span></text:p>
      <text:p text:style-name="P350">The switch with lowest bridge priority will be chosen the root bridge. If many switches have the same bridge priority then the lowest MAC address would be chosen.</text:p>
      <text:p text:style-name="Normal"><text:span text:style-name="T351">Question 13.</text:span><text:span text:style-name="T352">29</text:span></text:p>
      <text:p text:style-name="P353">Refer to the exhibit.</text:p>
      <text:soft-page-break/>
      <text:p text:style-name="Normal"><text:span text:style-name="T354"><draw:frame draw:style-name="a11" draw:name="Picture 53" text:anchor-type="as-char" svg:x="0in" svg:y="0in" svg:width="6.29167in" svg:height="3.04167in" style:rel-width="scale" style:rel-height="scale"><draw:image xlink:href="media/image12.jpeg" xlink:type="simple" xlink:show="embed" xlink:actuate="onLoad"/><svg:title/><svg:desc/></draw:frame></text:span></text:p>
      <text:p text:style-name="P355">A newly configured PC fails to connect to the internet using TCP port 80 to www.cisco.com. Which setting must be modified for the connection to work?</text:p>
      <text:p text:style-name="P356">A. Subnet Mask<text:line-break/>B. DNS Servers<text:line-break/>C. Default Gateway<text:line-break/>D. DHCP Server</text:p>
      <text:p text:style-name="P357"> </text:p>
      <text:p text:style-name="Normal"><text:span text:style-name="T358">Answer:</text:span><text:span text:style-name="T359"> C</text:span></text:p>
      <text:p text:style-name="Normal"><text:span text:style-name="T360">Explanation</text:span></text:p>
      <text:p text:style-name="P361">We see the Subnet Mask of the PC is 255.255.255.248 so it belongs to 10.2.2.0/29 (ranges from 10.2.2.0 to 10.2.2.7). But its default gateway is 10.2.2.10 and it is outside of the PC subnet. This question says only newly configured PC fails to connect to internet so maybe its default gateway was configured wrongly. The IP address of the Default Gateway configured on this new PC must be in 10.2.2.0/29 subnet.</text:p>
      <text:p text:style-name="Normal"><text:span text:style-name="T362">Question 13.</text:span><text:span text:style-name="T363">30</text:span></text:p>
      <text:p text:style-name="P364">Refer to the exhibit.</text:p>
      <text:p text:style-name="Normal"><text:span text:style-name="T365"><draw:frame draw:style-name="a12" draw:name="Picture 52" text:anchor-type="as-char" svg:x="0in" svg:y="0in" svg:width="4.22917in" svg:height="0.47917in" style:rel-width="scale" style:rel-height="scale"><draw:image xlink:href="media/image13.jpeg" xlink:type="simple" xlink:show="embed" xlink:actuate="onLoad"/><svg:title/><svg:desc/></draw:frame></text:span></text:p>
      <text:soft-page-break/>
      <text:p text:style-name="Normal"><text:span text:style-name="T366">All interfaces are configured with </text:span><text:span text:style-name="T367">duplex auto</text:span><text:span text:style-name="T368"> and </text:span><text:span text:style-name="T369">ip ospf network broadcast</text:span><text:span text:style-name="T370">. Which configuration allows routers R14 and R86 to form an OSPFv2 adjacency and act as a central point for exchanging OSPF information between routers?</text:span></text:p>
      <table:table table:style-name="Table371">
        <table:table-columns>
          <table:table-column table:style-name="TableColumn372"/>
          <table:table-column table:style-name="TableColumn373"/>
        </table:table-columns>
        <table:table-row table:style-name="TableRow374">
          <table:table-cell table:style-name="TableCell375">
            <text:p text:style-name="Normal"><text:span text:style-name="T376">Option A</text:span></text:p>
            <text:p text:style-name="P377">R14#<text:line-break/>interface FastEthernet0/0<text:line-break/>ip address 10.73.65.65 255.255.255.252<text:line-break/>ip ospf priority 0<text:line-break/>ip mtu 1500</text:p>
            <text:p text:style-name="P378">router ospf 10<text:line-break/>router-id 10.10.1.14<text:line-break/>network 10.10.1.14 0.0.0.0 area 0<text:line-break/>network 10.73.65.64 0.0.0.3 area 0</text:p>
            <text:p text:style-name="P379">R86#<text:line-break/>interface FastEthernet0/0<text:line-break/>ip address 10.73.65.66 255.255.255.252<text:line-break/>ip mtu 1500</text:p>
            <text:p text:style-name="P380">router ospf 10<text:line-break/>router-id 10.10.1.86<text:line-break/>network 10.10.1.86 0.0.0.0 area 0<text:line-break/>network 10.73.65.64 0.0.0.3 area 0</text:p>
          </table:table-cell>
          <table:table-cell table:style-name="TableCell381">
            <text:p text:style-name="Normal"><text:span text:style-name="T382">Option B</text:span></text:p>
            <text:p text:style-name="P383">R14#<text:line-break/>interface Loopback0<text:line-break/>ip ospf 10 area 0</text:p>
            <text:p text:style-name="P384">interface FastEthernet0/0<text:line-break/>ip address 10.73.65.65 255.255.255.252<text:line-break/>ip ospf priority 255<text:line-break/>ip ospf 10 area 0<text:line-break/>ip mtu 1500</text:p>
            <text:p text:style-name="P385">router ospf 10<text:line-break/>router-id 10.10.1.14</text:p>
            <text:p text:style-name="P386">R86#<text:line-break/>interface Loopback0<text:line-break/>ip ospf 10 area 0</text:p>
            <text:p text:style-name="P387">interface FastEthernet0/0<text:line-break/>ip address 10.73.65.66 255.255.255.252<text:line-break/>ip ospf 10 area 0<text:line-break/>ip mtu 1500</text:p>
            <text:p text:style-name="P388">router ospf 10<text:line-break/>router-id 10.10.1.86</text:p>
          </table:table-cell>
        </table:table-row>
        <table:table-row table:style-name="TableRow389">
          <table:table-cell table:style-name="TableCell390">
            <text:p text:style-name="Normal"><text:span text:style-name="T391">Option C</text:span></text:p>
            <text:p text:style-name="P392">R14#<text:line-break/>interface FastEthernet0/0<text:line-break/>ip address 10.73.65.65 255.255.255.252<text:line-break/><text:soft-page-break/>ip ospf priority 255<text:line-break/>ip mtu 1500</text:p>
            <text:p text:style-name="P393">router ospf 10<text:line-break/>router-id 10.10.1.14<text:line-break/>network 10.10.1.14 0.0.0.0 area 0<text:line-break/>network 10.73.65.64 0.0.0.3 area 0</text:p>
            <text:p text:style-name="P394">R86#<text:line-break/>interface FastEthernet0/0<text:line-break/>ip address 10.73.65.66 255.255.255.252<text:line-break/>ip mtu 1400</text:p>
            <text:p text:style-name="P395">router ospf 10<text:line-break/>router-id 10.10.1.86<text:line-break/>network 10.10.1.86 0.0.0.0 area 0<text:line-break/>network 10.73.65.64 0.0.0.3 area 0</text:p>
          </table:table-cell>
          <table:table-cell table:style-name="TableCell396">
            <text:p text:style-name="Normal"><text:span text:style-name="T397">Option D</text:span></text:p>
            <text:p text:style-name="P398">R14#<text:line-break/>interface Loopback0<text:line-break/>ip ospf 10 area 0</text:p>
            <text:soft-page-break/>
            <text:p text:style-name="P399">interface FastEthernet0/0<text:line-break/>ip address 10.73.65.65 255.255.255.252<text:line-break/>ip ospf 10 area 0<text:line-break/>ip mtu 1500</text:p>
            <text:p text:style-name="P400">router ospf 10<text:line-break/>router-id 10.10.1.14<text:line-break/>network 10.10.1.14 0.0.0.0 area 0<text:line-break/>network 10.73.65.64 0.0.0.3 area 0</text:p>
            <text:p text:style-name="P401">R86#<text:line-break/>interface FastEthernet0/0<text:line-break/>ip address 10.73.65.66 255.255.255.252<text:line-break/>ip mtu 1400</text:p>
            <text:p text:style-name="P402">router ospf 10<text:line-break/>router-id 10.10.1.86<text:line-break/>network 10.10.1.86 0.0.0.0 area 0<text:line-break/>network 10.73.65.64 0.0.0.3 area 0</text:p>
          </table:table-cell>
        </table:table-row>
      </table:table>
      <text:soft-page-break/>
      <text:p text:style-name="P403">A. Option A<text:line-break/>B. Option B<text:line-break/>C. Option C<text:line-break/>D. Option D</text:p>
      <text:p text:style-name="P404"> </text:p>
      <text:p text:style-name="Normal"><text:span text:style-name="T405">Answer:</text:span><text:span text:style-name="T406"> B</text:span></text:p>
      <text:p text:style-name="Normal"><text:span text:style-name="T407">Explanation</text:span></text:p>
      <text:p text:style-name="P408">In Option C and Option D, the MTUs of two Fa0/0 interfaces are mismatched so they cannot form OSPF adjacency -&gt; Option C and Option D are not correct.</text:p>
      <text:p text:style-name="P409">In Option B, R14 Fa0/0 interface is configured with OSPF priority 255 so surely it would become DR -&gt; This is the best answer.</text:p>
      <text:p text:style-name="Normal"><text:span text:style-name="T410">Question 13.</text:span><text:span text:style-name="T411">31</text:span></text:p>
      <text:soft-page-break/>
      <text:p text:style-name="P412">Drag and drop the characteristic from the left onto the cable type on the right.</text:p>
      <text:p text:style-name="Normal"><text:span text:style-name="T413"><draw:frame draw:style-name="a13" draw:name="Picture 51" text:anchor-type="as-char" svg:x="0in" svg:y="0in" svg:width="5.5625in" svg:height="2.51389in" style:rel-width="scale" style:rel-height="scale"><draw:image xlink:href="media/image14.jpeg" xlink:type="simple" xlink:show="embed" xlink:actuate="onLoad"/><svg:title/><svg:desc/></draw:frame></text:span></text:p>
      <text:p text:style-name="P414"> </text:p>
      <text:p text:style-name="Normal"><text:span text:style-name="T415">Answer:</text:span></text:p>
      <text:p text:style-name="Normal"><text:span text:style-name="T416">multimode fiber:</text:span><text:span text:style-name="T417"><text:line-break/>+ uses multiple wavelengths of light</text:span><text:span text:style-name="T418"><text:line-break/>+ has increased attenuation over long distances</text:span></text:p>
      <text:p text:style-name="Normal"><text:span text:style-name="T419">single-mode fiber:</text:span><text:span text:style-name="T420"><text:line-break/>+ has a core diameter of 9 microns</text:span><text:span text:style-name="T421"><text:line-break/>+ uses a single wavelength of light</text:span></text:p>
      <text:p text:style-name="Normal"><text:span text:style-name="T422">Explanation</text:span></text:p>
      <text:p text:style-name="Normal"><text:span text:style-name="T423">Single-mode fiber</text:span><text:span text:style-name="T424"> allows only one mode of light to propagate. Because of this, the number of light reflections created as the light passes through the core decreases, lowering attenuation and creating the ability for the signal to travel further. This application is typically used in long distance, higher bandwidth.</text:span></text:p>
      <text:p text:style-name="Normal"><text:span text:style-name="T425">Because of the high dispersion and attenuation rate with </text:span><text:span text:style-name="T426">multimode fiber cable</text:span><text:span text:style-name="T427">, the quality of the signal is reduced over long distances.</text:span></text:p>
      <text:p text:style-name="Normal"><text:span text:style-name="T428">Reference: </text:span><text:a xlink:href="https://www.multicominc.com/training/technical-resources/single-mode-vs-multi-mode-fiber-optic-cable/" office:target-frame-name="_blank" xlink:show="new"><text:span text:style-name="T429">https://www.multicominc.com/training/technical-resources/single-mode-vs-multi-mode-fiber-optic-cable/</text:span></text:a></text:p>
      <text:p text:style-name="Normal"><text:span text:style-name="T430">Question 13.</text:span><text:span text:style-name="T431">32</text:span></text:p>
      <text:soft-page-break/>
      <text:p text:style-name="P432">An engineer must configure a core router with a floating static default route to the backup router at 10.200.0.2. Which command meets the requirements?</text:p>
      <text:p text:style-name="P433">A. ip route 0.0.0.0 0.0.0.0 10.200.0.2 floating<text:line-break/>B. ip route 0.0.0.0 0.0.0.0 10.200.0.2<text:line-break/>C. ip route 0.0.0.0 0.0.0.0 10.200.0.2 10<text:line-break/>D. ip route 0.0.0.0 0.0.0.0 10.200.0.2 1</text:p>
      <text:p text:style-name="P434"> </text:p>
      <text:p text:style-name="Normal"><text:span text:style-name="T435">Answer:</text:span><text:span text:style-name="T436"> C</text:span></text:p>
      <text:p text:style-name="Normal"><text:span text:style-name="T437">Question 13.</text:span><text:span text:style-name="T438">33</text:span></text:p>
      <text:p text:style-name="P439">Which interface is used to send traffic to the destination network?</text:p>
      <table:table table:style-name="Table440">
        <table:table-columns>
          <table:table-column table:style-name="TableColumn441"/>
        </table:table-columns>
        <table:table-row table:style-name="TableRow442">
          <table:table-cell table:style-name="TableCell443">
            <text:p text:style-name="P444">D 10.87.161.30/27 [90/10331] via G0/17<text:line-break/>D 10.87.161.30/27 [90/44594] via G0/8<text:line-break/>O 10.87.161.30/27 [110/7820] via G0/24<text:line-break/>O 10.87 161.30/27 [110/7879] via G0/1</text:p>
          </table:table-cell>
        </table:table-row>
      </table:table>
      <text:p text:style-name="P445">A. G0/1<text:line-break/>B. G0/8<text:line-break/>C. G0/24<text:line-break/>D. G0/17</text:p>
      <text:p text:style-name="P446"> </text:p>
      <text:p text:style-name="Normal"><text:span text:style-name="T447">Answer:</text:span><text:span text:style-name="T448"> D</text:span></text:p>
      <text:p text:style-name="Normal"><text:span text:style-name="T449">Explanation</text:span></text:p>
      <text:p text:style-name="P450">The first entry has lowest AD so it will be installed into the routing table and it has the lowest metric so it is the best route.</text:p>
      <text:p text:style-name="Normal"><text:span text:style-name="T451">Question 13.</text:span><text:span text:style-name="T452">34</text:span></text:p>
      <text:p text:style-name="P453">Refer to the exhibit.</text:p>
      <text:p text:style-name="consolas">R1# show ip route</text:p>
      <text:soft-page-break/>
      <text:p text:style-name="consolas">Codes: C - connected, S — static, I — IGRP, R — RIP, M — mobile, B - BGP<text:s/></text:p>
      <text:p text:style-name="consolas">D - EIGRP, EX - EIGRP external, O - OSPF, XA - OSPF inter area<text:s/></text:p>
      <text:p text:style-name="consolas">N1 - OSPF NSSA external type 1, N2 - OSPF NSSA external type 2<text:s/></text:p>
      <text:p text:style-name="consolas">E1 - OSPF external type 1, E2 - OSPF external type 2, E — EGP<text:s/></text:p>
      <text:p text:style-name="consolas">i - IS-IS, LI - IS-IS level-1, L2 — IS-IS level-2, * — candidate default<text:s/></text:p>
      <text:p text:style-name="consolas">U - per-user static route, o - ODR<text:s/></text:p>
      <text:p text:style-name="consolas">Gateway of last resort is not set</text:p>
      <text:p text:style-name="consolas">C <text:s text:c="2"/>172.16.0.0/16 is directly connected, Loopback0</text:p>
      <text:p text:style-name="consolas"><text:s text:c="4"/>172.16.0.0/16 is variably subnetted, 4 subnets, 2 masks<text:s/></text:p>
      <text:p text:style-name="P454">O <text:s text:c="5"/>172.16.1.3/32 [110/100] via 10.0.1.100, 00:39:08, Serial0</text:p>
      <text:p text:style-name="P455">O <text:s text:c="5"/>172.16.1.9/32 [110/5] via 172.16.1.50, 00:43:01, Gigabit Ethernet 0/0</text:p>
      <text:p text:style-name="consolas">D <text:s text:c="5"/>172.16.1.4/30 [90/7445] via 172.16.9.5, 00:39:08, Gigabit Ethernet 0/0</text:p>
      <text:p text:style-name="consolas"><text:s text:c="21"/>[90/7445] via 172.16.4.4, 00:39:08, Gigabit Ethernet 0/4</text:p>
      <text:p text:style-name="P456">How does router R1 handle traffic to the 172.16.1.4/30 subnet?</text:p>
      <text:p text:style-name="P457">A. It sends all traffic over the path via 172.16.4.4<text:line-break/>B. It sends all traffic over the path via 10.0.1 100<text:line-break/>C. It sends all traffic over the path via 172.16.9.5 using 172.16.4.4 as a backup<text:line-break/>D. It load-balances traffic over 172.16.9.5 and 172.16.4.4</text:p>
      <text:p text:style-name="P458"> </text:p>
      <text:p text:style-name="Normal"><text:span text:style-name="T459">Answer:</text:span><text:span text:style-name="T460"> D</text:span></text:p>
      <text:p text:style-name="Normal"><text:span text:style-name="T461">Question 13.</text:span><text:span text:style-name="T462">35</text:span></text:p>
      <text:p text:style-name="P463">Drag and drop the characteristic from the left onto the IPv6 address type on the right.</text:p>
      <text:soft-page-break/>
      <text:p text:style-name="Normal"><text:span text:style-name="T464"><draw:frame draw:style-name="a14" draw:name="Picture 50" text:anchor-type="as-char" svg:x="0in" svg:y="0in" svg:width="6.5in" svg:height="2.30972in" style:rel-width="scale" style:rel-height="scale"><draw:image xlink:href="media/image15.jpeg" xlink:type="simple" xlink:show="embed" xlink:actuate="onLoad"/><svg:title/><svg:desc/></draw:frame></text:span></text:p>
      <text:p text:style-name="P465"> </text:p>
      <text:p text:style-name="Normal"><text:span text:style-name="T466">Answer:</text:span></text:p>
      <text:p text:style-name="Normal"><text:span text:style-name="T467">Anycast</text:span><text:span text:style-name="T468"><text:line-break/>+ is assigned to multiple devices on the same network simultaneously</text:span><text:span text:style-name="T469"><text:line-break/>+ is routed to the nearest interface that has the address</text:span></text:p>
      <text:p text:style-name="Normal"><text:span text:style-name="T470">Multicast</text:span><text:span text:style-name="T471"><text:line-break/>+ cannot be used as a source address</text:span><text:span text:style-name="T472"><text:line-break/>+ provides one-to-many communications</text:span></text:p>
      <text:p text:style-name="Normal"><text:span text:style-name="T473">Explanation</text:span></text:p>
      <text:p text:style-name="Normal"><text:span text:style-name="T474">An anycast address is an address that is assigned to a set of interfaces that typically belong to different nodes. A packet sent to an anycast address is delivered to the </text:span><text:span text:style-name="T475">closest interface</text:span><text:span text:style-name="T476"> (as defined by the routing protocols in use) identified by the anycast address.</text:span></text:p>
      <text:p text:style-name="P477">For the option “cannot be used as a source address”, it is correct for both Anycast and Multicast so we have to assign it to Multicast as other options are only suitable for Anycast.</text:p>
      <text:p text:style-name="Normal"><text:span text:style-name="T478">Reference: </text:span><text:a xlink:href="https://www.cisco.com/c/en/us/td/docs/ios-xml/ios/ipv6_basic/configuration/xe-3se/5700/ip6-anycast-add-xe.html" office:target-frame-name="_blank" xlink:show="new"><text:span text:style-name="T479">https://www.cisco.com/c/en/us/td/docs/ios-xml/ios/ipv6_basic/configuration/xe-3se/5700/ip6-anycast-add-xe.html</text:span></text:a></text:p>
      <text:p text:style-name="Normal"><text:span text:style-name="T480">Question 13.</text:span><text:span text:style-name="T481">36</text:span></text:p>
      <text:p text:style-name="P482">What is a characteristic of an SSID in wireless networks?</text:p>
      <text:soft-page-break/>
      <text:p text:style-name="P483">A. uses policies to prevent unauthorized users<text:line-break/>B. identifies an access point on a WLAN<text:line-break/>C. prompts a user for a login ID<text:line-break/>D. associates a name to a WLAN</text:p>
      <text:p text:style-name="P484"> </text:p>
      <text:p text:style-name="Normal"><text:span text:style-name="T485">Answer:</text:span><text:span text:style-name="T486"> D</text:span></text:p>
      <text:p text:style-name="Normal"><text:span text:style-name="T487">Question 13.</text:span><text:span text:style-name="T488">37</text:span></text:p>
      <text:p text:style-name="P489">What is represented by the word “port” within this JSON schema?</text:p>
      <text:p text:style-name="consolas">1 <text:s text:c="2"/>[</text:p>
      <text:p text:style-name="consolas">2 <text:s text:c="2"/>{"IDS": "IPS_pittsburgh", "port":"te8/30"},</text:p>
      <text:p text:style-name="consolas">3 <text:s text:c="2"/>{"router": "R20", "port":"ge9/23"},</text:p>
      <text:p text:style-name="consolas">4 <text:s text:c="2"/>{"firewall": "FW42", "port":"fe3/24"},</text:p>
      <text:p text:style-name="consolas">5 <text:s text:c="2"/>]</text:p>
      <text:p text:style-name="P490">A. value<text:line-break/>B. array<text:line-break/>C. key<text:line-break/>D. object</text:p>
      <text:p text:style-name="P491"> </text:p>
      <text:p text:style-name="Normal"><text:span text:style-name="T492">Answer:</text:span><text:span text:style-name="T493"> C</text:span></text:p>
      <text:p text:style-name="Normal"><text:span text:style-name="T494">Question 13.</text:span><text:span text:style-name="T495">38</text:span></text:p>
      <text:p text:style-name="P496">Drag and drop the IPv6 address from the left onto the type on the right.</text:p>
      <text:p text:style-name="Normal"><text:span text:style-name="T497"><draw:frame draw:style-name="a15" draw:name="Picture 49" text:anchor-type="as-char" svg:x="0in" svg:y="0in" svg:width="5.69444in" svg:height="1.95833in" style:rel-width="scale" style:rel-height="scale"><draw:image xlink:href="media/image16.jpeg" xlink:type="simple" xlink:show="embed" xlink:actuate="onLoad"/><svg:title/><svg:desc/></draw:frame></text:span></text:p>
      <text:soft-page-break/>
      <text:p text:style-name="P498"> </text:p>
      <text:p text:style-name="Normal"><text:span text:style-name="T499">Answer:</text:span></text:p>
      <text:p text:style-name="P500">+ Global Unicast: 2000:1092 :a1e8:827d:527c:3ce7:9816:1<text:line-break/>+ Link-Local Unicast: fe80:cc72:4b9e:445c:8179:0420:5988:7<text:line-break/>+ Multicast: ff00:ec6c:dbb1:3e8b:6d46:bd27:a236:12<text:line-break/>+ Unique Local: fc00:9860:653f:5146:8cb2:a27c:cb6f:3</text:p>
      <text:p text:style-name="Normal"><text:span text:style-name="T501">Question 13.</text:span><text:span text:style-name="T502">39</text:span></text:p>
      <text:p text:style-name="P503">Drag and drop the characteristic from the left onto the cable type on the right.</text:p>
      <text:p text:style-name="Normal"><text:span text:style-name="T504"><draw:frame draw:style-name="a16" draw:name="Picture 48" text:anchor-type="as-char" svg:x="0in" svg:y="0in" svg:width="5.5625in" svg:height="2.49306in" style:rel-width="scale" style:rel-height="scale"><draw:image xlink:href="media/image17.jpeg" xlink:type="simple" xlink:show="embed" xlink:actuate="onLoad"/><svg:title/><svg:desc/></draw:frame></text:span></text:p>
      <text:p text:style-name="P505"> </text:p>
      <text:p text:style-name="Normal"><text:span text:style-name="T506">Answer:</text:span></text:p>
      <text:p text:style-name="Normal"><text:span text:style-name="T507">copper</text:span><text:span text:style-name="T508">:</text:span><text:span text:style-name="T509"><text:line-break/>+ contains a conductor, bedding, and sheathing</text:span><text:span text:style-name="T510"><text:line-break/>+ is typically used in small office applications</text:span></text:p>
      <text:p text:style-name="Normal"><text:span text:style-name="T511">single mode fiber</text:span><text:span text:style-name="T512">:</text:span><text:span text:style-name="T513"><text:line-break/>+ is ideal over longer distances with little loss of integrity</text:span><text:span text:style-name="T514"><text:line-break/>+ uses a single wavelength of light</text:span></text:p>
      <text:p text:style-name="Normal"><text:span text:style-name="T515">Question 13.</text:span><text:span text:style-name="T516">40</text:span></text:p>
      <text:p text:style-name="P517">What is represented by the word “ge3/36” within this JSON schema?</text:p>
      <text:p text:style-name="consolas">1 [</text:p>
      <text:soft-page-break/>
      <text:p text:style-name="consolas">2 {"VPN concentrator": "VPN36", "interface":"ge3/36"},</text:p>
      <text:p text:style-name="consolas">3 {"load balancer": "LB33", "interface":"te7/10"},</text:p>
      <text:p text:style-name="consolas">4 {"switch": "SW31", "interface":"fe2/25"},</text:p>
      <text:p text:style-name="consolas">5 ]</text:p>
      <text:p text:style-name="P518">A. value<text:line-break/>B. array<text:line-break/>C. key<text:line-break/>D. object</text:p>
      <text:p text:style-name="P519"> </text:p>
      <text:p text:style-name="Normal"><text:span text:style-name="T520">Answer:</text:span><text:span text:style-name="T521"> A</text:span></text:p>
      <text:p text:style-name="Normal"><text:span text:style-name="T522">Explanation</text:span></text:p>
      <text:p text:style-name="Normal"><text:span text:style-name="T523">JSON syntax structure:</text:span></text:p>
      <text:p text:style-name="P524">+ A key/value pair consists of a key (must be a string in double quotation marks ""), followed by a colon :, followed by a value. For example: “name”:”John”</text:p>
      <text:p text:style-name="P525">Therefore in this question, “interface” is the key while “ge3/36” is the value.</text:p>
      <text:p text:style-name="Normal"><text:span text:style-name="T526">Question 13.</text:span><text:span text:style-name="T527">41</text:span></text:p>
      <text:p text:style-name="P528">Drag and drop the characteristic from the left onto the IPv6 address type on the right.</text:p>
      <text:p text:style-name="Normal"><text:span text:style-name="T529"><draw:frame draw:style-name="a17" draw:name="Picture 47" text:anchor-type="as-char" svg:x="0in" svg:y="0in" svg:width="5.5625in" svg:height="2.49306in" style:rel-width="scale" style:rel-height="scale"><draw:image xlink:href="media/image18.jpeg" xlink:type="simple" xlink:show="embed" xlink:actuate="onLoad"/><svg:title/><svg:desc/></draw:frame></text:span></text:p>
      <text:p text:style-name="P530"> </text:p>
      <text:soft-page-break/>
      <text:p text:style-name="Normal"><text:span text:style-name="T531">Answer:</text:span></text:p>
      <text:p text:style-name="Normal"><text:span text:style-name="T532">Unique Local</text:span><text:span text:style-name="T533"><text:line-break/>+ is unable to route on the internet</text:span><text:span text:style-name="T534"><text:line-break/>+ allows sites to be combined without address conflicts</text:span></text:p>
      <text:p text:style-name="Normal"><text:span text:style-name="T535">Multicast</text:span><text:span text:style-name="T536"><text:line-break/>+ has a unicast source sent to a group</text:span><text:span text:style-name="T537"><text:line-break/>+ sends packets to a group address rather than a single address</text:span></text:p>
      <text:p text:style-name="Normal"><text:span text:style-name="T538">Question 13.</text:span><text:span text:style-name="T539">42</text:span></text:p>
      <text:p text:style-name="P540">What is a characteristic of encryption in wireless networks?</text:p>
      <text:p text:style-name="P541">A. uses policies to prevent unauthorized users<text:line-break/>B. prevents the interception of data as it transits a network<text:line-break/>C. provides increased protection against spyware<text:line-break/>D. converts electrical current to radio waves</text:p>
      <text:p text:style-name="P542"> </text:p>
      <text:p text:style-name="Normal"><text:span text:style-name="T543">Answer:</text:span><text:span text:style-name="T544"> B</text:span></text:p>
      <text:p text:style-name="Normal"><text:span text:style-name="T545">Explanation</text:span></text:p>
      <text:p text:style-name="P546">Data encryption protects the vulnerable wireless link between client devices and access points by encrypting all data in the transmission.</text:p>
      <text:p text:style-name="Normal"><text:span text:style-name="T547">Reference: </text:span><text:a xlink:href="https://www.cityu.edu.hk/csc/netcomp/dec2009-2.htm" office:target-frame-name="_blank" xlink:show="new"><text:span text:style-name="T548">https://www.cityu.edu.hk/csc/netcomp/dec2009-2.htm</text:span></text:a></text:p>
      <text:p text:style-name="Normal"><text:span text:style-name="T549">Question 13.</text:span><text:span text:style-name="T550">43</text:span></text:p>
      <text:p text:style-name="P551">What is a characteristic of private IPv4 addressing?</text:p>
      <text:p text:style-name="P552">A. complies with PCI regulations<text:line-break/>B. is used on internal hosts that stream data solely to external resources<text:line-break/>C. provides an added level of protection against internet threats<text:line-break/>D. enables secure connectivity over the internet</text:p>
      <text:p text:style-name="P553"> </text:p>
      <text:p text:style-name="Normal"><text:span text:style-name="T554">Answer:</text:span><text:span text:style-name="T555"> C</text:span></text:p>
      <text:p text:style-name="Normal"><text:span text:style-name="T556">Explanation</text:span></text:p>
      <text:soft-page-break/>
      <text:p text:style-name="P557">By using private IPv4 addressing, an Internet threats cannot reach the internal hosts directly, thus it provides an additional level of protection against Internet threats.</text:p>
      <text:p text:style-name="Normal"><text:span text:style-name="T558">Question 13.</text:span><text:span text:style-name="T559">44</text:span></text:p>
      <text:p text:style-name="P560">Which interface is used to send traffic to the destination network?</text:p>
      <table:table table:style-name="Table561">
        <table:table-columns>
          <table:table-column table:style-name="TableColumn562"/>
        </table:table-columns>
        <table:table-row table:style-name="TableRow563">
          <table:table-cell table:style-name="TableCell564">
            <text:p text:style-name="P565">D 10.214.247.237/28 [90/2170] via G0/12<text:line-break/>D 10.214.247.237/28 [90/46985] via G0/19<text:line-break/>O 10.214.247.237/28 [110/665] via G0/9<text:line-break/>O 10.214.247.237/28 [110/3399] via G0/1</text:p>
          </table:table-cell>
        </table:table-row>
      </table:table>
      <text:p text:style-name="P566">A. G0/12<text:line-break/>B. G0/1<text:line-break/>C. G0/9<text:line-break/>D. G0/19</text:p>
      <text:p text:style-name="P567"> </text:p>
      <text:p text:style-name="Normal"><text:span text:style-name="T568">Answer:</text:span><text:span text:style-name="T569"> A</text:span></text:p>
      <text:p text:style-name="Normal"><text:span text:style-name="T570">Explanation</text:span></text:p>
      <text:p text:style-name="P571">The first entry has lowest AD (90) so it will be installed into the routing table and it has the lowest metric (2170) so it is the best route.</text:p>
      <text:p text:style-name="Normal"><text:span text:style-name="T572">Question 13.</text:span><text:span text:style-name="T573">45</text:span></text:p>
      <text:p text:style-name="P574">Which interface is used to send traffic to the destination network?</text:p>
      <table:table table:style-name="Table575">
        <table:table-columns>
          <table:table-column table:style-name="TableColumn576"/>
        </table:table-columns>
        <table:table-row table:style-name="TableRow577">
          <table:table-cell table:style-name="TableCell578">
            <text:p text:style-name="P579">O 10.139.120.253/29 [110/9443] via G0/20<text:line-break/>O 10.139.120.253/29 [110/29560] via G0/16<text:line-break/>R 10.139.120.253/29 [120/12] via G0/11<text:line-break/>R 10.139120 253/29 [120/6] via G0/9</text:p>
          </table:table-cell>
        </table:table-row>
      </table:table>
      <text:p text:style-name="P580">A. G0/11<text:line-break/>B. G0/20<text:line-break/>C. G0/9<text:line-break/>D. G0/16</text:p>
      <text:p text:style-name="P581"> </text:p>
      <text:p text:style-name="Normal"><text:span text:style-name="T582">Answer:</text:span><text:span text:style-name="T583"> B</text:span></text:p>
      <text:soft-page-break/>
      <text:p text:style-name="Normal"><text:span text:style-name="T584">Explanation</text:span></text:p>
      <text:p text:style-name="P585">The first entry has lowest AD (110) and lowest metric (9443) so  it is the best route and will be installed into the routing table.</text:p>
      <text:p text:style-name="Normal"><text:span text:style-name="T586">Question 13.</text:span><text:span text:style-name="T587">46</text:span></text:p>
      <text:p text:style-name="P588">Drag and drop the characteristic from the left onto the cable type on the right.</text:p>
      <text:p text:style-name="Normal"><text:span text:style-name="T589"><draw:frame draw:style-name="a18" draw:name="Picture 46" text:anchor-type="as-char" svg:x="0in" svg:y="0in" svg:width="5.5625in" svg:height="2.51389in" style:rel-width="scale" style:rel-height="scale"><draw:image xlink:href="media/image19.jpeg" xlink:type="simple" xlink:show="embed" xlink:actuate="onLoad"/><svg:title/><svg:desc/></draw:frame></text:span></text:p>
      <text:p text:style-name="Normal"><text:span text:style-name="T590">Answer:</text:span></text:p>
      <text:p text:style-name="P591">multimode fiber:<text:line-break/>+ becomes distorted at longer lengths<text:line-break/>+ is typically used for internal datacenter connectivity</text:p>
      <text:p text:style-name="P592">single mode fiber:<text:line-break/>+ has minimal light reflection as it travels down the core<text:line-break/>+ uses a single wavelength of light </text:p>
      <text:p text:style-name="Normal"><text:span text:style-name="T593">Question 13.</text:span><text:span text:style-name="T594">47</text:span></text:p>
      <text:p text:style-name="P595">What is a characteristic of an SSID in wireless networks?</text:p>
      <text:p text:style-name="P596">A. broadcasts a beacon signal to announce its presence by default<text:line-break/>B. uses policies to prevent unauthorized users<text:line-break/>C. converts electrical current to radio waves<text:line-break/>D. prompts a user for a login ID</text:p>
      <text:p text:style-name="P597"> </text:p>
      <text:soft-page-break/>
      <text:p text:style-name="Normal"><text:span text:style-name="T598">Answer:</text:span><text:span text:style-name="T599"> A</text:span></text:p>
      <text:p text:style-name="Normal"><text:span text:style-name="T600">Question 13.</text:span><text:span text:style-name="T601">48</text:span></text:p>
      <text:p text:style-name="P602">Refer to the exhibit.</text:p>
      <text:p text:style-name="Normal"><text:span text:style-name="T603"><draw:frame draw:style-name="a19" draw:name="Picture 45" text:anchor-type="as-char" svg:x="0in" svg:y="0in" svg:width="6.5in" svg:height="3.15347in" style:rel-width="scale" style:rel-height="scale"><draw:image xlink:href="media/image20.jpeg" xlink:type="simple" xlink:show="embed" xlink:actuate="onLoad"/><svg:title/><svg:desc/></draw:frame></text:span></text:p>
      <text:p text:style-name="P604">The P2P Blocking Action option is disabled on the WLC. The security team has a new requirement for each client to retain their assigned IP addressing as the clients move between locations in the campus network. Which action completes this configuration?</text:p>
      <text:p text:style-name="P605">A. Set the P2P Blocking Action option to Forward-UpStream.<text:line-break/>B. Enable the Static IP Tunneling option.<text:line-break/>C. Check the DHCP Addr. Assignment check box.<text:line-break/>D. Disable the Coverage Hole Detection option.</text:p>
      <text:p text:style-name="P606"> </text:p>
      <text:p text:style-name="Normal"><text:span text:style-name="T607">Answer:</text:span><text:span text:style-name="T608"> B</text:span></text:p>
      <text:p text:style-name="Normal"><text:span text:style-name="T609">Explanation</text:span></text:p>
      <text:p text:style-name="Normal"><text:span text:style-name="T610">Dynamic Anchoring for Clients with Static IP</text:span></text:p>
      <text:p text:style-name="P611">At times you may want to configure static IP addresses for wireless clients. When these wireless clients move about in a network, they could try associating with other controllers. If the clients try to associate with a controller that does not<text:s/><text:soft-page-break/>support the same subnet as the static IP, the clients fail to connect to the network. You can now enable dynamic tunneling of clients with static IP addresses.<text:line-break/>Dynamic anchoring of static IP clients with static IP addresses can be associated with other controllers where the client’s subnet is supported by tunneling the traffic to another controller in the same mobility group. This feature enables you to configure your WLAN so that the network is serviced even though the clients use static IP addresses.</text:p>
      <text:p text:style-name="Normal"><text:span text:style-name="T612">Reference: </text:span><text:a xlink:href="https://www.cisco.com/c/en/us/td/docs/wireless/controller/7-4/configuration/guides/consolidated/b_cg74_CONSOLIDATED/b_cg74_CONSOLIDATED_chapter_010011000.html" office:target-frame-name="_blank" xlink:show="new"><text:span text:style-name="T613">https://www.cisco.com/c/en/us/td/docs/wireless/controller/7-4/configuration/guides/consolidated/b_cg74_CONSOLIDATED/b_cg74_CONSOLIDATED_chapter_010011000.html</text:span></text:a></text:p>
      <text:p text:style-name="Normal"><text:span text:style-name="T614">Question 13.</text:span><text:span text:style-name="T615">49</text:span></text:p>
      <text:p text:style-name="P616">Drag and drop the characteristics of transport layer protocols from the left onto the corresponding protocols on the right.</text:p>
      <text:p text:style-name="Normal"><text:span text:style-name="T617"><draw:frame draw:style-name="a20" draw:name="Picture 44" text:anchor-type="as-char" svg:x="0in" svg:y="0in" svg:width="5.54167in" svg:height="3.35417in" style:rel-width="scale" style:rel-height="scale"><draw:image xlink:href="media/image21.jpeg" xlink:type="simple" xlink:show="embed" xlink:actuate="onLoad"/><svg:title/><svg:desc/></draw:frame></text:span></text:p>
      <text:p text:style-name="P618"> </text:p>
      <text:p text:style-name="Normal"><text:span text:style-name="T619">Answer:</text:span></text:p>
      <text:p text:style-name="Normal"><text:span text:style-name="T620">TCP</text:span><text:span text:style-name="T621"><text:line-break/>+ guarantees packet delivery</text:span><text:span text:style-name="T622"><text:line-break/></text:span><text:soft-page-break/><text:span text:style-name="T623">+ uses a 32-bit sequence number</text:span><text:span text:style-name="T624"><text:line-break/>+ provides support for retransmission of lost packets</text:span></text:p>
      <text:p text:style-name="Normal"><text:span text:style-name="T625">UDP</text:span><text:span text:style-name="T626"><text:line-break/>+ ideal for voice traffic</text:span><text:span text:style-name="T627"><text:line-break/>+ offers minimal overhead within a packet</text:span><text:span text:style-name="T628"><text:line-break/>+ requires less computer resources</text:span></text:p>
      <text:p text:style-name="Normal"><text:span text:style-name="T629">Question 13.</text:span><text:span text:style-name="T630">50</text:span></text:p>
      <text:p text:style-name="P631">What is a reason why a company would choose to use network automation in an enterprise?</text:p>
      <text:p text:style-name="P632">A. Provide data services faster.<text:line-break/>B. Enable network segmentation.<text:line-break/>C. Mitigate spanning-tree loop avoidance.<text:line-break/>D. Implement granular QoS.</text:p>
      <text:p text:style-name="P633"> </text:p>
      <text:p text:style-name="Normal"><text:span text:style-name="T634">Answer:</text:span><text:span text:style-name="T635"> A</text:span></text:p>
      <text:p text:style-name="Normal"><text:span text:style-name="T636">Question 13.</text:span><text:span text:style-name="T637">51</text:span></text:p>
      <text:p text:style-name="P638">Refer to the exhibit.</text:p>
      <text:p text:style-name="consolas">router# show ip route</text:p>
      <text:p text:style-name="consolas">...</text:p>
      <text:p text:style-name="consolas">D <text:s text:c="6"/>172.16.32.0/26 [90/25789217] via 10.0.0.1</text:p>
      <text:p text:style-name="consolas">R <text:s text:c="6"/>172.16.32.0/24 [120/4] via 10.0.0.2</text:p>
      <text:p text:style-name="consolas">O <text:s text:c="6"/>172.16.32.0/19 [110/229840] via 10.0.0.3</text:p>
      <text:p text:style-name="consolas">C <text:s text:c="6"/>172.16.32.32/32 is directly connected, Loopback0</text:p>
      <text:p text:style-name="consolas">C <text:s text:c="6"/>172.16.32.4/30 is directly connected, GigabitEthernet0/0</text:p>
      <text:p text:style-name="P639">A packet sourced from 172.16.32.254 is destined for 172.16.32.8. What is the subnet mask of the preferred destination route?</text:p>
      <text:p text:style-name="P640">A. 255.255.224.0<text:line-break/>B. 255.255.255.0<text:line-break/><text:soft-page-break/>C. 255.255.255.192<text:line-break/>D. 255.255.255.252</text:p>
      <text:p text:style-name="P641"> </text:p>
      <text:p text:style-name="Normal"><text:span text:style-name="T642">Answer:</text:span><text:span text:style-name="T643"> C</text:span></text:p>
      <text:p text:style-name="Normal"><text:span text:style-name="T644">Explanation</text:span></text:p>
      <text:p text:style-name="P645">The destination of 172.16.32.8 does not belong to 172.16.32.4/30 (which ranges from 172.16.32.4 to 172.16.32.7) or 172.16.32.32 so the best subnet is 172.16.32.0/26.</text:p>
      <text:p text:style-name="Normal"><text:span text:style-name="T646">Question 13.</text:span><text:span text:style-name="T647">52</text:span></text:p>
      <text:p text:style-name="P648">Which WLC interface provides out-of-band management in the Cisco Unified Wireless Network Architecture?</text:p>
      <text:p text:style-name="P649">A. dynamic<text:line-break/>B. AP-Manager<text:line-break/>C. virtual<text:line-break/>D. service port</text:p>
      <text:p text:style-name="P650"> </text:p>
      <text:p text:style-name="Normal"><text:span text:style-name="T651">Answer:</text:span><text:span text:style-name="T652"> D</text:span></text:p>
      <text:p text:style-name="Normal"><text:span text:style-name="T653">Explanation</text:span></text:p>
      <text:p text:style-name="Normal"><text:span text:style-name="T654">The </text:span><text:span text:style-name="T655">service-port</text:span><text:span text:style-name="T656"> interface is used for out-of-band management of the controller.</text:span></text:p>
      <text:p text:style-name="Normal"><text:span text:style-name="T657">Question 13.</text:span><text:span text:style-name="T658">53</text:span></text:p>
      <text:p text:style-name="P659">Refer to the exhibit.</text:p>
      <text:soft-page-break/>
      <text:p text:style-name="Normal"><text:span text:style-name="T660"><draw:frame draw:style-name="a21" draw:name="Picture 43" text:anchor-type="as-char" svg:x="0in" svg:y="0in" svg:width="5.45139in" svg:height="4.36806in" style:rel-width="scale" style:rel-height="scale"><draw:image xlink:href="media/image22.jpeg" xlink:type="simple" xlink:show="embed" xlink:actuate="onLoad"/><svg:title/><svg:desc/></draw:frame></text:span></text:p>
      <text:p text:style-name="P661">The IPv6 address for the LAN segment on router R1 must be configured using the EUI-64 format. When configured which ipv6 address is produced by the router?</text:p>
      <text:p text:style-name="P662">A. 2001:db8:1006:1968:4564:877F:FE99:1<text:line-break/>B. 2001:db8:1006:1968:1119:BEFF:FE67:1<text:line-break/>C. 2001:db8:1006:1968:1130:ABFF:FECC:1<text:line-break/>D. 2001:db8:1006:1968:12D8:BAFE:FF01:1</text:p>
      <text:p text:style-name="P663"> </text:p>
      <text:p text:style-name="Normal"><text:span text:style-name="T664">Answer:</text:span><text:span text:style-name="T665"> B</text:span></text:p>
      <text:p text:style-name="Normal"><text:span text:style-name="T666">Explanation</text:span></text:p>
      <text:p text:style-name="P667">The EUI-64 format must have “FF:FE” in the middle of the MAC address of E0/1 interface of R1 -&gt; Only answer B and answer C are correct.</text:p>
      <text:p text:style-name="P668">Only answer B has correct IPv6 of the MAC address of E0/1 interface of R1 (end with “67:1”) -&gt; This is the correct answer.</text:p>
      <text:p text:style-name="Normal"><text:span text:style-name="T669">Question 13.</text:span><text:span text:style-name="T670">54</text:span></text:p>
      <text:soft-page-break/>
      <text:p text:style-name="P671">Which IPsec encryption mode is appropriate when the destination of a packet differs from the security termination point?</text:p>
      <text:p text:style-name="P672">A. tunnel<text:line-break/>B. main<text:line-break/>C. aggressive<text:line-break/>D. transport</text:p>
      <text:p text:style-name="P673"> </text:p>
      <text:p text:style-name="Normal"><text:span text:style-name="T674">Answer:</text:span><text:span text:style-name="T675"> A</text:span></text:p>
      <text:p text:style-name="Normal"><text:span text:style-name="T676">Explanation</text:span></text:p>
      <text:p text:style-name="Normal"><text:span text:style-name="T677">Encryption Technologies</text:span></text:p>
      <text:p text:style-name="P678">There are two encryption modes available for IPsec. Both modes have their own uses and should be used with caution depending upon the solution.</text:p>
      <text:p text:style-name="Normal"><text:span text:style-name="T679">Tunnel Mode</text:span><text:span text:style-name="T680"><text:line-break/>This encrypts both the payload and the header. IPsec in </text:span><text:span text:style-name="T681">tunnel mode is used when the destination of the packet is different than the security termination point</text:span><text:span text:style-name="T682">. The most common use of this mode is between gateways or from end station to gateway. The gateway serves as a proxy for the hosts. So when the origin of the packets differs from the device that is providing security, tunnel mode is used.</text:span></text:p>
      <text:p text:style-name="Normal"><text:span text:style-name="T683">Reference: </text:span><text:a xlink:href="https://www.rapid7.com/blog/post/2017/02/13/basics-of-ipsec/" office:target-frame-name="_blank" xlink:show="new"><text:span text:style-name="T684">https://www.rapid7.com/blog/post/2017/02/13/basics-of-ipsec/</text:span></text:a></text:p>
      <text:p text:style-name="Normal"><text:span text:style-name="T685">Question 13.</text:span><text:span text:style-name="T686">55</text:span></text:p>
      <text:p text:style-name="P687">Why is UDP more suitable than TCP for applications that require low latency, such as VoIP?</text:p>
      <text:p text:style-name="P688">A. UDP reliably guarantees delivery of all packets, and TCP drops packets under heavy load.<text:line-break/>B. TCP uses congestion control for efficient packet delivery, and UDP uses flow control mechanisms for the delivery of packets.<text:line-break/>C. UDP uses sequencing data for packets to arrive in order, and TCP offers the capability to receive packets in random order.<text:line-break/>D. TCP sends an acknowledgment for every packet that is received, and UDP operates without acknowledgments.</text:p>
      <text:soft-page-break/>
      <text:p text:style-name="P689"> </text:p>
      <text:p text:style-name="Normal"><text:span text:style-name="T690">Answer:</text:span><text:span text:style-name="T691"> D</text:span></text:p>
      <text:p text:style-name="Normal"><text:span text:style-name="T692">Explanation</text:span></text:p>
      <text:p text:style-name="P693">Both flow control and congestion control are traffic controlling methods in TCP. And only TCP uses sequencing data for packets to arrive in order.</text:p>
      <text:p text:style-name="Normal"><text:span text:style-name="T694">Question 13.</text:span><text:span text:style-name="T695">56</text:span></text:p>
      <text:p text:style-name="P696">Refer to the exhibit.</text:p>
      <text:p text:style-name="consolas">Router# show interface FastEthernet0/0</text:p>
      <text:p text:style-name="consolas">FastEthernet0/0 is up, line protocol is up</text:p>
      <text:p text:style-name="consolas"><text:s text:c="2"/>Hardware is Gt96k FE, address is 0017.59b2.7fb2 (bia 0017.59b2.7fb2) Internet address is 10.0.0.2/30<text:s/></text:p>
      <text:p text:style-name="consolas"><text:s text:c="2"/>MTU 1500 bytes, BW 100000 Kbit/sec, DLY 100 usec,<text:s/></text:p>
      <text:p text:style-name="consolas"><text:s text:c="4"/>reliability 255/255, txload 1/255, rxload 1/255<text:s/></text:p>
      <text:p text:style-name="consolas"><text:s text:c="2"/>Encapsulation ARPA, loopback not set<text:s/></text:p>
      <text:p text:style-name="consolas"><text:s text:c="2"/>Keepalive set (10 sec)</text:p>
      <text:p text:style-name="consolas"><text:s text:c="2"/>Half-duplex, 100Mb/s, 100BaseTX/FX<text:s/></text:p>
      <text:p text:style-name="consolas"><text:s text:c="2"/>ARP type: ARPA, ARP Timeout 04:00:00</text:p>
      <text:p text:style-name="consolas"><text:s text:c="2"/>Last input 00:00:04, output 00:00:04, output hang sever<text:s/></text:p>
      <text:p text:style-name="consolas"><text:s text:c="2"/>Last clearing of "show interface” counters never</text:p>
      <text:p text:style-name="consolas"><text:s text:c="2"/>Input queue: 0/75/0/0 (size/max/drops/flushes); Total output drops: 1 Queueing strategy: fifo<text:s/></text:p>
      <text:p text:style-name="consolas"><text:s text:c="2"/>Output queue: 0/40 (size/max)</text:p>
      <text:p text:style-name="consolas"><text:s text:c="2"/>5 minute input rate 516000 bits/sec, 45 packets/sec<text:s/></text:p>
      <text:p text:style-name="consolas"><text:s text:c="2"/>5 minute output rate 516000 bits/sec, 46 packets/sec<text:s/></text:p>
      <text:p text:style-name="consolas"><text:s text:c="4"/>13282 packets input, 20075670 bytes</text:p>
      <text:p text:style-name="consolas"><text:s text:c="4"/>Received 25 broadcasts, 0 runts, 0 giants, 0 throttles<text:s/></text:p>
      <text:p text:style-name="consolas"><text:s text:c="4"/>383 input errors, 383 CRC, 0 frame, 0 overrun, 0 ignored<text:s/></text:p>
      <text:p text:style-name="consolas"><text:s text:c="4"/>0 watchdog</text:p>
      <text:soft-page-break/>
      <text:p text:style-name="consolas"><text:s text:c="4"/>0 input packets with dribble condition detected<text:s/></text:p>
      <text:p text:style-name="consolas"><text:s text:c="4"/>13438 packets output, 20084258 bytes, 0 underruns<text:s/></text:p>
      <text:p text:style-name="consolas"><text:s text:c="4"/>0 output errors, 831 collision, 5 interface resets<text:s/></text:p>
      <text:p text:style-name="consolas"><text:s text:c="4"/>11 unknown protocol drops<text:s/></text:p>
      <text:p text:style-name="consolas"><text:s text:c="4"/>0 babbles, 0 late collision, 0 deferred</text:p>
      <text:p text:style-name="consolas"><text:s text:c="4"/>0 lost carrier, 0 no carrier</text:p>
      <text:p text:style-name="consolas"><text:s text:c="4"/>0 output buffer failures, 0 output buffers swapped out</text:p>
      <text:p text:style-name="P697">Users at a branch office are experiencing application performance issues, poor VoIP audio quality, and slow downloads. What is the cause of the issues?</text:p>
      <text:p text:style-name="P698">A. QoS queuing<text:line-break/>B. interface configuration<text:line-break/>C. broadcast storm<text:line-break/>D. overutilization</text:p>
      <text:p text:style-name="P699"> </text:p>
      <text:p text:style-name="Normal"><text:span text:style-name="T700">Answer:</text:span><text:span text:style-name="T701"> B</text:span></text:p>
      <text:p text:style-name="Normal"><text:span text:style-name="T702">Explanation</text:span></text:p>
      <text:p text:style-name="P703">TXLoad is the amount of traffic being transmitted from your interface and the RXLoad is the amount of traffic received on the interface. Both of them are 1 in this question so answer D is not the problem.</text:p>
      <text:p text:style-name="P704">This interface received “25 broadcasts” so answer C is not the problem.</text:p>
      <text:p text:style-name="P705">Answer A is not the problem as “Input queue: 0/75/0/0 (size/max/drops/flushes); Total output drops: 1 Queueing strategy: fifo Output queue: 0/40 (size/max)”</text:p>
      <text:p text:style-name="P706">Therefore only answer B is left. Also this interface was configured in “half-duplex” and has high “input errors” (383) and high “collision” (831) so the most likely cause of this problem is “interface configuration” and maybe the other end was configured in full-duplex, which creates a duplex mismatched problem.</text:p>
      <text:p text:style-name="Normal"><text:span text:style-name="T707">Question 13.</text:span><text:span text:style-name="T708">57</text:span></text:p>
      <text:p text:style-name="P709">Refer to the exhibit.</text:p>
      <text:soft-page-break/>
      <text:p text:style-name="consolas">0ldR#show ip ospf interface</text:p>
      <text:p text:style-name="consolas">GigabitEthernet0/0/0 is up, line protocol is up<text:s/></text:p>
      <text:p text:style-name="consolas"><text:s text:c="2"/>Internet address is 192.168.1.2/24, Area 0</text:p>
      <text:p text:style-name="consolas"><text:s text:c="2"/>Process ID 1, Router ID 192.168.1.1, Network Type BROADCAST, Cost: 1 Transmit Delay is 1 sec, State DROTHER, Priority 1<text:s/></text:p>
      <text:p text:style-name="consolas"><text:s text:c="2"/>Designated Router (ID) 192.168.1.1, Interface address 192.168.1.1<text:s/></text:p>
      <text:p text:style-name="consolas"><text:s text:c="2"/>Backup Designated Router (ID) 192.168.1.1, Interface address 192.168.1.1<text:s/></text:p>
      <text:p text:style-name="consolas"><text:s text:c="2"/>Timer intervals configured, Hello 10, Dead 40, Wait 40, Retransmit 5<text:s/></text:p>
      <text:p text:style-name="consolas"><text:s text:c="4"/>Hello due in 00:00:01<text:s/></text:p>
      <text:p text:style-name="consolas"><text:s text:c="2"/>Index 1/1, flood queue length 0</text:p>
      <text:p text:style-name="consolas"><text:s text:c="2"/>Neighbor Count is 1, Adjacent neighbor count is 2<text:s/></text:p>
      <text:p text:style-name="consolas"><text:s text:c="2"/></text:p>
      <text:p text:style-name="consolas">R2#show ip ospf interface</text:p>
      <text:p text:style-name="consolas">GigabitEthernet0/0/0 is up, line protocol is up<text:s/></text:p>
      <text:p text:style-name="consolas"><text:s text:c="2"/>Internet address is 192.168.1.1/24, Area 0</text:p>
      <text:p text:style-name="consolas"><text:s text:c="2"/>Process ID 1, Router ID 192.168.1.1, Network Type BROADCAST, Cost: 1<text:s/></text:p>
      <text:p text:style-name="consolas"><text:s text:c="2"/>Transmit Delay is 1 sec, State DROTHER, Priority 1<text:s/></text:p>
      <text:p text:style-name="consolas"><text:s text:c="2"/>Designated Router (ID) 192.168.1.1, Interface address 192.168.1.2<text:s/></text:p>
      <text:p text:style-name="consolas"><text:s text:c="2"/>Backup Designated Router (ID) 192.168.1.1, Interface address 192.168.1.2<text:s/></text:p>
      <text:p text:style-name="consolas"><text:s text:c="2"/>Timer intervals configured, Hello 10, Dead 40, Wait 40, Retransmit 5<text:s/></text:p>
      <text:p text:style-name="consolas"><text:s text:c="4"/>Hello due in 00:00:02<text:s/></text:p>
      <text:p text:style-name="consolas"><text:s text:c="2"/>Index 2/2, flood queue length 0<text:s/></text:p>
      <text:p text:style-name="consolas"><text:s text:c="4"/>Neighbor Count is 1, Adjacent neighbor count is 2</text:p>
      <text:p text:style-name="Normal"><text:span text:style-name="T710">Router OldR is replacing another router on the network with the intention of having OldR and R2 exchange routes. After the engineer applied the initial OSPF configuration, the routes were still missing on both devices. Which command sequence must be issued before the </text:span><text:span text:style-name="T711">clear IP ospf process</text:span><text:span text:style-name="T712"> command is entered to enable the neighbor relationship?</text:span></text:p>
      <text:soft-page-break/>
      <text:p text:style-name="P713">A. OldR(config)#router ospf 1<text:line-break/>OldR(config-router)#no router-id 192.168.1.1</text:p>
      <text:p text:style-name="P714">B. OldR(config)#interface g0/0/0<text:line-break/>OldR(config-if)#ip ospf dead-interval 15</text:p>
      <text:p text:style-name="P715">C. OldR(config)#interface g0/0/0<text:line-break/>OldR(config-if)#ip ospf hello-interval 15</text:p>
      <text:p text:style-name="P716">D. OldR(config)#router ospf 1<text:line-break/>OldR(config-router)# network 192.168.1.0 255.255.255.0 area 2</text:p>
      <text:p text:style-name="P717"> </text:p>
      <text:p text:style-name="Normal"><text:span text:style-name="T718">Answer:</text:span><text:span text:style-name="T719"> A</text:span></text:p>
      <text:p text:style-name="Normal"><text:span text:style-name="T720">Explanation</text:span></text:p>
      <text:p text:style-name="P721">Two routers in the exhibit have the same router-id of 192.168.1.1 so they cannot form neighbor relationship. Therefore we need to clear the router-id of one of the router. Hopefully the OldR will choose another router-id (maybe 192.168.1.2) automatically after resetting.</text:p>
      <text:p text:style-name="Normal"><text:span text:style-name="T722">Question 13.</text:span><text:span text:style-name="T723">58</text:span></text:p>
      <text:p text:style-name="P724">Refer to the exhibit.</text:p>
      <text:p text:style-name="Normal"><text:span text:style-name="T725"><draw:frame draw:style-name="a22" draw:name="Picture 42" text:anchor-type="as-char" svg:x="0in" svg:y="0in" svg:width="6.5in" svg:height="3.31597in" style:rel-width="scale" style:rel-height="scale"><draw:image xlink:href="media/image23.jpeg" xlink:type="simple" xlink:show="embed" xlink:actuate="onLoad"/><svg:title/><svg:desc/></draw:frame></text:span></text:p>
      <text:soft-page-break/>
      <text:p text:style-name="consolas">Router-Y#show ip route</text:p>
      <text:p text:style-name="consolas"/>
      <text:p text:style-name="consolas">Codes: L - local, C - connected, S - static, R - RIP, M - mobile, B - BGP</text:p>
      <text:p text:style-name="consolas"><text:s text:c="7"/>D - EIGRP, EX - EIGRP external, O - OSPF, IA - OSPF inter area<text:s/></text:p>
      <text:p text:style-name="consolas"><text:s text:c="7"/>N1 - OSPF NSSA external type 1, N2 - OSPF NSSA external type 2</text:p>
      <text:p text:style-name="consolas"><text:s text:c="7"/>E1 - OSPF external type 1, E2 - OSPF external type 2</text:p>
      <text:p text:style-name="consolas"><text:s text:c="7"/>i - IS-IS, su - IS-IS summary, L1 - IS-IS level-1, L2 - IS-IS level-2</text:p>
      <text:p text:style-name="consolas"><text:s text:c="7"/>ia - IS-IS inter area, * - candidate default, U - per-user static route</text:p>
      <text:p text:style-name="consolas"><text:s text:c="7"/>o - ODR, P - periodic downloaded static route, H - NHRP, l - LISP</text:p>
      <text:p text:style-name="consolas"><text:s text:c="7"/>+ - replicated route, % - next hop override, p - overrides from PfR</text:p>
      <text:p text:style-name="consolas"/>
      <text:p text:style-name="consolas">Gateway of last resort is not set</text:p>
      <text:p text:style-name="consolas"/>
      <text:p text:style-name="consolas">10.0.0.0/8 is variably subnetted<text:s/></text:p>
      <text:p text:style-name="consolas">B <text:s text:c="6"/>10.0.0.0/8 [1/0] via 10.224.1.2</text:p>
      <text:p text:style-name="P726">B <text:s text:c="6"/>10.27.150.224/27 [20/0] via 10.224.1.3, 1w6d</text:p>
      <text:p text:style-name="P727">S <text:s text:c="6"/>10.128.0.0/9 [1/0] via 10.224.1.3</text:p>
      <text:p text:style-name="P728">B <text:s text:c="6"/>10.224.0.0/11 [20/0] via 10.224.1.5, 5d18h</text:p>
      <text:p text:style-name="consolas">B <text:s text:c="6"/>10.224.0.0/15 [20/0] via 10.224.1.4, 5d18h</text:p>
      <text:p text:style-name="consolas">C <text:s text:c="6"/>10.223.0.0/24 is directly connected, GigabitEthernet0/1</text:p>
      <text:p text:style-name="consolas">C <text:s text:c="6"/>10.224.0.0/24 is directly connected, GigabitEthernet0/0<text:s/></text:p>
      <text:p text:style-name="consolas">B <text:s text:c="6"/>10.226.34.0/24 [20/0] via 10.224.1.5, 5d18h</text:p>
      <text:p text:style-name="P729">PC A is communicating with another device at IP address 10.225.34.225. Through which router does router Y route the traffic?</text:p>
      <text:p text:style-name="P730">A. router A<text:line-break/>B. router B<text:line-break/>C. router C<text:line-break/>D. router D</text:p>
      <text:soft-page-break/>
      <text:p text:style-name="P731"> </text:p>
      <text:p text:style-name="Normal"><text:span text:style-name="T732">Answer:</text:span><text:span text:style-name="T733"> C</text:span></text:p>
      <text:p text:style-name="Normal"><text:span text:style-name="T734">Explanation</text:span></text:p>
      <text:p text:style-name="Normal"><text:span text:style-name="T735">The destination IP address 10.225.34.225 belongs to </text:span><text:span text:style-name="T736">10.224.0.0/15</text:span><text:span text:style-name="T737"> subnet (which ranges from 10.224.0.0 to 10.225.255.255) and this is the longest prefix subnet so router Y will send traffic from PC A to 10.224.1.4, which is router C.</text:span></text:p>
      <text:p text:style-name="Normal"><text:span text:style-name="T738">Question 13.</text:span><text:span text:style-name="T739">59</text:span></text:p>
      <text:p text:style-name="P740">An engineer needs to configure an access point to forward all client traffic through a wireless controller. Which mode must be enabled to accomplish this task?</text:p>
      <text:p text:style-name="P741">A. local<text:line-break/>B. monitor<text:line-break/>C. autonomous<text:line-break/>D. rogue detector</text:p>
      <text:p text:style-name="P742"> </text:p>
      <text:p text:style-name="Normal"><text:span text:style-name="T743">Answer:</text:span><text:span text:style-name="T744"> A</text:span></text:p>
      <text:p text:style-name="Normal"><text:span text:style-name="T745">Explanation</text:span></text:p>
      <text:p text:style-name="Normal"><text:span text:style-name="T746">Local mode</text:span><text:span text:style-name="T747"> (default mode): An AP configured in Local mode tunnels all the client traffic for WLANs is forwarded via the CAPWAP (Control and Provisioning of Wireless Access Points) tunnel to the WLC (Wireless Controller) -&gt; Answer A is correct.</text:span></text:p>
      <text:p text:style-name="P748">Note:</text:p>
      <text:p text:style-name="Normal"><text:span text:style-name="T749">Autonomous</text:span><text:span text:style-name="T750">: self-sufficient and standalone. Used for small wireless networks. Each autonomous AP must be configured with a management IP address so that it can be remotely accessed using Telnet, SSH, or a web interface. Each AP must be individually managed and maintained unless you use a management platform such as Cisco DNA Center.</text:span></text:p>
      <text:p text:style-name="Normal"><text:span text:style-name="T751">Monitor mode</text:span><text:span text:style-name="T752">: does not transmit at all. It acts like a dedicated sensor for location-based services (LBS), rogue AP detection, and Checks Intrusion Detection System<text:s/></text:span><text:soft-page-break/><text:span text:style-name="T753">(IDS). In this mode, AP will not broadcast an SSID so clients are unable to connect to it.</text:span></text:p>
      <text:p text:style-name="Normal"><text:span text:style-name="T754">Rogue detector mode</text:span><text:span text:style-name="T755">: monitor for rogue APs. It does not handle data at all.</text:span></text:p>
      <text:p text:style-name="Normal"><text:span text:style-name="T756">Question 13.</text:span><text:span text:style-name="T757">60</text:span></text:p>
      <text:p text:style-name="P758">What is the root port in STP?</text:p>
      <text:p text:style-name="P759">A. It is the port with the highest priority toward the root bridge.<text:line-break/>B. It is the port that is elected only when the root bridge has precisely one port on a single LAN segment.<text:line-break/>C. It is the port on a switch with the lowest cost to reach the root bridge.<text:line-break/>D. It is the port on the root switch that leads to the designated port on another switch.</text:p>
      <text:p text:style-name="P760"> </text:p>
      <text:p text:style-name="Normal"><text:span text:style-name="T761">Answer:</text:span><text:span text:style-name="T762"> C</text:span></text:p>
      <text:p text:style-name="Normal"><text:span text:style-name="T763">Explanation</text:span></text:p>
      <text:p text:style-name="Normal"><text:span text:style-name="T764">The root port is always the link connected to the root bridge, </text:span><text:span text:style-name="T765">or the shortest path to the root bridge</text:span><text:span text:style-name="T766">.</text:span></text:p>
      <text:p text:style-name="Normal"><text:span text:style-name="T767">Reference: </text:span><text:a xlink:href="https://community.cisco.com/t5/switching/stp-root-port-vs-designated-port/td-p/1517842" office:target-frame-name="_blank" xlink:show="new"><text:span text:style-name="T768">https://community.cisco.com/t5/switching/stp-root-port-vs-designated-port/td-p/1517842</text:span></text:a></text:p>
      <text:p text:style-name="Normal"><text:span text:style-name="T769">Question 13.</text:span><text:span text:style-name="T770">61</text:span></text:p>
      <text:p text:style-name="P771">An Ethernet frame arrived at switch interface G0/1, but the destination MAC address is missing from the MAC address table. How does the switch process the frame?</text:p>
      <text:p text:style-name="P772">A. It sends an ARP request to attempt to locate the destination.<text:line-break/>B. It updates the destination to FFFF.FFFF.FFFF.<text:line-break/>C. It drops the frame and notifies the sending host.<text:line-break/>D. It floods the frame out of the remaining switch interfaces.</text:p>
      <text:p text:style-name="P773"> </text:p>
      <text:p text:style-name="Normal"><text:span text:style-name="T774">Answer:</text:span><text:span text:style-name="T775"> D</text:span></text:p>
      <text:soft-page-break/>
      <text:p text:style-name="Normal"><text:span text:style-name="T776">Question 13.</text:span><text:span text:style-name="T777">62</text:span></text:p>
      <text:p text:style-name="P778">In which circumstance would a network architect decide to implement a global unicast subnet instead of a unique local unicast subnet?</text:p>
      <text:p text:style-name="P779">A. when the subnet must be available only within an organization<text:line-break/>B. when the subnet does not need to be routable<text:line-break/>C. when the addresses on the subnet must be equivalent to private IPv4 addresses<text:line-break/>D. when the subnet must be routable over the internet</text:p>
      <text:p text:style-name="P780"> </text:p>
      <text:p text:style-name="Normal"><text:span text:style-name="T781">Answer:</text:span><text:span text:style-name="T782"> D</text:span></text:p>
      <text:p text:style-name="Normal"><text:span text:style-name="T783">Question 13.</text:span><text:span text:style-name="T784">63</text:span></text:p>
      <text:p text:style-name="P785">Which Windows command is used instead of the route print command to display the contents of the IP routing table?</text:p>
      <text:p text:style-name="P786">A. netstat-n<text:line-break/>B. ipconfig<text:line-break/>C. ifconfig<text:line-break/>D. netstat-r</text:p>
      <text:p text:style-name="P787"> </text:p>
      <text:p text:style-name="Normal"><text:span text:style-name="T788">Answer:</text:span><text:span text:style-name="T789"> D</text:span></text:p>
      <text:p text:style-name="Normal"><text:span text:style-name="T790">Explanation</text:span></text:p>
      <text:p text:style-name="P791">The “route print” and netstat -r” commands are very similar. This is the output of the “route print” command:</text:p>
      <text:soft-page-break/>
      <text:p text:style-name="Normal"><text:span text:style-name="T792"><draw:frame draw:style-name="a23" draw:name="Picture 41" text:anchor-type="as-char" svg:x="0in" svg:y="0in" svg:width="6.5in" svg:height="4.54097in" style:rel-width="scale" style:rel-height="scale"><draw:image xlink:href="media/image24.jpeg" xlink:type="simple" xlink:show="embed" xlink:actuate="onLoad"/><svg:title/><svg:desc/></draw:frame></text:span></text:p>
      <text:p text:style-name="P793">And “netstat -r” command:</text:p>
      <text:soft-page-break/>
      <text:p text:style-name="Normal"><text:span text:style-name="T794"><draw:frame draw:style-name="a24" draw:name="Picture 40" text:anchor-type="as-char" svg:x="0in" svg:y="0in" svg:width="6.5in" svg:height="4.38333in" style:rel-width="scale" style:rel-height="scale"><draw:image xlink:href="media/image25.jpeg" xlink:type="simple" xlink:show="embed" xlink:actuate="onLoad"/><svg:title/><svg:desc/></draw:frame></text:span></text:p>
      <text:p text:style-name="P795">Note: “-r” means “displays the routing table”</text:p>
      <text:p text:style-name="Normal"><text:span text:style-name="T796">Question 13.</text:span><text:span text:style-name="T797">64</text:span></text:p>
      <text:p text:style-name="P798">What differentiates the Cisco OfficeExtend AP mode from FlexConnect AP mode?</text:p>
      <text:p text:style-name="P799">A. FlexConnect allows a personal SSID to be configured on the AP, and personal SSIDs are not supported with OfficeExtend.<text:line-break/>B. OfficeExtend does not support DTLS tunneling of traffic to the WLC, and FlexConnect tunnels traffic to the WLC with DTLS.<text:line-break/>C. OfficeExtend tunnels all traffic through the WLC, and FlexConnect terminates client traffic at the AP switch port.<text:line-break/>D. FlexConnect must be deployed behind a router that NATs the client traffic, and OfficeExtend uses public IP sources.</text:p>
      <text:p text:style-name="P800"> </text:p>
      <text:p text:style-name="Normal"><text:span text:style-name="T801">Answer:</text:span><text:span text:style-name="T802"> C</text:span></text:p>
      <text:p text:style-name="Normal"><text:span text:style-name="T803">Explanation</text:span></text:p>
      <text:soft-page-break/>
      <text:p text:style-name="Normal"><text:span text:style-name="T804">A controller with OfficeExtend access points in an access point group publishes only up to 15 WLANs to each connected OfficeExtend access point because it reserves one WLAN for the </text:span><text:span text:style-name="T805">personal SSID</text:span><text:span text:style-name="T806"> -&gt; OfficeExtend support personal SSID -&gt; Answer A is not correct.</text:span></text:p>
      <text:p text:style-name="Normal"><text:span text:style-name="T807">A Cisco OfficeExtend access point (Cisco OEAP) provides secure communications from a controller to a Cisco AP at a remote location, seamlessly extending the corporate WLAN over the Internet to an employee’s residence. The user’s experience at the home office is exactly the same as it would be at the corporate office. </text:span><text:span text:style-name="T808">Datagram Transport Layer Security (DTLS) encryption between the access point and the controller</text:span><text:span text:style-name="T809"> (-&gt; Answer B is not correct) ensures that all communications have the highest level of security.</text:span></text:p>
      <text:p text:style-name="P810">Cisco OEAPs are designed to work behind a router or other gateway device that is using network address translation (NAT) -&gt; Answer D is not correct.</text:p>
      <text:p text:style-name="Normal"><text:span text:style-name="T811">Reference: </text:span><text:a xlink:href="https://www.cisco.com/c/en/us/td/docs/wireless/controller/8-5/config-guide/b_cg85/configuring_officeextend_access_points.html" office:target-frame-name="_blank" xlink:show="new"><text:span text:style-name="T812">https://www.cisco.com/c/en/us/td/docs/wireless/controller/8-5/config-guide/b_cg85/configuring_officeextend_access_points.html</text:span></text:a></text:p>
      <text:p text:style-name="P813">OEAP tunnels back to a Cisco WLC with an IPsec VPN tunnel.</text:p>
      <text:p text:style-name="P814">With FlexConnect, AP simply terminates user traffic in a VLAN &amp; destined to gateway defined on a local switch.</text:p>
      <text:p text:style-name="Normal"><text:span text:style-name="T815">Question 13.</text:span><text:span text:style-name="T816">65</text:span></text:p>
      <text:p text:style-name="P817">Which type of IPv4 address must be assigned to a server to protect it from external access and allow only internal users access while restricting internet access?</text:p>
      <text:p text:style-name="P818">A. global unicast<text:line-break/>B. public<text:line-break/>C. private<text:line-break/>D. multicast</text:p>
      <text:p text:style-name="P819"> </text:p>
      <text:p text:style-name="Normal"><text:span text:style-name="T820">Answer:</text:span><text:span text:style-name="T821"> C</text:span></text:p>
      <text:p text:style-name="Normal"><text:span text:style-name="T822">Question 13.</text:span><text:span text:style-name="T823">66</text:span></text:p>
      <text:soft-page-break/>
      <text:p text:style-name="P824">Which function generally performed by a traditional network device is replaced by a software-defined controller?</text:p>
      <text:p text:style-name="P825">A. encryption and decryption for VPN link processing<text:line-break/>B. building route tables and updating the forwarding table<text:line-break/>C. changing the source or destination address during NAT operations<text:line-break/>D. encapsulation and decapsulation of packets in a data-link frame</text:p>
      <text:p text:style-name="P826"> </text:p>
      <text:p text:style-name="Normal"><text:span text:style-name="T827">Answer:</text:span><text:span text:style-name="T828"> B</text:span></text:p>
      <text:p text:style-name="Normal"><text:span text:style-name="T829">Question 13.</text:span><text:span text:style-name="T830">67</text:span></text:p>
      <text:p text:style-name="P831">Refer to the exhibit.</text:p>
      <text:p text:style-name="consolas">R1# show ip route | begin gateway</text:p>
      <text:p text:style-name="consolas">Gateway of last resort is not set</text:p>
      <text:p text:style-name="consolas"><text:s text:c="3"/>172.16.0.0/16 is variably subnetted, 3 subnets, 2 masks<text:s/></text:p>
      <text:p text:style-name="consolas"><text:s text:c="3"/>172.16.1.0/24 is directly connected, FastEthernet0/0<text:s/></text:p>
      <text:p text:style-name="consolas"><text:s text:c="3"/>172.16.1.1/32 is directly connected, FastEthernet0/0<text:s/></text:p>
      <text:p text:style-name="consolas"><text:s text:c="3"/>172.16.2.0/24 [120/2] via 207.165.200.250, 00:00:25, Serial0/0/0<text:s/></text:p>
      <text:p text:style-name="consolas"><text:s text:c="3"/>192.168.1.0/24 [110/84437] via 207.165.200.254, 00:00:17, Serial0/0/1</text:p>
      <text:p text:style-name="consolas"><text:s text:c="3"/>192.168.2.0/24 [90/3164437] via 207.165.200.254, 00:00:15, Serial0/0/1<text:s/></text:p>
      <text:p text:style-name="consolas"><text:s text:c="3"/>207.165.200.0/24 is variably subnetted, 5 subnets, 2 masks<text:s/></text:p>
      <text:p text:style-name="consolas"><text:s text:c="3"/>207.165.200.244/30 [1/1] via 207.169.200.254, Serial0/0/1<text:s/></text:p>
      <text:p text:style-name="consolas"><text:s text:c="3"/>207.165.200.248/30 is directly connected, Serial0/0/0</text:p>
      <text:p text:style-name="consolas"><text:s text:c="3"/>207.165.200.249/32 is directly connected, Serial0/0/0</text:p>
      <text:p text:style-name="consolas"><text:s text:c="3"/>207.165.200.252/30 is directly connected, Serial0/0/1</text:p>
      <text:p text:style-name="consolas"><text:s text:c="3"/>207.165.200.253/32 is directly connected, Serial0/0/1</text:p>
      <text:p text:style-name="P832">Drag and drop the learned prefixes from the left onto the preferred route methods from which they were learned on the right.</text:p>
      <text:soft-page-break/>
      <text:p text:style-name="Normal"><text:span text:style-name="T833"><draw:frame draw:style-name="a25" draw:name="Picture 39" text:anchor-type="as-char" svg:x="0in" svg:y="0in" svg:width="5.53472in" svg:height="2.29167in" style:rel-width="scale" style:rel-height="scale"><draw:image xlink:href="media/image26.jpeg" xlink:type="simple" xlink:show="embed" xlink:actuate="onLoad"/><svg:title/><svg:desc/></draw:frame></text:span></text:p>
      <text:p text:style-name="P834"> </text:p>
      <text:p text:style-name="Normal"><text:span text:style-name="T835">Answer:</text:span></text:p>
      <text:p text:style-name="consolas">+ static: 207.165.200.244/30<text:line-break/>+ EIGRP: 192.168.2.0/24<text:line-break/>+ OSPF: 192.168.1.0/24<text:line-break/>+ RIP: 172.16.2.0/24</text:p>
      <text:p text:style-name="Normal"><text:span text:style-name="T836">Explanation</text:span></text:p>
      <text:p text:style-name="P837">The output in this question removed the symbols which represent for the routing protocols used so we have to remember the Administrative Distances (AD) of popular routing protocols to figure out which routing protocols were used.</text:p>
      <text:p text:style-name="Normal"><text:span text:style-name="T838"><draw:frame draw:style-name="a26" draw:name="Picture 38" text:anchor-type="as-char" svg:x="0in" svg:y="0in" svg:width="3.79861in" svg:height="1.85417in" style:rel-width="scale" style:rel-height="scale"><draw:image xlink:href="media/image27.jpeg" xlink:type="simple" xlink:show="embed" xlink:actuate="onLoad"/><svg:title/><svg:desc/></draw:frame></text:span></text:p>
      <text:p text:style-name="P839">The AD is the first parameter in the square bracket. For example from the line “172.16.2.0/24 [120/2] via …” we learn that the AD of this routing protocol is 120, which is RIP.</text:p>
      <text:p text:style-name="Normal"><text:span text:style-name="T840">Question 13.</text:span><text:span text:style-name="T841">68</text:span></text:p>
      <text:p text:style-name="P842">What describes the functionality of southbound APIs?</text:p>
      <text:soft-page-break/>
      <text:p text:style-name="P843">A. They use HTTP messages to communicate.<text:line-break/>B. They enable communication between the controller and the network device.<text:line-break/>C. They convey information from the controller to the SDN applications.<text:line-break/>D. They communicate with the management plane.</text:p>
      <text:p text:style-name="P844"> </text:p>
      <text:p text:style-name="Normal"><text:span text:style-name="T845">Answer:</text:span><text:span text:style-name="T846"> B</text:span></text:p>
      <text:p text:style-name="Normal"><text:span text:style-name="T847">Question 13.</text:span><text:span text:style-name="T848">69</text:span></text:p>
      <text:p text:style-name="P849">What are two purposes of HSRP? (Choose two)</text:p>
      <text:p text:style-name="P850">A. It groups two or more routers to operate as one virtual router.<text:line-break/>B. It improves network availability by providing redundant gateways.<text:line-break/>C. It passes configuration information to hosts in a TCP/IP network.<text:line-break/>D. It helps hosts on the network to reach remote subnets without a default gateway.<text:line-break/>E. It provides a mechanism for diskless clients to autoconfigure their IP parameters during boot.</text:p>
      <text:p text:style-name="P851"> </text:p>
      <text:p text:style-name="Normal"><text:span text:style-name="T852">Answer:</text:span><text:span text:style-name="T853"> A B</text:span></text:p>
      <text:p text:style-name="Normal"><text:span text:style-name="T854">Question 13.</text:span><text:span text:style-name="T855">70</text:span></text:p>
      <text:p text:style-name="P856">A network engineer must configure an access list on a new Cisco IOS router. The access list must deny HTTP traffic to network 10.125.128.32/27 from the 192.168.240.0/20 network, but it must allow the 192.168.240.0/20 network to reach the rest of the 10.0.0.0/8 network. Which configuration must the engineer apply?</text:p>
      <table:table table:style-name="Table857">
        <table:table-columns>
          <table:table-column table:style-name="TableColumn858"/>
        </table:table-columns>
        <table:table-row table:style-name="TableRow859">
          <table:table-cell table:style-name="TableCell860">
            <text:p text:style-name="P861">Option A</text:p>
            <text:p text:style-name="consolas">ip access-list extended deny_outbound<text:s/></text:p>
            <text:p text:style-name="consolas"><text:s/>10 deny tcp 10.125.128.32 255.255.255.224 192.168.240.0 255.255.240.0 eq 443<text:s/></text:p>
            <text:p text:style-name="consolas"><text:s/>20 deny tcp 192.168.240.0 255.255.240.0 10.125.128.32 255.255.255.224 eq 443<text:s/></text:p>
            <text:p text:style-name="consolas"><text:s/>30 permit ip 192.168.240.0 255.255.240.0 10.0.0.0 255.0.0.0</text:p>
          </table:table-cell>
        </table:table-row>
        <text:soft-page-break/>
        <table:table-row table:style-name="TableRow862">
          <table:table-cell table:style-name="TableCell863">
            <text:p text:style-name="P864">Option B</text:p>
            <text:p text:style-name="consolas">ip access-list extended deny_outbound</text:p>
            <text:p text:style-name="consolas"><text:s text:c="2"/>10 permit ip 192.168.240.0 255.255.240.0 10.0.0.0 255.0.0.0</text:p>
            <text:p text:style-name="consolas"><text:s text:c="2"/>20 deny tcp 192.168.240.0 255.255.240.0 10.125.128.32 255.255.255.224 eq 443</text:p>
            <text:p text:style-name="consolas"><text:s text:c="2"/>30 permit ip any any</text:p>
          </table:table-cell>
        </table:table-row>
        <table:table-row table:style-name="TableRow865">
          <table:table-cell table:style-name="TableCell866">
            <text:p text:style-name="P867">Option C</text:p>
            <text:p text:style-name="consolas">ip access-list extended deny_outbound<text:s/></text:p>
            <text:p text:style-name="consolas"><text:s text:c="2"/>10 deny tcp 192.168.240.0 0.0.15.255 10.125.128.32 0.0.0.31 eq 80<text:s/></text:p>
            <text:p text:style-name="consolas"><text:s text:c="2"/>20 permit ip 192.168.240.0 0.0.15.255 10.0.0.0 0.255.255.255<text:s/></text:p>
            <text:p text:style-name="consolas"><text:s text:c="2"/>30 deny ip any any log</text:p>
          </table:table-cell>
        </table:table-row>
        <table:table-row table:style-name="TableRow868">
          <table:table-cell table:style-name="TableCell869">
            <text:p text:style-name="P870">Option D</text:p>
            <text:p text:style-name="consolas">ip access-list extended deny_outbound<text:s/></text:p>
            <text:p text:style-name="consolas"><text:s text:c="2"/>10 deny tcp 192.168.240.0 0.0.15.255 any eq 80<text:s/></text:p>
            <text:p text:style-name="consolas"><text:s text:c="2"/>20 deny tcp 192.168.240.0 0.0.15.255 10.125.128.32 0.0.0.31 eq 80<text:s/></text:p>
            <text:p text:style-name="consolas"><text:s text:c="2"/>30 permit ip 192.168.240.0 0.0.15.255 10.0.0.0 0.255.255.255</text:p>
          </table:table-cell>
        </table:table-row>
      </table:table>
      <text:p text:style-name="P871">A. Option A<text:line-break/>B. Option B<text:line-break/>C. Option C<text:line-break/>D. Option D</text:p>
      <text:p text:style-name="P872"> </text:p>
      <text:p text:style-name="Normal"><text:span text:style-name="T873">Answer:</text:span><text:span text:style-name="T874"> C</text:span></text:p>
      <text:p text:style-name="Normal"><text:span text:style-name="T875">Explanation</text:span></text:p>
      <text:p text:style-name="P876">This question only asks to deny HTTP traffic so the port must be “eq 80”, not 443 (for HTTPS) -&gt; Only Option C and Option D are correct. But Option D denies all HTTP traffic from 192.168.24.0/20 with the first statement “10 deny tcp 192.168.240.0 0.0.15.255 any eq 80 ” so it is not correct.</text:p>
      <text:p text:style-name="Normal"><text:span text:style-name="T877">Question 13.</text:span><text:span text:style-name="T878">71</text:span></text:p>
      <text:soft-page-break/>
      <text:p text:style-name="P879">A DHCP pool has been created with the name NOCC. The pool is using 192.168.20.0/24 and must use the next to last usable IP address as the default gateway for the DHCP clients. What is the next step in the process?</text:p>
      <text:p text:style-name="P880">A. default-router 192.168.20.253<text:line-break/>B. network 192.168.20.254 255.255.255.0 secondary<text:line-break/>C. ip default-gateway 0.0.0.0 0.0.0.0 192.168.20.253<text:line-break/>D. next-server 192.168.20.254</text:p>
      <text:p text:style-name="P881"> </text:p>
      <text:p text:style-name="Normal"><text:span text:style-name="T882">Answer:</text:span><text:span text:style-name="T883"> A</text:span></text:p>
      <text:p text:style-name="Normal"><text:span text:style-name="T884">Question 13.</text:span><text:span text:style-name="T885">72</text:span></text:p>
      <text:p text:style-name="P886">What is the role of SNMP in the network?</text:p>
      <text:p text:style-name="P887">A. to monitor network devices and functions using a TCP underlay that operates on the presentation layer<text:line-break/>B. to collect data directly from network devices using an SSL underlay that operates on the transport layer<text:line-break/>C. to monitor and manage network devices using a UDP underlay that operates on the application layer<text:line-break/>D. to collect telemetry and critical information from network devices using an SSH underlay that operates on the network layer</text:p>
      <text:p text:style-name="P888"> </text:p>
      <text:p text:style-name="Normal"><text:span text:style-name="T889">Answer:</text:span><text:span text:style-name="T890"> C</text:span></text:p>
      <text:p text:style-name="Normal"><text:span text:style-name="T891">Explanation</text:span></text:p>
      <text:p text:style-name="P892">SNMP uses UDP as its transport protocol because it has no need for the overhead of TCP. “Reliability” is not required because each request generates a response. If the SNMP application does not receive a response, it simply re-issues the request.</text:p>
      <text:p text:style-name="Normal"><text:span text:style-name="T893">Question 13.</text:span><text:span text:style-name="T894">73</text:span></text:p>
      <text:p text:style-name="P895">Refer to the exhibit.</text:p>
      <text:p text:style-name="consolas">1 [</text:p>
      <text:p text:style-name="consolas">2 <text:s text:c="2"/>{"switch": "3750", "port": e2},</text:p>
      <text:soft-page-break/>
      <text:p text:style-name="consolas">3 <text:s text:c="2"/>{"router": "2951", "port": e20},</text:p>
      <text:p text:style-name="consolas">4 <text:s text:c="2"/>{"switch": "3750", "port": e23}</text:p>
      <text:p text:style-name="consolas">5 ]</text:p>
      <text:p text:style-name="P896">What is represented beginning with line 1 and ending with line 5?</text:p>
      <text:p text:style-name="P897">A. object<text:line-break/>B. key<text:line-break/>C. value<text:line-break/>D. array</text:p>
      <text:p text:style-name="P898"> </text:p>
      <text:p text:style-name="Normal"><text:span text:style-name="T899">Answer:</text:span><text:span text:style-name="T900"> D</text:span></text:p>
      <text:p text:style-name="Normal"><text:span text:style-name="T901">Explanation</text:span></text:p>
      <text:p text:style-name="P902">JSON uses curly braces {} to hold objects and square brackets [] to hold arrays.</text:p>
      <text:p text:style-name="Normal"><text:span text:style-name="T903">Question 13.</text:span><text:span text:style-name="T904">74</text:span></text:p>
      <text:p text:style-name="P905">What is the difference between an IPv6 link-local address and a unique local address?</text:p>
      <text:p text:style-name="P906">A. The scope of an IPv6 link-local address is limited to a directly attached interface, but an IPv6 unique local address is used throughout a company site or network<text:line-break/>B. The scope of an IPv6 link-local address is limited to a loopback address, and an IPv6 unique local address is limited to a directly attached interface.<text:line-break/>C. The scope of an IPv6 link-local address is global, but the scope of an IPv6 unique local address is limited to a loopback address<text:line-break/>D. The scope of an IPv6 link-local address can be used throughout a company site or network, but an IPv6 unique local address is limited to a loopback address.</text:p>
      <text:p text:style-name="P907"> </text:p>
      <text:p text:style-name="Normal"><text:span text:style-name="T908">Answer:</text:span><text:span text:style-name="T909"> A</text:span></text:p>
      <text:p text:style-name="Normal"><text:span text:style-name="T910">Explanation</text:span></text:p>
      <text:soft-page-break/>
      <text:p text:style-name="Normal"><text:span text:style-name="T911">A IPv6 </text:span><text:span text:style-name="T912">Unique Local Address</text:span><text:span text:style-name="T913"> is an IPv6 address in the block FC00::/7. It is the approximate IPv6 counterpart of the IPv4 private address. It is not routable on the global Internet.</text:span></text:p>
      <text:p text:style-name="Normal"><text:span text:style-name="T914">A </text:span><text:span text:style-name="T915">link-local</text:span><text:span text:style-name="T916"> address is an address that is valid only for communications within the network segment (link) or the broadcast domain that the device is connected to.</text:span></text:p>
      <text:p text:style-name="Normal"><text:span text:style-name="T917">Question 13.</text:span><text:span text:style-name="T918">75</text:span></text:p>
      <text:p text:style-name="P919">What are two reasons to implement DHCP in a network? (Choose two)</text:p>
      <text:p text:style-name="P920">A. manually control and configure IP addresses on network devices<text:line-break/>B. reduce administration time in managing IP address ranges for clients<text:line-break/>C. control the length of time an IP address is used by a network device<text:line-break/>D. dynamic control over the best path to reach an IP address<text:line-break/>E. access a website by name instead of by IP address</text:p>
      <text:p text:style-name="P921"> </text:p>
      <text:p text:style-name="Normal"><text:span text:style-name="T922">Answer:</text:span><text:span text:style-name="T923"> B C</text:span></text:p>
      <text:p text:style-name="Normal"><text:span text:style-name="T924">Explanation</text:span></text:p>
      <text:p text:style-name="P925">DHCP automatically issue IP address in configured ranges for clients -&gt; Answer B is correct.</text:p>
      <text:p text:style-name="P926">With DHCP, we can control the length of time an IP address issued by DHCP lease time. This feature determines how long a device can keep an IP address before renewing or releasing it -&gt; Answer C is correct.</text:p>
      <text:p text:style-name="Normal"><text:span text:style-name="T927">Question 13.</text:span><text:span text:style-name="T928">76</text:span></text:p>
      <text:p text:style-name="P929">What does traffic shaping do?</text:p>
      <text:p text:style-name="P930">A. It modifies the QoS attributes of a packet<text:line-break/>B. It sets QoS attributes within a packet<text:line-break/>C. It queues excess traffic<text:line-break/>D. It organizes traffic into classes</text:p>
      <text:p text:style-name="P931"> </text:p>
      <text:p text:style-name="Normal"><text:span text:style-name="T932">Answer:</text:span><text:span text:style-name="T933"> C</text:span></text:p>
      <text:soft-page-break/>
      <text:p text:style-name="Normal"><text:span text:style-name="T934">Explanation</text:span></text:p>
      <text:p text:style-name="Normal"><text:span text:style-name="T935">Traffic Shaping</text:span><text:span text:style-name="T936">: retains excess packets in a queue and then schedules the excess for later transmission over increments of time. When traffic reaches the maximum configured rate, additional packets are queued instead of being dropped to proceed later. Traffic shaping is applicable only on outbound interfaces as buffering and queuing happens only on outbound interfaces. Shaping is configured in bits per second.</text:span></text:p>
      <text:p text:style-name="Normal"><text:span text:style-name="T937">Question 13.</text:span><text:span text:style-name="T938">77</text:span></text:p>
      <text:p text:style-name="P939">What is a difference between an IPv6 multicast address and an IPv6 anycast address?</text:p>
      <text:p text:style-name="P940">A. An IPv6 multicast address uses the prefix 2002:/15 and forwards to one destination, and an IPv6 anycast address uses the prefix ff00::/8 and forwards to any destination in a group<text:line-break/>B. IPv6 multicast addresses are used to transition from IPv4 to IPv6, and IPv6 anycast addresses are used for address aggregation in an IPv6-only environment<text:line-break/>C. An IPv6 multicast address is assigned to numerous interfaces within a subnet, but an IPv6 anycast address is used for a predefined group of nodes in an all-IPv6 routers group<text:line-break/>D. A packet sent to an IPv6 multicast address is delivered to one or more destinations at once, but a packet sent to an IPv6 anycast address is routed to the closest interface with that address</text:p>
      <text:p text:style-name="P941"> </text:p>
      <text:p text:style-name="Normal"><text:span text:style-name="T942">Answer:</text:span><text:span text:style-name="T943"> D</text:span></text:p>
      <text:p text:style-name="Normal"><text:span text:style-name="T944">Question 13.</text:span><text:span text:style-name="T945">78</text:span></text:p>
      <text:p text:style-name="P946">Which enhancements were implemented as part of WPA3?</text:p>
      <text:p text:style-name="P947">A. TKIP encryption improving WEP and per-packet keying<text:line-break/>B. forward secrecy and SAE in personal mode for secure initial key exchange<text:line-break/>C. 802.1x authentication and AES-128 encryption<text:line-break/>D. AES-64 in personal mode and AES-128 in enterprise mode</text:p>
      <text:p text:style-name="P948"> </text:p>
      <text:soft-page-break/>
      <text:p text:style-name="Normal"><text:span text:style-name="T949">Answer:</text:span><text:span text:style-name="T950"> B</text:span></text:p>
      <text:p text:style-name="Normal"><text:span text:style-name="T951">Explanation</text:span></text:p>
      <text:p text:style-name="P952">WPA3-Personal uses AES-128 -&gt; Answer D is not correct.</text:p>
      <text:p text:style-name="Normal"><text:span text:style-name="T953">WPA3 networks include perfect </text:span><text:span text:style-name="T954">forward secrecy</text:span><text:span text:style-name="T955">. With this protection, even if an adversary successfully guesses the correct network password, they cannot observe a user’s earlier interactions on the network, determine the session keys for that interaction, or decrypt wireless traffic from other users on the network -&gt; Answer B is correct.</text:span></text:p>
      <text:p text:style-name="Normal"><text:span text:style-name="T956">Reference: </text:span><text:a xlink:href="https://www.wi-fi.org/beacon/the-beacon/what-s-new-in-wi-fi-security" office:target-frame-name="_blank" xlink:show="new"><text:span text:style-name="T957">https://www.wi-fi.org/beacon/the-beacon/what-s-new-in-wi-fi-security</text:span></text:a></text:p>
      <text:p text:style-name="Normal"><text:span text:style-name="T958">WPA3 provides improvements to the general Wi-Fi encryption, thanks to Simultaneous Authentication of Equals (</text:span><text:span text:style-name="T959">SAE</text:span><text:span text:style-name="T960">) replacing the Pre-Shared Key (PSK) authentication method used in prior WPA versions. SAE enables individuals or home users to set Wi-Fi passwords that are easier to remember and provide the same security protection even if the passwords are not complex enough.</text:span></text:p>
      <text:p text:style-name="Normal"><text:span text:style-name="T961">Question 13.</text:span><text:span text:style-name="T962">79</text:span></text:p>
      <text:p text:style-name="P963">How is a configuration change made to a wireless AP in lightweight mode?</text:p>
      <text:p text:style-name="P964">A. SSH connection to the management IP of the AP <text:line-break/>B. HTTPS connection directly to the out-of-band address of the AP<text:line-break/>C. CAPWAP/LWAPP connection via the parent WLC<text:line-break/>D. EoIP connection via the parent WLC</text:p>
      <text:p text:style-name="P965"> </text:p>
      <text:p text:style-name="Normal"><text:span text:style-name="T966">Answer:</text:span><text:span text:style-name="T967"> C</text:span></text:p>
      <text:p text:style-name="Normal"><text:span text:style-name="T968">Explanation</text:span></text:p>
      <text:p text:style-name="P969">Lightweight: The term ‘lightweight’ refers to the fact that these devices cannot work independently. A Cisco lightweight AP (LAP) has to join a Wireless LAN Controller (WLC) to function. LAP and WLC communicate with each other via a logical pair of CAPWAP tunnels.</text:p>
      <text:p text:style-name="Normal"><text:span text:style-name="T970">Question 13.</text:span><text:span text:style-name="T971">80</text:span></text:p>
      <text:soft-page-break/>
      <text:p text:style-name="P972">Which Rapid PVST+ feature should be configured on a switch port to immediately send traffic to a connected server as soon as it is active?</text:p>
      <text:p text:style-name="P973">A. loop guard<text:line-break/>B. BPDU guard<text:line-break/>C. uplinkfast<text:line-break/>D. portfast</text:p>
      <text:p text:style-name="P974"> </text:p>
      <text:p text:style-name="Normal"><text:span text:style-name="T975">Answer:</text:span><text:span text:style-name="T976"> D</text:span></text:p>
      <text:p text:style-name="Normal"><text:span text:style-name="T977">Explanation</text:span></text:p>
      <text:p text:style-name="P978">Note:</text:p>
      <text:p text:style-name="P979">Portfast is often configured on switch ports that connect to hosts. Interfaces with Portfast enabled will go to forwarding state immediately without passing the listening and learning state. Therefore it can save about 30 to 45 seconds to transition through these states.</text:p>
      <text:p text:style-name="P980">With BPDU Guard, when a PortFast receives a BPDU, it will be shut down to prevent a loop.</text:p>
      <text:p text:style-name="P981">UplinkFast is a Cisco specific feature that improves the convergence time of the Spanning-Tree Protocol (STP) in the event of the failure of an uplink.</text:p>
      <text:p text:style-name="Normal"><text:span text:style-name="T982">Question 13.</text:span><text:span text:style-name="T983">81</text:span></text:p>
      <text:p text:style-name="P984">How is noise defined in Wi-Fi?</text:p>
      <text:p text:style-name="P985">A. signals from other Wi-Fi networks that interfere with the local signal<text:line-break/>B. measured difference between the desired Wi-Fi signal and an interfering Wi-Fi signal<text:line-break/>C. ratio of signal-to-noise rating supplied by the wireless device<text:line-break/>D. any interference that is not Wi-Fi traffic that degrades the desired signal</text:p>
      <text:p text:style-name="P986"> </text:p>
      <text:p text:style-name="Normal"><text:span text:style-name="T987">Answer:</text:span><text:span text:style-name="T988"> D</text:span></text:p>
      <text:p text:style-name="Normal"><text:span text:style-name="T989">Explanation</text:span></text:p>
      <text:soft-page-break/>
      <text:p text:style-name="P990">Noise is any signal (interference) that is not WiFi traffic such as cordless phones, microwaves, radar, etc.</text:p>
      <text:p text:style-name="Normal"><text:span text:style-name="T991">Question 13.</text:span><text:span text:style-name="T992">82</text:span></text:p>
      <text:p text:style-name="P993">Refer to the exhibit.</text:p>
      <text:p text:style-name="Normal"><text:span text:style-name="T994"><draw:frame draw:style-name="a27" draw:name="Picture 37" text:anchor-type="as-char" svg:x="0in" svg:y="0in" svg:width="3.91667in" svg:height="0.54861in" style:rel-width="scale" style:rel-height="scale"><draw:image xlink:href="media/image28.jpeg" xlink:type="simple" xlink:show="embed" xlink:actuate="onLoad"/><svg:title/><svg:desc/></draw:frame></text:span></text:p>
      <text:p text:style-name="P995">Which set of commands must be applied to the two switches to configure an LACP Layer 2 EtherChannel?</text:p>
      <table:table table:style-name="Table996">
        <table:table-columns>
          <table:table-column table:style-name="TableColumn997"/>
          <table:table-column table:style-name="TableColumn998"/>
        </table:table-columns>
        <table:table-row table:style-name="TableRow999">
          <table:table-cell table:style-name="TableCell1000">
            <text:p text:style-name="P1001">Option A</text:p>
            <text:p text:style-name="P1002">SW1(config)#interface range f0/13 -14<text:line-break/>SW1(config-if-range)#channel-group 1 mode desirable<text:line-break/>SW2(config)#interface range f0/13 -14<text:line-break/>SW2(config-if-range)#channel-group 1 mode passive</text:p>
          </table:table-cell>
          <table:table-cell table:style-name="TableCell1003">
            <text:p text:style-name="P1004">Option B</text:p>
            <text:p text:style-name="P1005">SW1(config)#interface range f0/13 -14<text:line-break/>SW1(config-if-range)#channel-group 1 mode on<text:line-break/>SW2(config)#interface range f0/13 -14<text:line-break/>SW2(config-if-range)#channel-group 1 mode passive</text:p>
          </table:table-cell>
        </table:table-row>
        <table:table-row table:style-name="TableRow1006">
          <table:table-cell table:style-name="TableCell1007">
            <text:p text:style-name="P1008">Option C</text:p>
            <text:p text:style-name="P1009">SW1(config)#interface range f0/13 -14<text:line-break/>SW1(config-if-range)#channel-group 1 mode active<text:line-break/>SW2(config)#interface range f0/13 -14<text:line-break/>SW2(config-if-range)#channel-group 1 mode passive</text:p>
          </table:table-cell>
          <table:table-cell table:style-name="TableCell1010">
            <text:p text:style-name="P1011">Option D</text:p>
            <text:p text:style-name="P1012">SW1(config)#interface range f0/13 -14<text:line-break/>SW1(config-if-range)#channel-group 1 mode auto<text:line-break/>SW2(config)#interface range f0/13 -14<text:line-break/>SW2(config-if-range)#channel-group 1 mode passive</text:p>
          </table:table-cell>
        </table:table-row>
      </table:table>
      <text:p text:style-name="P1013">A. Option A<text:line-break/>B. Option B<text:line-break/>C. Option C<text:line-break/>D. Option D</text:p>
      <text:soft-page-break/>
      <text:p text:style-name="P1014"> </text:p>
      <text:p text:style-name="Normal"><text:span text:style-name="T1015">Answer:</text:span><text:span text:style-name="T1016"> C</text:span></text:p>
      <text:p text:style-name="Normal"><text:span text:style-name="T1017">Question 13.</text:span><text:span text:style-name="T1018">83</text:span></text:p>
      <text:p text:style-name="P1019">An administrator is configuring a Cisco Catalyst switch so that it will accept management connections only from hosts in the 203.0.113.0/24 network. Other traffic passing through the switch must transit without interruption. Which two configurations must the engineer apply to the router? (Choose two)</text:p>
      <text:p text:style-name="P1020">A. ip access-list extended Management<text:line-break/>permit tcp any range 22 23 203.0.113.0 0.0.0.255</text:p>
      <text:p text:style-name="P1021">B. line vty 0 15<text:line-break/>access-class Management in</text:p>
      <text:p text:style-name="P1022">C. ip access-list standard Management<text:line-break/>permit 203.0.113.0 255.255.255.0</text:p>
      <text:p text:style-name="P1023">D. interface range vlan 1 – 4094<text:line-break/>ip access-group Management out</text:p>
      <text:p text:style-name="P1024">E. ip access-list standard Management<text:line-break/>permit 203.0.113.0 0.0.0.255</text:p>
      <text:p text:style-name="P1025"> </text:p>
      <text:p text:style-name="Normal"><text:span text:style-name="T1026">Answer:</text:span><text:span text:style-name="T1027"> B E</text:span></text:p>
      <text:p text:style-name="Normal"><text:span text:style-name="T1028">Explanation</text:span></text:p>
      <text:p text:style-name="P1029">When applying access-list to line vty we must use “access-class”, not “access-group”.</text:p>
      <text:p text:style-name="P1030">The access-list command “permit tcp any range 22 23 203.0.113.0 0.0.0.255” means permit TCP traffic from any source with range 22 (SSH) and 23 (Telnet) to the destination 203.0.113.0/24 (not from source 203.0.113.0/24) so answer A is not correct.</text:p>
      <text:p text:style-name="P1031">Answer C is not correct as it used wrong wildcard mask 255.255.255.0. It should be 0.0.0.255.</text:p>
      <text:soft-page-break/>
      <text:p text:style-name="P1032">Answer D is not correct as other traffic will be dropped but the questions asks “Other traffic passing through the switch must transit without interruption”.</text:p>
      <text:p text:style-name="Normal"><text:span text:style-name="T1033">Question 13.</text:span><text:span text:style-name="T1034">84</text:span></text:p>
      <text:p text:style-name="P1035">Which interface on the WLC is limited to one when LAG is in use?</text:p>
      <text:p text:style-name="P1036">A. AP-manager<text:line-break/>B. virtual<text:line-break/>C. trunk<text:line-break/>D. service </text:p>
      <text:p text:style-name="P1037"> </text:p>
      <text:p text:style-name="Normal"><text:span text:style-name="T1038">Answer:</text:span><text:span text:style-name="T1039"> A</text:span></text:p>
      <text:p text:style-name="Normal"><text:span text:style-name="T1040">Explanation</text:span></text:p>
      <text:p text:style-name="Normal"><text:span text:style-name="T1041">If link aggregation (LAG) is enabled, there can be </text:span><text:span text:style-name="T1042">only one AP-manager interface</text:span><text:span text:style-name="T1043">.</text:span></text:p>
      <text:p text:style-name="Normal"><text:span text:style-name="T1044">Reference: </text:span><text:a xlink:href="https://www.cisco.com/c/en/us/td/docs/wireless/controller/7-5/configuration-guide/b_cg75/b_cg75_chapter_011100.html" office:target-frame-name="_blank" xlink:show="new"><text:span text:style-name="T1045">https://www.cisco.com/c/en/us/td/docs/wireless/controller/7-5/configuration-guide/b_cg75/b_cg75_chapter_011100.html</text:span></text:a></text:p>
      <text:p text:style-name="Normal"><text:span text:style-name="T1046">Question 13.</text:span><text:span text:style-name="T1047">85</text:span></text:p>
      <text:p text:style-name="P1048">Refer to the exhibit.</text:p>
      <text:p text:style-name="Normal"><text:span text:style-name="T1049"><draw:frame draw:style-name="a28" draw:name="Picture 36" text:anchor-type="as-char" svg:x="0in" svg:y="0in" svg:width="5.61806in" svg:height="2.97917in" style:rel-width="scale" style:rel-height="scale"><draw:image xlink:href="media/image29.jpeg" xlink:type="simple" xlink:show="embed" xlink:actuate="onLoad"/><svg:title/><svg:desc/></draw:frame></text:span></text:p>
      <text:soft-page-break/>
      <text:p text:style-name="P1050">Connections must be blocked from PC2 to the file server while still allowing PC2 to connect to other network hosts and devices. Which configuration must be used to complete the task?</text:p>
      <table:table table:style-name="Table1051">
        <table:table-columns>
          <table:table-column table:style-name="TableColumn1052"/>
          <table:table-column table:style-name="TableColumn1053"/>
        </table:table-columns>
        <table:table-row table:style-name="TableRow1054">
          <table:table-cell table:style-name="TableCell1055">
            <text:p text:style-name="P1056">Option A</text:p>
            <text:p text:style-name="P1057">R1(config)#access-list 1 permit 192.168.2.10<text:line-break/>R1(config)#access-list 1 deny any<text:line-break/>R1(config)#interface g0/1<text:line-break/>R1(config-if)#ip access-group 1 out</text:p>
          </table:table-cell>
          <table:table-cell table:style-name="TableCell1058">
            <text:p text:style-name="P1059">Option B</text:p>
            <text:p text:style-name="P1060">R2(config)#access-list 1 deny 192.168.2.10<text:line-break/>R2(config)#access-list 1 permit any<text:line-break/>R2(config)#interface g0/1<text:line-break/>R2(config-if)#ip access-group 1 out</text:p>
          </table:table-cell>
        </table:table-row>
        <table:table-row table:style-name="TableRow1061">
          <table:table-cell table:style-name="TableCell1062">
            <text:p text:style-name="P1063">Option C</text:p>
            <text:p text:style-name="P1064">R2(config)#access-list 1 permit 192.168.2.10<text:line-break/>R2(config)#access-list 1 deny 192.168.2.0 0.0.0.255<text:line-break/>R2(config)#interface g0/1<text:line-break/>R2(config)#ip access-group 1 in</text:p>
          </table:table-cell>
          <table:table-cell table:style-name="TableCell1065">
            <text:p text:style-name="P1066">Option D</text:p>
            <text:p text:style-name="P1067">R1(config)#access-list 1 deny 192.168.2.10<text:line-break/>R1(config)#access-list 1 permit 192.168.2.0 0.0.0.255<text:line-break/>R1(config)#interface g0/0<text:line-break/>R1(config-if)#ip access-group 1 in</text:p>
          </table:table-cell>
        </table:table-row>
      </table:table>
      <text:p text:style-name="P1068">A. Option A<text:line-break/>B. Option B<text:line-break/>C. Option C<text:line-break/>D. Option D</text:p>
      <text:p text:style-name="P1069"> </text:p>
      <text:p text:style-name="Normal"><text:span text:style-name="T1070">Answer:</text:span><text:span text:style-name="T1071"> B</text:span></text:p>
      <text:p text:style-name="Normal"><text:span text:style-name="T1072">Explanation</text:span></text:p>
      <text:p text:style-name="P1073">Block connection from R2 to Server -&gt; “deny 192.168.2.10” and we should apply to R2 which is closest to the Server so that it does not affect other devices.</text:p>
      <text:p text:style-name="Normal"><text:span text:style-name="T1074">Question 13.</text:span><text:span text:style-name="T1075">86</text:span></text:p>
      <text:p text:style-name="P1076">Which protocol does a REST API use to communicate?</text:p>
      <text:p text:style-name="P1077">A. HTTP<text:line-break/>B. STP<text:line-break/><text:soft-page-break/>C. SNMP<text:line-break/>D. SSH </text:p>
      <text:p text:style-name="P1078"> </text:p>
      <text:p text:style-name="Normal"><text:span text:style-name="T1079">Answer:</text:span><text:span text:style-name="T1080"> A</text:span></text:p>
      <text:p text:style-name="Normal"><text:span text:style-name="T1081">Question 13.</text:span><text:span text:style-name="T1082">87</text:span></text:p>
      <text:p text:style-name="P1083">What is a function of a firewall on an enterprise network?</text:p>
      <text:p text:style-name="P1084">A. It acts as the intermediary device between the enterprise and its ISP<text:line-break/>B. It serves as a default gateway to hosts on the internet<text:line-break/>C. It processes traffic based on stateless inspection<text:line-break/>D. It allows and denies ingress and egress traffic</text:p>
      <text:p text:style-name="P1085"> </text:p>
      <text:p text:style-name="Normal"><text:span text:style-name="T1086">Answer:</text:span><text:span text:style-name="T1087"> D</text:span></text:p>
      <text:p text:style-name="Normal"><text:span text:style-name="T1088">Question 13.</text:span><text:span text:style-name="T1089">88</text:span></text:p>
      <text:p text:style-name="P1090">Which encryption mode is used when a packet is sent from a site-to-site VPN connection where the source and destination IP address portion of a packet is unencrypted?</text:p>
      <text:p text:style-name="P1091">A. PPTP<text:line-break/>B. Secure Shell<text:line-break/>C. Transport<text:line-break/>D. PPPoE</text:p>
      <text:p text:style-name="P1092"> </text:p>
      <text:p text:style-name="Normal"><text:span text:style-name="T1093">Answer:</text:span><text:span text:style-name="T1094"> C</text:span></text:p>
      <text:p text:style-name="Normal"><text:span text:style-name="T1095">Explanation</text:span></text:p>
      <text:p text:style-name="P1096">Site-to-site VPN uses IPsec for encryption. IPsec has two modes: Tunnel and Transport mode.</text:p>
      <text:p text:style-name="Normal"><text:span text:style-name="T1097">Transport Mode</text:span><text:span text:style-name="T1098">: The main difference in transport mode is that it retains the original IP header. In other words, payload data transmitted within the original IP packet is protected, but not the IP header.</text:span></text:p>
      <text:soft-page-break/>
      <text:p text:style-name="Normal"><text:span text:style-name="T1099">Question 13.</text:span><text:span text:style-name="T1100">89</text:span></text:p>
      <text:p text:style-name="P1101">Refer to the exhibit.</text:p>
      <text:p text:style-name="Normal"><text:span text:style-name="T1102"><draw:frame draw:style-name="a29" draw:name="Picture 35" text:anchor-type="as-char" svg:x="0in" svg:y="0in" svg:width="5.90972in" svg:height="3.39583in" style:rel-width="scale" style:rel-height="scale"><draw:image xlink:href="media/image30.jpeg" xlink:type="simple" xlink:show="embed" xlink:actuate="onLoad"/><svg:title/><svg:desc/></draw:frame></text:span></text:p>
      <text:p text:style-name="P1103">An engineer just installed network 10.120.10.0/24. Which configuration must be applied to the R14 router to add the new network to its OSPF routing table?</text:p>
      <text:p text:style-name="P1104">A. router ospf 100<text:line-break/>network 10.120.10.0 0.0.0.255 area 0</text:p>
      <text:p text:style-name="P1105">B. router ospf 100 area 0<text:line-break/>network 10.120.10.0 0.0.0.255</text:p>
      <text:p text:style-name="P1106">C. router ospf 120<text:line-break/>network 10.120.10.0 255.255.255.0 area 0<text:line-break/>ip route 10.120.10.0 255.255.255.0 fa0/1</text:p>
      <text:p text:style-name="P1107">D. router ospf 100<text:line-break/>network 10.120.10.0 255.255.255.0 area 0</text:p>
      <text:p text:style-name="P1108"> </text:p>
      <text:p text:style-name="Normal"><text:span text:style-name="T1109">Answer:</text:span><text:span text:style-name="T1110"> A</text:span></text:p>
      <text:p text:style-name="Normal"><text:span text:style-name="T1111">Question 13.</text:span><text:span text:style-name="T1112">90</text:span></text:p>
      <text:soft-page-break/>
      <text:p text:style-name="P1113">Which key function is provided by the data plane?</text:p>
      <text:p text:style-name="P1114">A. making routing decisions<text:line-break/>B. exchanging routing table data<text:line-break/>C. forwarding traffic to the next hop<text:line-break/>D. originating packets</text:p>
      <text:p text:style-name="P1115"> </text:p>
      <text:p text:style-name="Normal"><text:span text:style-name="T1116">Answer:</text:span><text:span text:style-name="T1117"> C</text:span></text:p>
      <text:p text:style-name="Normal"><text:span text:style-name="T1118">Question 13.</text:span><text:span text:style-name="T1119">91</text:span></text:p>
      <text:p text:style-name="P1120">Refer to the exhibit.</text:p>
      <text:p text:style-name="Normal"><text:span text:style-name="T1121"><draw:frame draw:style-name="a30" draw:name="Picture 34" text:anchor-type="as-char" svg:x="0in" svg:y="0in" svg:width="3.44444in" svg:height="3.60417in" style:rel-width="scale" style:rel-height="scale"><draw:image xlink:href="media/image31.jpeg" xlink:type="simple" xlink:show="embed" xlink:actuate="onLoad"/><svg:title/><svg:desc/></draw:frame></text:span></text:p>
      <text:p text:style-name="P1122">An engineer configures interface fa0/1 on SW1 and SW2 to pass traffic from two different VLANs. For security reasons, company policy requires the native VLAN to be set to a nondefault value. Which configuration meets this requirement?</text:p>
      <table:table table:style-name="Table1123">
        <table:table-columns>
          <table:table-column table:style-name="TableColumn1124"/>
          <table:table-column table:style-name="TableColumn1125"/>
        </table:table-columns>
        <table:table-row table:style-name="TableRow1126">
          <table:table-cell table:style-name="TableCell1127">
            <text:p text:style-name="P1128">Option A</text:p>
            <text:p text:style-name="P1129">Switch(config-if)#switchport mode dynamic<text:line-break/>Switch(config-if}#switchport access<text:s/><text:soft-page-break/>vlan 100,105<text:line-break/>Switch(config-if)#switchport trunk native vlan 1</text:p>
          </table:table-cell>
          <table:table-cell table:style-name="TableCell1130">
            <text:p text:style-name="P1131">Option B</text:p>
            <text:p text:style-name="P1132">Switch(config-if)#switchport mode access<text:line-break/>Switch(config-if)#switchport trunk<text:s/><text:soft-page-break/>encapsulation dot1q<text:line-break/>Switch(config-if)#switchport access vlan 100.105<text:line-break/>Switch(config-if)#switchport trunk native vlan 3</text:p>
          </table:table-cell>
        </table:table-row>
        <text:soft-page-break/>
        <table:table-row table:style-name="TableRow1133">
          <table:table-cell table:style-name="TableCell1134">
            <text:p text:style-name="P1135">Option C</text:p>
            <text:p text:style-name="P1136">Switch(config-if)#switchport mode trunk<text:line-break/>Switch(config-if)# switch port trunk encapsulation isl<text:line-break/>Switch(config-if)#switchport trunk allowed vlan 100,105<text:line-break/>Switch(config-if)#s witch port trunk native vlan 1</text:p>
          </table:table-cell>
          <table:table-cell table:style-name="TableCell1137">
            <text:p text:style-name="P1138">Option D</text:p>
            <text:p text:style-name="P1139">Switch(config-if)#switchport mode trunk<text:line-break/>Switch(config-if)#switchport trunk encapsulation dot1q<text:line-break/>Switch(config-if)#switchport trunk allowed vlan 100,105<text:line-break/>Switch(config if)#switchport trunk native vlan 3</text:p>
          </table:table-cell>
        </table:table-row>
      </table:table>
      <text:p text:style-name="P1140">A. Option A<text:line-break/>B. Option B<text:line-break/>C. Option C<text:line-break/>D. Option D</text:p>
      <text:p text:style-name="P1141"> </text:p>
      <text:p text:style-name="Normal"><text:span text:style-name="T1142">Answer:</text:span><text:span text:style-name="T1143"> D</text:span></text:p>
      <text:p text:style-name="Normal"><text:span text:style-name="T1144">Explanation</text:span></text:p>
      <text:p text:style-name="P1145">The default value of native VLAN is 1 so we have to use another number for non-default value. Also there are two different VLANs so we have to set both ends to mode trunk.</text:p>
      <text:p text:style-name="Normal"><text:span text:style-name="T1146">Question 13.</text:span><text:span text:style-name="T1147">92</text:span></text:p>
      <text:p text:style-name="P1148">Which fact must the engineer consider when implementing syslog on a new network?</text:p>
      <text:p text:style-name="P1149">A. Syslog defines the software or hardware component that triggered the message<text:line-break/>B. By default, all message levels are sent to the syslog server<text:line-break/><text:soft-page-break/>C. The logging level defines the severity of a particular message<text:line-break/>D. There are 16 different logging levels (0-15)</text:p>
      <text:p text:style-name="P1150"> </text:p>
      <text:p text:style-name="Normal"><text:span text:style-name="T1151">Answer:</text:span><text:span text:style-name="T1152"> C</text:span></text:p>
      <text:p text:style-name="Normal"><text:span text:style-name="T1153">Question 13.</text:span><text:span text:style-name="T1154">93</text:span></text:p>
      <text:p text:style-name="P1155">Which cable type must be used when connecting a router and switch together using these criteria?</text:p>
      <text:p text:style-name="P1156">– Pins 1 and 2 are receivers and pins 3 and 6 are transmitters<text:line-break/>– Auto detection MDI-X is unavailable</text:p>
      <text:p text:style-name="P1157">A. crossover<text:line-break/>B. rollover<text:line-break/>C. console<text:line-break/>D. straight-through</text:p>
      <text:p text:style-name="P1158"> </text:p>
      <text:p text:style-name="Normal"><text:span text:style-name="T1159">Answer:</text:span><text:span text:style-name="T1160"> D</text:span></text:p>
      <text:p text:style-name="Normal"><text:span text:style-name="T1161">Explanation</text:span></text:p>
      <text:p text:style-name="Normal"><text:span text:style-name="T1162">When auto-MDIX is enabled, the interface automatically detects the required cable connection type (straight-through or crossover) and configures the connection appropriately. </text:span><text:span text:style-name="T1163">When connecting to switches without the auto-MDIX feature, straight-through cables must be used to connect to devices such as servers, workstations, or routers</text:span><text:span text:style-name="T1164"> and crossover cables must be used to connect to other switches or repeaters.</text:span></text:p>
      <text:p text:style-name="Normal"><text:span text:style-name="T1165">Reference: </text:span><text:a xlink:href="https://community.cisco.com/t5/switching/auto-mdix-in-switch/td-p/1603099" office:target-frame-name="_blank" xlink:show="new"><text:span text:style-name="T1166">https://community.cisco.com/t5/switching/auto-mdix-in-switch/td-p/1603099</text:span></text:a></text:p>
      <text:p text:style-name="Normal"><text:span text:style-name="T1167">(Without MDI-X) To specify when we use crossover cable or straight-through cable, we should remember:</text:span><text:span text:style-name="T1168"><text:line-break/></text:span><text:span text:style-name="T1169">Group 1:</text:span><text:span text:style-name="T1170"> Router, Host, Server</text:span><text:span text:style-name="T1171"><text:line-break/></text:span><text:span text:style-name="T1172">Group 2:</text:span><text:span text:style-name="T1173"> Hub, Switch</text:span><text:span text:style-name="T1174"><text:line-break/></text:span><text:soft-page-break/><text:span text:style-name="T1175">One device in Group 1 + One device in Group 2: use straight-through cable</text:span><text:span text:style-name="T1176"><text:line-break/>Two devices in the same group: use crossover cable</text:span></text:p>
      <text:p text:style-name="Normal"><text:span text:style-name="T1177">Question 13.</text:span><text:span text:style-name="T1178">94</text:span></text:p>
      <text:p text:style-name="P1179">Refer to the exhibit.</text:p>
      <text:p text:style-name="Normal"><text:span text:style-name="T1180"><draw:frame draw:style-name="a31" draw:name="Picture 33" text:anchor-type="as-char" svg:x="0in" svg:y="0in" svg:width="6.5in" svg:height="3.2in" style:rel-width="scale" style:rel-height="scale"><draw:image xlink:href="media/image32.jpeg" xlink:type="simple" xlink:show="embed" xlink:actuate="onLoad"/><svg:title/><svg:desc/></draw:frame></text:span></text:p>
      <text:p text:style-name="P1181">An administrator is configuring a new WLAN for a wireless network that has these requirements<text:line-break/>– Dual-band clients that connect to the WLAN must be directed to the 5-GHz spectrum<text:line-break/>– Wireless clients on this WLAN must be able to apply VLAN settings on the returned RADIUS attributes</text:p>
      <text:p text:style-name="P1182">Which two actions meet these requirements? (Choose two)</text:p>
      <text:p text:style-name="P1183">A. Enable the Client Band Select option.<text:line-break/>B. Enable the Coverage Hole Detection option<text:line-break/>C. Enable the Allow AAA Override option<text:line-break/>D. Set the MFP Client Protection option to Required<text:line-break/>E. Enable the Aironet IE option</text:p>
      <text:p text:style-name="P1184"> </text:p>
      <text:p text:style-name="Normal"><text:span text:style-name="T1185">Answer:</text:span><text:span text:style-name="T1186"> A C</text:span></text:p>
      <text:soft-page-break/>
      <text:p text:style-name="Normal"><text:span text:style-name="T1187">Explanation</text:span></text:p>
      <text:p text:style-name="P1188">Client Band Select is a new feature that encourages dual band clients to connect to 5 G-Hz networks. Band select is disabled by default. The Band Select function provides a better wireless experience for users.</text:p>
      <text:p text:style-name="Normal"><text:span text:style-name="T1189">The </text:span><text:span text:style-name="T1190">AAA Override</text:span><text:span text:style-name="T1191"> option of a WLAN enables you to configure the WLAN for identity networking. It enables</text:span><text:span text:style-name="T1192"><text:line-break/>you to apply VLAN tagging, Quality of Service (QoS), and Access Control Lists (ACLs) to individual clients</text:span><text:span text:style-name="T1193"><text:line-break/></text:span><text:span text:style-name="T1194">based on the returned RADIUS attributes</text:span><text:span text:style-name="T1195"> from the AAA server.</text:span></text:p>
      <text:p text:style-name="Normal"><text:span text:style-name="T1196">Reference: </text:span><text:a xlink:href="https://www.cisco.com/c/en/us/td/docs/wireless/controller/7-4/configuration/guides/consolidated/b_cg74_CONSOLIDATED/m_configuring_aaa_override.pdf" office:target-frame-name="_blank" xlink:show="new"><text:span text:style-name="T1197">https://www.cisco.com/c/en/us/td/docs/wireless/controller/7-4/configuration/guides/consolidated/b_cg74_CONSOLIDATED/m_configuring_aaa_override.pdf</text:span></text:a></text:p>
      <text:p text:style-name="Normal"><text:span text:style-name="T1198">Question 13.</text:span><text:span text:style-name="T1199">95</text:span></text:p>
      <text:p text:style-name="P1200">What is a similarity between global and unique local IPv6 addresses?</text:p>
      <text:p text:style-name="P1201">A. They are part of the multicast IPv6 group type<text:line-break/>B. They are routable on the global internet<text:line-break/>C. They are allocated by the same organization<text:line-break/>D. They use the same process for subnetting</text:p>
      <text:p text:style-name="P1202"> </text:p>
      <text:p text:style-name="Normal"><text:span text:style-name="T1203">Answer:</text:span><text:span text:style-name="T1204"> D</text:span></text:p>
      <text:p text:style-name="Normal"><text:span text:style-name="T1205">Question 13.</text:span><text:span text:style-name="T1206">96</text:span></text:p>
      <text:p text:style-name="P1207">What is the purpose of the service-set identifier?</text:p>
      <text:p text:style-name="P1208">A. It identifies a wireless network for a mobile device to connect<text:line-break/>B. It identifies the wired network to which a network device is connected<text:line-break/>C. It identifies the wireless network to which an application must connect<text:line-break/>D. It identifies the wired network to which a user device is connected</text:p>
      <text:p text:style-name="P1209"> </text:p>
      <text:p text:style-name="Normal"><text:span text:style-name="T1210">Answer:</text:span><text:span text:style-name="T1211"> A</text:span></text:p>
      <text:soft-page-break/>
      <text:p text:style-name="Normal"><text:span text:style-name="T1212">Explanation</text:span></text:p>
      <text:p text:style-name="P1213">The service-set identifier (SSID) is a unique identifier that wireless networking devices use to establish and maintain wireless connectivity.</text:p>
      <text:p text:style-name="Normal"><text:span text:style-name="T1214">Reference: </text:span><text:a xlink:href="https://www.cisco.com/c/en/us/td/docs/wireless/access_point/1300/12-2_15_JA/configuration/guide/o13ssid.html" office:target-frame-name="_blank" xlink:show="new"><text:span text:style-name="T1215">https://www.cisco.com/c/en/us/td/docs/wireless/access_point/1300/12-2_15_JA/configuration/guide/o13ssid.html</text:span></text:a></text:p>
      <text:p text:style-name="Normal"><text:span text:style-name="T1216">Question 13.</text:span><text:span text:style-name="T1217">97</text:span></text:p>
      <text:p text:style-name="P1218">In what way does a network supervisor reduce maintenance costs while maintaining network integrity on a traditionally managed network?</text:p>
      <text:p text:style-name="P1219">A. They install an automated network-monitoring system to provide early warning of network issues<text:line-break/>B. They employ additional network administrators to proactively manage the network<text:line-break/>C. They use automation to centralize network-management tasks<text:line-break/>D. They automate change-management processes that verify issue resolution</text:p>
      <text:p text:style-name="P1220"> </text:p>
      <text:p text:style-name="Normal"><text:span text:style-name="T1221">Answer:</text:span><text:span text:style-name="T1222"> C</text:span></text:p>
      <text:p text:style-name="Normal"><text:span text:style-name="T1223">Question 13.</text:span><text:span text:style-name="T1224">98</text:span></text:p>
      <text:p text:style-name="P1225">How does a network administrator securely manage an AP in lightweight mode?</text:p>
      <text:p text:style-name="P1226">A. using the WLC GUI via HTTPS<text:line-break/>B. using the CLI via an out-of-band connection<text:line-break/>C. using the CLI via a virtual interface with SSH<text:line-break/>D. using the AP GUI via an in-band SSH connection</text:p>
      <text:p text:style-name="P1227"> </text:p>
      <text:p text:style-name="Normal"><text:span text:style-name="T1228">Answer:</text:span><text:span text:style-name="T1229"> A</text:span></text:p>
      <text:p text:style-name="Normal"><text:span text:style-name="T1230">Question 13.</text:span><text:span text:style-name="T1231">99</text:span></text:p>
      <text:p text:style-name="P1232">Which protocol is implemented when an organization must verify network performance, troubleshoot issues and use an agent to communicate between monitoring tools and end devices?</text:p>
      <text:soft-page-break/>
      <text:p text:style-name="P1233">A. FTP<text:line-break/>B. NTP<text:line-break/>C. NFS<text:line-break/>D. SNMP</text:p>
      <text:p text:style-name="P1234"> </text:p>
      <text:p text:style-name="Normal"><text:span text:style-name="T1235">Answer:</text:span><text:span text:style-name="T1236"> D</text:span></text:p>
      <text:p text:style-name="Normal"><text:span text:style-name="T1237">Question 13.</text:span><text:span text:style-name="T1238">100</text:span></text:p>
      <text:p text:style-name="P1239">What is the difference between AAA authentication and authorization?</text:p>
      <text:p text:style-name="P1240">A. Authentication controls the system processes a user accesses, and authorization logs the activities the user initiates.<text:line-break/>B. Authentication identifies a user who is attempting to access a system, and authorization validates the user s password<text:line-break/>C. Authentication identifies and verifies a user who is attempting to access a system, and authorization controls the tasks the user performs<text:line-break/>D. Authentication verifies a username and password, and authorization handles the communication between the authentication agent and the user database</text:p>
      <text:p text:style-name="P1241"> </text:p>
      <text:p text:style-name="Normal"><text:span text:style-name="T1242">Answer:</text:span><text:span text:style-name="T1243"> C</text:span></text:p>
      <text:p text:style-name="Normal"><text:span text:style-name="T1244">Question 13.</text:span><text:span text:style-name="T1245">101</text:span></text:p>
      <text:p text:style-name="P1246">Which syslog message logging level displays interface line protocol up/down events?</text:p>
      <text:p text:style-name="P1247">A. informational<text:line-break/>B. alerts<text:line-break/>C. debugging<text:line-break/>D. notifications</text:p>
      <text:p text:style-name="P1248"> </text:p>
      <text:p text:style-name="Normal"><text:span text:style-name="T1249">Answer:</text:span><text:span text:style-name="T1250"> D</text:span></text:p>
      <text:p text:style-name="Normal"><text:span text:style-name="T1251">Explanation</text:span></text:p>
      <text:soft-page-break/>
      <text:p text:style-name="P1252">An example of interface line protocol down is shown below:</text:p>
      <table:table table:style-name="Table1253">
        <table:table-columns>
          <table:table-column table:style-name="TableColumn1254"/>
        </table:table-columns>
        <table:table-row table:style-name="TableRow1255">
          <table:table-cell table:style-name="TableCell1256">
            <text:p text:style-name="Normal"><text:span text:style-name="T1257">%LINEPROTO-</text:span><text:span text:style-name="T1258">5</text:span><text:span text:style-name="T1259">-UPDOWN: Line protocol on Interface FastEthernet0/1, changed state to down</text:span></text:p>
          </table:table-cell>
        </table:table-row>
      </table:table>
      <text:p text:style-name="Normal"><text:span text:style-name="T1260">Number 5 in the above message represents for the </text:span><text:span text:style-name="T1261">Notification</text:span><text:span text:style-name="T1262"> Level (Normal, but significant, conditions exist).</text:span></text:p>
      <text:p text:style-name="P1263">The Syslog levels are:</text:p>
      <table:table table:style-name="Table1264">
        <table:table-columns>
          <table:table-column table:style-name="TableColumn1265"/>
          <table:table-column table:style-name="TableColumn1266"/>
          <table:table-column table:style-name="TableColumn1267"/>
        </table:table-columns>
        <table:table-row table:style-name="TableRow1268">
          <table:table-cell table:style-name="TableCell1269">
            <text:p text:style-name="Normal"><text:span text:style-name="T1270">Level</text:span></text:p>
          </table:table-cell>
          <table:table-cell table:style-name="TableCell1271">
            <text:p text:style-name="Normal"><text:span text:style-name="T1272">Keyword</text:span></text:p>
          </table:table-cell>
          <table:table-cell table:style-name="TableCell1273">
            <text:p text:style-name="Normal"><text:span text:style-name="T1274">Description</text:span></text:p>
          </table:table-cell>
        </table:table-row>
        <table:table-row table:style-name="TableRow1275">
          <table:table-cell table:style-name="TableCell1276">
            <text:p text:style-name="P1277">0</text:p>
          </table:table-cell>
          <table:table-cell table:style-name="TableCell1278">
            <text:p text:style-name="P1279">emergencies</text:p>
          </table:table-cell>
          <table:table-cell table:style-name="TableCell1280">
            <text:p text:style-name="P1281">System is unusable</text:p>
          </table:table-cell>
        </table:table-row>
        <table:table-row table:style-name="TableRow1282">
          <table:table-cell table:style-name="TableCell1283">
            <text:p text:style-name="P1284">1</text:p>
          </table:table-cell>
          <table:table-cell table:style-name="TableCell1285">
            <text:p text:style-name="P1286">alerts</text:p>
          </table:table-cell>
          <table:table-cell table:style-name="TableCell1287">
            <text:p text:style-name="P1288">Immediate action is needed</text:p>
          </table:table-cell>
        </table:table-row>
        <table:table-row table:style-name="TableRow1289">
          <table:table-cell table:style-name="TableCell1290">
            <text:p text:style-name="P1291">2</text:p>
          </table:table-cell>
          <table:table-cell table:style-name="TableCell1292">
            <text:p text:style-name="P1293">critical</text:p>
          </table:table-cell>
          <table:table-cell table:style-name="TableCell1294">
            <text:p text:style-name="P1295">Critical conditions exist</text:p>
          </table:table-cell>
        </table:table-row>
        <table:table-row table:style-name="TableRow1296">
          <table:table-cell table:style-name="TableCell1297">
            <text:p text:style-name="P1298">3</text:p>
          </table:table-cell>
          <table:table-cell table:style-name="TableCell1299">
            <text:p text:style-name="P1300">errors</text:p>
          </table:table-cell>
          <table:table-cell table:style-name="TableCell1301">
            <text:p text:style-name="P1302">Error conditions exist</text:p>
          </table:table-cell>
        </table:table-row>
        <table:table-row table:style-name="TableRow1303">
          <table:table-cell table:style-name="TableCell1304">
            <text:p text:style-name="P1305">4</text:p>
          </table:table-cell>
          <table:table-cell table:style-name="TableCell1306">
            <text:p text:style-name="P1307">warnings</text:p>
          </table:table-cell>
          <table:table-cell table:style-name="TableCell1308">
            <text:p text:style-name="P1309">Warning conditions exist</text:p>
          </table:table-cell>
        </table:table-row>
        <table:table-row table:style-name="TableRow1310">
          <table:table-cell table:style-name="TableCell1311">
            <text:p text:style-name="P1312">5</text:p>
          </table:table-cell>
          <table:table-cell table:style-name="TableCell1313">
            <text:p text:style-name="P1314">notification</text:p>
          </table:table-cell>
          <table:table-cell table:style-name="TableCell1315">
            <text:p text:style-name="P1316">Normal, but significant, conditions exist</text:p>
          </table:table-cell>
        </table:table-row>
        <table:table-row table:style-name="TableRow1317">
          <table:table-cell table:style-name="TableCell1318">
            <text:p text:style-name="P1319">6</text:p>
          </table:table-cell>
          <table:table-cell table:style-name="TableCell1320">
            <text:p text:style-name="P1321">informational</text:p>
          </table:table-cell>
          <table:table-cell table:style-name="TableCell1322">
            <text:p text:style-name="P1323">Informational messages</text:p>
          </table:table-cell>
        </table:table-row>
        <table:table-row table:style-name="TableRow1324">
          <table:table-cell table:style-name="TableCell1325">
            <text:p text:style-name="P1326">7</text:p>
          </table:table-cell>
          <table:table-cell table:style-name="TableCell1327">
            <text:p text:style-name="P1328">debugging</text:p>
          </table:table-cell>
          <table:table-cell table:style-name="TableCell1329">
            <text:p text:style-name="P1330">Debugging messages</text:p>
          </table:table-cell>
        </table:table-row>
      </table:table>
      <text:p text:style-name="P1331">In fact there are two correct answers in this question: Notification and informational but the first answer is enough.</text:p>
      <text:p text:style-name="Normal"><text:span text:style-name="T1332">Question 13.</text:span><text:span text:style-name="T1333">102</text:span></text:p>
      <text:p text:style-name="P1334">Which standard is required when more than one distribution system port and only one IP address are configured for a Cisco WLC?</text:p>
      <text:p text:style-name="P1335">A. 802.3ad<text:line-break/>B. 802.1q<text:line-break/>C. 802.1d<text:line-break/>D. 802.1af</text:p>
      <text:soft-page-break/>
      <text:p text:style-name="P1336"> </text:p>
      <text:p text:style-name="Normal"><text:span text:style-name="T1337">Answer:</text:span><text:span text:style-name="T1338"> A</text:span></text:p>
      <text:p text:style-name="P13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ccnaexplanation" style:display-name="ccnaexplanation"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pinkandbold" style:display-name="pinkandbold" style:family="text" style:parent-style-name="DefaultParagraphFont"/>
    <style:style style:name="fontstyle0" style:display-name="fontstyle0" style:family="text" style:parent-style-name="DefaultParagraphFont"/>
    <style:style style:name="fontstyle2" style:display-name="fontstyle2"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consolas" style:display-name="consolas" style:family="paragraph" style:parent-style-name="Normal">
      <style:text-properties style:font-name="Consolas" style:font-name-complex="Times New Roman" fo:font-size="11pt" style:font-size-asian="11pt" style:font-size-complex="14pt" fo:hyphenate="false"/>
    </style:style>
    <style:style style:name="consolasChar" style:display-name="consolas Char" style:family="text" style:parent-style-name="DefaultParagraphFont">
      <style:text-properties style:font-name="Consolas" style:font-name-complex="Times New Roman"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13:57:00Z</meta:creation-date>
    <dc:date>2026-05-06T14:34:00Z</dc:date>
    <meta:template xlink:href="Normal.dotm" xlink:type="simple"/>
    <meta:editing-cycles>2</meta:editing-cycles>
    <meta:editing-duration>PT480S</meta:editing-duration>
    <meta:document-statistic meta:page-count="75" meta:paragraph-count="143" meta:word-count="10730" meta:character-count="71748" meta:row-count="509" meta:non-whitespace-character-count="61161"/>
  </office:meta>
</office:document-meta>
</file>