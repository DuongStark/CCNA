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jpeg" manifest:media-type="image/jpeg"/>
  <manifest:file-entry manifest:full-path="media/image38.jpeg" manifest:media-type="image/jpeg"/>
  <manifest:file-entry manifest:full-path="media/image39.jpeg" manifest:media-type="image/jpeg"/>
  <manifest:file-entry manifest:full-path="media/image1.jpeg" manifest:media-type="image/jpeg"/>
  <manifest:file-entry manifest:full-path="media/image41.jpeg" manifest:media-type="image/jpeg"/>
  <manifest:file-entry manifest:full-path="media/image42.jpeg" manifest:media-type="image/jpeg"/>
  <manifest:file-entry manifest:full-path="media/image43.jpeg" manifest:media-type="image/jpeg"/>
  <manifest:file-entry manifest:full-path="media/image44.jpeg" manifest:media-type="image/jpeg"/>
  <manifest:file-entry manifest:full-path="media/image45.jpeg" manifest:media-type="image/jpeg"/>
  <manifest:file-entry manifest:full-path="media/image40.jpeg" manifest:media-type="image/jpeg"/>
  <manifest:file-entry manifest:full-path="media/image47.jpeg" manifest:media-type="image/jpeg"/>
  <manifest:file-entry manifest:full-path="media/image48.jpeg" manifest:media-type="image/jpeg"/>
  <manifest:file-entry manifest:full-path="media/image49.jpeg" manifest:media-type="image/jpeg"/>
  <manifest:file-entry manifest:full-path="media/image2.jpeg" manifest:media-type="image/jpeg"/>
  <manifest:file-entry manifest:full-path="media/image3.jpeg" manifest:media-type="image/jpeg"/>
  <manifest:file-entry manifest:full-path="media/image4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automatic-styles>
    <style:style style:name="P1" style:parent-style-name="Cauhoi" style:master-page-name="MP0" style:family="paragraph">
      <style:paragraph-properties fo:break-before="page"/>
    </style:style>
    <style:style style:name="P2" style:parent-style-name="Normal" style:family="paragraph">
      <style:text-properties style:font-name="Times New Roman" style:font-name-complex="Times New Roman" fo:font-size="14pt" style:font-size-asian="14pt" style:font-size-complex="14pt"/>
    </style:style>
    <style:style style:name="T3" style:parent-style-name="DefaultParagraphFont" style:family="text">
      <style:text-properties style:font-name="Times New Roman" style:font-name-complex="Times New Roman" fo:font-size="14pt" style:font-size-asian="14pt" style:font-size-complex="14pt"/>
    </style:style>
    <style:style style:name="P4" style:parent-style-name="Normal" style:family="paragraph">
      <style:text-properties style:font-name="Times New Roman" style:font-name-complex="Times New Roman" fo:font-size="14pt" style:font-size-asian="14pt" style:font-size-complex="14pt"/>
    </style:style>
    <style:style style:name="T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 style:parent-style-name="Normal" style:family="paragraph">
      <style:text-properties style:font-name="Times New Roman" style:font-name-complex="Times New Roman" fo:font-size="14pt" style:font-size-asian="14pt" style:font-size-complex="14pt"/>
    </style:style>
    <style:style style:name="T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 style:parent-style-name="Normal" style:family="paragraph">
      <style:text-properties style:font-name="Times New Roman" style:font-name-complex="Times New Roman" fo:font-size="14pt" style:font-size-asian="14pt" style:font-size-complex="14pt"/>
    </style:style>
    <style:style style:name="T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 style:parent-style-name="Normal" style:family="paragraph">
      <style:text-properties style:font-name="Times New Roman" style:font-name-complex="Times New Roman" fo:font-size="14pt" style:font-size-asian="14pt" style:font-size-complex="14pt"/>
    </style:style>
    <style:style style:name="T12" style:parent-style-name="DefaultParagraphFont" style:family="text">
      <style:text-properties style:font-name="Times New Roman" style:font-name-complex="Times New Roman" fo:font-size="14pt" style:font-size-asian="14pt" style:font-size-complex="14pt"/>
    </style:style>
    <style:style style:name="P13" style:parent-style-name="Normal" style:family="paragraph">
      <style:text-properties style:font-name="Times New Roman" style:font-name-complex="Times New Roman" fo:font-size="14pt" style:font-size-asian="14pt" style:font-size-complex="14pt"/>
    </style:style>
    <style:style style:name="P14" style:parent-style-name="Normal" style:family="paragraph">
      <style:text-properties style:font-name="Times New Roman" style:font-name-complex="Times New Roman" fo:font-size="14pt" style:font-size-asian="14pt" style:font-size-complex="14pt"/>
    </style:style>
    <style:style style:name="P15" style:parent-style-name="Normal" style:family="paragraph">
      <style:text-properties style:font-name="Times New Roman" style:font-name-complex="Times New Roman" fo:font-size="14pt" style:font-size-asian="14pt" style:font-size-complex="14pt"/>
    </style:style>
    <style:style style:name="T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 style:parent-style-name="DefaultParagraphFont" style:family="text">
      <style:text-properties style:font-name="Times New Roman" style:font-name-complex="Times New Roman" fo:font-size="14pt" style:font-size-asian="14pt" style:font-size-complex="14pt"/>
    </style:style>
    <style:style style:name="T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 style:parent-style-name="Normal" style:family="paragraph">
      <style:text-properties style:font-name="Times New Roman" style:font-name-complex="Times New Roman" fo:font-size="14pt" style:font-size-asian="14pt" style:font-size-complex="14pt"/>
    </style:style>
    <style:style style:name="T21" style:parent-style-name="DefaultParagraphFont" style:family="text">
      <style:text-properties style:font-name="Times New Roman" style:font-name-complex="Times New Roman" fo:font-size="14pt" style:font-size-asian="14pt" style:font-size-complex="14pt"/>
    </style:style>
    <style:style style:name="P22" style:parent-style-name="Normal" style:family="paragraph">
      <style:text-properties style:font-name="Times New Roman" style:font-name-complex="Times New Roman" fo:font-size="14pt" style:font-size-asian="14pt" style:font-size-complex="14pt"/>
    </style:style>
    <style:style style:name="P23" style:parent-style-name="Normal" style:family="paragraph">
      <style:text-properties style:font-name="Times New Roman" style:font-name-complex="Times New Roman" fo:font-size="14pt" style:font-size-asian="14pt" style:font-size-complex="14pt"/>
    </style:style>
    <style:style style:name="T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 style:parent-style-name="DefaultParagraphFont" style:family="text">
      <style:text-properties style:font-name="Times New Roman" style:font-name-complex="Times New Roman" fo:font-size="14pt" style:font-size-asian="14pt" style:font-size-complex="14pt"/>
    </style:style>
    <style:style style:name="T27" style:parent-style-name="DefaultParagraphFont" style:family="text">
      <style:text-properties style:font-name="Times New Roman" style:font-name-complex="Times New Roman" fo:font-size="14pt" style:font-size-asian="14pt" style:font-size-complex="14pt"/>
    </style:style>
    <style:style style:name="T28" style:parent-style-name="DefaultParagraphFont" style:family="text">
      <style:text-properties style:font-name="Times New Roman" style:font-name-complex="Times New Roman" fo:font-size="14pt" style:font-size-asian="14pt" style:font-size-complex="14pt"/>
    </style:style>
    <style:style style:name="T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 style:parent-style-name="DefaultParagraphFont" style:family="text">
      <style:text-properties style:font-name="Times New Roman" style:font-name-complex="Times New Roman"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T32" style:parent-style-name="DefaultParagraphFont" style:family="text">
      <style:text-properties style:font-name="Times New Roman" style:font-name-complex="Times New Roman" fo:font-size="14pt" style:font-size-asian="14pt" style:font-size-complex="14pt"/>
    </style:style>
    <style:style style:name="T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 style:parent-style-name="DefaultParagraphFont" style:family="text">
      <style:text-properties style:font-name="Times New Roman" style:font-name-complex="Times New Roman" fo:font-size="14pt" style:font-size-asian="14pt" style:font-size-complex="14pt"/>
    </style:style>
    <style:style style:name="T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 style:parent-style-name="DefaultParagraphFont" style:family="text">
      <style:text-properties style:font-name="Times New Roman" style:font-name-complex="Times New Roman" fo:font-size="14pt" style:font-size-asian="14pt" style:font-size-complex="14pt"/>
    </style:style>
    <style:style style:name="T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 style:parent-style-name="DefaultParagraphFont" style:family="text">
      <style:text-properties style:font-name="Times New Roman" style:font-name-complex="Times New Roman" fo:font-size="14pt" style:font-size-asian="14pt" style:font-size-complex="14pt"/>
    </style:style>
    <style:style style:name="T39" style:parent-style-name="DefaultParagraphFont" style:family="text">
      <style:text-properties style:font-name="Times New Roman" style:font-name-complex="Times New Roman" fo:font-size="14pt" style:font-size-asian="14pt" style:font-size-complex="14pt"/>
    </style:style>
    <style:style style:name="T40" style:parent-style-name="Hyperlink" style:family="text">
      <style:text-properties style:font-name="Times New Roman" style:font-name-complex="Times New Roman" fo:font-size="14pt" style:font-size-asian="14pt" style:font-size-complex="14pt"/>
    </style:style>
    <style:style style:name="T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3" style:parent-style-name="Normal" style:family="paragraph">
      <style:text-properties style:font-name="Times New Roman" style:font-name-complex="Times New Roman" fo:font-size="14pt" style:font-size-asian="14pt" style:font-size-complex="14pt"/>
    </style:style>
    <style:style style:name="P44" style:parent-style-name="Normal" style:family="paragraph">
      <style:text-properties style:font-name="Times New Roman" style:font-name-complex="Times New Roman" fo:font-size="14pt" style:font-size-asian="14pt" style:font-size-complex="14pt"/>
    </style:style>
    <style:style style:name="P45" style:parent-style-name="Normal" style:family="paragraph">
      <style:text-properties style:font-name="Times New Roman" style:font-name-complex="Times New Roman" fo:font-size="14pt" style:font-size-asian="14pt" style:font-size-complex="14pt"/>
    </style:style>
    <style:style style:name="T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 style:parent-style-name="DefaultParagraphFont" style:family="text">
      <style:text-properties style:font-name="Times New Roman" style:font-name-complex="Times New Roman" fo:font-size="14pt" style:font-size-asian="14pt" style:font-size-complex="14pt"/>
    </style:style>
    <style:style style:name="T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 style:parent-style-name="DefaultParagraphFont" style:family="text">
      <style:text-properties style:font-name="Times New Roman" style:font-name-complex="Times New Roman" fo:font-size="14pt" style:font-size-asian="14pt" style:font-size-complex="14pt"/>
    </style:style>
    <style:style style:name="T50" style:parent-style-name="DefaultParagraphFont" style:family="text">
      <style:text-properties style:font-name="Times New Roman" style:font-name-complex="Times New Roman" fo:font-size="14pt" style:font-size-asian="14pt" style:font-size-complex="14pt"/>
    </style:style>
    <style:style style:name="T51"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52" style:parent-style-name="DefaultParagraphFont" style:family="text">
      <style:text-properties style:font-name="Times New Roman" style:font-name-complex="Times New Roman" fo:font-size="14pt" style:font-size-asian="14pt" style:font-size-complex="14pt"/>
    </style:style>
    <style:style style:name="T53" style:parent-style-name="DefaultParagraphFont" style:family="text">
      <style:text-properties style:font-name="Times New Roman" style:font-name-complex="Times New Roman" fo:font-size="14pt" style:font-size-asian="14pt" style:font-size-complex="14pt"/>
    </style:style>
    <style:style style:name="T54" style:parent-style-name="Hyperlink" style:family="text">
      <style:text-properties style:font-name="Times New Roman" style:font-name-complex="Times New Roman" fo:font-size="14pt" style:font-size-asian="14pt" style:font-size-complex="14pt"/>
    </style:style>
    <style:style style:name="T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6" style:parent-style-name="Normal" style:family="paragraph">
      <style:text-properties style:font-name="Times New Roman" style:font-name-complex="Times New Roman" fo:font-size="14pt" style:font-size-asian="14pt" style:font-size-complex="14pt"/>
    </style:style>
    <style:style style:name="T57" style:parent-style-name="DefaultParagraphFont" style:family="text">
      <style:text-properties style:font-name="Times New Roman" style:font-name-complex="Times New Roman" fo:font-size="14pt" style:font-size-asian="14pt" style:font-size-complex="14pt"/>
    </style:style>
    <style:style style:name="T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 style:parent-style-name="DefaultParagraphFont" style:family="text">
      <style:text-properties style:font-name="Times New Roman" style:font-name-complex="Times New Roman" fo:font-size="14pt" style:font-size-asian="14pt" style:font-size-complex="14pt"/>
    </style:style>
    <style:style style:name="T60" style:parent-style-name="DefaultParagraphFont" style:family="text">
      <style:text-properties style:font-name="Times New Roman" style:font-name-complex="Times New Roman" fo:font-size="14pt" style:font-size-asian="14pt" style:font-size-complex="14pt"/>
    </style:style>
    <style:style style:name="T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 style:parent-style-name="DefaultParagraphFont" style:family="text">
      <style:text-properties style:font-name="Times New Roman" style:font-name-complex="Times New Roman" fo:font-size="14pt" style:font-size-asian="14pt" style:font-size-complex="14pt"/>
    </style:style>
    <style:style style:name="T6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64" style:parent-style-name="DefaultParagraphFont" style:family="text">
      <style:text-properties style:font-name="Times New Roman" style:font-name-complex="Times New Roman" fo:font-size="14pt" style:font-size-asian="14pt" style:font-size-complex="14pt"/>
    </style:style>
    <style:style style:name="P65" style:parent-style-name="Normal" style:family="paragraph">
      <style:text-properties style:font-name="Times New Roman" style:font-name-complex="Times New Roman" fo:font-size="14pt" style:font-size-asian="14pt" style:font-size-complex="14pt"/>
    </style:style>
    <style:style style:name="T66" style:parent-style-name="DefaultParagraphFont" style:family="text">
      <style:text-properties style:font-name="Times New Roman" style:font-name-complex="Times New Roman" fo:font-size="14pt" style:font-size-asian="14pt" style:font-size-complex="14pt"/>
    </style:style>
    <style:style style:name="T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 style:parent-style-name="DefaultParagraphFont" style:family="text">
      <style:text-properties style:font-name="Times New Roman" style:font-name-complex="Times New Roman" fo:font-size="14pt" style:font-size-asian="14pt" style:font-size-complex="14pt"/>
    </style:style>
    <style:style style:name="T69" style:parent-style-name="DefaultParagraphFont" style:family="text">
      <style:text-properties style:font-name="Times New Roman" style:font-name-complex="Times New Roman" fo:font-size="14pt" style:font-size-asian="14pt" style:font-size-complex="14pt"/>
    </style:style>
    <style:style style:name="T70" style:parent-style-name="DefaultParagraphFont" style:family="text">
      <style:text-properties style:font-name="Times New Roman" style:font-name-complex="Times New Roman" fo:font-size="14pt" style:font-size-asian="14pt" style:font-size-complex="14pt"/>
    </style:style>
    <style:style style:name="T71" style:parent-style-name="DefaultParagraphFont" style:family="text">
      <style:text-properties style:font-name="Times New Roman" style:font-name-complex="Times New Roman" fo:font-size="14pt" style:font-size-asian="14pt" style:font-size-complex="14pt"/>
    </style:style>
    <style:style style:name="T72" style:parent-style-name="DefaultParagraphFont" style:family="text">
      <style:text-properties style:font-name="Times New Roman" style:font-name-complex="Times New Roman" fo:font-size="14pt" style:font-size-asian="14pt" style:font-size-complex="14pt"/>
    </style:style>
    <style:style style:name="T73" style:parent-style-name="DefaultParagraphFont" style:family="text">
      <style:text-properties style:font-name="Times New Roman" style:font-name-complex="Times New Roman" fo:font-size="14pt" style:font-size-asian="14pt" style:font-size-complex="14pt"/>
    </style:style>
    <style:style style:name="T74" style:parent-style-name="Hyperlink" style:family="text">
      <style:text-properties style:font-name="Times New Roman" style:font-name-complex="Times New Roman" fo:font-size="14pt" style:font-size-asian="14pt" style:font-size-complex="14pt"/>
    </style:style>
    <style:style style:name="T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7" style:parent-style-name="Normal" style:family="paragraph">
      <style:text-properties style:font-name="Times New Roman" style:font-name-complex="Times New Roman" fo:font-size="14pt" style:font-size-asian="14pt" style:font-size-complex="14pt"/>
    </style:style>
    <style:style style:name="P78" style:parent-style-name="Normal" style:family="paragraph">
      <style:text-properties style:font-name="Times New Roman" style:font-name-complex="Times New Roman" fo:font-size="14pt" style:font-size-asian="14pt" style:font-size-complex="14pt"/>
    </style:style>
    <style:style style:name="P79" style:parent-style-name="Normal" style:family="paragraph">
      <style:text-properties style:font-name="Times New Roman" style:font-name-complex="Times New Roman" fo:font-size="14pt" style:font-size-asian="14pt" style:font-size-complex="14pt"/>
    </style:style>
    <style:style style:name="T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1" style:parent-style-name="DefaultParagraphFont" style:family="text">
      <style:text-properties style:font-name="Times New Roman" style:font-name-complex="Times New Roman" fo:font-size="14pt" style:font-size-asian="14pt" style:font-size-complex="14pt"/>
    </style:style>
    <style:style style:name="T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4" style:parent-style-name="Normal" style:family="paragraph">
      <style:text-properties style:font-name="Times New Roman" style:font-name-complex="Times New Roman" fo:font-size="14pt" style:font-size-asian="14pt" style:font-size-complex="14pt"/>
    </style:style>
    <style:style style:name="P85" style:parent-style-name="Normal" style:family="paragraph">
      <style:text-properties style:font-name="Times New Roman" style:font-name-complex="Times New Roman" fo:font-size="14pt" style:font-size-asian="14pt" style:font-size-complex="14pt"/>
    </style:style>
    <style:style style:name="P86" style:parent-style-name="Normal" style:family="paragraph">
      <style:text-properties style:font-name="Times New Roman" style:font-name-complex="Times New Roman" fo:font-size="14pt" style:font-size-asian="14pt" style:font-size-complex="14pt"/>
    </style:style>
    <style:style style:name="T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 style:parent-style-name="DefaultParagraphFont" style:family="text">
      <style:text-properties style:font-name="Times New Roman" style:font-name-complex="Times New Roman" fo:font-size="14pt" style:font-size-asian="14pt" style:font-size-complex="14pt"/>
    </style:style>
    <style:style style:name="T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1" style:parent-style-name="Normal" style:family="paragraph">
      <style:text-properties style:font-name="Times New Roman" style:font-name-complex="Times New Roman" fo:font-size="14pt" style:font-size-asian="14pt" style:font-size-complex="14pt"/>
    </style:style>
    <style:style style:name="T92" style:parent-style-name="DefaultParagraphFont" style:family="text">
      <style:text-properties style:font-name="Times New Roman" style:font-name-complex="Times New Roman" fo:font-size="14pt" style:font-size-asian="14pt" style:font-size-complex="14pt"/>
    </style:style>
    <style:style style:name="P93" style:parent-style-name="Normal" style:family="paragraph">
      <style:text-properties style:font-name="Times New Roman" style:font-name-complex="Times New Roman" fo:font-size="14pt" style:font-size-asian="14pt" style:font-size-complex="14pt"/>
    </style:style>
    <style:style style:name="P94" style:parent-style-name="Normal" style:family="paragraph">
      <style:text-properties style:font-name="Times New Roman" style:font-name-complex="Times New Roman" fo:font-size="14pt" style:font-size-asian="14pt" style:font-size-complex="14pt"/>
    </style:style>
    <style:style style:name="P95" style:parent-style-name="Normal" style:family="paragraph">
      <style:text-properties style:font-name="Times New Roman" style:font-name-complex="Times New Roman" fo:font-size="14pt" style:font-size-asian="14pt" style:font-size-complex="14pt"/>
    </style:style>
    <style:style style:name="T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 style:parent-style-name="DefaultParagraphFont" style:family="text">
      <style:text-properties style:font-name="Times New Roman" style:font-name-complex="Times New Roman" fo:font-size="14pt" style:font-size-asian="14pt" style:font-size-complex="14pt"/>
    </style:style>
    <style:style style:name="T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9" style:parent-style-name="Normal" style:family="paragraph">
      <style:text-properties style:font-name="Times New Roman" style:font-name-complex="Times New Roman" fo:font-size="14pt" style:font-size-asian="14pt" style:font-size-complex="14pt"/>
    </style:style>
    <style:style style:name="P100" style:parent-style-name="Normal" style:family="paragraph">
      <style:text-properties style:font-name="Times New Roman" style:font-name-complex="Times New Roman" fo:font-size="14pt" style:font-size-asian="14pt" style:font-size-complex="14pt"/>
    </style:style>
    <style:style style:name="T1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3" style:parent-style-name="Normal" style:family="paragraph">
      <style:text-properties style:font-name="Times New Roman" style:font-name-complex="Times New Roman" fo:font-size="14pt" style:font-size-asian="14pt" style:font-size-complex="14pt"/>
    </style:style>
    <style:style style:name="T104" style:parent-style-name="DefaultParagraphFont" style:family="text">
      <style:text-properties style:font-name="Times New Roman" style:font-name-complex="Times New Roman" fo:font-size="14pt" style:font-size-asian="14pt" style:font-size-complex="14pt"/>
    </style:style>
    <style:style style:name="P105" style:parent-style-name="Normal" style:family="paragraph">
      <style:text-properties style:font-name="Consolas" style:font-name-complex="Times New Roman" fo:font-size="11pt" style:font-size-asian="11pt" style:font-size-complex="11pt"/>
    </style:style>
    <style:style style:name="P106" style:parent-style-name="Normal" style:family="paragraph">
      <style:text-properties style:font-name="Consolas" style:font-name-complex="Times New Roman" fo:font-size="11pt" style:font-size-asian="11pt" style:font-size-complex="11pt"/>
    </style:style>
    <style:style style:name="P107" style:parent-style-name="Normal" style:family="paragraph">
      <style:text-properties style:font-name="Consolas" style:font-name-complex="Times New Roman" fo:font-size="11pt" style:font-size-asian="11pt" style:font-size-complex="11pt"/>
    </style:style>
    <style:style style:name="P108" style:parent-style-name="Normal" style:family="paragraph">
      <style:text-properties style:font-name="Consolas" style:font-name-complex="Times New Roman" fo:font-size="11pt" style:font-size-asian="11pt" style:font-size-complex="11pt"/>
    </style:style>
    <style:style style:name="P109" style:parent-style-name="Normal" style:family="paragraph">
      <style:text-properties style:font-name="Consolas" style:font-name-complex="Times New Roman" fo:font-size="11pt" style:font-size-asian="11pt" style:font-size-complex="11pt"/>
    </style:style>
    <style:style style:name="P110" style:parent-style-name="Normal" style:family="paragraph">
      <style:text-properties style:font-name="Consolas" style:font-name-complex="Times New Roman" fo:font-size="11pt" style:font-size-asian="11pt" style:font-size-complex="11pt"/>
    </style:style>
    <style:style style:name="P111" style:parent-style-name="Normal" style:family="paragraph">
      <style:text-properties style:font-name="Consolas" style:font-name-complex="Times New Roman" fo:font-size="11pt" style:font-size-asian="11pt" style:font-size-complex="11pt"/>
    </style:style>
    <style:style style:name="P112" style:parent-style-name="Normal" style:family="paragraph">
      <style:text-properties style:font-name="Consolas" style:font-name-complex="Times New Roman" fo:font-size="11pt" style:font-size-asian="11pt" style:font-size-complex="11pt"/>
    </style:style>
    <style:style style:name="P113" style:parent-style-name="Normal" style:family="paragraph">
      <style:text-properties style:font-name="Consolas" style:font-name-complex="Times New Roman" fo:font-size="11pt" style:font-size-asian="11pt" style:font-size-complex="11pt"/>
    </style:style>
    <style:style style:name="P114" style:parent-style-name="Normal" style:family="paragraph">
      <style:text-properties style:font-name="Consolas" style:font-name-complex="Times New Roman" fo:font-size="11pt" style:font-size-asian="11pt" style:font-size-complex="11pt"/>
    </style:style>
    <style:style style:name="P115" style:parent-style-name="Normal" style:family="paragraph">
      <style:text-properties style:font-name="Consolas" style:font-name-complex="Times New Roman" fo:font-size="11pt" style:font-size-asian="11pt" style:font-size-complex="11pt"/>
    </style:style>
    <style:style style:name="P116" style:parent-style-name="Normal" style:family="paragraph">
      <style:text-properties style:font-name="Consolas" style:font-name-complex="Times New Roman" fo:font-size="11pt" style:font-size-asian="11pt" style:font-size-complex="11pt"/>
    </style:style>
    <style:style style:name="P117" style:parent-style-name="Normal" style:family="paragraph">
      <style:text-properties style:font-name="Consolas" style:font-name-complex="Times New Roman" fo:font-size="11pt" style:font-size-asian="11pt" style:font-size-complex="11pt"/>
    </style:style>
    <style:style style:name="P118" style:parent-style-name="Normal" style:family="paragraph">
      <style:text-properties style:font-name="Consolas" style:font-name-complex="Times New Roman" fo:font-size="11pt" style:font-size-asian="11pt" style:font-size-complex="11pt"/>
    </style:style>
    <style:style style:name="P119" style:parent-style-name="Normal" style:family="paragraph">
      <style:text-properties style:font-name="Consolas" style:font-name-complex="Times New Roman" fo:font-size="11pt" style:font-size-asian="11pt" style:font-size-complex="11pt"/>
    </style:style>
    <style:style style:name="P120" style:parent-style-name="Normal" style:family="paragraph">
      <style:text-properties style:font-name="Consolas" style:font-name-complex="Times New Roman" fo:font-size="11pt" style:font-size-asian="11pt" style:font-size-complex="11pt" fo:language="it" fo:country="IT"/>
    </style:style>
    <style:style style:name="P121" style:parent-style-name="Normal" style:family="paragraph">
      <style:text-properties style:font-name="Consolas" style:font-name-complex="Times New Roman" fo:font-size="11pt" style:font-size-asian="11pt" style:font-size-complex="11pt" fo:language="it" fo:country="IT"/>
    </style:style>
    <style:style style:name="P122" style:parent-style-name="Normal" style:family="paragraph">
      <style:text-properties style:font-name="Consolas" style:font-name-complex="Times New Roman" fo:font-size="11pt" style:font-size-asian="11pt" style:font-size-complex="11pt" fo:language="it" fo:country="IT"/>
    </style:style>
    <style:style style:name="P123" style:parent-style-name="Normal" style:family="paragraph">
      <style:text-properties style:font-name="Consolas" style:font-name-complex="Times New Roman" fo:font-size="11pt" style:font-size-asian="11pt" style:font-size-complex="11pt"/>
    </style:style>
    <style:style style:name="P124" style:parent-style-name="Normal" style:family="paragraph">
      <style:text-properties style:font-name="Consolas" style:font-name-complex="Times New Roman" fo:font-size="11pt" style:font-size-asian="11pt" style:font-size-complex="11pt"/>
    </style:style>
    <style:style style:name="P125" style:parent-style-name="Normal" style:family="paragraph">
      <style:text-properties style:font-name="Consolas" style:font-name-complex="Times New Roman" fo:font-size="11pt" style:font-size-asian="11pt" style:font-size-complex="11pt"/>
    </style:style>
    <style:style style:name="P126" style:parent-style-name="Normal" style:family="paragraph">
      <style:text-properties style:font-name="Consolas" style:font-name-complex="Times New Roman" fo:font-size="11pt" style:font-size-asian="11pt" style:font-size-complex="11pt"/>
    </style:style>
    <style:style style:name="P127" style:parent-style-name="Normal" style:family="paragraph">
      <style:text-properties style:font-name="Times New Roman" style:font-name-complex="Times New Roman" fo:font-size="14pt" style:font-size-asian="14pt" style:font-size-complex="14pt"/>
    </style:style>
    <style:style style:name="P128" style:parent-style-name="Normal" style:family="paragraph">
      <style:text-properties style:font-name="Times New Roman" style:font-name-complex="Times New Roman" fo:font-size="14pt" style:font-size-asian="14pt" style:font-size-complex="14pt"/>
    </style:style>
    <style:style style:name="P129" style:parent-style-name="Normal" style:family="paragraph">
      <style:text-properties style:font-name="Times New Roman" style:font-name-complex="Times New Roman" fo:font-size="14pt" style:font-size-asian="14pt" style:font-size-complex="14pt"/>
    </style:style>
    <style:style style:name="T1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1" style:parent-style-name="DefaultParagraphFont" style:family="text">
      <style:text-properties style:font-name="Times New Roman" style:font-name-complex="Times New Roman" fo:font-size="14pt" style:font-size-asian="14pt" style:font-size-complex="14pt"/>
    </style:style>
    <style:style style:name="T1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3" style:parent-style-name="Normal" style:family="paragraph">
      <style:text-properties style:font-name="Times New Roman" style:font-name-complex="Times New Roman" fo:font-size="14pt" style:font-size-asian="14pt" style:font-size-complex="14pt"/>
    </style:style>
    <style:style style:name="T1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6" style:parent-style-name="Normal" style:family="paragraph">
      <style:text-properties style:font-name="Times New Roman" style:font-name-complex="Times New Roman" fo:font-size="14pt" style:font-size-asian="14pt" style:font-size-complex="14pt"/>
    </style:style>
    <style:style style:name="P137" style:parent-style-name="Normal" style:family="paragraph">
      <style:text-properties style:font-name="Times New Roman" style:font-name-complex="Times New Roman" fo:font-size="14pt" style:font-size-asian="14pt" style:font-size-complex="14pt"/>
    </style:style>
    <style:style style:name="P138" style:parent-style-name="Normal" style:family="paragraph">
      <style:text-properties style:font-name="Times New Roman" style:font-name-complex="Times New Roman" fo:font-size="14pt" style:font-size-asian="14pt" style:font-size-complex="14pt"/>
    </style:style>
    <style:style style:name="T1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0" style:parent-style-name="DefaultParagraphFont" style:family="text">
      <style:text-properties style:font-name="Times New Roman" style:font-name-complex="Times New Roman" fo:font-size="14pt" style:font-size-asian="14pt" style:font-size-complex="14pt"/>
    </style:style>
    <style:style style:name="T1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2" style:parent-style-name="DefaultParagraphFont" style:family="text">
      <style:text-properties style:font-name="Times New Roman" style:font-name-complex="Times New Roman" fo:font-size="14pt" style:font-size-asian="14pt" style:font-size-complex="14pt"/>
    </style:style>
    <style:style style:name="T14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44" style:parent-style-name="DefaultParagraphFont" style:family="text">
      <style:text-properties style:font-name="Times New Roman" style:font-name-complex="Times New Roman" fo:font-size="14pt" style:font-size-asian="14pt" style:font-size-complex="14pt"/>
    </style:style>
    <style:style style:name="T145" style:parent-style-name="DefaultParagraphFont" style:family="text">
      <style:text-properties style:font-name="Times New Roman" style:font-name-complex="Times New Roman" fo:font-size="14pt" style:font-size-asian="14pt" style:font-size-complex="14pt"/>
    </style:style>
    <style:style style:name="T146" style:parent-style-name="Hyperlink" style:family="text">
      <style:text-properties style:font-name="Times New Roman" style:font-name-complex="Times New Roman" fo:font-size="14pt" style:font-size-asian="14pt" style:font-size-complex="14pt"/>
    </style:style>
    <style:style style:name="T1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9" style:parent-style-name="Normal" style:family="paragraph">
      <style:text-properties style:font-name="Times New Roman" style:font-name-complex="Times New Roman" fo:font-size="14pt" style:font-size-asian="14pt" style:font-size-complex="14pt"/>
    </style:style>
    <style:style style:name="T150" style:parent-style-name="DefaultParagraphFont" style:family="text">
      <style:text-properties style:font-name="Times New Roman" style:font-name-complex="Times New Roman" fo:font-size="14pt" style:font-size-asian="14pt" style:font-size-complex="14pt"/>
    </style:style>
    <style:style style:name="P151" style:parent-style-name="Normal" style:family="paragraph">
      <style:text-properties style:font-name="Times New Roman" style:font-name-complex="Times New Roman" fo:font-size="14pt" style:font-size-asian="14pt" style:font-size-complex="14pt"/>
    </style:style>
    <style:style style:name="T1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4" style:parent-style-name="DefaultParagraphFont" style:family="text">
      <style:text-properties style:font-name="Times New Roman" style:font-name-complex="Times New Roman" fo:font-size="14pt" style:font-size-asian="14pt" style:font-size-complex="14pt"/>
    </style:style>
    <style:style style:name="T155" style:parent-style-name="DefaultParagraphFont" style:family="text">
      <style:text-properties style:font-name="Times New Roman" style:font-name-complex="Times New Roman" fo:font-size="14pt" style:font-size-asian="14pt" style:font-size-complex="14pt"/>
    </style:style>
    <style:style style:name="T1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7" style:parent-style-name="DefaultParagraphFont" style:family="text">
      <style:text-properties style:font-name="Times New Roman" style:font-name-complex="Times New Roman" fo:font-size="14pt" style:font-size-asian="14pt" style:font-size-complex="14pt"/>
    </style:style>
    <style:style style:name="T158" style:parent-style-name="DefaultParagraphFont" style:family="text">
      <style:text-properties style:font-name="Times New Roman" style:font-name-complex="Times New Roman" fo:font-size="14pt" style:font-size-asian="14pt" style:font-size-complex="14pt"/>
    </style:style>
    <style:style style:name="T1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0" style:parent-style-name="DefaultParagraphFont" style:family="text">
      <style:text-properties style:font-name="Times New Roman" style:font-name-complex="Times New Roman" fo:font-size="14pt" style:font-size-asian="14pt" style:font-size-complex="14pt"/>
    </style:style>
    <style:style style:name="T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2" style:parent-style-name="DefaultParagraphFont" style:family="text">
      <style:text-properties style:font-name="Times New Roman" style:font-name-complex="Times New Roman" fo:font-size="14pt" style:font-size-asian="14pt" style:font-size-complex="14pt"/>
    </style:style>
    <style:style style:name="P163" style:parent-style-name="Normal" style:family="paragraph">
      <style:text-properties style:font-name="Times New Roman" style:font-name-complex="Times New Roman" fo:font-size="14pt" style:font-size-asian="14pt" style:font-size-complex="14pt"/>
    </style:style>
    <style:style style:name="T1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6" style:parent-style-name="Normal" style:family="paragraph">
      <style:text-properties style:font-name="Times New Roman" style:font-name-complex="Times New Roman" fo:font-size="14pt" style:font-size-asian="14pt" style:font-size-complex="14pt"/>
    </style:style>
    <style:style style:name="P167" style:parent-style-name="Normal" style:family="paragraph">
      <style:text-properties style:font-name="Times New Roman" style:font-name-complex="Times New Roman" fo:font-size="14pt" style:font-size-asian="14pt" style:font-size-complex="14pt"/>
    </style:style>
    <style:style style:name="P168" style:parent-style-name="Normal" style:family="paragraph">
      <style:text-properties style:font-name="Times New Roman" style:font-name-complex="Times New Roman" fo:font-size="14pt" style:font-size-asian="14pt" style:font-size-complex="14pt"/>
    </style:style>
    <style:style style:name="T1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0" style:parent-style-name="DefaultParagraphFont" style:family="text">
      <style:text-properties style:font-name="Times New Roman" style:font-name-complex="Times New Roman" fo:font-size="14pt" style:font-size-asian="14pt" style:font-size-complex="14pt"/>
    </style:style>
    <style:style style:name="T1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3" style:parent-style-name="Normal" style:family="paragraph">
      <style:text-properties style:font-name="Times New Roman" style:font-name-complex="Times New Roman" fo:font-size="14pt" style:font-size-asian="14pt" style:font-size-complex="14pt"/>
    </style:style>
    <style:style style:name="T174" style:parent-style-name="DefaultParagraphFont" style:family="text">
      <style:text-properties style:font-name="Times New Roman" style:font-name-complex="Times New Roman" fo:font-size="14pt" style:font-size-asian="14pt" style:font-size-complex="14pt"/>
    </style:style>
    <style:style style:name="P175" style:parent-style-name="Normal" style:family="paragraph">
      <style:text-properties style:font-name="Times New Roman" style:font-name-complex="Times New Roman" fo:font-size="14pt" style:font-size-asian="14pt" style:font-size-complex="14pt"/>
    </style:style>
    <style:style style:name="P176" style:parent-style-name="Normal" style:family="paragraph">
      <style:text-properties style:font-name="Times New Roman" style:font-name-complex="Times New Roman" fo:font-size="14pt" style:font-size-asian="14pt" style:font-size-complex="14pt"/>
    </style:style>
    <style:style style:name="P177" style:parent-style-name="Normal" style:family="paragraph">
      <style:text-properties style:font-name="Times New Roman" style:font-name-complex="Times New Roman" fo:font-size="14pt" style:font-size-asian="14pt" style:font-size-complex="14pt"/>
    </style:style>
    <style:style style:name="T1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9" style:parent-style-name="DefaultParagraphFont" style:family="text">
      <style:text-properties style:font-name="Times New Roman" style:font-name-complex="Times New Roman" fo:font-size="14pt" style:font-size-asian="14pt" style:font-size-complex="14pt"/>
    </style:style>
    <style:style style:name="T1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1" style:parent-style-name="Normal" style:family="paragraph">
      <style:text-properties style:font-name="Times New Roman" style:font-name-complex="Times New Roman" fo:font-size="14pt" style:font-size-asian="14pt" style:font-size-complex="14pt"/>
    </style:style>
    <style:style style:name="T1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4" style:parent-style-name="Normal" style:family="paragraph">
      <style:text-properties style:font-name="Times New Roman" style:font-name-complex="Times New Roman" fo:font-size="14pt" style:font-size-asian="14pt" style:font-size-complex="14pt"/>
    </style:style>
    <style:style style:name="T185" style:parent-style-name="DefaultParagraphFont" style:family="text">
      <style:text-properties style:font-name="Times New Roman" style:font-name-complex="Times New Roman" fo:font-size="14pt" style:font-size-asian="14pt" style:font-size-complex="14pt"/>
    </style:style>
    <style:style style:name="P186" style:parent-style-name="Normal" style:family="paragraph">
      <style:text-properties style:font-name="Times New Roman" style:font-name-complex="Times New Roman" fo:font-size="14pt" style:font-size-asian="14pt" style:font-size-complex="14pt"/>
    </style:style>
    <style:style style:name="P187" style:parent-style-name="Normal" style:family="paragraph">
      <style:text-properties style:font-name="Times New Roman" style:font-name-complex="Times New Roman" fo:font-size="14pt" style:font-size-asian="14pt" style:font-size-complex="14pt"/>
    </style:style>
    <style:style style:name="P188" style:parent-style-name="Normal" style:family="paragraph">
      <style:text-properties style:font-name="Times New Roman" style:font-name-complex="Times New Roman" fo:font-size="14pt" style:font-size-asian="14pt" style:font-size-complex="14pt"/>
    </style:style>
    <style:style style:name="T1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0" style:parent-style-name="DefaultParagraphFont" style:family="text">
      <style:text-properties style:font-name="Times New Roman" style:font-name-complex="Times New Roman" fo:font-size="14pt" style:font-size-asian="14pt" style:font-size-complex="14pt"/>
    </style:style>
    <style:style style:name="T1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3" style:parent-style-name="Normal" style:family="paragraph">
      <style:text-properties style:font-name="Times New Roman" style:font-name-complex="Times New Roman" fo:font-size="14pt" style:font-size-asian="14pt" style:font-size-complex="14pt"/>
    </style:style>
    <style:style style:name="T194" style:parent-style-name="DefaultParagraphFont" style:family="text">
      <style:text-properties style:font-name="Times New Roman" style:font-name-complex="Times New Roman" fo:font-size="14pt" style:font-size-asian="14pt" style:font-size-complex="14pt"/>
    </style:style>
    <style:style style:name="P195" style:parent-style-name="Normal" style:family="paragraph">
      <style:text-properties style:font-name="Times New Roman" style:font-name-complex="Times New Roman" fo:font-size="14pt" style:font-size-asian="14pt" style:font-size-complex="14pt"/>
    </style:style>
    <style:style style:name="T196" style:parent-style-name="DefaultParagraphFont" style:family="text">
      <style:text-properties style:font-name="Times New Roman" style:font-name-complex="Times New Roman" fo:font-size="14pt" style:font-size-asian="14pt" style:font-size-complex="14pt"/>
    </style:style>
    <style:style style:name="T1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8" style:parent-style-name="DefaultParagraphFont" style:family="text">
      <style:text-properties style:font-name="Times New Roman" style:font-name-complex="Times New Roman" fo:font-size="14pt" style:font-size-asian="14pt" style:font-size-complex="14pt"/>
    </style:style>
    <style:style style:name="T1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0" style:parent-style-name="DefaultParagraphFont" style:family="text">
      <style:text-properties style:font-name="Times New Roman" style:font-name-complex="Times New Roman" fo:font-size="14pt" style:font-size-asian="14pt" style:font-size-complex="14pt"/>
    </style:style>
    <style:style style:name="T2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2" style:parent-style-name="DefaultParagraphFont" style:family="text">
      <style:text-properties style:font-name="Times New Roman" style:font-name-complex="Times New Roman" fo:font-size="14pt" style:font-size-asian="14pt" style:font-size-complex="14pt"/>
    </style:style>
    <style:style style:name="T2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4" style:parent-style-name="DefaultParagraphFont" style:family="text">
      <style:text-properties style:font-name="Times New Roman" style:font-name-complex="Times New Roman" fo:font-size="14pt" style:font-size-asian="14pt" style:font-size-complex="14pt"/>
    </style:style>
    <style:style style:name="T2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6" style:parent-style-name="DefaultParagraphFont" style:family="text">
      <style:text-properties style:font-name="Times New Roman" style:font-name-complex="Times New Roman" fo:font-size="14pt" style:font-size-asian="14pt" style:font-size-complex="14pt"/>
    </style:style>
    <style:style style:name="T2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8" style:parent-style-name="DefaultParagraphFont" style:family="text">
      <style:text-properties style:font-name="Times New Roman" style:font-name-complex="Times New Roman" fo:font-size="14pt" style:font-size-asian="14pt" style:font-size-complex="14pt"/>
    </style:style>
    <style:style style:name="T2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0" style:parent-style-name="DefaultParagraphFont" style:family="text">
      <style:text-properties style:font-name="Times New Roman" style:font-name-complex="Times New Roman" fo:font-size="14pt" style:font-size-asian="14pt" style:font-size-complex="14pt"/>
    </style:style>
    <style:style style:name="T2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2" style:parent-style-name="DefaultParagraphFont" style:family="text">
      <style:text-properties style:font-name="Times New Roman" style:font-name-complex="Times New Roman" fo:font-size="14pt" style:font-size-asian="14pt" style:font-size-complex="14pt"/>
    </style:style>
    <style:style style:name="T2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4" style:parent-style-name="DefaultParagraphFont" style:family="text">
      <style:text-properties style:font-name="Times New Roman" style:font-name-complex="Times New Roman" fo:font-size="14pt" style:font-size-asian="14pt" style:font-size-complex="14pt"/>
    </style:style>
    <style:style style:name="T2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6" style:parent-style-name="DefaultParagraphFont" style:family="text">
      <style:text-properties style:font-name="Times New Roman" style:font-name-complex="Times New Roman" fo:font-size="14pt" style:font-size-asian="14pt" style:font-size-complex="14pt"/>
    </style:style>
    <style:style style:name="T2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8" style:parent-style-name="DefaultParagraphFont" style:family="text">
      <style:text-properties style:font-name="Times New Roman" style:font-name-complex="Times New Roman" fo:font-size="14pt" style:font-size-asian="14pt" style:font-size-complex="14pt"/>
    </style:style>
    <style:style style:name="T2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20" style:parent-style-name="Normal" style:family="paragraph">
      <style:text-properties style:font-name="Times New Roman" style:font-name-complex="Times New Roman" fo:font-size="14pt" style:font-size-asian="14pt" style:font-size-complex="14pt"/>
    </style:style>
    <style:style style:name="T2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2" style:parent-style-name="DefaultParagraphFont" style:family="text">
      <style:text-properties style:font-name="Times New Roman" style:font-name-complex="Times New Roman" fo:font-size="14pt" style:font-size-asian="14pt" style:font-size-complex="14pt"/>
    </style:style>
    <style:style style:name="T2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24" style:parent-style-name="Normal" style:family="paragraph">
      <style:text-properties style:font-name="Times New Roman" style:font-name-complex="Times New Roman" fo:font-size="14pt" style:font-size-asian="14pt" style:font-size-complex="14pt"/>
    </style:style>
    <style:style style:name="P225" style:parent-style-name="Normal" style:family="paragraph">
      <style:text-properties style:font-name="Times New Roman" style:font-name-complex="Times New Roman" fo:font-size="14pt" style:font-size-asian="14pt" style:font-size-complex="14pt"/>
    </style:style>
    <style:style style:name="P226" style:parent-style-name="Normal" style:family="paragraph">
      <style:text-properties style:font-name="Times New Roman" style:font-name-complex="Times New Roman" fo:font-size="14pt" style:font-size-asian="14pt" style:font-size-complex="14pt"/>
    </style:style>
    <style:style style:name="P227" style:parent-style-name="Normal" style:family="paragraph">
      <style:text-properties style:font-name="Times New Roman" style:font-name-complex="Times New Roman" fo:font-size="14pt" style:font-size-asian="14pt" style:font-size-complex="14pt"/>
    </style:style>
    <style:style style:name="TableColumn229" style:family="table-column">
      <style:table-column-properties style:column-width="3.0881in"/>
    </style:style>
    <style:style style:name="TableColumn230" style:family="table-column">
      <style:table-column-properties style:column-width="3.4006in"/>
    </style:style>
    <style:style style:name="Table228" style:family="table">
      <style:table-properties style:width="6.4888in" fo:margin-left="0in" table:align="left"/>
    </style:style>
    <style:style style:name="TableRow231" style:family="table-row">
      <style:table-row-properties/>
    </style:style>
    <style:style style:name="TableCell23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233" style:parent-style-name="DefaultParagraphFont" style:family="text">
      <style:text-properties style:font-name="Times New Roman" style:font-name-complex="Times New Roman" fo:font-size="14pt" style:font-size-asian="14pt" style:font-size-complex="14pt"/>
    </style:style>
    <style:style style:name="TableCell23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235" style:parent-style-name="DefaultParagraphFont" style:family="text">
      <style:text-properties style:font-name="Times New Roman" style:font-name-complex="Times New Roman" fo:font-size="14pt" style:font-size-asian="14pt" style:font-size-complex="14pt"/>
    </style:style>
    <style:style style:name="T2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38" style:parent-style-name="Normal" style:family="paragraph">
      <style:text-properties style:font-name="Times New Roman" style:font-name-complex="Times New Roman" fo:font-size="14pt" style:font-size-asian="14pt" style:font-size-complex="14pt"/>
    </style:style>
    <style:style style:name="P239" style:parent-style-name="Normal" style:family="paragraph">
      <style:text-properties style:font-name="Consolas" style:font-name-complex="Times New Roman" fo:font-size="11pt" style:font-size-asian="11pt" style:font-size-complex="11pt"/>
    </style:style>
    <style:style style:name="P240" style:parent-style-name="Normal" style:family="paragraph">
      <style:text-properties style:font-name="Consolas" style:font-name-complex="Times New Roman" fo:font-size="11pt" style:font-size-asian="11pt" style:font-size-complex="11pt"/>
    </style:style>
    <style:style style:name="P241" style:parent-style-name="Normal" style:family="paragraph">
      <style:text-properties style:font-name="Consolas" style:font-name-complex="Times New Roman" fo:font-size="11pt" style:font-size-asian="11pt" style:font-size-complex="11pt"/>
    </style:style>
    <style:style style:name="P242" style:parent-style-name="Normal" style:family="paragraph">
      <style:text-properties style:font-name="Consolas" style:font-name-complex="Times New Roman" fo:font-size="11pt" style:font-size-asian="11pt" style:font-size-complex="11pt"/>
    </style:style>
    <style:style style:name="P243" style:parent-style-name="Normal" style:family="paragraph">
      <style:text-properties style:font-name="Consolas" style:font-name-complex="Times New Roman" fo:font-size="11pt" style:font-size-asian="11pt" style:font-size-complex="11pt"/>
    </style:style>
    <style:style style:name="P244" style:parent-style-name="Normal" style:family="paragraph">
      <style:text-properties style:font-name="Consolas" style:font-name-complex="Times New Roman" fo:font-size="11pt" style:font-size-asian="11pt" style:font-size-complex="11pt"/>
    </style:style>
    <style:style style:name="P245" style:parent-style-name="Normal" style:family="paragraph">
      <style:text-properties style:font-name="Consolas" style:font-name-complex="Times New Roman" fo:font-size="11pt" style:font-size-asian="11pt" style:font-size-complex="11pt"/>
    </style:style>
    <style:style style:name="P246" style:parent-style-name="Normal" style:family="paragraph">
      <style:text-properties style:font-name="Consolas" style:font-name-complex="Times New Roman" fo:font-size="11pt" style:font-size-asian="11pt" style:font-size-complex="11pt"/>
    </style:style>
    <style:style style:name="P247" style:parent-style-name="Normal" style:family="paragraph">
      <style:text-properties style:font-name="Consolas" style:font-name-complex="Times New Roman" fo:font-size="11pt" style:font-size-asian="11pt" style:font-size-complex="11pt"/>
    </style:style>
    <style:style style:name="P248" style:parent-style-name="Normal" style:family="paragraph">
      <style:text-properties style:font-name="Consolas" style:font-name-complex="Times New Roman" fo:font-size="11pt" style:font-size-asian="11pt" style:font-size-complex="11pt"/>
    </style:style>
    <style:style style:name="P249" style:parent-style-name="Normal" style:family="paragraph">
      <style:text-properties style:font-name="Consolas" style:font-name-complex="Times New Roman" fo:font-size="11pt" style:font-size-asian="11pt" style:font-size-complex="11pt"/>
    </style:style>
    <style:style style:name="P250" style:parent-style-name="Normal" style:family="paragraph">
      <style:text-properties style:font-name="Consolas" style:font-name-complex="Times New Roman" fo:font-size="11pt" style:font-size-asian="11pt" style:font-size-complex="11pt"/>
    </style:style>
    <style:style style:name="P251" style:parent-style-name="Normal" style:family="paragraph">
      <style:text-properties style:font-name="Consolas" style:font-name-complex="Times New Roman" fo:font-size="11pt" style:font-size-asian="11pt" style:font-size-complex="11pt"/>
    </style:style>
    <style:style style:name="P252" style:parent-style-name="Normal" style:family="paragraph">
      <style:text-properties style:font-name="Consolas" style:font-name-complex="Times New Roman" fo:font-size="11pt" style:font-size-asian="11pt" style:font-size-complex="11pt"/>
    </style:style>
    <style:style style:name="P253" style:parent-style-name="Normal" style:family="paragraph">
      <style:text-properties style:font-name="Consolas" style:font-name-complex="Times New Roman" fo:font-size="11pt" style:font-size-asian="11pt" style:font-size-complex="11pt"/>
    </style:style>
    <style:style style:name="P254" style:parent-style-name="Normal" style:family="paragraph">
      <style:text-properties style:font-name="Consolas" style:font-name-complex="Times New Roman" fo:font-size="11pt" style:font-size-asian="11pt" style:font-size-complex="11pt"/>
    </style:style>
    <style:style style:name="P255" style:parent-style-name="Normal" style:family="paragraph">
      <style:text-properties style:font-name="Consolas" style:font-name-complex="Times New Roman" fo:font-size="11pt" style:font-size-asian="11pt" style:font-size-complex="11pt"/>
    </style:style>
    <style:style style:name="P256" style:parent-style-name="Normal" style:family="paragraph">
      <style:text-properties style:font-name="Consolas" style:font-name-complex="Times New Roman" fo:font-size="11pt" style:font-size-asian="11pt" style:font-size-complex="11pt"/>
    </style:style>
    <style:style style:name="P257" style:parent-style-name="Normal" style:family="paragraph">
      <style:text-properties style:font-name="Consolas" style:font-name-complex="Times New Roman" fo:font-size="11pt" style:font-size-asian="11pt" style:font-size-complex="11pt"/>
    </style:style>
    <style:style style:name="P258" style:parent-style-name="Normal" style:family="paragraph">
      <style:text-properties style:font-name="Consolas" style:font-name-complex="Times New Roman" fo:font-size="11pt" style:font-size-asian="11pt" style:font-size-complex="11pt"/>
    </style:style>
    <style:style style:name="P259" style:parent-style-name="Normal" style:family="paragraph">
      <style:text-properties style:font-name="Consolas" style:font-name-complex="Times New Roman" fo:font-size="11pt" style:font-size-asian="11pt" style:font-size-complex="11pt"/>
    </style:style>
    <style:style style:name="P260" style:parent-style-name="Normal" style:family="paragraph">
      <style:text-properties style:font-name="Consolas" style:font-name-complex="Times New Roman" fo:font-size="11pt" style:font-size-asian="11pt" style:font-size-complex="11pt"/>
    </style:style>
    <style:style style:name="P261" style:parent-style-name="Normal" style:family="paragraph">
      <style:text-properties style:font-name="Consolas" style:font-name-complex="Times New Roman" fo:font-size="11pt" style:font-size-asian="11pt" style:font-size-complex="11pt"/>
    </style:style>
    <style:style style:name="P262" style:parent-style-name="Normal" style:family="paragraph">
      <style:text-properties style:font-name="Consolas" style:font-name-complex="Times New Roman" fo:font-size="11pt" style:font-size-asian="11pt" style:font-size-complex="11pt"/>
    </style:style>
    <style:style style:name="P263" style:parent-style-name="Normal" style:family="paragraph">
      <style:text-properties style:font-name="Consolas" style:font-name-complex="Times New Roman" fo:font-size="11pt" style:font-size-asian="11pt" style:font-size-complex="11pt"/>
    </style:style>
    <style:style style:name="P264" style:parent-style-name="Normal" style:family="paragraph">
      <style:text-properties style:font-name="Times New Roman" style:font-name-complex="Times New Roman" fo:font-size="14pt" style:font-size-asian="14pt" style:font-size-complex="14pt"/>
    </style:style>
    <style:style style:name="P265" style:parent-style-name="Normal" style:family="paragraph">
      <style:text-properties style:font-name="Times New Roman" style:font-name-complex="Times New Roman" fo:font-size="14pt" style:font-size-asian="14pt" style:font-size-complex="14pt"/>
    </style:style>
    <style:style style:name="P266" style:parent-style-name="Normal" style:family="paragraph">
      <style:text-properties style:font-name="Times New Roman" style:font-name-complex="Times New Roman" fo:font-size="14pt" style:font-size-asian="14pt" style:font-size-complex="14pt"/>
    </style:style>
    <style:style style:name="P267" style:parent-style-name="Normal" style:family="paragraph">
      <style:text-properties style:font-name="Times New Roman" style:font-name-complex="Times New Roman" fo:font-size="14pt" style:font-size-asian="14pt" style:font-size-complex="14pt"/>
    </style:style>
    <style:style style:name="P268" style:parent-style-name="Normal" style:family="paragraph">
      <style:text-properties style:font-name="Times New Roman" style:font-name-complex="Times New Roman" fo:font-size="14pt" style:font-size-asian="14pt" style:font-size-complex="14pt"/>
    </style:style>
    <style:style style:name="P269" style:parent-style-name="Normal" style:family="paragraph">
      <style:text-properties style:font-name="Times New Roman" style:font-name-complex="Times New Roman" fo:font-size="14pt" style:font-size-asian="14pt" style:font-size-complex="14pt"/>
    </style:style>
    <style:style style:name="P270" style:parent-style-name="Normal" style:family="paragraph">
      <style:text-properties style:font-name="Times New Roman" style:font-name-complex="Times New Roman" fo:font-size="14pt" style:font-size-asian="14pt" style:font-size-complex="14pt"/>
    </style:style>
    <style:style style:name="T2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72" style:parent-style-name="DefaultParagraphFont" style:family="text">
      <style:text-properties style:font-name="Times New Roman" style:font-name-complex="Times New Roman" fo:font-size="14pt" style:font-size-asian="14pt" style:font-size-complex="14pt"/>
    </style:style>
    <style:style style:name="T2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74" style:parent-style-name="Normal" style:family="paragraph">
      <style:text-properties style:font-name="Times New Roman" style:font-name-complex="Times New Roman" fo:font-size="14pt" style:font-size-asian="14pt" style:font-size-complex="14pt"/>
    </style:style>
    <style:style style:name="P275" style:parent-style-name="Normal" style:family="paragraph">
      <style:text-properties style:font-name="Times New Roman" style:font-name-complex="Times New Roman" fo:font-size="14pt" style:font-size-asian="14pt" style:font-size-complex="14pt"/>
    </style:style>
    <style:style style:name="P276" style:parent-style-name="Normal" style:family="paragraph">
      <style:text-properties style:font-name="Times New Roman" style:font-name-complex="Times New Roman" fo:font-size="14pt" style:font-size-asian="14pt" style:font-size-complex="14pt"/>
    </style:style>
    <style:style style:name="P277" style:parent-style-name="Normal" style:family="paragraph">
      <style:text-properties style:font-name="Times New Roman" style:font-name-complex="Times New Roman" fo:font-size="14pt" style:font-size-asian="14pt" style:font-size-complex="14pt"/>
    </style:style>
    <style:style style:name="T278" style:parent-style-name="DefaultParagraphFont" style:family="text">
      <style:text-properties style:font-name="Times New Roman" style:font-name-complex="Times New Roman" fo:font-size="14pt" style:font-size-asian="14pt" style:font-size-complex="14pt"/>
    </style:style>
    <style:style style:name="P279" style:parent-style-name="Normal" style:family="paragraph">
      <style:text-properties style:font-name="Times New Roman" style:font-name-complex="Times New Roman" fo:font-size="14pt" style:font-size-asian="14pt" style:font-size-complex="14pt"/>
    </style:style>
    <style:style style:name="T280" style:parent-style-name="DefaultParagraphFont" style:family="text">
      <style:text-properties style:font-name="Times New Roman" style:font-name-complex="Times New Roman" fo:font-size="14pt" style:font-size-asian="14pt" style:font-size-complex="14pt"/>
    </style:style>
    <style:style style:name="P281" style:parent-style-name="Normal" style:family="paragraph">
      <style:text-properties style:font-name="Times New Roman" style:font-name-complex="Times New Roman" fo:font-size="14pt" style:font-size-asian="14pt" style:font-size-complex="14pt"/>
    </style:style>
    <style:style style:name="T2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84" style:parent-style-name="Normal" style:family="paragraph">
      <style:text-properties style:font-name="Times New Roman" style:font-name-complex="Times New Roman" fo:font-size="14pt" style:font-size-asian="14pt" style:font-size-complex="14pt"/>
    </style:style>
    <style:style style:name="T285" style:parent-style-name="DefaultParagraphFont" style:family="text">
      <style:text-properties style:font-name="Times New Roman" style:font-name-complex="Times New Roman" fo:font-size="14pt" style:font-size-asian="14pt" style:font-size-complex="14pt"/>
    </style:style>
    <style:style style:name="P286" style:parent-style-name="Normal" style:family="paragraph">
      <style:text-properties style:font-name="Times New Roman" style:font-name-complex="Times New Roman" fo:font-size="14pt" style:font-size-asian="14pt" style:font-size-complex="14pt"/>
    </style:style>
    <style:style style:name="P287" style:parent-style-name="Normal" style:family="paragraph">
      <style:text-properties style:font-name="Times New Roman" style:font-name-complex="Times New Roman" fo:font-size="14pt" style:font-size-asian="14pt" style:font-size-complex="14pt"/>
    </style:style>
    <style:style style:name="P288" style:parent-style-name="Normal" style:family="paragraph">
      <style:text-properties style:font-name="Times New Roman" style:font-name-complex="Times New Roman" fo:font-size="14pt" style:font-size-asian="14pt" style:font-size-complex="14pt"/>
    </style:style>
    <style:style style:name="T2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0" style:parent-style-name="DefaultParagraphFont" style:family="text">
      <style:text-properties style:font-name="Times New Roman" style:font-name-complex="Times New Roman" fo:font-size="14pt" style:font-size-asian="14pt" style:font-size-complex="14pt"/>
    </style:style>
    <style:style style:name="T2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92" style:parent-style-name="Normal" style:family="paragraph">
      <style:text-properties style:font-name="Times New Roman" style:font-name-complex="Times New Roman" fo:font-size="14pt" style:font-size-asian="14pt" style:font-size-complex="14pt"/>
    </style:style>
    <style:style style:name="T2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95" style:parent-style-name="Normal" style:family="paragraph">
      <style:text-properties style:font-name="Times New Roman" style:font-name-complex="Times New Roman" fo:font-size="14pt" style:font-size-asian="14pt" style:font-size-complex="14pt"/>
    </style:style>
    <style:style style:name="P296" style:parent-style-name="Normal" style:family="paragraph">
      <style:text-properties style:font-name="Consolas" style:font-name-complex="Times New Roman" fo:font-size="11pt" style:font-size-asian="11pt" style:font-size-complex="11pt"/>
    </style:style>
    <style:style style:name="P297" style:parent-style-name="Normal" style:family="paragraph">
      <style:text-properties style:font-name="Consolas" style:font-name-complex="Times New Roman" fo:font-size="11pt" style:font-size-asian="11pt" style:font-size-complex="11pt"/>
    </style:style>
    <style:style style:name="P298" style:parent-style-name="Normal" style:family="paragraph">
      <style:text-properties style:font-name="Consolas" style:font-name-complex="Times New Roman" fo:font-size="11pt" style:font-size-asian="11pt" style:font-size-complex="11pt"/>
    </style:style>
    <style:style style:name="P299" style:parent-style-name="Normal" style:family="paragraph">
      <style:text-properties style:font-name="Consolas" style:font-name-complex="Times New Roman" fo:font-size="11pt" style:font-size-asian="11pt" style:font-size-complex="11pt"/>
    </style:style>
    <style:style style:name="P300" style:parent-style-name="Normal" style:family="paragraph">
      <style:text-properties style:font-name="Consolas" style:font-name-complex="Times New Roman" fo:font-size="11pt" style:font-size-asian="11pt" style:font-size-complex="11pt"/>
    </style:style>
    <style:style style:name="P301" style:parent-style-name="Normal" style:family="paragraph">
      <style:text-properties style:font-name="Times New Roman" style:font-name-complex="Times New Roman" fo:font-size="14pt" style:font-size-asian="14pt" style:font-size-complex="14pt"/>
    </style:style>
    <style:style style:name="P302" style:parent-style-name="Normal" style:family="paragraph">
      <style:text-properties style:font-name="Times New Roman" style:font-name-complex="Times New Roman" fo:font-size="14pt" style:font-size-asian="14pt" style:font-size-complex="14pt"/>
    </style:style>
    <style:style style:name="P303" style:parent-style-name="Normal" style:family="paragraph">
      <style:text-properties style:font-name="Times New Roman" style:font-name-complex="Times New Roman" fo:font-size="14pt" style:font-size-asian="14pt" style:font-size-complex="14pt"/>
    </style:style>
    <style:style style:name="T3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5" style:parent-style-name="DefaultParagraphFont" style:family="text">
      <style:text-properties style:font-name="Times New Roman" style:font-name-complex="Times New Roman" fo:font-size="14pt" style:font-size-asian="14pt" style:font-size-complex="14pt"/>
    </style:style>
    <style:style style:name="T3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7" style:parent-style-name="DefaultParagraphFont" style:family="text">
      <style:text-properties style:font-name="Times New Roman" style:font-name-complex="Times New Roman" fo:font-size="14pt" style:font-size-asian="14pt" style:font-size-complex="14pt"/>
    </style:style>
    <style:style style:name="T30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09" style:parent-style-name="DefaultParagraphFont" style:family="text">
      <style:text-properties style:font-name="Times New Roman" style:font-name-complex="Times New Roman" fo:font-size="14pt" style:font-size-asian="14pt" style:font-size-complex="14pt"/>
    </style:style>
    <style:style style:name="T3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12" style:parent-style-name="Normal" style:family="paragraph">
      <style:text-properties style:font-name="Times New Roman" style:font-name-complex="Times New Roman" fo:font-size="14pt" style:font-size-asian="14pt" style:font-size-complex="14pt"/>
    </style:style>
    <style:style style:name="T313" style:parent-style-name="DefaultParagraphFont" style:family="text">
      <style:text-properties style:font-name="Times New Roman" style:font-name-complex="Times New Roman" fo:font-size="14pt" style:font-size-asian="14pt" style:font-size-complex="14pt"/>
    </style:style>
    <style:style style:name="P314" style:parent-style-name="Normal" style:family="paragraph">
      <style:text-properties style:font-name="Times New Roman" style:font-name-complex="Times New Roman" fo:font-size="14pt" style:font-size-asian="14pt" style:font-size-complex="14pt"/>
    </style:style>
    <style:style style:name="P315" style:parent-style-name="Normal" style:family="paragraph">
      <style:text-properties style:font-name="Times New Roman" style:font-name-complex="Times New Roman" fo:font-size="14pt" style:font-size-asian="14pt" style:font-size-complex="14pt"/>
    </style:style>
    <style:style style:name="P316" style:parent-style-name="Normal" style:family="paragraph">
      <style:text-properties style:font-name="Times New Roman" style:font-name-complex="Times New Roman" fo:font-size="14pt" style:font-size-asian="14pt" style:font-size-complex="14pt"/>
    </style:style>
    <style:style style:name="T3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8" style:parent-style-name="DefaultParagraphFont" style:family="text">
      <style:text-properties style:font-name="Times New Roman" style:font-name-complex="Times New Roman" fo:font-size="14pt" style:font-size-asian="14pt" style:font-size-complex="14pt"/>
    </style:style>
    <style:style style:name="T3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20" style:parent-style-name="Normal" style:family="paragraph">
      <style:text-properties style:font-name="Times New Roman" style:font-name-complex="Times New Roman" fo:font-size="14pt" style:font-size-asian="14pt" style:font-size-complex="14pt"/>
    </style:style>
    <style:style style:name="T3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23" style:parent-style-name="Normal" style:family="paragraph">
      <style:text-properties style:font-name="Times New Roman" style:font-name-complex="Times New Roman" fo:font-size="14pt" style:font-size-asian="14pt" style:font-size-complex="14pt"/>
    </style:style>
    <style:style style:name="P324" style:parent-style-name="Normal" style:family="paragraph">
      <style:text-properties style:font-name="Times New Roman" style:font-name-complex="Times New Roman" fo:font-size="14pt" style:font-size-asian="14pt" style:font-size-complex="14pt"/>
    </style:style>
    <style:style style:name="P325" style:parent-style-name="Normal" style:family="paragraph">
      <style:text-properties style:font-name="Times New Roman" style:font-name-complex="Times New Roman" fo:font-size="14pt" style:font-size-asian="14pt" style:font-size-complex="14pt"/>
    </style:style>
    <style:style style:name="T3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7" style:parent-style-name="DefaultParagraphFont" style:family="text">
      <style:text-properties style:font-name="Times New Roman" style:font-name-complex="Times New Roman" fo:font-size="14pt" style:font-size-asian="14pt" style:font-size-complex="14pt"/>
    </style:style>
    <style:style style:name="T3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9" style:parent-style-name="DefaultParagraphFont" style:family="text">
      <style:text-properties style:font-name="Times New Roman" style:font-name-complex="Times New Roman" fo:font-size="14pt" style:font-size-asian="14pt" style:font-size-complex="14pt"/>
    </style:style>
    <style:style style:name="T330"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31" style:parent-style-name="DefaultParagraphFont" style:family="text">
      <style:text-properties style:font-name="Times New Roman" style:font-name-complex="Times New Roman" fo:font-size="14pt" style:font-size-asian="14pt" style:font-size-complex="14pt"/>
    </style:style>
    <style:style style:name="T332" style:parent-style-name="DefaultParagraphFont" style:family="text">
      <style:text-properties style:font-name="Times New Roman" style:font-name-complex="Times New Roman" fo:font-size="14pt" style:font-size-asian="14pt" style:font-size-complex="14pt"/>
    </style:style>
    <style:style style:name="T33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34" style:parent-style-name="DefaultParagraphFont" style:family="text">
      <style:text-properties style:font-name="Times New Roman" style:font-name-complex="Times New Roman" fo:font-size="14pt" style:font-size-asian="14pt" style:font-size-complex="14pt"/>
    </style:style>
    <style:style style:name="T335" style:parent-style-name="DefaultParagraphFont" style:family="text">
      <style:text-properties style:font-name="Times New Roman" style:font-name-complex="Times New Roman" fo:font-size="14pt" style:font-size-asian="14pt" style:font-size-complex="14pt"/>
    </style:style>
    <style:style style:name="T336" style:parent-style-name="DefaultParagraphFont" style:family="text">
      <style:text-properties style:font-name="Times New Roman" style:font-name-complex="Times New Roman" fo:font-size="14pt" style:font-size-asian="14pt" style:font-size-complex="14pt"/>
    </style:style>
    <style:style style:name="T3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39" style:parent-style-name="Normal" style:family="paragraph">
      <style:text-properties style:font-name="Times New Roman" style:font-name-complex="Times New Roman" fo:font-size="14pt" style:font-size-asian="14pt" style:font-size-complex="14pt"/>
    </style:style>
    <style:style style:name="T340" style:parent-style-name="DefaultParagraphFont" style:family="text">
      <style:text-properties style:font-name="Times New Roman" style:font-name-complex="Times New Roman" fo:font-size="14pt" style:font-size-asian="14pt" style:font-size-complex="14pt"/>
    </style:style>
    <style:style style:name="P341" style:parent-style-name="Normal" style:family="paragraph">
      <style:text-properties style:font-name="Times New Roman" style:font-name-complex="Times New Roman" fo:font-size="14pt" style:font-size-asian="14pt" style:font-size-complex="14pt"/>
    </style:style>
    <style:style style:name="T3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3" style:parent-style-name="DefaultParagraphFont" style:family="text">
      <style:text-properties style:font-name="Times New Roman" style:font-name-complex="Times New Roman" fo:font-size="14pt" style:font-size-asian="14pt" style:font-size-complex="14pt"/>
    </style:style>
    <style:style style:name="T3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5" style:parent-style-name="DefaultParagraphFont" style:family="text">
      <style:text-properties style:font-name="Times New Roman" style:font-name-complex="Times New Roman" fo:font-size="14pt" style:font-size-asian="14pt" style:font-size-complex="14pt"/>
    </style:style>
    <style:style style:name="T3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7" style:parent-style-name="DefaultParagraphFont" style:family="text">
      <style:text-properties style:font-name="Times New Roman" style:font-name-complex="Times New Roman" fo:font-size="14pt" style:font-size-asian="14pt" style:font-size-complex="14pt"/>
    </style:style>
    <style:style style:name="T3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9" style:parent-style-name="DefaultParagraphFont" style:family="text">
      <style:text-properties style:font-name="Times New Roman" style:font-name-complex="Times New Roman" fo:font-size="14pt" style:font-size-asian="14pt" style:font-size-complex="14pt"/>
    </style:style>
    <style:style style:name="T3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1" style:parent-style-name="DefaultParagraphFont" style:family="text">
      <style:text-properties style:font-name="Times New Roman" style:font-name-complex="Times New Roman" fo:font-size="14pt" style:font-size-asian="14pt" style:font-size-complex="14pt"/>
    </style:style>
    <style:style style:name="T3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4" style:parent-style-name="DefaultParagraphFont" style:family="text">
      <style:text-properties style:font-name="Times New Roman" style:font-name-complex="Times New Roman" fo:font-size="14pt" style:font-size-asian="14pt" style:font-size-complex="14pt"/>
    </style:style>
    <style:style style:name="T3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6" style:parent-style-name="DefaultParagraphFont" style:family="text">
      <style:text-properties style:font-name="Times New Roman" style:font-name-complex="Times New Roman" fo:font-size="14pt" style:font-size-asian="14pt" style:font-size-complex="14pt"/>
    </style:style>
    <style:style style:name="T3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8" style:parent-style-name="DefaultParagraphFont" style:family="text">
      <style:text-properties style:font-name="Times New Roman" style:font-name-complex="Times New Roman" fo:font-size="14pt" style:font-size-asian="14pt" style:font-size-complex="14pt"/>
    </style:style>
    <style:style style:name="T359"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60" style:parent-style-name="DefaultParagraphFont" style:family="text">
      <style:text-properties style:font-name="Times New Roman" style:font-name-complex="Times New Roman" fo:font-size="14pt" style:font-size-asian="14pt" style:font-size-complex="14pt"/>
    </style:style>
    <style:style style:name="T361" style:parent-style-name="DefaultParagraphFont" style:family="text">
      <style:text-properties style:font-name="Times New Roman" style:font-name-complex="Times New Roman" fo:font-size="14pt" style:font-size-asian="14pt" style:font-size-complex="14pt"/>
    </style:style>
    <style:style style:name="T362" style:parent-style-name="Hyperlink" style:family="text">
      <style:text-properties style:font-name="Times New Roman" style:font-name-complex="Times New Roman" fo:font-size="14pt" style:font-size-asian="14pt" style:font-size-complex="14pt"/>
    </style:style>
    <style:style style:name="P363" style:parent-style-name="Normal" style:family="paragraph">
      <style:text-properties style:font-name="Times New Roman" style:font-name-complex="Times New Roman" fo:font-size="14pt" style:font-size-asian="14pt" style:font-size-complex="14pt"/>
    </style:style>
    <style:style style:name="T364" style:parent-style-name="DefaultParagraphFont" style:family="text">
      <style:text-properties style:font-name="Times New Roman" style:font-name-complex="Times New Roman" fo:font-size="14pt" style:font-size-asian="14pt" style:font-size-complex="14pt"/>
    </style:style>
    <style:style style:name="T365" style:parent-style-name="Hyperlink" style:family="text">
      <style:text-properties style:font-name="Times New Roman" style:font-name-complex="Times New Roman" fo:font-size="14pt" style:font-size-asian="14pt" style:font-size-complex="14pt"/>
    </style:style>
    <style:style style:name="P366" style:parent-style-name="Normal" style:family="paragraph">
      <style:text-properties style:font-name="Times New Roman" style:font-name-complex="Times New Roman" fo:font-size="14pt" style:font-size-asian="14pt" style:font-size-complex="14pt"/>
    </style:style>
    <style:style style:name="T367" style:parent-style-name="DefaultParagraphFont" style:family="text">
      <style:text-properties style:font-name="Times New Roman" style:font-name-complex="Times New Roman" fo:font-size="14pt" style:font-size-asian="14pt" style:font-size-complex="14pt"/>
    </style:style>
    <style:style style:name="T368" style:parent-style-name="Hyperlink" style:family="text">
      <style:text-properties style:font-name="Times New Roman" style:font-name-complex="Times New Roman" fo:font-size="14pt" style:font-size-asian="14pt" style:font-size-complex="14pt"/>
    </style:style>
    <style:style style:name="T369" style:parent-style-name="DefaultParagraphFont" style:family="text">
      <style:text-properties style:font-name="Times New Roman" style:font-name-complex="Times New Roman" fo:font-size="14pt" style:font-size-asian="14pt" style:font-size-complex="14pt"/>
    </style:style>
    <style:style style:name="T3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1" style:parent-style-name="DefaultParagraphFont" style:family="text">
      <style:text-properties style:font-name="Times New Roman" style:font-name-complex="Times New Roman" fo:font-size="14pt" style:font-size-asian="14pt" style:font-size-complex="14pt"/>
    </style:style>
    <style:style style:name="T372" style:parent-style-name="DefaultParagraphFont" style:family="text">
      <style:text-properties style:font-name="Times New Roman" style:font-name-complex="Times New Roman" fo:font-size="14pt" style:font-size-asian="14pt" style:font-size-complex="14pt"/>
    </style:style>
    <style:style style:name="T37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74" style:parent-style-name="DefaultParagraphFont" style:family="text">
      <style:text-properties style:font-name="Times New Roman" style:font-name-complex="Times New Roman" fo:font-size="14pt" style:font-size-asian="14pt" style:font-size-complex="14pt"/>
    </style:style>
    <style:style style:name="T375" style:parent-style-name="DefaultParagraphFont" style:family="text">
      <style:text-properties style:font-name="Times New Roman" style:font-name-complex="Times New Roman" fo:font-size="14pt" style:font-size-asian="14pt" style:font-size-complex="14pt"/>
    </style:style>
    <style:style style:name="T376"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77" style:parent-style-name="DefaultParagraphFont" style:family="text">
      <style:text-properties style:font-name="Times New Roman" style:font-name-complex="Times New Roman" fo:font-size="14pt" style:font-size-asian="14pt" style:font-size-complex="14pt"/>
    </style:style>
    <style:style style:name="T378" style:parent-style-name="DefaultParagraphFont" style:family="text">
      <style:text-properties style:font-name="Times New Roman" style:font-name-complex="Times New Roman" fo:font-size="14pt" style:font-size-asian="14pt" style:font-size-complex="14pt"/>
    </style:style>
    <style:style style:name="T3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0" style:parent-style-name="DefaultParagraphFont" style:family="text">
      <style:text-properties style:font-name="Times New Roman" style:font-name-complex="Times New Roman" fo:font-size="14pt" style:font-size-asian="14pt" style:font-size-complex="14pt"/>
    </style:style>
    <style:style style:name="T3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2" style:parent-style-name="DefaultParagraphFont" style:family="text">
      <style:text-properties style:font-name="Times New Roman" style:font-name-complex="Times New Roman" fo:font-size="14pt" style:font-size-asian="14pt" style:font-size-complex="14pt"/>
    </style:style>
    <style:style style:name="T3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85" style:parent-style-name="Normal" style:family="paragraph">
      <style:text-properties style:font-name="Times New Roman" style:font-name-complex="Times New Roman" fo:font-size="14pt" style:font-size-asian="14pt" style:font-size-complex="14pt"/>
    </style:style>
    <style:style style:name="P386" style:parent-style-name="Normal" style:family="paragraph">
      <style:text-properties style:font-name="Times New Roman" style:font-name-complex="Times New Roman" fo:font-size="14pt" style:font-size-asian="14pt" style:font-size-complex="14pt"/>
    </style:style>
    <style:style style:name="P387" style:parent-style-name="Normal" style:family="paragraph">
      <style:text-properties style:font-name="Times New Roman" style:font-name-complex="Times New Roman" fo:font-size="14pt" style:font-size-asian="14pt" style:font-size-complex="14pt"/>
    </style:style>
    <style:style style:name="T3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9" style:parent-style-name="DefaultParagraphFont" style:family="text">
      <style:text-properties style:font-name="Times New Roman" style:font-name-complex="Times New Roman" fo:font-size="14pt" style:font-size-asian="14pt" style:font-size-complex="14pt"/>
    </style:style>
    <style:style style:name="T3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91" style:parent-style-name="Normal" style:family="paragraph">
      <style:text-properties style:font-name="Times New Roman" style:font-name-complex="Times New Roman" fo:font-size="14pt" style:font-size-asian="14pt" style:font-size-complex="14pt"/>
    </style:style>
    <style:style style:name="P392" style:parent-style-name="Normal" style:family="paragraph">
      <style:text-properties style:font-name="Times New Roman" style:font-name-complex="Times New Roman" fo:font-size="14pt" style:font-size-asian="14pt" style:font-size-complex="14pt"/>
    </style:style>
    <style:style style:name="P393" style:parent-style-name="Normal" style:family="paragraph">
      <style:text-properties style:font-name="Times New Roman" style:font-name-complex="Times New Roman" fo:font-size="14pt" style:font-size-asian="14pt" style:font-size-complex="14pt"/>
    </style:style>
    <style:style style:name="T394" style:parent-style-name="DefaultParagraphFont" style:family="text">
      <style:text-properties style:font-name="Times New Roman" style:font-name-complex="Times New Roman" fo:font-size="14pt" style:font-size-asian="14pt" style:font-size-complex="14pt"/>
    </style:style>
    <style:style style:name="T395" style:parent-style-name="Hyperlink" style:family="text">
      <style:text-properties style:font-name="Times New Roman" style:font-name-complex="Times New Roman" fo:font-size="14pt" style:font-size-asian="14pt" style:font-size-complex="14pt"/>
    </style:style>
    <style:style style:name="T3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98" style:parent-style-name="Normal" style:family="paragraph">
      <style:text-properties style:font-name="Times New Roman" style:font-name-complex="Times New Roman" fo:font-size="14pt" style:font-size-asian="14pt" style:font-size-complex="14pt"/>
    </style:style>
    <style:style style:name="T399" style:parent-style-name="DefaultParagraphFont" style:family="text">
      <style:text-properties style:font-name="Times New Roman" style:font-name-complex="Times New Roman" fo:font-size="14pt" style:font-size-asian="14pt" style:font-size-complex="14pt"/>
    </style:style>
    <style:style style:name="P400" style:parent-style-name="Normal" style:family="paragraph">
      <style:text-properties style:font-name="Consolas" style:font-name-complex="Times New Roman" fo:font-size="11pt" style:font-size-asian="11pt" style:font-size-complex="11pt"/>
    </style:style>
    <style:style style:name="P401" style:parent-style-name="Normal" style:family="paragraph">
      <style:text-properties style:font-name="Consolas" style:font-name-complex="Times New Roman" fo:font-size="11pt" style:font-size-asian="11pt" style:font-size-complex="11pt"/>
    </style:style>
    <style:style style:name="P402" style:parent-style-name="Normal" style:family="paragraph">
      <style:text-properties style:font-name="Consolas" style:font-name-complex="Times New Roman" fo:font-size="11pt" style:font-size-asian="11pt" style:font-size-complex="11pt"/>
    </style:style>
    <style:style style:name="P403" style:parent-style-name="Normal" style:family="paragraph">
      <style:text-properties style:font-name="Consolas" style:font-name-complex="Times New Roman" fo:font-size="11pt" style:font-size-asian="11pt" style:font-size-complex="11pt"/>
    </style:style>
    <style:style style:name="P404" style:parent-style-name="Normal" style:family="paragraph">
      <style:text-properties style:font-name="Consolas" style:font-name-complex="Times New Roman" fo:font-size="11pt" style:font-size-asian="11pt" style:font-size-complex="11pt"/>
    </style:style>
    <style:style style:name="P405" style:parent-style-name="Normal" style:family="paragraph">
      <style:text-properties style:font-name="Consolas" style:font-name-complex="Times New Roman" fo:font-size="11pt" style:font-size-asian="11pt" style:font-size-complex="11pt"/>
    </style:style>
    <style:style style:name="P406" style:parent-style-name="Normal" style:family="paragraph">
      <style:text-properties style:font-name="Consolas" style:font-name-complex="Times New Roman" fo:font-size="11pt" style:font-size-asian="11pt" style:font-size-complex="11pt"/>
    </style:style>
    <style:style style:name="P407" style:parent-style-name="Normal" style:family="paragraph">
      <style:text-properties style:font-name="Consolas" style:font-name-complex="Times New Roman" fo:font-size="11pt" style:font-size-asian="11pt" style:font-size-complex="11pt"/>
    </style:style>
    <style:style style:name="P408" style:parent-style-name="Normal" style:family="paragraph">
      <style:text-properties style:font-name="Consolas" style:font-name-complex="Times New Roman" fo:font-size="11pt" style:font-size-asian="11pt" style:font-size-complex="11pt"/>
    </style:style>
    <style:style style:name="P409" style:parent-style-name="Normal" style:family="paragraph">
      <style:text-properties style:font-name="Consolas" style:font-name-complex="Times New Roman" fo:font-size="11pt" style:font-size-asian="11pt" style:font-size-complex="11pt"/>
    </style:style>
    <style:style style:name="P410" style:parent-style-name="Normal" style:family="paragraph">
      <style:text-properties style:font-name="Consolas" style:font-name-complex="Times New Roman" fo:font-size="11pt" style:font-size-asian="11pt" style:font-size-complex="11pt"/>
    </style:style>
    <style:style style:name="P411" style:parent-style-name="Normal" style:family="paragraph">
      <style:text-properties style:font-name="Consolas" style:font-name-complex="Times New Roman" fo:font-size="11pt" style:font-size-asian="11pt" style:font-size-complex="11pt"/>
    </style:style>
    <style:style style:name="P412" style:parent-style-name="Normal" style:family="paragraph">
      <style:text-properties style:font-name="Consolas" style:font-name-complex="Times New Roman" fo:font-size="11pt" style:font-size-asian="11pt" style:font-size-complex="11pt"/>
    </style:style>
    <style:style style:name="P413" style:parent-style-name="Normal" style:family="paragraph">
      <style:text-properties style:font-name="Consolas" style:font-name-complex="Times New Roman" fo:font-size="11pt" style:font-size-asian="11pt" style:font-size-complex="11pt"/>
    </style:style>
    <style:style style:name="P414" style:parent-style-name="Normal" style:family="paragraph">
      <style:text-properties style:font-name="Consolas" style:font-name-complex="Times New Roman" fo:font-size="11pt" style:font-size-asian="11pt" style:font-size-complex="11pt"/>
    </style:style>
    <style:style style:name="P415" style:parent-style-name="Normal" style:family="paragraph">
      <style:text-properties style:font-name="Consolas" style:font-name-complex="Times New Roman" fo:font-size="11pt" style:font-size-asian="11pt" style:font-size-complex="11pt"/>
    </style:style>
    <style:style style:name="P416" style:parent-style-name="Normal" style:family="paragraph">
      <style:text-properties style:font-name="Consolas" style:font-name-complex="Times New Roman" fo:font-size="11pt" style:font-size-asian="11pt" style:font-size-complex="11pt"/>
    </style:style>
    <style:style style:name="P417" style:parent-style-name="Normal" style:family="paragraph">
      <style:text-properties style:font-name="Consolas" style:font-name-complex="Times New Roman" fo:font-size="11pt" style:font-size-asian="11pt" style:font-size-complex="11pt"/>
    </style:style>
    <style:style style:name="P418" style:parent-style-name="Normal" style:family="paragraph">
      <style:text-properties style:font-name="Times New Roman" style:font-name-complex="Times New Roman" fo:font-size="14pt" style:font-size-asian="14pt" style:font-size-complex="14pt"/>
    </style:style>
    <style:style style:name="TableColumn420" style:family="table-column">
      <style:table-column-properties style:column-width="3.2444in"/>
    </style:style>
    <style:style style:name="TableColumn421" style:family="table-column">
      <style:table-column-properties style:column-width="3.2444in"/>
    </style:style>
    <style:style style:name="Table419" style:family="table">
      <style:table-properties style:width="6.4888in" fo:margin-left="0in" table:align="left"/>
    </style:style>
    <style:style style:name="TableRow422" style:family="table-row">
      <style:table-row-properties/>
    </style:style>
    <style:style style:name="TableCell42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424" style:parent-style-name="Normal" style:family="paragraph">
      <style:text-properties style:font-name="Times New Roman" style:font-name-complex="Times New Roman" fo:font-size="14pt" style:font-size-asian="14pt" style:font-size-complex="14pt"/>
    </style:style>
    <style:style style:name="P425" style:parent-style-name="Normal" style:family="paragraph">
      <style:text-properties style:font-name="Times New Roman" style:font-name-complex="Times New Roman" fo:font-size="14pt" style:font-size-asian="14pt" style:font-size-complex="14pt"/>
    </style:style>
    <style:style style:name="P426" style:parent-style-name="Normal" style:family="paragraph">
      <style:text-properties style:font-name="Times New Roman" style:font-name-complex="Times New Roman" fo:font-size="14pt" style:font-size-asian="14pt" style:font-size-complex="14pt"/>
    </style:style>
    <style:style style:name="TableCell42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428" style:parent-style-name="Normal" style:family="paragraph">
      <style:text-properties style:font-name="Times New Roman" style:font-name-complex="Times New Roman" fo:font-size="14pt" style:font-size-asian="14pt" style:font-size-complex="14pt"/>
    </style:style>
    <style:style style:name="P429" style:parent-style-name="Normal" style:family="paragraph">
      <style:text-properties style:font-name="Times New Roman" style:font-name-complex="Times New Roman" fo:font-size="14pt" style:font-size-asian="14pt" style:font-size-complex="14pt"/>
    </style:style>
    <style:style style:name="P430" style:parent-style-name="Normal" style:family="paragraph">
      <style:text-properties style:font-name="Times New Roman" style:font-name-complex="Times New Roman" fo:font-size="14pt" style:font-size-asian="14pt" style:font-size-complex="14pt"/>
    </style:style>
    <style:style style:name="TableRow431" style:family="table-row">
      <style:table-row-properties/>
    </style:style>
    <style:style style:name="TableCell43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433" style:parent-style-name="Normal" style:family="paragraph">
      <style:text-properties style:font-name="Times New Roman" style:font-name-complex="Times New Roman" fo:font-size="14pt" style:font-size-asian="14pt" style:font-size-complex="14pt"/>
    </style:style>
    <style:style style:name="P434" style:parent-style-name="Normal" style:family="paragraph">
      <style:text-properties style:font-name="Times New Roman" style:font-name-complex="Times New Roman" fo:font-size="14pt" style:font-size-asian="14pt" style:font-size-complex="14pt"/>
    </style:style>
    <style:style style:name="P435" style:parent-style-name="Normal" style:family="paragraph">
      <style:text-properties style:font-name="Times New Roman" style:font-name-complex="Times New Roman" fo:font-size="14pt" style:font-size-asian="14pt" style:font-size-complex="14pt"/>
    </style:style>
    <style:style style:name="TableCell43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437" style:parent-style-name="Normal" style:family="paragraph">
      <style:text-properties style:font-name="Times New Roman" style:font-name-complex="Times New Roman" fo:font-size="14pt" style:font-size-asian="14pt" style:font-size-complex="14pt"/>
    </style:style>
    <style:style style:name="P438" style:parent-style-name="Normal" style:family="paragraph">
      <style:text-properties style:font-name="Times New Roman" style:font-name-complex="Times New Roman" fo:font-size="14pt" style:font-size-asian="14pt" style:font-size-complex="14pt"/>
    </style:style>
    <style:style style:name="P439" style:parent-style-name="Normal" style:family="paragraph">
      <style:text-properties style:font-name="Times New Roman" style:font-name-complex="Times New Roman" fo:font-size="14pt" style:font-size-asian="14pt" style:font-size-complex="14pt"/>
    </style:style>
    <style:style style:name="P440" style:parent-style-name="Normal" style:family="paragraph">
      <style:text-properties style:font-name="Times New Roman" style:font-name-complex="Times New Roman" fo:font-size="14pt" style:font-size-asian="14pt" style:font-size-complex="14pt"/>
    </style:style>
    <style:style style:name="P441" style:parent-style-name="Normal" style:family="paragraph">
      <style:text-properties style:font-name="Times New Roman" style:font-name-complex="Times New Roman" fo:font-size="14pt" style:font-size-asian="14pt" style:font-size-complex="14pt"/>
    </style:style>
    <style:style style:name="T4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3" style:parent-style-name="DefaultParagraphFont" style:family="text">
      <style:text-properties style:font-name="Times New Roman" style:font-name-complex="Times New Roman" fo:font-size="14pt" style:font-size-asian="14pt" style:font-size-complex="14pt"/>
    </style:style>
    <style:style style:name="T4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45" style:parent-style-name="Normal" style:family="paragraph">
      <style:text-properties style:font-name="Times New Roman" style:font-name-complex="Times New Roman" fo:font-size="14pt" style:font-size-asian="14pt" style:font-size-complex="14pt"/>
    </style:style>
    <style:style style:name="P446" style:parent-style-name="Normal" style:family="paragraph">
      <style:text-properties style:font-name="Times New Roman" style:font-name-complex="Times New Roman" fo:font-size="14pt" style:font-size-asian="14pt" style:font-size-complex="14pt"/>
    </style:style>
    <style:style style:name="T4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49" style:parent-style-name="Normal" style:family="paragraph">
      <style:text-properties style:font-name="Times New Roman" style:font-name-complex="Times New Roman" fo:font-size="14pt" style:font-size-asian="14pt" style:font-size-complex="14pt"/>
    </style:style>
    <style:style style:name="T450" style:parent-style-name="DefaultParagraphFont" style:family="text">
      <style:text-properties style:font-name="Times New Roman" style:font-name-complex="Times New Roman" fo:font-size="14pt" style:font-size-asian="14pt" style:font-size-complex="14pt"/>
    </style:style>
    <style:style style:name="P451" style:parent-style-name="Normal" style:family="paragraph">
      <style:text-properties style:font-name="Times New Roman" style:font-name-complex="Times New Roman" fo:font-size="14pt" style:font-size-asian="14pt" style:font-size-complex="14pt"/>
    </style:style>
    <style:style style:name="T4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54" style:parent-style-name="DefaultParagraphFont" style:family="text">
      <style:text-properties style:font-name="Times New Roman" style:font-name-complex="Times New Roman" fo:font-size="14pt" style:font-size-asian="14pt" style:font-size-complex="14pt"/>
    </style:style>
    <style:style style:name="T455" style:parent-style-name="DefaultParagraphFont" style:family="text">
      <style:text-properties style:font-name="Times New Roman" style:font-name-complex="Times New Roman" fo:font-size="14pt" style:font-size-asian="14pt" style:font-size-complex="14pt"/>
    </style:style>
    <style:style style:name="T4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57" style:parent-style-name="DefaultParagraphFont" style:family="text">
      <style:text-properties style:font-name="Times New Roman" style:font-name-complex="Times New Roman" fo:font-size="14pt" style:font-size-asian="14pt" style:font-size-complex="14pt"/>
    </style:style>
    <style:style style:name="T458" style:parent-style-name="DefaultParagraphFont" style:family="text">
      <style:text-properties style:font-name="Times New Roman" style:font-name-complex="Times New Roman" fo:font-size="14pt" style:font-size-asian="14pt" style:font-size-complex="14pt"/>
    </style:style>
    <style:style style:name="T4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61" style:parent-style-name="Normal" style:family="paragraph">
      <style:text-properties style:font-name="Times New Roman" style:font-name-complex="Times New Roman" fo:font-size="14pt" style:font-size-asian="14pt" style:font-size-complex="14pt"/>
    </style:style>
    <style:style style:name="P462" style:parent-style-name="Normal" style:family="paragraph">
      <style:text-properties style:font-name="Times New Roman" style:font-name-complex="Times New Roman" fo:font-size="14pt" style:font-size-asian="14pt" style:font-size-complex="14pt"/>
    </style:style>
    <style:style style:name="P463" style:parent-style-name="Normal" style:family="paragraph">
      <style:text-properties style:font-name="Times New Roman" style:font-name-complex="Times New Roman" fo:font-size="14pt" style:font-size-asian="14pt" style:font-size-complex="14pt"/>
    </style:style>
    <style:style style:name="T4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5" style:parent-style-name="DefaultParagraphFont" style:family="text">
      <style:text-properties style:font-name="Times New Roman" style:font-name-complex="Times New Roman" fo:font-size="14pt" style:font-size-asian="14pt" style:font-size-complex="14pt"/>
    </style:style>
    <style:style style:name="T4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68" style:parent-style-name="Normal" style:family="paragraph">
      <style:text-properties style:font-name="Times New Roman" style:font-name-complex="Times New Roman" fo:font-size="14pt" style:font-size-asian="14pt" style:font-size-complex="14pt"/>
    </style:style>
    <style:style style:name="P469" style:parent-style-name="Normal" style:family="paragraph">
      <style:text-properties style:font-name="Times New Roman" style:font-name-complex="Times New Roman" fo:font-size="14pt" style:font-size-asian="14pt" style:font-size-complex="14pt"/>
    </style:style>
    <style:style style:name="P470" style:parent-style-name="Normal" style:family="paragraph">
      <style:text-properties style:font-name="Times New Roman" style:font-name-complex="Times New Roman" fo:font-size="14pt" style:font-size-asian="14pt" style:font-size-complex="14pt"/>
    </style:style>
    <style:style style:name="T4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2" style:parent-style-name="DefaultParagraphFont" style:family="text">
      <style:text-properties style:font-name="Times New Roman" style:font-name-complex="Times New Roman" fo:font-size="14pt" style:font-size-asian="14pt" style:font-size-complex="14pt"/>
    </style:style>
    <style:style style:name="T4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74" style:parent-style-name="Normal" style:family="paragraph">
      <style:text-properties style:font-name="Times New Roman" style:font-name-complex="Times New Roman" fo:font-size="14pt" style:font-size-asian="14pt" style:font-size-complex="14pt"/>
    </style:style>
    <style:style style:name="T4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77" style:parent-style-name="Normal" style:family="paragraph">
      <style:text-properties style:font-name="Times New Roman" style:font-name-complex="Times New Roman" fo:font-size="14pt" style:font-size-asian="14pt" style:font-size-complex="14pt"/>
    </style:style>
    <style:style style:name="T478" style:parent-style-name="DefaultParagraphFont" style:family="text">
      <style:text-properties style:font-name="Times New Roman" style:font-name-complex="Times New Roman" fo:font-size="14pt" style:font-size-asian="14pt" style:font-size-complex="14pt"/>
    </style:style>
    <style:style style:name="P479" style:parent-style-name="Normal" style:family="paragraph">
      <style:text-properties style:font-name="Times New Roman" style:font-name-complex="Times New Roman" fo:font-size="14pt" style:font-size-asian="14pt" style:font-size-complex="14pt"/>
    </style:style>
    <style:style style:name="P480" style:parent-style-name="Normal" style:family="paragraph">
      <style:text-properties style:font-name="Times New Roman" style:font-name-complex="Times New Roman" fo:font-size="14pt" style:font-size-asian="14pt" style:font-size-complex="14pt"/>
    </style:style>
    <style:style style:name="P481" style:parent-style-name="Normal" style:family="paragraph">
      <style:text-properties style:font-name="Times New Roman" style:font-name-complex="Times New Roman" fo:font-size="14pt" style:font-size-asian="14pt" style:font-size-complex="14pt"/>
    </style:style>
    <style:style style:name="T4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3" style:parent-style-name="DefaultParagraphFont" style:family="text">
      <style:text-properties style:font-name="Times New Roman" style:font-name-complex="Times New Roman" fo:font-size="14pt" style:font-size-asian="14pt" style:font-size-complex="14pt"/>
    </style:style>
    <style:style style:name="T4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86" style:parent-style-name="Normal" style:family="paragraph">
      <style:text-properties style:font-name="Times New Roman" style:font-name-complex="Times New Roman" fo:font-size="14pt" style:font-size-asian="14pt" style:font-size-complex="14pt"/>
    </style:style>
    <style:style style:name="P487" style:parent-style-name="Normal" style:family="paragraph">
      <style:text-properties style:font-name="Times New Roman" style:font-name-complex="Times New Roman" fo:font-size="14pt" style:font-size-asian="14pt" style:font-size-complex="14pt"/>
    </style:style>
    <style:style style:name="P488" style:parent-style-name="Normal" style:family="paragraph">
      <style:text-properties style:font-name="Times New Roman" style:font-name-complex="Times New Roman" fo:font-size="14pt" style:font-size-asian="14pt" style:font-size-complex="14pt"/>
    </style:style>
    <style:style style:name="T4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0" style:parent-style-name="DefaultParagraphFont" style:family="text">
      <style:text-properties style:font-name="Times New Roman" style:font-name-complex="Times New Roman" fo:font-size="14pt" style:font-size-asian="14pt" style:font-size-complex="14pt"/>
    </style:style>
    <style:style style:name="T4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93" style:parent-style-name="Normal" style:family="paragraph">
      <style:text-properties style:font-name="Times New Roman" style:font-name-complex="Times New Roman" fo:font-size="14pt" style:font-size-asian="14pt" style:font-size-complex="14pt"/>
    </style:style>
    <style:style style:name="P494" style:parent-style-name="Normal" style:family="paragraph">
      <style:text-properties style:font-name="Times New Roman" style:font-name-complex="Times New Roman" fo:font-size="14pt" style:font-size-asian="14pt" style:font-size-complex="14pt"/>
    </style:style>
    <style:style style:name="P495" style:parent-style-name="Normal" style:family="paragraph">
      <style:text-properties style:font-name="Times New Roman" style:font-name-complex="Times New Roman" fo:font-size="14pt" style:font-size-asian="14pt" style:font-size-complex="14pt"/>
    </style:style>
    <style:style style:name="T4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7" style:parent-style-name="DefaultParagraphFont" style:family="text">
      <style:text-properties style:font-name="Times New Roman" style:font-name-complex="Times New Roman" fo:font-size="14pt" style:font-size-asian="14pt" style:font-size-complex="14pt"/>
    </style:style>
    <style:style style:name="T4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99" style:parent-style-name="Normal" style:family="paragraph">
      <style:text-properties style:font-name="Times New Roman" style:font-name-complex="Times New Roman" fo:font-size="14pt" style:font-size-asian="14pt" style:font-size-complex="14pt"/>
    </style:style>
    <style:style style:name="T5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02" style:parent-style-name="Normal" style:family="paragraph">
      <style:text-properties style:font-name="Times New Roman" style:font-name-complex="Times New Roman" fo:font-size="14pt" style:font-size-asian="14pt" style:font-size-complex="14pt"/>
    </style:style>
    <style:style style:name="P503" style:parent-style-name="Normal" style:family="paragraph">
      <style:text-properties style:font-name="Times New Roman" style:font-name-complex="Times New Roman" fo:font-size="14pt" style:font-size-asian="14pt" style:font-size-complex="14pt"/>
    </style:style>
    <style:style style:name="P504" style:parent-style-name="Normal" style:family="paragraph">
      <style:text-properties style:font-name="Times New Roman" style:font-name-complex="Times New Roman" fo:font-size="14pt" style:font-size-asian="14pt" style:font-size-complex="14pt"/>
    </style:style>
    <style:style style:name="T5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6" style:parent-style-name="DefaultParagraphFont" style:family="text">
      <style:text-properties style:font-name="Times New Roman" style:font-name-complex="Times New Roman" fo:font-size="14pt" style:font-size-asian="14pt" style:font-size-complex="14pt"/>
    </style:style>
    <style:style style:name="T5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9" style:parent-style-name="DefaultParagraphFont" style:family="text">
      <style:text-properties style:font-name="Times New Roman" style:font-name-complex="Times New Roman" fo:font-size="14pt" style:font-size-asian="14pt" style:font-size-complex="14pt"/>
    </style:style>
    <style:style style:name="T5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12" style:parent-style-name="Normal" style:family="paragraph">
      <style:text-properties style:font-name="Times New Roman" style:font-name-complex="Times New Roman" fo:font-size="14pt" style:font-size-asian="14pt" style:font-size-complex="14pt"/>
    </style:style>
    <style:style style:name="T513" style:parent-style-name="DefaultParagraphFont" style:family="text">
      <style:text-properties style:font-name="Times New Roman" style:font-name-complex="Times New Roman" fo:font-size="14pt" style:font-size-asian="14pt" style:font-size-complex="14pt"/>
    </style:style>
    <style:style style:name="P514" style:parent-style-name="Normal" style:family="paragraph">
      <style:text-properties style:font-name="Times New Roman" style:font-name-complex="Times New Roman" fo:font-size="14pt" style:font-size-asian="14pt" style:font-size-complex="14pt"/>
    </style:style>
    <style:style style:name="P515" style:parent-style-name="Normal" style:family="paragraph">
      <style:text-properties style:font-name="Times New Roman" style:font-name-complex="Times New Roman" fo:font-size="14pt" style:font-size-asian="14pt" style:font-size-complex="14pt"/>
    </style:style>
    <style:style style:name="P516" style:parent-style-name="Normal" style:family="paragraph">
      <style:text-properties style:font-name="Times New Roman" style:font-name-complex="Times New Roman" fo:font-size="14pt" style:font-size-asian="14pt" style:font-size-complex="14pt"/>
    </style:style>
    <style:style style:name="T5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8" style:parent-style-name="DefaultParagraphFont" style:family="text">
      <style:text-properties style:font-name="Times New Roman" style:font-name-complex="Times New Roman" fo:font-size="14pt" style:font-size-asian="14pt" style:font-size-complex="14pt"/>
    </style:style>
    <style:style style:name="T5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21" style:parent-style-name="Normal" style:family="paragraph">
      <style:text-properties style:font-name="Times New Roman" style:font-name-complex="Times New Roman" fo:font-size="14pt" style:font-size-asian="14pt" style:font-size-complex="14pt"/>
    </style:style>
    <style:style style:name="T522" style:parent-style-name="DefaultParagraphFont" style:family="text">
      <style:text-properties style:font-name="Times New Roman" style:font-name-complex="Times New Roman" fo:font-size="14pt" style:font-size-asian="14pt" style:font-size-complex="14pt"/>
    </style:style>
    <style:style style:name="P523" style:parent-style-name="Normal" style:family="paragraph">
      <style:text-properties style:font-name="Times New Roman" style:font-name-complex="Times New Roman" fo:font-size="14pt" style:font-size-asian="14pt" style:font-size-complex="14pt"/>
    </style:style>
    <style:style style:name="T5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25" style:parent-style-name="Normal" style:family="paragraph">
      <style:text-properties style:font-name="Times New Roman" style:font-name-complex="Times New Roman" fo:font-size="14pt" style:font-size-asian="14pt" style:font-size-complex="14pt"/>
    </style:style>
    <style:style style:name="T5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28" style:parent-style-name="Normal" style:family="paragraph">
      <style:text-properties style:font-name="Times New Roman" style:font-name-complex="Times New Roman" fo:font-size="14pt" style:font-size-asian="14pt" style:font-size-complex="14pt"/>
    </style:style>
    <style:style style:name="P529" style:parent-style-name="Normal" style:family="paragraph">
      <style:text-properties style:font-name="Times New Roman" style:font-name-complex="Times New Roman" fo:font-size="14pt" style:font-size-asian="14pt" style:font-size-complex="14pt"/>
    </style:style>
    <style:style style:name="P530" style:parent-style-name="Normal" style:family="paragraph">
      <style:text-properties style:font-name="Times New Roman" style:font-name-complex="Times New Roman" fo:font-size="14pt" style:font-size-asian="14pt" style:font-size-complex="14pt"/>
    </style:style>
    <style:style style:name="T5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2" style:parent-style-name="DefaultParagraphFont" style:family="text">
      <style:text-properties style:font-name="Times New Roman" style:font-name-complex="Times New Roman" fo:font-size="14pt" style:font-size-asian="14pt" style:font-size-complex="14pt"/>
    </style:style>
    <style:style style:name="T5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35" style:parent-style-name="Normal" style:family="paragraph">
      <style:text-properties style:font-name="Times New Roman" style:font-name-complex="Times New Roman" fo:font-size="14pt" style:font-size-asian="14pt" style:font-size-complex="14pt"/>
    </style:style>
    <style:style style:name="P536" style:parent-style-name="Normal" style:family="paragraph">
      <style:text-properties style:font-name="Times New Roman" style:font-name-complex="Times New Roman" fo:font-size="14pt" style:font-size-asian="14pt" style:font-size-complex="14pt"/>
    </style:style>
    <style:style style:name="P537" style:parent-style-name="Normal" style:family="paragraph">
      <style:text-properties style:font-name="Times New Roman" style:font-name-complex="Times New Roman" fo:font-size="14pt" style:font-size-asian="14pt" style:font-size-complex="14pt"/>
    </style:style>
    <style:style style:name="T5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9" style:parent-style-name="DefaultParagraphFont" style:family="text">
      <style:text-properties style:font-name="Times New Roman" style:font-name-complex="Times New Roman" fo:font-size="14pt" style:font-size-asian="14pt" style:font-size-complex="14pt"/>
    </style:style>
    <style:style style:name="T5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1" style:parent-style-name="DefaultParagraphFont" style:family="text">
      <style:text-properties style:font-name="Times New Roman" style:font-name-complex="Times New Roman" fo:font-size="14pt" style:font-size-asian="14pt" style:font-size-complex="14pt"/>
    </style:style>
    <style:style style:name="T5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3" style:parent-style-name="DefaultParagraphFont" style:family="text">
      <style:text-properties style:font-name="Times New Roman" style:font-name-complex="Times New Roman" fo:font-size="14pt" style:font-size-asian="14pt" style:font-size-complex="14pt"/>
    </style:style>
    <style:style style:name="T5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46" style:parent-style-name="Normal" style:family="paragraph">
      <style:text-properties style:font-name="Times New Roman" style:font-name-complex="Times New Roman" fo:font-size="14pt" style:font-size-asian="14pt" style:font-size-complex="14pt"/>
    </style:style>
    <style:style style:name="T547" style:parent-style-name="DefaultParagraphFont" style:family="text">
      <style:text-properties style:font-name="Times New Roman" style:font-name-complex="Times New Roman" fo:font-size="14pt" style:font-size-asian="14pt" style:font-size-complex="14pt"/>
    </style:style>
    <style:style style:name="P548" style:parent-style-name="Normal" style:family="paragraph">
      <style:text-properties style:font-name="Times New Roman" style:font-name-complex="Times New Roman" fo:font-size="14pt" style:font-size-asian="14pt" style:font-size-complex="14pt"/>
    </style:style>
    <style:style style:name="P549" style:parent-style-name="Normal" style:family="paragraph">
      <style:text-properties style:font-name="Times New Roman" style:font-name-complex="Times New Roman" fo:font-size="14pt" style:font-size-asian="14pt" style:font-size-complex="14pt" fo:language="it" fo:country="IT"/>
    </style:style>
    <style:style style:name="P550" style:parent-style-name="Normal" style:family="paragraph">
      <style:text-properties style:font-name="Times New Roman" style:font-name-complex="Times New Roman" fo:font-size="14pt" style:font-size-asian="14pt" style:font-size-complex="14pt" fo:language="it" fo:country="IT"/>
    </style:style>
    <style:style style:name="T5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2" style:parent-style-name="DefaultParagraphFont" style:family="text">
      <style:text-properties style:font-name="Times New Roman" style:font-name-complex="Times New Roman" fo:font-size="14pt" style:font-size-asian="14pt" style:font-size-complex="14pt"/>
    </style:style>
    <style:style style:name="T5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55" style:parent-style-name="Normal" style:family="paragraph">
      <style:text-properties style:font-name="Times New Roman" style:font-name-complex="Times New Roman" fo:font-size="14pt" style:font-size-asian="14pt" style:font-size-complex="14pt"/>
    </style:style>
    <style:style style:name="P556" style:parent-style-name="Normal" style:family="paragraph">
      <style:text-properties style:font-name="Times New Roman" style:font-name-complex="Times New Roman" fo:font-size="14pt" style:font-size-asian="14pt" style:font-size-complex="14pt"/>
    </style:style>
    <style:style style:name="P557" style:parent-style-name="Normal" style:family="paragraph">
      <style:text-properties style:font-name="Times New Roman" style:font-name-complex="Times New Roman" fo:font-size="14pt" style:font-size-asian="14pt" style:font-size-complex="14pt"/>
    </style:style>
    <style:style style:name="T5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9" style:parent-style-name="DefaultParagraphFont" style:family="text">
      <style:text-properties style:font-name="Times New Roman" style:font-name-complex="Times New Roman" fo:font-size="14pt" style:font-size-asian="14pt" style:font-size-complex="14pt"/>
    </style:style>
    <style:style style:name="T5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61" style:parent-style-name="Normal" style:family="paragraph">
      <style:text-properties style:font-name="Times New Roman" style:font-name-complex="Times New Roman" fo:font-size="14pt" style:font-size-asian="14pt" style:font-size-complex="14pt"/>
    </style:style>
    <style:style style:name="T5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64" style:parent-style-name="Normal" style:family="paragraph">
      <style:text-properties style:font-name="Times New Roman" style:font-name-complex="Times New Roman" fo:font-size="14pt" style:font-size-asian="14pt" style:font-size-complex="14pt"/>
    </style:style>
    <style:style style:name="P565" style:parent-style-name="Normal" style:family="paragraph">
      <style:text-properties style:font-name="Times New Roman" style:font-name-complex="Times New Roman" fo:font-size="14pt" style:font-size-asian="14pt" style:font-size-complex="14pt"/>
    </style:style>
    <style:style style:name="P566" style:parent-style-name="Normal" style:family="paragraph">
      <style:text-properties style:font-name="Times New Roman" style:font-name-complex="Times New Roman" fo:font-size="14pt" style:font-size-asian="14pt" style:font-size-complex="14pt"/>
    </style:style>
    <style:style style:name="T5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8" style:parent-style-name="DefaultParagraphFont" style:family="text">
      <style:text-properties style:font-name="Times New Roman" style:font-name-complex="Times New Roman" fo:font-size="14pt" style:font-size-asian="14pt" style:font-size-complex="14pt"/>
    </style:style>
    <style:style style:name="T5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70" style:parent-style-name="Normal" style:family="paragraph">
      <style:text-properties style:font-name="Times New Roman" style:font-name-complex="Times New Roman" fo:font-size="14pt" style:font-size-asian="14pt" style:font-size-complex="14pt"/>
    </style:style>
    <style:style style:name="P571" style:parent-style-name="Normal" style:family="paragraph">
      <style:text-properties style:font-name="Times New Roman" style:font-name-complex="Times New Roman" fo:font-size="14pt" style:font-size-asian="14pt" style:font-size-complex="14pt"/>
    </style:style>
    <style:style style:name="T5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74" style:parent-style-name="Normal" style:family="paragraph">
      <style:text-properties style:font-name="Times New Roman" style:font-name-complex="Times New Roman" fo:font-size="14pt" style:font-size-asian="14pt" style:font-size-complex="14pt"/>
    </style:style>
    <style:style style:name="P575" style:parent-style-name="Normal" style:family="paragraph">
      <style:text-properties style:font-name="Times New Roman" style:font-name-complex="Times New Roman" fo:font-size="14pt" style:font-size-asian="14pt" style:font-size-complex="14pt"/>
    </style:style>
    <style:style style:name="P576" style:parent-style-name="Normal" style:family="paragraph">
      <style:text-properties style:font-name="Times New Roman" style:font-name-complex="Times New Roman" fo:font-size="14pt" style:font-size-asian="14pt" style:font-size-complex="14pt"/>
    </style:style>
    <style:style style:name="T5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78" style:parent-style-name="DefaultParagraphFont" style:family="text">
      <style:text-properties style:font-name="Times New Roman" style:font-name-complex="Times New Roman" fo:font-size="14pt" style:font-size-asian="14pt" style:font-size-complex="14pt"/>
    </style:style>
    <style:style style:name="T5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80" style:parent-style-name="Normal" style:family="paragraph">
      <style:text-properties style:font-name="Times New Roman" style:font-name-complex="Times New Roman" fo:font-size="14pt" style:font-size-asian="14pt" style:font-size-complex="14pt"/>
    </style:style>
    <style:style style:name="T5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83" style:parent-style-name="Normal" style:family="paragraph">
      <style:text-properties style:font-name="Times New Roman" style:font-name-complex="Times New Roman" fo:font-size="14pt" style:font-size-asian="14pt" style:font-size-complex="14pt"/>
    </style:style>
    <style:style style:name="P584" style:parent-style-name="Normal" style:family="paragraph">
      <style:text-properties style:font-name="Consolas" style:font-name-complex="Times New Roman" fo:font-size="11pt" style:font-size-asian="11pt" style:font-size-complex="11pt"/>
    </style:style>
    <style:style style:name="P585" style:parent-style-name="Normal" style:family="paragraph">
      <style:text-properties style:font-name="Consolas" style:font-name-complex="Times New Roman" fo:font-size="11pt" style:font-size-asian="11pt" style:font-size-complex="11pt"/>
    </style:style>
    <style:style style:name="P586" style:parent-style-name="Normal" style:family="paragraph">
      <style:text-properties style:font-name="Consolas" style:font-name-complex="Times New Roman" fo:font-size="11pt" style:font-size-asian="11pt" style:font-size-complex="11pt"/>
    </style:style>
    <style:style style:name="P587" style:parent-style-name="Normal" style:family="paragraph">
      <style:text-properties style:font-name="Consolas" style:font-name-complex="Times New Roman" fo:font-size="11pt" style:font-size-asian="11pt" style:font-size-complex="11pt"/>
    </style:style>
    <style:style style:name="P588" style:parent-style-name="Normal" style:family="paragraph">
      <style:text-properties style:font-name="Consolas" style:font-name-complex="Times New Roman" fo:font-size="11pt" style:font-size-asian="11pt" style:font-size-complex="11pt"/>
    </style:style>
    <style:style style:name="P589" style:parent-style-name="Normal" style:family="paragraph">
      <style:text-properties style:font-name="Consolas" style:font-name-complex="Times New Roman" fo:font-size="11pt" style:font-size-asian="11pt" style:font-size-complex="11pt"/>
    </style:style>
    <style:style style:name="P590" style:parent-style-name="Normal" style:family="paragraph">
      <style:text-properties style:font-name="Consolas" style:font-name-complex="Times New Roman" fo:font-size="11pt" style:font-size-asian="11pt" style:font-size-complex="11pt"/>
    </style:style>
    <style:style style:name="P591" style:parent-style-name="Normal" style:family="paragraph">
      <style:text-properties style:font-name="Consolas" style:font-name-complex="Times New Roman" fo:font-size="11pt" style:font-size-asian="11pt" style:font-size-complex="11pt"/>
    </style:style>
    <style:style style:name="P592" style:parent-style-name="Normal" style:family="paragraph">
      <style:text-properties style:font-name="Consolas" style:font-name-complex="Times New Roman" fo:font-size="11pt" style:font-size-asian="11pt" style:font-size-complex="11pt"/>
    </style:style>
    <style:style style:name="P593" style:parent-style-name="Normal" style:family="paragraph">
      <style:text-properties style:font-name="Consolas" style:font-name-complex="Times New Roman" fo:font-size="11pt" style:font-size-asian="11pt" style:font-size-complex="11pt"/>
    </style:style>
    <style:style style:name="P594" style:parent-style-name="Normal" style:family="paragraph">
      <style:text-properties style:font-name="Consolas" style:font-name-complex="Times New Roman" fo:font-size="11pt" style:font-size-asian="11pt" style:font-size-complex="11pt"/>
    </style:style>
    <style:style style:name="P595" style:parent-style-name="Normal" style:family="paragraph">
      <style:text-properties style:font-name="Consolas" style:font-name-complex="Times New Roman" fo:font-size="11pt" style:font-size-asian="11pt" style:font-size-complex="11pt"/>
    </style:style>
    <style:style style:name="P596" style:parent-style-name="Normal" style:family="paragraph">
      <style:text-properties style:font-name="Consolas" style:font-name-complex="Times New Roman" fo:font-size="11pt" style:font-size-asian="11pt" style:font-size-complex="11pt"/>
    </style:style>
    <style:style style:name="P597" style:parent-style-name="Normal" style:family="paragraph">
      <style:text-properties style:font-name="Times New Roman" style:font-name-complex="Times New Roman" fo:font-size="14pt" style:font-size-asian="14pt" style:font-size-complex="14pt"/>
    </style:style>
    <style:style style:name="P598" style:parent-style-name="Normal" style:family="paragraph">
      <style:text-properties style:font-name="Times New Roman" style:font-name-complex="Times New Roman" fo:font-size="14pt" style:font-size-asian="14pt" style:font-size-complex="14pt"/>
    </style:style>
    <style:style style:name="P599" style:parent-style-name="Normal" style:family="paragraph">
      <style:text-properties style:font-name="Times New Roman" style:font-name-complex="Times New Roman" fo:font-size="14pt" style:font-size-asian="14pt" style:font-size-complex="14pt"/>
    </style:style>
    <style:style style:name="P600" style:parent-style-name="Normal" style:family="paragraph">
      <style:text-properties style:font-name="Times New Roman" style:font-name-complex="Times New Roman" fo:font-size="14pt" style:font-size-asian="14pt" style:font-size-complex="14pt"/>
    </style:style>
    <style:style style:name="P601" style:parent-style-name="Normal" style:family="paragraph">
      <style:text-properties style:font-name="Times New Roman" style:font-name-complex="Times New Roman" fo:font-size="14pt" style:font-size-asian="14pt" style:font-size-complex="14pt"/>
    </style:style>
    <style:style style:name="P602" style:parent-style-name="Normal" style:family="paragraph">
      <style:text-properties style:font-name="Times New Roman" style:font-name-complex="Times New Roman" fo:font-size="14pt" style:font-size-asian="14pt" style:font-size-complex="14pt"/>
    </style:style>
    <style:style style:name="T6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04" style:parent-style-name="DefaultParagraphFont" style:family="text">
      <style:text-properties style:font-name="Times New Roman" style:font-name-complex="Times New Roman" fo:font-size="14pt" style:font-size-asian="14pt" style:font-size-complex="14pt"/>
    </style:style>
    <style:style style:name="T6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06" style:parent-style-name="Normal" style:family="paragraph">
      <style:text-properties style:font-name="Times New Roman" style:font-name-complex="Times New Roman" fo:font-size="14pt" style:font-size-asian="14pt" style:font-size-complex="14pt"/>
    </style:style>
    <style:style style:name="P607" style:parent-style-name="Normal" style:family="paragraph">
      <style:text-properties style:font-name="Times New Roman" style:font-name-complex="Times New Roman" fo:font-size="14pt" style:font-size-asian="14pt" style:font-size-complex="14pt"/>
    </style:style>
    <style:style style:name="T6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10" style:parent-style-name="Normal" style:family="paragraph">
      <style:text-properties style:font-name="Times New Roman" style:font-name-complex="Times New Roman" fo:font-size="14pt" style:font-size-asian="14pt" style:font-size-complex="14pt"/>
    </style:style>
    <style:style style:name="P611" style:parent-style-name="Normal" style:family="paragraph">
      <style:text-properties style:font-name="Times New Roman" style:font-name-complex="Times New Roman" fo:font-size="14pt" style:font-size-asian="14pt" style:font-size-complex="14pt"/>
    </style:style>
    <style:style style:name="P612" style:parent-style-name="Normal" style:family="paragraph">
      <style:text-properties style:font-name="Times New Roman" style:font-name-complex="Times New Roman" fo:font-size="14pt" style:font-size-asian="14pt" style:font-size-complex="14pt"/>
    </style:style>
    <style:style style:name="T6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4" style:parent-style-name="DefaultParagraphFont" style:family="text">
      <style:text-properties style:font-name="Times New Roman" style:font-name-complex="Times New Roman" fo:font-size="14pt" style:font-size-asian="14pt" style:font-size-complex="14pt"/>
    </style:style>
    <style:style style:name="T6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17" style:parent-style-name="Normal" style:family="paragraph">
      <style:text-properties style:font-name="Times New Roman" style:font-name-complex="Times New Roman" fo:font-size="14pt" style:font-size-asian="14pt" style:font-size-complex="14pt"/>
    </style:style>
    <style:style style:name="P618" style:parent-style-name="Normal" style:family="paragraph">
      <style:text-properties style:font-name="Times New Roman" style:font-name-complex="Times New Roman" fo:font-size="14pt" style:font-size-asian="14pt" style:font-size-complex="14pt"/>
    </style:style>
    <style:style style:name="P619" style:parent-style-name="Normal" style:family="paragraph">
      <style:text-properties style:font-name="Times New Roman" style:font-name-complex="Times New Roman" fo:font-size="14pt" style:font-size-asian="14pt" style:font-size-complex="14pt"/>
    </style:style>
    <style:style style:name="T6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1" style:parent-style-name="DefaultParagraphFont" style:family="text">
      <style:text-properties style:font-name="Times New Roman" style:font-name-complex="Times New Roman" fo:font-size="14pt" style:font-size-asian="14pt" style:font-size-complex="14pt"/>
    </style:style>
    <style:style style:name="T6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4" style:parent-style-name="DefaultParagraphFont" style:family="text">
      <style:text-properties style:font-name="Times New Roman" style:font-name-complex="Times New Roman" fo:font-size="14pt" style:font-size-asian="14pt" style:font-size-complex="14pt"/>
    </style:style>
    <style:style style:name="T625" style:parent-style-name="DefaultParagraphFont" style:family="text">
      <style:text-properties style:font-name="Times New Roman" style:font-name-complex="Times New Roman" fo:font-size="14pt" style:font-size-asian="14pt" style:font-size-complex="14pt"/>
    </style:style>
    <style:style style:name="T626" style:parent-style-name="DefaultParagraphFont" style:family="text">
      <style:text-properties style:font-name="Times New Roman" style:font-name-complex="Times New Roman" fo:font-size="14pt" style:font-size-asian="14pt" style:font-size-complex="14pt"/>
    </style:style>
    <style:style style:name="T627" style:parent-style-name="Hyperlink" style:family="text">
      <style:text-properties style:font-name="Times New Roman" style:font-name-complex="Times New Roman" fo:font-size="14pt" style:font-size-asian="14pt" style:font-size-complex="14pt"/>
    </style:style>
    <style:style style:name="P628" style:parent-style-name="Normal" style:family="paragraph">
      <style:text-properties style:font-name="Times New Roman" style:font-name-complex="Times New Roman" fo:font-size="14pt" style:font-size-asian="14pt" style:font-size-complex="14pt"/>
    </style:style>
    <style:style style:name="P629" style:parent-style-name="Normal" style:family="paragraph">
      <style:text-properties style:font-name="Times New Roman" style:font-name-complex="Times New Roman" fo:font-size="14pt" style:font-size-asian="14pt" style:font-size-complex="14pt"/>
    </style:style>
    <style:style style:name="T6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32" style:parent-style-name="Normal" style:family="paragraph">
      <style:text-properties style:font-name="Times New Roman" style:font-name-complex="Times New Roman" fo:font-size="14pt" style:font-size-asian="14pt" style:font-size-complex="14pt"/>
    </style:style>
    <style:style style:name="P633" style:parent-style-name="Normal" style:family="paragraph">
      <style:text-properties style:font-name="Times New Roman" style:font-name-complex="Times New Roman" fo:font-size="14pt" style:font-size-asian="14pt" style:font-size-complex="14pt"/>
    </style:style>
    <style:style style:name="P634" style:parent-style-name="Normal" style:family="paragraph">
      <style:text-properties style:font-name="Times New Roman" style:font-name-complex="Times New Roman" fo:font-size="14pt" style:font-size-asian="14pt" style:font-size-complex="14pt"/>
    </style:style>
    <style:style style:name="T6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6" style:parent-style-name="DefaultParagraphFont" style:family="text">
      <style:text-properties style:font-name="Times New Roman" style:font-name-complex="Times New Roman" fo:font-size="14pt" style:font-size-asian="14pt" style:font-size-complex="14pt"/>
    </style:style>
    <style:style style:name="T6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38" style:parent-style-name="Normal" style:family="paragraph">
      <style:text-properties style:font-name="Times New Roman" style:font-name-complex="Times New Roman" fo:font-size="14pt" style:font-size-asian="14pt" style:font-size-complex="14pt"/>
    </style:style>
    <style:style style:name="T639" style:parent-style-name="DefaultParagraphFont" style:family="text">
      <style:text-properties style:font-name="Times New Roman" style:font-name-complex="Times New Roman" fo:font-size="14pt" style:font-size-asian="14pt" style:font-size-complex="14pt"/>
    </style:style>
    <style:style style:name="T640" style:parent-style-name="Hyperlink" style:family="text">
      <style:text-properties style:font-name="Times New Roman" style:font-name-complex="Times New Roman" fo:font-size="14pt" style:font-size-asian="14pt" style:font-size-complex="14pt"/>
    </style:style>
    <style:style style:name="T6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43" style:parent-style-name="Normal" style:family="paragraph">
      <style:text-properties style:font-name="Times New Roman" style:font-name-complex="Times New Roman" fo:font-size="14pt" style:font-size-asian="14pt" style:font-size-complex="14pt"/>
    </style:style>
    <style:style style:name="P644" style:parent-style-name="Normal" style:family="paragraph">
      <style:text-properties style:font-name="Times New Roman" style:font-name-complex="Times New Roman" fo:font-size="14pt" style:font-size-asian="14pt" style:font-size-complex="14pt"/>
    </style:style>
    <style:style style:name="P645" style:parent-style-name="Normal" style:family="paragraph">
      <style:text-properties style:font-name="Times New Roman" style:font-name-complex="Times New Roman" fo:font-size="14pt" style:font-size-asian="14pt" style:font-size-complex="14pt"/>
    </style:style>
    <style:style style:name="T6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7" style:parent-style-name="DefaultParagraphFont" style:family="text">
      <style:text-properties style:font-name="Times New Roman" style:font-name-complex="Times New Roman" fo:font-size="14pt" style:font-size-asian="14pt" style:font-size-complex="14pt"/>
    </style:style>
    <style:style style:name="T6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49" style:parent-style-name="Normal" style:family="paragraph">
      <style:text-properties style:font-name="Times New Roman" style:font-name-complex="Times New Roman" fo:font-size="14pt" style:font-size-asian="14pt" style:font-size-complex="14pt"/>
    </style:style>
    <style:style style:name="T6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1" style:parent-style-name="DefaultParagraphFont" style:family="text">
      <style:text-properties style:font-name="Times New Roman" style:font-name-complex="Times New Roman" fo:font-size="14pt" style:font-size-asian="14pt" style:font-size-complex="14pt"/>
    </style:style>
    <style:style style:name="T6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3" style:parent-style-name="DefaultParagraphFont" style:family="text">
      <style:text-properties style:font-name="Times New Roman" style:font-name-complex="Times New Roman" fo:font-size="14pt" style:font-size-asian="14pt" style:font-size-complex="14pt"/>
    </style:style>
    <style:style style:name="T6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5" style:parent-style-name="DefaultParagraphFont" style:family="text">
      <style:text-properties style:font-name="Times New Roman" style:font-name-complex="Times New Roman" fo:font-size="14pt" style:font-size-asian="14pt" style:font-size-complex="14pt"/>
    </style:style>
    <style:style style:name="P656" style:parent-style-name="Normal" style:family="paragraph">
      <style:text-properties style:font-name="Times New Roman" style:font-name-complex="Times New Roman" fo:font-size="14pt" style:font-size-asian="14pt" style:font-size-complex="14pt"/>
    </style:style>
    <style:style style:name="T657" style:parent-style-name="DefaultParagraphFont" style:family="text">
      <style:text-properties style:font-name="Times New Roman" style:font-name-complex="Times New Roman" fo:font-size="14pt" style:font-size-asian="14pt" style:font-size-complex="14pt"/>
    </style:style>
    <style:style style:name="T658" style:parent-style-name="Hyperlink" style:family="text">
      <style:text-properties style:font-name="Times New Roman" style:font-name-complex="Times New Roman" fo:font-size="14pt" style:font-size-asian="14pt" style:font-size-complex="14pt"/>
    </style:style>
    <style:style style:name="P659" style:parent-style-name="Normal" style:family="paragraph">
      <style:text-properties style:font-name="Times New Roman" style:font-name-complex="Times New Roman" fo:font-size="14pt" style:font-size-asian="14pt" style:font-size-complex="14pt"/>
    </style:style>
    <style:style style:name="T6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62" style:parent-style-name="Normal" style:family="paragraph">
      <style:text-properties style:font-name="Times New Roman" style:font-name-complex="Times New Roman" fo:font-size="14pt" style:font-size-asian="14pt" style:font-size-complex="14pt"/>
    </style:style>
    <style:style style:name="P663" style:parent-style-name="Normal" style:family="paragraph">
      <style:text-properties style:font-name="Times New Roman" style:font-name-complex="Times New Roman" fo:font-size="14pt" style:font-size-asian="14pt" style:font-size-complex="14pt"/>
    </style:style>
    <style:style style:name="P664" style:parent-style-name="Normal" style:family="paragraph">
      <style:text-properties style:font-name="Times New Roman" style:font-name-complex="Times New Roman" fo:font-size="14pt" style:font-size-asian="14pt" style:font-size-complex="14pt"/>
    </style:style>
    <style:style style:name="T6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6" style:parent-style-name="DefaultParagraphFont" style:family="text">
      <style:text-properties style:font-name="Times New Roman" style:font-name-complex="Times New Roman" fo:font-size="14pt" style:font-size-asian="14pt" style:font-size-complex="14pt"/>
    </style:style>
    <style:style style:name="T6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8" style:parent-style-name="DefaultParagraphFont" style:family="text">
      <style:text-properties style:font-name="Times New Roman" style:font-name-complex="Times New Roman" fo:font-size="14pt" style:font-size-asian="14pt" style:font-size-complex="14pt"/>
    </style:style>
    <style:style style:name="T6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70" style:parent-style-name="Normal" style:family="paragraph">
      <style:text-properties style:font-name="Times New Roman" style:font-name-complex="Times New Roman" fo:font-size="14pt" style:font-size-asian="14pt" style:font-size-complex="14pt"/>
    </style:style>
    <style:style style:name="P671" style:parent-style-name="Normal" style:family="paragraph">
      <style:text-properties style:font-name="Times New Roman" style:font-name-complex="Times New Roman" fo:font-size="14pt" style:font-size-asian="14pt" style:font-size-complex="14pt"/>
    </style:style>
    <style:style style:name="P672" style:parent-style-name="Normal" style:family="paragraph">
      <style:text-properties style:font-name="Times New Roman" style:font-name-complex="Times New Roman" fo:font-size="14pt" style:font-size-asian="14pt" style:font-size-complex="14pt"/>
    </style:style>
    <style:style style:name="T673" style:parent-style-name="DefaultParagraphFont" style:family="text">
      <style:text-properties style:font-name="Times New Roman" style:font-name-complex="Times New Roman" fo:font-size="14pt" style:font-size-asian="14pt" style:font-size-complex="14pt"/>
    </style:style>
    <style:style style:name="T674" style:parent-style-name="Hyperlink" style:family="text">
      <style:text-properties style:font-name="Times New Roman" style:font-name-complex="Times New Roman" fo:font-size="14pt" style:font-size-asian="14pt" style:font-size-complex="14pt"/>
    </style:style>
    <style:style style:name="T675" style:parent-style-name="DefaultParagraphFont" style:family="text">
      <style:text-properties style:font-name="Times New Roman" style:font-name-complex="Times New Roman" fo:font-size="14pt" style:font-size-asian="14pt" style:font-size-complex="14pt"/>
    </style:style>
    <style:style style:name="T6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7" style:parent-style-name="DefaultParagraphFont" style:family="text">
      <style:text-properties style:font-name="Times New Roman" style:font-name-complex="Times New Roman" fo:font-size="14pt" style:font-size-asian="14pt" style:font-size-complex="14pt"/>
    </style:style>
    <style:style style:name="T678" style:parent-style-name="DefaultParagraphFont" style:family="text">
      <style:text-properties style:font-name="Times New Roman" style:font-name-complex="Times New Roman" fo:font-size="14pt" style:font-size-asian="14pt" style:font-size-complex="14pt"/>
    </style:style>
    <style:style style:name="T6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0" style:parent-style-name="DefaultParagraphFont" style:family="text">
      <style:text-properties style:font-name="Times New Roman" style:font-name-complex="Times New Roman" fo:font-size="14pt" style:font-size-asian="14pt" style:font-size-complex="14pt"/>
    </style:style>
    <style:style style:name="T6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83" style:parent-style-name="Normal" style:family="paragraph">
      <style:text-properties style:font-name="Times New Roman" style:font-name-complex="Times New Roman" fo:font-size="14pt" style:font-size-asian="14pt" style:font-size-complex="14pt"/>
    </style:style>
    <style:style style:name="P684" style:parent-style-name="Normal" style:family="paragraph">
      <style:text-properties style:font-name="Times New Roman" style:font-name-complex="Times New Roman" fo:font-size="14pt" style:font-size-asian="14pt" style:font-size-complex="14pt"/>
    </style:style>
    <style:style style:name="P685" style:parent-style-name="Normal" style:family="paragraph">
      <style:text-properties style:font-name="Times New Roman" style:font-name-complex="Times New Roman" fo:font-size="14pt" style:font-size-asian="14pt" style:font-size-complex="14pt"/>
    </style:style>
    <style:style style:name="T6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7" style:parent-style-name="DefaultParagraphFont" style:family="text">
      <style:text-properties style:font-name="Times New Roman" style:font-name-complex="Times New Roman" fo:font-size="14pt" style:font-size-asian="14pt" style:font-size-complex="14pt"/>
    </style:style>
    <style:style style:name="T6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89" style:parent-style-name="Normal" style:family="paragraph">
      <style:text-properties style:font-name="Times New Roman" style:font-name-complex="Times New Roman" fo:font-size="14pt" style:font-size-asian="14pt" style:font-size-complex="14pt"/>
    </style:style>
    <style:style style:name="T690" style:parent-style-name="DefaultParagraphFont" style:family="text">
      <style:text-properties style:font-name="Times New Roman" style:font-name-complex="Times New Roman" fo:font-size="14pt" style:font-size-asian="14pt" style:font-size-complex="14pt"/>
    </style:style>
    <style:style style:name="T691" style:parent-style-name="Hyperlink" style:family="text">
      <style:text-properties style:font-name="Times New Roman" style:font-name-complex="Times New Roman" fo:font-size="14pt" style:font-size-asian="14pt" style:font-size-complex="14pt"/>
    </style:style>
    <style:style style:name="P692" style:parent-style-name="Normal" style:family="paragraph">
      <style:text-properties style:font-name="Times New Roman" style:font-name-complex="Times New Roman" fo:font-size="14pt" style:font-size-asian="14pt" style:font-size-complex="14pt"/>
    </style:style>
    <style:style style:name="T6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95" style:parent-style-name="Normal" style:family="paragraph">
      <style:text-properties style:font-name="Times New Roman" style:font-name-complex="Times New Roman" fo:font-size="14pt" style:font-size-asian="14pt" style:font-size-complex="14pt"/>
    </style:style>
    <style:style style:name="T696" style:parent-style-name="DefaultParagraphFont" style:family="text">
      <style:text-properties style:font-name="Times New Roman" style:font-name-complex="Times New Roman" fo:font-size="14pt" style:font-size-asian="14pt" style:font-size-complex="14pt"/>
    </style:style>
    <style:style style:name="P697" style:parent-style-name="Normal" style:family="paragraph">
      <style:text-properties style:font-name="Times New Roman" style:font-name-complex="Times New Roman" fo:font-size="14pt" style:font-size-asian="14pt" style:font-size-complex="14pt"/>
    </style:style>
    <style:style style:name="T6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0" style:parent-style-name="DefaultParagraphFont" style:family="text">
      <style:text-properties style:font-name="Times New Roman" style:font-name-complex="Times New Roman" fo:font-size="14pt" style:font-size-asian="14pt" style:font-size-complex="14pt"/>
    </style:style>
    <style:style style:name="T701" style:parent-style-name="DefaultParagraphFont" style:family="text">
      <style:text-properties style:font-name="Times New Roman" style:font-name-complex="Times New Roman" fo:font-size="14pt" style:font-size-asian="14pt" style:font-size-complex="14pt"/>
    </style:style>
    <style:style style:name="T7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3" style:parent-style-name="DefaultParagraphFont" style:family="text">
      <style:text-properties style:font-name="Times New Roman" style:font-name-complex="Times New Roman" fo:font-size="14pt" style:font-size-asian="14pt" style:font-size-complex="14pt"/>
    </style:style>
    <style:style style:name="T704" style:parent-style-name="DefaultParagraphFont" style:family="text">
      <style:text-properties style:font-name="Times New Roman" style:font-name-complex="Times New Roman" fo:font-size="14pt" style:font-size-asian="14pt" style:font-size-complex="14pt"/>
    </style:style>
    <style:style style:name="T7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6" style:parent-style-name="DefaultParagraphFont" style:family="text">
      <style:text-properties style:font-name="Times New Roman" style:font-name-complex="Times New Roman" fo:font-size="14pt" style:font-size-asian="14pt" style:font-size-complex="14pt"/>
    </style:style>
    <style:style style:name="T7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8" style:parent-style-name="DefaultParagraphFont" style:family="text">
      <style:text-properties style:font-name="Times New Roman" style:font-name-complex="Times New Roman" fo:font-size="14pt" style:font-size-asian="14pt" style:font-size-complex="14pt"/>
    </style:style>
    <style:style style:name="T709" style:parent-style-name="DefaultParagraphFont" style:family="text">
      <style:text-properties style:font-name="Times New Roman" style:font-name-complex="Times New Roman" fo:font-size="14pt" style:font-size-asian="14pt" style:font-size-complex="14pt"/>
    </style:style>
    <style:style style:name="T710"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711" style:parent-style-name="DefaultParagraphFont" style:family="text">
      <style:text-properties style:font-name="Times New Roman" style:font-name-complex="Times New Roman" fo:font-size="14pt" style:font-size-asian="14pt" style:font-size-complex="14pt"/>
    </style:style>
    <style:style style:name="T712" style:parent-style-name="DefaultParagraphFont" style:family="text">
      <style:text-properties style:font-name="Times New Roman" style:font-name-complex="Times New Roman" fo:font-size="14pt" style:font-size-asian="14pt" style:font-size-complex="14pt"/>
    </style:style>
    <style:style style:name="T7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4" style:parent-style-name="DefaultParagraphFont" style:family="text">
      <style:text-properties style:font-name="Times New Roman" style:font-name-complex="Times New Roman" fo:font-size="14pt" style:font-size-asian="14pt" style:font-size-complex="14pt"/>
    </style:style>
    <style:style style:name="T7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17" style:parent-style-name="Normal" style:family="paragraph">
      <style:text-properties style:font-name="Times New Roman" style:font-name-complex="Times New Roman" fo:font-size="14pt" style:font-size-asian="14pt" style:font-size-complex="14pt"/>
    </style:style>
    <style:style style:name="P718" style:parent-style-name="Normal" style:family="paragraph">
      <style:text-properties style:font-name="Times New Roman" style:font-name-complex="Times New Roman" fo:font-size="14pt" style:font-size-asian="14pt" style:font-size-complex="14pt"/>
    </style:style>
    <style:style style:name="P719" style:parent-style-name="Normal" style:family="paragraph">
      <style:text-properties style:font-name="Times New Roman" style:font-name-complex="Times New Roman" fo:font-size="14pt" style:font-size-asian="14pt" style:font-size-complex="14pt"/>
    </style:style>
    <style:style style:name="T7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1" style:parent-style-name="DefaultParagraphFont" style:family="text">
      <style:text-properties style:font-name="Times New Roman" style:font-name-complex="Times New Roman" fo:font-size="14pt" style:font-size-asian="14pt" style:font-size-complex="14pt"/>
    </style:style>
    <style:style style:name="T7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24" style:parent-style-name="Normal" style:family="paragraph">
      <style:text-properties style:font-name="Times New Roman" style:font-name-complex="Times New Roman" fo:font-size="14pt" style:font-size-asian="14pt" style:font-size-complex="14pt"/>
    </style:style>
    <style:style style:name="P725" style:parent-style-name="Normal" style:family="paragraph">
      <style:text-properties style:font-name="Consolas" style:font-name-complex="Times New Roman" fo:font-size="11pt" style:font-size-asian="11pt" style:font-size-complex="11pt"/>
    </style:style>
    <style:style style:name="P726" style:parent-style-name="Normal" style:family="paragraph">
      <style:text-properties style:font-name="Consolas" style:font-name-complex="Times New Roman" fo:font-size="11pt" style:font-size-asian="11pt" style:font-size-complex="11pt"/>
    </style:style>
    <style:style style:name="P727" style:parent-style-name="Normal" style:family="paragraph">
      <style:text-properties style:font-name="Consolas" style:font-name-complex="Times New Roman" fo:font-size="11pt" style:font-size-asian="11pt" style:font-size-complex="11pt"/>
    </style:style>
    <style:style style:name="P728" style:parent-style-name="Normal" style:family="paragraph">
      <style:text-properties style:font-name="Consolas" style:font-name-complex="Times New Roman" fo:font-size="11pt" style:font-size-asian="11pt" style:font-size-complex="11pt"/>
    </style:style>
    <style:style style:name="P729" style:parent-style-name="Normal" style:family="paragraph">
      <style:text-properties style:font-name="Consolas" style:font-name-complex="Times New Roman" fo:font-size="11pt" style:font-size-asian="11pt" style:font-size-complex="11pt"/>
    </style:style>
    <style:style style:name="P730" style:parent-style-name="Normal" style:family="paragraph">
      <style:text-properties style:font-name="Consolas" style:font-name-complex="Times New Roman" fo:font-size="11pt" style:font-size-asian="11pt" style:font-size-complex="11pt"/>
    </style:style>
    <style:style style:name="P731" style:parent-style-name="Normal" style:family="paragraph">
      <style:text-properties style:font-name="Consolas" style:font-name-complex="Times New Roman" fo:font-size="11pt" style:font-size-asian="11pt" style:font-size-complex="11pt"/>
    </style:style>
    <style:style style:name="P732" style:parent-style-name="Normal" style:family="paragraph">
      <style:text-properties style:font-name="Consolas" style:font-name-complex="Times New Roman" fo:font-size="11pt" style:font-size-asian="11pt" style:font-size-complex="11pt"/>
    </style:style>
    <style:style style:name="P733" style:parent-style-name="Normal" style:family="paragraph">
      <style:text-properties style:font-name="Consolas" style:font-name-complex="Times New Roman" fo:font-size="11pt" style:font-size-asian="11pt" style:font-size-complex="11pt"/>
    </style:style>
    <style:style style:name="P734" style:parent-style-name="Normal" style:family="paragraph">
      <style:text-properties style:font-name="Consolas" style:font-name-complex="Times New Roman" fo:font-size="11pt" style:font-size-asian="11pt" style:font-size-complex="11pt"/>
    </style:style>
    <style:style style:name="P735" style:parent-style-name="Normal" style:family="paragraph">
      <style:text-properties style:font-name="Consolas" style:font-name-complex="Times New Roman" fo:font-size="11pt" style:font-size-asian="11pt" style:font-size-complex="11pt"/>
    </style:style>
    <style:style style:name="P736" style:parent-style-name="Normal" style:family="paragraph">
      <style:text-properties style:font-name="Consolas" style:font-name-complex="Times New Roman" fo:font-size="11pt" style:font-size-asian="11pt" style:font-size-complex="11pt"/>
    </style:style>
    <style:style style:name="P737" style:parent-style-name="Normal" style:family="paragraph">
      <style:text-properties style:font-name="Consolas" style:font-name-complex="Times New Roman" fo:font-size="11pt" style:font-size-asian="11pt" style:font-size-complex="11pt"/>
    </style:style>
    <style:style style:name="P738" style:parent-style-name="Normal" style:family="paragraph">
      <style:text-properties style:font-name="Consolas" style:font-name-complex="Times New Roman" fo:font-size="11pt" style:font-size-asian="11pt" style:font-size-complex="11pt"/>
    </style:style>
    <style:style style:name="P739" style:parent-style-name="Normal" style:family="paragraph">
      <style:text-properties style:font-name="Consolas" style:font-name-complex="Times New Roman" fo:font-size="11pt" style:font-size-asian="11pt" style:font-size-complex="11pt"/>
    </style:style>
    <style:style style:name="P740" style:parent-style-name="Normal" style:family="paragraph">
      <style:text-properties style:font-name="Consolas" style:font-name-complex="Times New Roman" fo:font-size="11pt" style:font-size-asian="11pt" style:font-size-complex="11pt"/>
    </style:style>
    <style:style style:name="P741" style:parent-style-name="Normal" style:family="paragraph">
      <style:text-properties style:font-name="Consolas" style:font-name-complex="Times New Roman" fo:font-size="11pt" style:font-size-asian="11pt" style:font-size-complex="11pt"/>
    </style:style>
    <style:style style:name="P742" style:parent-style-name="Normal" style:family="paragraph">
      <style:text-properties style:font-name="Consolas" style:font-name-complex="Times New Roman" fo:font-size="11pt" style:font-size-asian="11pt" style:font-size-complex="11pt" fo:language="it" fo:country="IT"/>
    </style:style>
    <style:style style:name="P743" style:parent-style-name="Normal" style:family="paragraph">
      <style:text-properties style:font-name="Consolas" style:font-name-complex="Times New Roman" fo:font-size="11pt" style:font-size-asian="11pt" style:font-size-complex="11pt" fo:language="it" fo:country="IT"/>
    </style:style>
    <style:style style:name="P744" style:parent-style-name="Normal" style:family="paragraph">
      <style:text-properties style:font-name="Consolas" style:font-name-complex="Times New Roman" fo:font-size="11pt" style:font-size-asian="11pt" style:font-size-complex="11pt"/>
    </style:style>
    <style:style style:name="P745" style:parent-style-name="Normal" style:family="paragraph">
      <style:text-properties style:font-name="Times New Roman" style:font-name-complex="Times New Roman" fo:font-size="14pt" style:font-size-asian="14pt" style:font-size-complex="14pt"/>
    </style:style>
    <style:style style:name="P746" style:parent-style-name="Normal" style:family="paragraph">
      <style:text-properties style:font-name="Times New Roman" style:font-name-complex="Times New Roman" fo:font-size="14pt" style:font-size-asian="14pt" style:font-size-complex="14pt"/>
    </style:style>
    <style:style style:name="P747" style:parent-style-name="Normal" style:family="paragraph">
      <style:text-properties style:font-name="Times New Roman" style:font-name-complex="Times New Roman" fo:font-size="14pt" style:font-size-asian="14pt" style:font-size-complex="14pt"/>
    </style:style>
    <style:style style:name="T7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9" style:parent-style-name="DefaultParagraphFont" style:family="text">
      <style:text-properties style:font-name="Times New Roman" style:font-name-complex="Times New Roman" fo:font-size="14pt" style:font-size-asian="14pt" style:font-size-complex="14pt"/>
    </style:style>
    <style:style style:name="T7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51" style:parent-style-name="Normal" style:family="paragraph">
      <style:text-properties style:font-name="Times New Roman" style:font-name-complex="Times New Roman" fo:font-size="14pt" style:font-size-asian="14pt" style:font-size-complex="14pt"/>
    </style:style>
    <style:style style:name="T752" style:parent-style-name="DefaultParagraphFont" style:family="text">
      <style:text-properties style:font-name="Times New Roman" style:font-name-complex="Times New Roman" fo:font-size="14pt" style:font-size-asian="14pt" style:font-size-complex="14pt"/>
    </style:style>
    <style:style style:name="T7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4" style:parent-style-name="DefaultParagraphFont" style:family="text">
      <style:text-properties style:font-name="Times New Roman" style:font-name-complex="Times New Roman" fo:font-size="14pt" style:font-size-asian="14pt" style:font-size-complex="14pt"/>
    </style:style>
    <style:style style:name="T7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57" style:parent-style-name="Normal" style:family="paragraph">
      <style:text-properties style:font-name="Times New Roman" style:font-name-complex="Times New Roman" fo:font-size="14pt" style:font-size-asian="14pt" style:font-size-complex="14pt"/>
    </style:style>
    <style:style style:name="T758" style:parent-style-name="DefaultParagraphFont" style:family="text">
      <style:text-properties style:font-name="Times New Roman" style:font-name-complex="Times New Roman" fo:font-size="14pt" style:font-size-asian="14pt" style:font-size-complex="14pt"/>
    </style:style>
    <style:style style:name="P759" style:parent-style-name="Normal" style:family="paragraph">
      <style:text-properties style:font-name="Times New Roman" style:font-name-complex="Times New Roman" fo:font-size="14pt" style:font-size-asian="14pt" style:font-size-complex="14pt"/>
    </style:style>
    <style:style style:name="P760" style:parent-style-name="Normal" style:family="paragraph">
      <style:text-properties style:font-name="Times New Roman" style:font-name-complex="Times New Roman" fo:font-size="14pt" style:font-size-asian="14pt" style:font-size-complex="14pt"/>
    </style:style>
    <style:style style:name="P761" style:parent-style-name="Normal" style:family="paragraph">
      <style:text-properties style:font-name="Times New Roman" style:font-name-complex="Times New Roman" fo:font-size="14pt" style:font-size-asian="14pt" style:font-size-complex="14pt"/>
    </style:style>
    <style:style style:name="P762" style:parent-style-name="Normal" style:family="paragraph">
      <style:text-properties style:font-name="Times New Roman" style:font-name-complex="Times New Roman" fo:font-size="14pt" style:font-size-asian="14pt" style:font-size-complex="14pt"/>
    </style:style>
    <style:style style:name="P763" style:parent-style-name="Normal" style:family="paragraph">
      <style:text-properties style:font-name="Times New Roman" style:font-name-complex="Times New Roman" fo:font-size="14pt" style:font-size-asian="14pt" style:font-size-complex="14pt"/>
    </style:style>
    <style:style style:name="P764" style:parent-style-name="Normal" style:family="paragraph">
      <style:text-properties style:font-name="Times New Roman" style:font-name-complex="Times New Roman" fo:font-size="14pt" style:font-size-asian="14pt" style:font-size-complex="14pt"/>
    </style:style>
    <style:style style:name="T7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6" style:parent-style-name="DefaultParagraphFont" style:family="text">
      <style:text-properties style:font-name="Times New Roman" style:font-name-complex="Times New Roman" fo:font-size="14pt" style:font-size-asian="14pt" style:font-size-complex="14pt"/>
    </style:style>
    <style:style style:name="T7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68" style:parent-style-name="Normal" style:family="paragraph">
      <style:text-properties style:font-name="Times New Roman" style:font-name-complex="Times New Roman" fo:font-size="14pt" style:font-size-asian="14pt" style:font-size-complex="14pt"/>
    </style:style>
    <style:style style:name="T7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71" style:parent-style-name="Normal" style:family="paragraph">
      <style:text-properties style:font-name="Times New Roman" style:font-name-complex="Times New Roman" fo:font-size="14pt" style:font-size-asian="14pt" style:font-size-complex="14pt"/>
    </style:style>
    <style:style style:name="P772" style:parent-style-name="Normal" style:family="paragraph">
      <style:text-properties style:font-name="Times New Roman" style:font-name-complex="Times New Roman" fo:font-size="14pt" style:font-size-asian="14pt" style:font-size-complex="14pt"/>
    </style:style>
    <style:style style:name="P773" style:parent-style-name="Normal" style:family="paragraph">
      <style:text-properties style:font-name="Times New Roman" style:font-name-complex="Times New Roman" fo:font-size="14pt" style:font-size-asian="14pt" style:font-size-complex="14pt"/>
    </style:style>
    <style:style style:name="T7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5" style:parent-style-name="DefaultParagraphFont" style:family="text">
      <style:text-properties style:font-name="Times New Roman" style:font-name-complex="Times New Roman" fo:font-size="14pt" style:font-size-asian="14pt" style:font-size-complex="14pt"/>
    </style:style>
    <style:style style:name="T7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77" style:parent-style-name="Normal" style:family="paragraph">
      <style:text-properties style:font-name="Times New Roman" style:font-name-complex="Times New Roman" fo:font-size="14pt" style:font-size-asian="14pt" style:font-size-complex="14pt"/>
    </style:style>
    <style:style style:name="P778" style:parent-style-name="Normal" style:family="paragraph">
      <style:text-properties style:font-name="Times New Roman" style:font-name-complex="Times New Roman" fo:font-size="14pt" style:font-size-asian="14pt" style:font-size-complex="14pt"/>
    </style:style>
    <style:style style:name="P779" style:parent-style-name="Normal" style:family="paragraph">
      <style:text-properties style:font-name="Times New Roman" style:font-name-complex="Times New Roman" fo:font-size="14pt" style:font-size-asian="14pt" style:font-size-complex="14pt"/>
    </style:style>
    <style:style style:name="P780" style:parent-style-name="Normal" style:family="paragraph">
      <style:text-properties style:font-name="Times New Roman" style:font-name-complex="Times New Roman" fo:font-size="14pt" style:font-size-asian="14pt" style:font-size-complex="14pt"/>
    </style:style>
    <style:style style:name="P781" style:parent-style-name="Normal" style:family="paragraph">
      <style:text-properties style:font-name="Times New Roman" style:font-name-complex="Times New Roman" fo:font-size="14pt" style:font-size-asian="14pt" style:font-size-complex="14pt"/>
    </style:style>
    <style:style style:name="P782" style:parent-style-name="Normal" style:family="paragraph">
      <style:text-properties style:font-name="Times New Roman" style:font-name-complex="Times New Roman" fo:font-size="14pt" style:font-size-asian="14pt" style:font-size-complex="14pt"/>
    </style:style>
    <style:style style:name="P783" style:parent-style-name="Normal" style:family="paragraph">
      <style:text-properties style:font-name="Times New Roman" style:font-name-complex="Times New Roman" fo:font-size="14pt" style:font-size-asian="14pt" style:font-size-complex="14pt"/>
    </style:style>
    <style:style style:name="P784" style:parent-style-name="Normal" style:family="paragraph">
      <style:text-properties style:font-name="Consolas" style:font-name-complex="Times New Roman" fo:font-size="11pt" style:font-size-asian="11pt" style:font-size-complex="11pt"/>
    </style:style>
    <style:style style:name="P785" style:parent-style-name="Normal" style:family="paragraph">
      <style:text-properties style:font-name="Consolas" style:font-name-complex="Times New Roman" fo:font-size="11pt" style:font-size-asian="11pt" style:font-size-complex="11pt"/>
    </style:style>
    <style:style style:name="P786" style:parent-style-name="Normal" style:family="paragraph">
      <style:text-properties style:font-name="Times New Roman" style:font-name-complex="Times New Roman" fo:font-size="14pt" style:font-size-asian="14pt" style:font-size-complex="14pt"/>
    </style:style>
    <style:style style:name="T7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89" style:parent-style-name="Normal" style:family="paragraph">
      <style:text-properties style:font-name="Times New Roman" style:font-name-complex="Times New Roman" fo:font-size="14pt" style:font-size-asian="14pt" style:font-size-complex="14pt"/>
    </style:style>
    <style:style style:name="P790" style:parent-style-name="Normal" style:family="paragraph">
      <style:text-properties style:font-name="Consolas" style:font-name-complex="Times New Roman" fo:font-size="11pt" style:font-size-asian="11pt" style:font-size-complex="11pt"/>
    </style:style>
    <style:style style:name="P791" style:parent-style-name="Normal" style:family="paragraph">
      <style:text-properties style:font-name="Consolas" style:font-name-complex="Times New Roman" fo:font-size="11pt" style:font-size-asian="11pt" style:font-size-complex="11pt"/>
    </style:style>
    <style:style style:name="P792" style:parent-style-name="Normal" style:family="paragraph">
      <style:text-properties style:font-name="Consolas" style:font-name-complex="Times New Roman" fo:font-size="11pt" style:font-size-asian="11pt" style:font-size-complex="11pt"/>
    </style:style>
    <style:style style:name="P793" style:parent-style-name="Normal" style:family="paragraph">
      <style:text-properties style:font-name="Consolas" style:font-name-complex="Times New Roman" fo:font-size="11pt" style:font-size-asian="11pt" style:font-size-complex="11pt"/>
    </style:style>
    <style:style style:name="P794" style:parent-style-name="Normal" style:family="paragraph">
      <style:text-properties style:font-name="Consolas" style:font-name-complex="Times New Roman" fo:font-size="11pt" style:font-size-asian="11pt" style:font-size-complex="11pt"/>
    </style:style>
    <style:style style:name="P795" style:parent-style-name="Normal" style:family="paragraph">
      <style:text-properties style:font-name="Consolas" style:font-name-complex="Times New Roman" fo:font-size="11pt" style:font-size-asian="11pt" style:font-size-complex="11pt"/>
    </style:style>
    <style:style style:name="P796" style:parent-style-name="Normal" style:family="paragraph">
      <style:text-properties style:font-name="Consolas" style:font-name-complex="Times New Roman" fo:font-size="11pt" style:font-size-asian="11pt" style:font-size-complex="11pt"/>
    </style:style>
    <style:style style:name="P797" style:parent-style-name="Normal" style:family="paragraph">
      <style:text-properties style:font-name="Consolas" style:font-name-complex="Times New Roman" fo:font-size="11pt" style:font-size-asian="11pt" style:font-size-complex="11pt"/>
    </style:style>
    <style:style style:name="P798" style:parent-style-name="Normal" style:family="paragraph">
      <style:text-properties style:font-name="Consolas" style:font-name-complex="Times New Roman" fo:font-size="11pt" style:font-size-asian="11pt" style:font-size-complex="11pt"/>
    </style:style>
    <style:style style:name="P799" style:parent-style-name="Normal" style:family="paragraph">
      <style:text-properties style:font-name="Consolas" style:font-name-complex="Times New Roman" fo:font-size="11pt" style:font-size-asian="11pt" style:font-size-complex="11pt"/>
    </style:style>
    <style:style style:name="P800" style:parent-style-name="Normal" style:family="paragraph">
      <style:text-properties style:font-name="Consolas" style:font-name-complex="Times New Roman" fo:font-size="11pt" style:font-size-asian="11pt" style:font-size-complex="11pt"/>
    </style:style>
    <style:style style:name="P801" style:parent-style-name="Normal" style:family="paragraph">
      <style:text-properties style:font-name="Consolas" style:font-name-complex="Times New Roman" fo:font-size="11pt" style:font-size-asian="11pt" style:font-size-complex="11pt"/>
    </style:style>
    <style:style style:name="P802" style:parent-style-name="Normal" style:family="paragraph">
      <style:text-properties style:font-name="Consolas" style:font-name-complex="Times New Roman" fo:font-size="11pt" style:font-size-asian="11pt" style:font-size-complex="11pt"/>
    </style:style>
    <style:style style:name="P803" style:parent-style-name="Normal" style:family="paragraph">
      <style:text-properties style:font-name="Consolas" style:font-name-complex="Times New Roman" fo:font-size="11pt" style:font-size-asian="11pt" style:font-size-complex="11pt"/>
    </style:style>
    <style:style style:name="P804" style:parent-style-name="Normal" style:family="paragraph">
      <style:text-properties style:font-name="Times New Roman" style:font-name-complex="Times New Roman" fo:font-size="14pt" style:font-size-asian="14pt" style:font-size-complex="14pt"/>
    </style:style>
    <style:style style:name="P805" style:parent-style-name="Normal" style:family="paragraph">
      <style:text-properties style:font-name="Times New Roman" style:font-name-complex="Times New Roman" fo:font-size="14pt" style:font-size-asian="14pt" style:font-size-complex="14pt"/>
    </style:style>
    <style:style style:name="P806" style:parent-style-name="Normal" style:family="paragraph">
      <style:text-properties style:font-name="Times New Roman" style:font-name-complex="Times New Roman" fo:font-size="14pt" style:font-size-asian="14pt" style:font-size-complex="14pt"/>
    </style:style>
    <style:style style:name="T8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8" style:parent-style-name="DefaultParagraphFont" style:family="text">
      <style:text-properties style:font-name="Times New Roman" style:font-name-complex="Times New Roman" fo:font-size="14pt" style:font-size-asian="14pt" style:font-size-complex="14pt"/>
    </style:style>
    <style:style style:name="T8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10" style:parent-style-name="Normal" style:family="paragraph">
      <style:text-properties style:font-name="Times New Roman" style:font-name-complex="Times New Roman" fo:font-size="14pt" style:font-size-asian="14pt" style:font-size-complex="14pt"/>
    </style:style>
    <style:style style:name="P811" style:parent-style-name="Normal" style:family="paragraph">
      <style:text-properties style:font-name="Times New Roman" style:font-name-complex="Times New Roman" fo:font-size="14pt" style:font-size-asian="14pt" style:font-size-complex="14pt"/>
    </style:style>
    <style:style style:name="T8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14" style:parent-style-name="Normal" style:family="paragraph">
      <style:text-properties style:font-name="Times New Roman" style:font-name-complex="Times New Roman" fo:font-size="14pt" style:font-size-asian="14pt" style:font-size-complex="14pt"/>
    </style:style>
    <style:style style:name="P815" style:parent-style-name="Normal" style:family="paragraph">
      <style:text-properties style:font-name="Times New Roman" style:font-name-complex="Times New Roman" fo:font-size="14pt" style:font-size-asian="14pt" style:font-size-complex="14pt"/>
    </style:style>
    <style:style style:name="P816" style:parent-style-name="Normal" style:family="paragraph">
      <style:text-properties style:font-name="Times New Roman" style:font-name-complex="Times New Roman" fo:font-size="14pt" style:font-size-asian="14pt" style:font-size-complex="14pt"/>
    </style:style>
    <style:style style:name="T8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18" style:parent-style-name="DefaultParagraphFont" style:family="text">
      <style:text-properties style:font-name="Times New Roman" style:font-name-complex="Times New Roman" fo:font-size="14pt" style:font-size-asian="14pt" style:font-size-complex="14pt"/>
    </style:style>
    <style:style style:name="T8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20" style:parent-style-name="Normal" style:family="paragraph">
      <style:text-properties style:font-name="Times New Roman" style:font-name-complex="Times New Roman" fo:font-size="14pt" style:font-size-asian="14pt" style:font-size-complex="14pt"/>
    </style:style>
    <style:style style:name="P821" style:parent-style-name="Normal" style:family="paragraph">
      <style:text-properties style:font-name="Times New Roman" style:font-name-complex="Times New Roman" fo:font-size="14pt" style:font-size-asian="14pt" style:font-size-complex="14pt"/>
    </style:style>
    <style:style style:name="P822" style:parent-style-name="Normal" style:family="paragraph">
      <style:text-properties style:font-name="Times New Roman" style:font-name-complex="Times New Roman" fo:font-size="14pt" style:font-size-asian="14pt" style:font-size-complex="14pt"/>
    </style:style>
    <style:style style:name="T823" style:parent-style-name="DefaultParagraphFont" style:family="text">
      <style:text-properties style:font-name="Times New Roman" style:font-name-complex="Times New Roman" fo:font-size="14pt" style:font-size-asian="14pt" style:font-size-complex="14pt"/>
    </style:style>
    <style:style style:name="T824" style:parent-style-name="Hyperlink" style:family="text">
      <style:text-properties style:font-name="Times New Roman" style:font-name-complex="Times New Roman" fo:font-size="14pt" style:font-size-asian="14pt" style:font-size-complex="14pt"/>
    </style:style>
    <style:style style:name="T8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27" style:parent-style-name="Normal" style:family="paragraph">
      <style:text-properties style:font-name="Times New Roman" style:font-name-complex="Times New Roman" fo:font-size="14pt" style:font-size-asian="14pt" style:font-size-complex="14pt"/>
    </style:style>
    <style:style style:name="P828" style:parent-style-name="Normal" style:family="paragraph">
      <style:text-properties style:font-name="Times New Roman" style:font-name-complex="Times New Roman" fo:font-size="14pt" style:font-size-asian="14pt" style:font-size-complex="14pt"/>
    </style:style>
    <style:style style:name="P829" style:parent-style-name="Normal" style:family="paragraph">
      <style:text-properties style:font-name="Times New Roman" style:font-name-complex="Times New Roman" fo:font-size="14pt" style:font-size-asian="14pt" style:font-size-complex="14pt"/>
    </style:style>
    <style:style style:name="T8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1" style:parent-style-name="DefaultParagraphFont" style:family="text">
      <style:text-properties style:font-name="Times New Roman" style:font-name-complex="Times New Roman" fo:font-size="14pt" style:font-size-asian="14pt" style:font-size-complex="14pt"/>
    </style:style>
    <style:style style:name="T8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33" style:parent-style-name="Normal" style:family="paragraph">
      <style:text-properties style:font-name="Times New Roman" style:font-name-complex="Times New Roman" fo:font-size="14pt" style:font-size-asian="14pt" style:font-size-complex="14pt"/>
    </style:style>
    <style:style style:name="T834" style:parent-style-name="DefaultParagraphFont" style:family="text">
      <style:text-properties style:font-name="Times New Roman" style:font-name-complex="Times New Roman" fo:font-size="14pt" style:font-size-asian="14pt" style:font-size-complex="14pt"/>
    </style:style>
    <style:style style:name="T835" style:parent-style-name="Hyperlink" style:family="text">
      <style:text-properties style:font-name="Times New Roman" style:font-name-complex="Times New Roman" fo:font-size="14pt" style:font-size-asian="14pt" style:font-size-complex="14pt"/>
    </style:style>
    <style:style style:name="P836" style:parent-style-name="Normal" style:family="paragraph">
      <style:text-properties style:font-name="Times New Roman" style:font-name-complex="Times New Roman" fo:font-size="14pt" style:font-size-asian="14pt" style:font-size-complex="14pt"/>
    </style:style>
    <style:style style:name="P837" style:parent-style-name="Normal" style:family="paragraph">
      <style:text-properties style:font-name="Times New Roman" style:font-name-complex="Times New Roman" fo:font-size="14pt" style:font-size-asian="14pt" style:font-size-complex="14pt"/>
    </style:style>
    <style:style style:name="T8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40" style:parent-style-name="Normal" style:family="paragraph">
      <style:text-properties style:font-name="Times New Roman" style:font-name-complex="Times New Roman" fo:font-size="14pt" style:font-size-asian="14pt" style:font-size-complex="14pt"/>
    </style:style>
    <style:style style:name="T841" style:parent-style-name="DefaultParagraphFont" style:family="text">
      <style:text-properties style:font-name="Times New Roman" style:font-name-complex="Times New Roman" fo:font-size="14pt" style:font-size-asian="14pt" style:font-size-complex="14pt"/>
    </style:style>
    <style:style style:name="P842" style:parent-style-name="Normal" style:family="paragraph">
      <style:text-properties style:font-name="Times New Roman" style:font-name-complex="Times New Roman" fo:font-size="14pt" style:font-size-asian="14pt" style:font-size-complex="14pt"/>
    </style:style>
    <style:style style:name="TableColumn844" style:family="table-column">
      <style:table-column-properties style:column-width="3.2444in"/>
    </style:style>
    <style:style style:name="TableColumn845" style:family="table-column">
      <style:table-column-properties style:column-width="3.2444in"/>
    </style:style>
    <style:style style:name="Table843" style:family="table">
      <style:table-properties style:width="6.4888in" fo:margin-left="0in" table:align="left"/>
    </style:style>
    <style:style style:name="TableRow846" style:family="table-row">
      <style:table-row-properties/>
    </style:style>
    <style:style style:name="TableCell84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848" style:parent-style-name="Normal" style:family="paragraph">
      <style:text-properties style:font-name="Times New Roman" style:font-name-complex="Times New Roman" fo:font-size="14pt" style:font-size-asian="14pt" style:font-size-complex="14pt"/>
    </style:style>
    <style:style style:name="P849" style:parent-style-name="Normal" style:family="paragraph">
      <style:text-properties style:font-name="Times New Roman" style:font-name-complex="Times New Roman" fo:font-size="14pt" style:font-size-asian="14pt" style:font-size-complex="14pt"/>
    </style:style>
    <style:style style:name="P850" style:parent-style-name="Normal" style:family="paragraph">
      <style:text-properties style:font-name="Times New Roman" style:font-name-complex="Times New Roman" fo:font-size="14pt" style:font-size-asian="14pt" style:font-size-complex="14pt"/>
    </style:style>
    <style:style style:name="P851" style:parent-style-name="Normal" style:family="paragraph">
      <style:text-properties style:font-name="Times New Roman" style:font-name-complex="Times New Roman" fo:font-size="14pt" style:font-size-asian="14pt" style:font-size-complex="14pt"/>
    </style:style>
    <style:style style:name="TableCell85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853" style:parent-style-name="Normal" style:family="paragraph">
      <style:text-properties style:font-name="Times New Roman" style:font-name-complex="Times New Roman" fo:font-size="14pt" style:font-size-asian="14pt" style:font-size-complex="14pt"/>
    </style:style>
    <style:style style:name="P854" style:parent-style-name="Normal" style:family="paragraph">
      <style:text-properties style:font-name="Times New Roman" style:font-name-complex="Times New Roman" fo:font-size="14pt" style:font-size-asian="14pt" style:font-size-complex="14pt"/>
    </style:style>
    <style:style style:name="P855" style:parent-style-name="Normal" style:family="paragraph">
      <style:text-properties style:font-name="Times New Roman" style:font-name-complex="Times New Roman" fo:font-size="14pt" style:font-size-asian="14pt" style:font-size-complex="14pt"/>
    </style:style>
    <style:style style:name="P856" style:parent-style-name="Normal" style:family="paragraph">
      <style:text-properties style:font-name="Times New Roman" style:font-name-complex="Times New Roman" fo:font-size="14pt" style:font-size-asian="14pt" style:font-size-complex="14pt"/>
    </style:style>
    <style:style style:name="TableRow857" style:family="table-row">
      <style:table-row-properties/>
    </style:style>
    <style:style style:name="TableCell85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859" style:parent-style-name="Normal" style:family="paragraph">
      <style:text-properties style:font-name="Times New Roman" style:font-name-complex="Times New Roman" fo:font-size="14pt" style:font-size-asian="14pt" style:font-size-complex="14pt"/>
    </style:style>
    <style:style style:name="P860" style:parent-style-name="Normal" style:family="paragraph">
      <style:text-properties style:font-name="Times New Roman" style:font-name-complex="Times New Roman" fo:font-size="14pt" style:font-size-asian="14pt" style:font-size-complex="14pt"/>
    </style:style>
    <style:style style:name="P861" style:parent-style-name="Normal" style:family="paragraph">
      <style:text-properties style:font-name="Times New Roman" style:font-name-complex="Times New Roman" fo:font-size="14pt" style:font-size-asian="14pt" style:font-size-complex="14pt"/>
    </style:style>
    <style:style style:name="P862" style:parent-style-name="Normal" style:family="paragraph">
      <style:text-properties style:font-name="Times New Roman" style:font-name-complex="Times New Roman" fo:font-size="14pt" style:font-size-asian="14pt" style:font-size-complex="14pt"/>
    </style:style>
    <style:style style:name="TableCell86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864" style:parent-style-name="Normal" style:family="paragraph">
      <style:text-properties style:font-name="Times New Roman" style:font-name-complex="Times New Roman" fo:font-size="14pt" style:font-size-asian="14pt" style:font-size-complex="14pt"/>
    </style:style>
    <style:style style:name="P865" style:parent-style-name="Normal" style:family="paragraph">
      <style:text-properties style:font-name="Times New Roman" style:font-name-complex="Times New Roman" fo:font-size="14pt" style:font-size-asian="14pt" style:font-size-complex="14pt"/>
    </style:style>
    <style:style style:name="P866" style:parent-style-name="Normal" style:family="paragraph">
      <style:text-properties style:font-name="Times New Roman" style:font-name-complex="Times New Roman" fo:font-size="14pt" style:font-size-asian="14pt" style:font-size-complex="14pt"/>
    </style:style>
    <style:style style:name="P867" style:parent-style-name="Normal" style:family="paragraph">
      <style:text-properties style:font-name="Times New Roman" style:font-name-complex="Times New Roman" fo:font-size="14pt" style:font-size-asian="14pt" style:font-size-complex="14pt"/>
    </style:style>
    <style:style style:name="P868" style:parent-style-name="Normal" style:family="paragraph">
      <style:text-properties style:font-name="Times New Roman" style:font-name-complex="Times New Roman" fo:font-size="14pt" style:font-size-asian="14pt" style:font-size-complex="14pt"/>
    </style:style>
    <style:style style:name="P869" style:parent-style-name="Normal" style:family="paragraph">
      <style:text-properties style:font-name="Times New Roman" style:font-name-complex="Times New Roman" fo:font-size="14pt" style:font-size-asian="14pt" style:font-size-complex="14pt"/>
    </style:style>
    <style:style style:name="T8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1" style:parent-style-name="DefaultParagraphFont" style:family="text">
      <style:text-properties style:font-name="Times New Roman" style:font-name-complex="Times New Roman" fo:font-size="14pt" style:font-size-asian="14pt" style:font-size-complex="14pt"/>
    </style:style>
    <style:style style:name="T8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3" style:parent-style-name="DefaultParagraphFont" style:family="text">
      <style:text-properties style:font-name="Times New Roman" style:font-name-complex="Times New Roman" fo:font-size="14pt" style:font-size-asian="14pt" style:font-size-complex="14pt"/>
    </style:style>
    <style:style style:name="T874" style:parent-style-name="DefaultParagraphFont" style:family="text">
      <style:text-properties style:font-name="Times New Roman" style:font-name-complex="Times New Roman" fo:font-size="14pt" style:font-size-asian="14pt" style:font-size-complex="14pt"/>
    </style:style>
    <style:style style:name="T875" style:parent-style-name="DefaultParagraphFont" style:family="text">
      <style:text-properties style:font-name="Times New Roman" style:font-name-complex="Times New Roman" fo:font-size="14pt" style:font-size-asian="14pt" style:font-size-complex="14pt"/>
    </style:style>
    <style:style style:name="T876" style:parent-style-name="DefaultParagraphFont" style:family="text">
      <style:text-properties style:font-name="Times New Roman" style:font-name-complex="Times New Roman" fo:font-size="14pt" style:font-size-asian="14pt" style:font-size-complex="14pt"/>
    </style:style>
    <style:style style:name="T877" style:parent-style-name="DefaultParagraphFont" style:family="text">
      <style:text-properties style:font-name="Times New Roman" style:font-name-complex="Times New Roman" fo:font-size="14pt" style:font-size-asian="14pt" style:font-size-complex="14pt"/>
    </style:style>
    <style:style style:name="T8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9" style:parent-style-name="DefaultParagraphFont" style:family="text">
      <style:text-properties style:font-name="Times New Roman" style:font-name-complex="Times New Roman" fo:font-size="14pt" style:font-size-asian="14pt" style:font-size-complex="14pt"/>
    </style:style>
    <style:style style:name="T880" style:parent-style-name="DefaultParagraphFont" style:family="text">
      <style:text-properties style:font-name="Times New Roman" style:font-name-complex="Times New Roman" fo:font-size="14pt" style:font-size-asian="14pt" style:font-size-complex="14pt"/>
    </style:style>
    <style:style style:name="T881" style:parent-style-name="DefaultParagraphFont" style:family="text">
      <style:text-properties style:font-name="Times New Roman" style:font-name-complex="Times New Roman" fo:font-size="14pt" style:font-size-asian="14pt" style:font-size-complex="14pt"/>
    </style:style>
    <style:style style:name="T882" style:parent-style-name="DefaultParagraphFont" style:family="text">
      <style:text-properties style:font-name="Times New Roman" style:font-name-complex="Times New Roman" fo:font-size="14pt" style:font-size-asian="14pt" style:font-size-complex="14pt"/>
    </style:style>
    <style:style style:name="T883" style:parent-style-name="DefaultParagraphFont" style:family="text">
      <style:text-properties style:font-name="Times New Roman" style:font-name-complex="Times New Roman" fo:font-size="14pt" style:font-size-asian="14pt" style:font-size-complex="14pt"/>
    </style:style>
    <style:style style:name="T8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5" style:parent-style-name="DefaultParagraphFont" style:family="text">
      <style:text-properties style:font-name="Times New Roman" style:font-name-complex="Times New Roman" fo:font-size="14pt" style:font-size-asian="14pt" style:font-size-complex="14pt"/>
    </style:style>
    <style:style style:name="T886" style:parent-style-name="DefaultParagraphFont" style:family="text">
      <style:text-properties style:font-name="Times New Roman" style:font-name-complex="Times New Roman" fo:font-size="14pt" style:font-size-asian="14pt" style:font-size-complex="14pt"/>
    </style:style>
    <style:style style:name="T887" style:parent-style-name="DefaultParagraphFont" style:family="text">
      <style:text-properties style:font-name="Times New Roman" style:font-name-complex="Times New Roman" fo:font-size="14pt" style:font-size-asian="14pt" style:font-size-complex="14pt"/>
    </style:style>
    <style:style style:name="T888" style:parent-style-name="DefaultParagraphFont" style:family="text">
      <style:text-properties style:font-name="Times New Roman" style:font-name-complex="Times New Roman" fo:font-size="14pt" style:font-size-asian="14pt" style:font-size-complex="14pt"/>
    </style:style>
    <style:style style:name="T889" style:parent-style-name="DefaultParagraphFont" style:family="text">
      <style:text-properties style:font-name="Times New Roman" style:font-name-complex="Times New Roman" fo:font-size="14pt" style:font-size-asian="14pt" style:font-size-complex="14pt"/>
    </style:style>
    <style:style style:name="T890" style:parent-style-name="DefaultParagraphFont" style:family="text">
      <style:text-properties style:font-name="Times New Roman" style:font-name-complex="Times New Roman" fo:font-size="14pt" style:font-size-asian="14pt" style:font-size-complex="14pt"/>
    </style:style>
    <style:style style:name="T8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92" style:parent-style-name="Normal" style:family="paragraph">
      <style:text-properties style:font-name="Times New Roman" style:font-name-complex="Times New Roman" fo:font-size="14pt" style:font-size-asian="14pt" style:font-size-complex="14pt"/>
    </style:style>
    <style:style style:name="T8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95" style:parent-style-name="Normal" style:family="paragraph">
      <style:text-properties style:font-name="Times New Roman" style:font-name-complex="Times New Roman" fo:font-size="14pt" style:font-size-asian="14pt" style:font-size-complex="14pt"/>
    </style:style>
    <style:style style:name="T896" style:parent-style-name="DefaultParagraphFont" style:family="text">
      <style:text-properties style:font-name="Times New Roman" style:font-name-complex="Times New Roman" fo:font-size="14pt" style:font-size-asian="14pt" style:font-size-complex="14pt"/>
    </style:style>
    <style:style style:name="P897" style:parent-style-name="Normal" style:family="paragraph">
      <style:text-properties style:font-name="Times New Roman" style:font-name-complex="Times New Roman" fo:font-size="14pt" style:font-size-asian="14pt" style:font-size-complex="14pt"/>
    </style:style>
    <style:style style:name="P898" style:parent-style-name="Normal" style:family="paragraph">
      <style:text-properties style:font-name="Times New Roman" style:font-name-complex="Times New Roman" fo:font-size="14pt" style:font-size-asian="14pt" style:font-size-complex="14pt"/>
    </style:style>
    <style:style style:name="P899" style:parent-style-name="Normal" style:family="paragraph">
      <style:text-properties style:font-name="Times New Roman" style:font-name-complex="Times New Roman" fo:font-size="14pt" style:font-size-asian="14pt" style:font-size-complex="14pt"/>
    </style:style>
    <style:style style:name="T9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1" style:parent-style-name="DefaultParagraphFont" style:family="text">
      <style:text-properties style:font-name="Times New Roman" style:font-name-complex="Times New Roman" fo:font-size="14pt" style:font-size-asian="14pt" style:font-size-complex="14pt"/>
    </style:style>
    <style:style style:name="T9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04" style:parent-style-name="Normal" style:family="paragraph">
      <style:text-properties style:font-name="Times New Roman" style:font-name-complex="Times New Roman" fo:font-size="14pt" style:font-size-asian="14pt" style:font-size-complex="14pt"/>
    </style:style>
    <style:style style:name="P905" style:parent-style-name="Normal" style:family="paragraph">
      <style:text-properties style:font-name="Times New Roman" style:font-name-complex="Times New Roman" fo:font-size="14pt" style:font-size-asian="14pt" style:font-size-complex="14pt"/>
    </style:style>
    <style:style style:name="P906" style:parent-style-name="Normal" style:family="paragraph">
      <style:text-properties style:font-name="Times New Roman" style:font-name-complex="Times New Roman" fo:font-size="14pt" style:font-size-asian="14pt" style:font-size-complex="14pt"/>
    </style:style>
    <style:style style:name="T9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8" style:parent-style-name="DefaultParagraphFont" style:family="text">
      <style:text-properties style:font-name="Times New Roman" style:font-name-complex="Times New Roman" fo:font-size="14pt" style:font-size-asian="14pt" style:font-size-complex="14pt"/>
    </style:style>
    <style:style style:name="T9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10" style:parent-style-name="Normal" style:family="paragraph">
      <style:text-properties style:font-name="Times New Roman" style:font-name-complex="Times New Roman" fo:font-size="14pt" style:font-size-asian="14pt" style:font-size-complex="14pt"/>
    </style:style>
    <style:style style:name="T911" style:parent-style-name="DefaultParagraphFont" style:family="text">
      <style:text-properties style:font-name="Times New Roman" style:font-name-complex="Times New Roman" fo:font-size="14pt" style:font-size-asian="14pt" style:font-size-complex="14pt"/>
    </style:style>
    <style:style style:name="T912" style:parent-style-name="Hyperlink" style:family="text">
      <style:text-properties style:font-name="Times New Roman" style:font-name-complex="Times New Roman" fo:font-size="14pt" style:font-size-asian="14pt" style:font-size-complex="14pt"/>
    </style:style>
    <style:style style:name="T9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15" style:parent-style-name="Normal" style:family="paragraph">
      <style:text-properties style:font-name="Times New Roman" style:font-name-complex="Times New Roman" fo:font-size="14pt" style:font-size-asian="14pt" style:font-size-complex="14pt"/>
    </style:style>
    <style:style style:name="P916" style:parent-style-name="Normal" style:family="paragraph">
      <style:text-properties style:font-name="Consolas" style:font-name-complex="Times New Roman" fo:font-size="11pt" style:font-size-asian="11pt" style:font-size-complex="11pt"/>
    </style:style>
    <style:style style:name="P917" style:parent-style-name="Normal" style:family="paragraph">
      <style:text-properties style:font-name="Consolas" style:font-name-complex="Times New Roman" fo:font-size="11pt" style:font-size-asian="11pt" style:font-size-complex="11pt"/>
    </style:style>
    <style:style style:name="P918" style:parent-style-name="Normal" style:family="paragraph">
      <style:text-properties style:font-name="Consolas" style:font-name-complex="Times New Roman" fo:font-size="11pt" style:font-size-asian="11pt" style:font-size-complex="11pt"/>
    </style:style>
    <style:style style:name="P919" style:parent-style-name="Normal" style:family="paragraph">
      <style:text-properties style:font-name="Consolas" style:font-name-complex="Times New Roman" fo:font-size="11pt" style:font-size-asian="11pt" style:font-size-complex="11pt"/>
    </style:style>
    <style:style style:name="P920" style:parent-style-name="Normal" style:family="paragraph">
      <style:text-properties style:font-name="Consolas" style:font-name-complex="Times New Roman" fo:font-size="11pt" style:font-size-asian="11pt" style:font-size-complex="11pt"/>
    </style:style>
    <style:style style:name="P921" style:parent-style-name="Normal" style:family="paragraph">
      <style:text-properties style:font-name="Consolas" style:font-name-complex="Times New Roman" fo:font-size="11pt" style:font-size-asian="11pt" style:font-size-complex="11pt"/>
    </style:style>
    <style:style style:name="P922" style:parent-style-name="Normal" style:family="paragraph">
      <style:text-properties style:font-name="Consolas" style:font-name-complex="Times New Roman" fo:font-size="11pt" style:font-size-asian="11pt" style:font-size-complex="11pt"/>
    </style:style>
    <style:style style:name="P923" style:parent-style-name="Normal" style:family="paragraph">
      <style:text-properties style:font-name="Consolas" style:font-name-complex="Times New Roman" fo:font-size="11pt" style:font-size-asian="11pt" style:font-size-complex="11pt"/>
    </style:style>
    <style:style style:name="P924" style:parent-style-name="Normal" style:family="paragraph">
      <style:text-properties style:font-name="Consolas" style:font-name-complex="Times New Roman" fo:font-size="11pt" style:font-size-asian="11pt" style:font-size-complex="11pt"/>
    </style:style>
    <style:style style:name="P925" style:parent-style-name="Normal" style:family="paragraph">
      <style:text-properties style:font-name="Consolas" style:font-name-complex="Times New Roman" fo:font-size="11pt" style:font-size-asian="11pt" style:font-size-complex="11pt"/>
    </style:style>
    <style:style style:name="P926" style:parent-style-name="Normal" style:family="paragraph">
      <style:text-properties style:font-name="Consolas" style:font-name-complex="Times New Roman" fo:font-size="11pt" style:font-size-asian="11pt" style:font-size-complex="11pt"/>
    </style:style>
    <style:style style:name="P927" style:parent-style-name="Normal" style:family="paragraph">
      <style:text-properties style:font-name="Times New Roman" style:font-name-complex="Times New Roman" fo:font-size="14pt" style:font-size-asian="14pt" style:font-size-complex="14pt"/>
    </style:style>
    <style:style style:name="P928" style:parent-style-name="Normal" style:family="paragraph">
      <style:text-properties style:font-name="Times New Roman" style:font-name-complex="Times New Roman" fo:font-size="14pt" style:font-size-asian="14pt" style:font-size-complex="14pt"/>
    </style:style>
    <style:style style:name="P929" style:parent-style-name="Normal" style:family="paragraph">
      <style:text-properties style:font-name="Times New Roman" style:font-name-complex="Times New Roman" fo:font-size="14pt" style:font-size-asian="14pt" style:font-size-complex="14pt"/>
    </style:style>
    <style:style style:name="T9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1" style:parent-style-name="DefaultParagraphFont" style:family="text">
      <style:text-properties style:font-name="Times New Roman" style:font-name-complex="Times New Roman" fo:font-size="14pt" style:font-size-asian="14pt" style:font-size-complex="14pt"/>
    </style:style>
    <style:style style:name="T9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33" style:parent-style-name="Normal" style:family="paragraph">
      <style:text-properties style:font-name="Times New Roman" style:font-name-complex="Times New Roman" fo:font-size="14pt" style:font-size-asian="14pt" style:font-size-complex="14pt"/>
    </style:style>
    <style:style style:name="T9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36" style:parent-style-name="Normal" style:family="paragraph">
      <style:text-properties style:font-name="Times New Roman" style:font-name-complex="Times New Roman" fo:font-size="14pt" style:font-size-asian="14pt" style:font-size-complex="14pt"/>
    </style:style>
    <style:style style:name="P937" style:parent-style-name="Normal" style:family="paragraph">
      <style:text-properties style:font-name="Times New Roman" style:font-name-complex="Times New Roman" fo:font-size="14pt" style:font-size-asian="14pt" style:font-size-complex="14pt"/>
    </style:style>
    <style:style style:name="P938" style:parent-style-name="Normal" style:family="paragraph">
      <style:text-properties style:font-name="Times New Roman" style:font-name-complex="Times New Roman" fo:font-size="14pt" style:font-size-asian="14pt" style:font-size-complex="14pt"/>
    </style:style>
    <style:style style:name="T9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0" style:parent-style-name="DefaultParagraphFont" style:family="text">
      <style:text-properties style:font-name="Times New Roman" style:font-name-complex="Times New Roman" fo:font-size="14pt" style:font-size-asian="14pt" style:font-size-complex="14pt"/>
    </style:style>
    <style:style style:name="T9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42" style:parent-style-name="Normal" style:family="paragraph">
      <style:text-properties style:font-name="Times New Roman" style:font-name-complex="Times New Roman" fo:font-size="14pt" style:font-size-asian="14pt" style:font-size-complex="14pt"/>
    </style:style>
    <style:style style:name="T9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45" style:parent-style-name="Normal" style:family="paragraph">
      <style:text-properties style:font-name="Times New Roman" style:font-name-complex="Times New Roman" fo:font-size="14pt" style:font-size-asian="14pt" style:font-size-complex="14pt"/>
    </style:style>
    <style:style style:name="P946" style:parent-style-name="Normal" style:family="paragraph">
      <style:text-properties style:font-name="Times New Roman" style:font-name-complex="Times New Roman" fo:font-size="14pt" style:font-size-asian="14pt" style:font-size-complex="14pt"/>
    </style:style>
    <style:style style:name="P947" style:parent-style-name="Normal" style:family="paragraph">
      <style:text-properties style:font-name="Times New Roman" style:font-name-complex="Times New Roman" fo:font-size="14pt" style:font-size-asian="14pt" style:font-size-complex="14pt"/>
    </style:style>
    <style:style style:name="T9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9" style:parent-style-name="DefaultParagraphFont" style:family="text">
      <style:text-properties style:font-name="Times New Roman" style:font-name-complex="Times New Roman" fo:font-size="14pt" style:font-size-asian="14pt" style:font-size-complex="14pt"/>
    </style:style>
    <style:style style:name="T9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52" style:parent-style-name="Normal" style:family="paragraph">
      <style:text-properties style:font-name="Times New Roman" style:font-name-complex="Times New Roman" fo:font-size="14pt" style:font-size-asian="14pt" style:font-size-complex="14pt"/>
    </style:style>
    <style:style style:name="T953" style:parent-style-name="DefaultParagraphFont" style:family="text">
      <style:text-properties style:font-name="Times New Roman" style:font-name-complex="Times New Roman" fo:font-size="14pt" style:font-size-asian="14pt" style:font-size-complex="14pt"/>
    </style:style>
    <style:style style:name="P954" style:parent-style-name="Normal" style:family="paragraph">
      <style:text-properties style:font-name="Times New Roman" style:font-name-complex="Times New Roman" fo:font-size="14pt" style:font-size-asian="14pt" style:font-size-complex="14pt"/>
    </style:style>
    <style:style style:name="P955" style:parent-style-name="Normal" style:family="paragraph">
      <style:text-properties style:font-name="Times New Roman" style:font-name-complex="Times New Roman" fo:font-size="14pt" style:font-size-asian="14pt" style:font-size-complex="14pt"/>
    </style:style>
    <style:style style:name="P956" style:parent-style-name="Normal" style:family="paragraph">
      <style:text-properties style:font-name="Times New Roman" style:font-name-complex="Times New Roman" fo:font-size="14pt" style:font-size-asian="14pt" style:font-size-complex="14pt"/>
    </style:style>
    <style:style style:name="P957" style:parent-style-name="Normal" style:family="paragraph">
      <style:text-properties style:font-name="Times New Roman" style:font-name-complex="Times New Roman" fo:font-size="14pt" style:font-size-asian="14pt" style:font-size-complex="14pt"/>
    </style:style>
    <style:style style:name="P958" style:parent-style-name="Normal" style:family="paragraph">
      <style:text-properties style:font-name="Times New Roman" style:font-name-complex="Times New Roman" fo:font-size="14pt" style:font-size-asian="14pt" style:font-size-complex="14pt"/>
    </style:style>
    <style:style style:name="P959" style:parent-style-name="Normal" style:family="paragraph">
      <style:text-properties style:font-name="Times New Roman" style:font-name-complex="Times New Roman" fo:font-size="14pt" style:font-size-asian="14pt" style:font-size-complex="14pt"/>
    </style:style>
    <style:style style:name="T9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1" style:parent-style-name="DefaultParagraphFont" style:family="text">
      <style:text-properties style:font-name="Times New Roman" style:font-name-complex="Times New Roman" fo:font-size="14pt" style:font-size-asian="14pt" style:font-size-complex="14pt"/>
    </style:style>
    <style:style style:name="T9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64" style:parent-style-name="Normal" style:family="paragraph">
      <style:text-properties style:font-name="Consolas" style:font-name-complex="Times New Roman" fo:font-size="11pt" style:font-size-asian="11pt" style:font-size-complex="11pt"/>
    </style:style>
    <style:style style:name="P965" style:parent-style-name="Normal" style:family="paragraph">
      <style:text-properties style:font-name="Consolas" style:font-name-complex="Times New Roman" fo:font-size="11pt" style:font-size-asian="11pt" style:font-size-complex="11pt"/>
    </style:style>
    <style:style style:name="P966" style:parent-style-name="Normal" style:family="paragraph">
      <style:text-properties style:font-name="Consolas" style:font-name-complex="Times New Roman" fo:font-size="11pt" style:font-size-asian="11pt" style:font-size-complex="11pt"/>
    </style:style>
    <style:style style:name="P967" style:parent-style-name="Normal" style:family="paragraph">
      <style:text-properties style:font-name="Consolas" style:font-name-complex="Times New Roman" fo:font-size="11pt" style:font-size-asian="11pt" style:font-size-complex="11pt"/>
    </style:style>
    <style:style style:name="P968" style:parent-style-name="Normal" style:family="paragraph">
      <style:text-properties style:font-name="Consolas" style:font-name-complex="Times New Roman" fo:font-size="11pt" style:font-size-asian="11pt" style:font-size-complex="11pt"/>
    </style:style>
    <style:style style:name="P969" style:parent-style-name="Normal" style:family="paragraph">
      <style:text-properties style:font-name="Consolas" style:font-name-complex="Times New Roman" fo:font-size="11pt" style:font-size-asian="11pt" style:font-size-complex="11pt"/>
    </style:style>
    <style:style style:name="P970" style:parent-style-name="Normal" style:family="paragraph">
      <style:text-properties style:font-name="Consolas" style:font-name-complex="Times New Roman" fo:font-size="11pt" style:font-size-asian="11pt" style:font-size-complex="11pt"/>
    </style:style>
    <style:style style:name="P971" style:parent-style-name="Normal" style:family="paragraph">
      <style:text-properties style:font-name="Consolas" style:font-name-complex="Times New Roman" fo:font-size="11pt" style:font-size-asian="11pt" style:font-size-complex="11pt"/>
    </style:style>
    <style:style style:name="P972" style:parent-style-name="Normal" style:family="paragraph">
      <style:text-properties style:font-name="Consolas" style:font-name-complex="Times New Roman" fo:font-size="11pt" style:font-size-asian="11pt" style:font-size-complex="11pt"/>
    </style:style>
    <style:style style:name="P973" style:parent-style-name="Normal" style:family="paragraph">
      <style:text-properties style:font-name="Consolas" style:font-name-complex="Times New Roman" fo:font-size="11pt" style:font-size-asian="11pt" style:font-size-complex="11pt"/>
    </style:style>
    <style:style style:name="P974" style:parent-style-name="Normal" style:family="paragraph">
      <style:text-properties style:font-name="Consolas" style:font-name-complex="Times New Roman" fo:font-size="11pt" style:font-size-asian="11pt" style:font-size-complex="11pt"/>
    </style:style>
    <style:style style:name="P975" style:parent-style-name="Normal" style:family="paragraph">
      <style:text-properties style:font-name="Consolas" style:font-name-complex="Times New Roman" fo:font-size="11pt" style:font-size-asian="11pt" style:font-size-complex="11pt"/>
    </style:style>
    <style:style style:name="P976" style:parent-style-name="Normal" style:family="paragraph">
      <style:text-properties style:font-name="Consolas" style:font-name-complex="Times New Roman" fo:font-size="11pt" style:font-size-asian="11pt" style:font-size-complex="11pt"/>
    </style:style>
    <style:style style:name="P977" style:parent-style-name="Normal" style:family="paragraph">
      <style:text-properties style:font-name="Consolas" style:font-name-complex="Times New Roman" fo:font-size="11pt" style:font-size-asian="11pt" style:font-size-complex="11pt" fo:language="it" fo:country="IT"/>
    </style:style>
    <style:style style:name="P978" style:parent-style-name="Normal" style:family="paragraph">
      <style:text-properties style:font-name="Consolas" style:font-name-complex="Times New Roman" fo:font-size="11pt" style:font-size-asian="11pt" style:font-size-complex="11pt" fo:language="it" fo:country="IT"/>
    </style:style>
    <style:style style:name="P979" style:parent-style-name="Normal" style:family="paragraph">
      <style:text-properties style:font-name="Consolas" style:font-name-complex="Times New Roman" fo:font-size="11pt" style:font-size-asian="11pt" style:font-size-complex="11pt"/>
    </style:style>
    <style:style style:name="P980" style:parent-style-name="Normal" style:family="paragraph">
      <style:text-properties style:font-name="Times New Roman" style:font-name-complex="Times New Roman" fo:font-size="14pt" style:font-size-asian="14pt" style:font-size-complex="14pt"/>
    </style:style>
    <style:style style:name="P981" style:parent-style-name="Normal" style:family="paragraph">
      <style:text-properties style:font-name="Times New Roman" style:font-name-complex="Times New Roman" fo:font-size="14pt" style:font-size-asian="14pt" style:font-size-complex="14pt"/>
    </style:style>
    <style:style style:name="P982" style:parent-style-name="Normal" style:family="paragraph">
      <style:text-properties style:font-name="Times New Roman" style:font-name-complex="Times New Roman" fo:font-size="14pt" style:font-size-asian="14pt" style:font-size-complex="14pt"/>
    </style:style>
    <style:style style:name="T9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84" style:parent-style-name="DefaultParagraphFont" style:family="text">
      <style:text-properties style:font-name="Times New Roman" style:font-name-complex="Times New Roman" fo:font-size="14pt" style:font-size-asian="14pt" style:font-size-complex="14pt"/>
    </style:style>
    <style:style style:name="T9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87" style:parent-style-name="Normal" style:family="paragraph">
      <style:text-properties style:font-name="Times New Roman" style:font-name-complex="Times New Roman" fo:font-size="14pt" style:font-size-asian="14pt" style:font-size-complex="14pt"/>
    </style:style>
    <style:style style:name="P988" style:parent-style-name="Normal" style:family="paragraph">
      <style:text-properties style:font-name="Consolas" style:font-name-complex="Times New Roman" fo:font-size="11pt" style:font-size-asian="11pt" style:font-size-complex="11pt"/>
    </style:style>
    <style:style style:name="P989" style:parent-style-name="Normal" style:family="paragraph">
      <style:text-properties style:font-name="Consolas" style:font-name-complex="Times New Roman" fo:font-size="11pt" style:font-size-asian="11pt" style:font-size-complex="11pt"/>
    </style:style>
    <style:style style:name="P990" style:parent-style-name="Normal" style:family="paragraph">
      <style:text-properties style:font-name="Consolas" style:font-name-complex="Times New Roman" fo:font-size="11pt" style:font-size-asian="11pt" style:font-size-complex="11pt"/>
    </style:style>
    <style:style style:name="P991" style:parent-style-name="Normal" style:family="paragraph">
      <style:text-properties style:font-name="Consolas" style:font-name-complex="Times New Roman" fo:font-size="11pt" style:font-size-asian="11pt" style:font-size-complex="11pt"/>
    </style:style>
    <style:style style:name="P992" style:parent-style-name="Normal" style:family="paragraph">
      <style:text-properties style:font-name="Consolas" style:font-name-complex="Times New Roman" fo:font-size="11pt" style:font-size-asian="11pt" style:font-size-complex="11pt"/>
    </style:style>
    <style:style style:name="P993" style:parent-style-name="Normal" style:family="paragraph">
      <style:text-properties style:font-name="Consolas" style:font-name-complex="Times New Roman" fo:font-size="11pt" style:font-size-asian="11pt" style:font-size-complex="11pt"/>
    </style:style>
    <style:style style:name="P994" style:parent-style-name="Normal" style:family="paragraph">
      <style:text-properties style:font-name="Consolas" style:font-name-complex="Times New Roman" fo:font-size="11pt" style:font-size-asian="11pt" style:font-size-complex="11pt"/>
    </style:style>
    <style:style style:name="P995" style:parent-style-name="Normal" style:family="paragraph">
      <style:text-properties style:font-name="Consolas" style:font-name-complex="Times New Roman" fo:font-size="11pt" style:font-size-asian="11pt" style:font-size-complex="11pt"/>
    </style:style>
    <style:style style:name="P996" style:parent-style-name="Normal" style:family="paragraph">
      <style:text-properties style:font-name="Consolas" style:font-name-complex="Times New Roman" fo:font-size="11pt" style:font-size-asian="11pt" style:font-size-complex="11pt"/>
    </style:style>
    <style:style style:name="P997" style:parent-style-name="Normal" style:family="paragraph">
      <style:text-properties style:font-name="Consolas" style:font-name-complex="Times New Roman" fo:font-size="11pt" style:font-size-asian="11pt" style:font-size-complex="11pt"/>
    </style:style>
    <style:style style:name="P998" style:parent-style-name="Normal" style:family="paragraph">
      <style:text-properties style:font-name="Consolas" style:font-name-complex="Times New Roman" fo:font-size="11pt" style:font-size-asian="11pt" style:font-size-complex="11pt"/>
    </style:style>
    <style:style style:name="P999" style:parent-style-name="Normal" style:family="paragraph">
      <style:text-properties style:font-name="Consolas" style:font-name-complex="Times New Roman" fo:font-size="11pt" style:font-size-asian="11pt" style:font-size-complex="11pt"/>
    </style:style>
    <style:style style:name="P1000" style:parent-style-name="Normal" style:family="paragraph">
      <style:text-properties style:font-name="Consolas" style:font-name-complex="Times New Roman" fo:font-size="11pt" style:font-size-asian="11pt" style:font-size-complex="11pt"/>
    </style:style>
    <style:style style:name="P1001" style:parent-style-name="Normal" style:family="paragraph">
      <style:text-properties style:font-name="Consolas" style:font-name-complex="Times New Roman" fo:font-size="11pt" style:font-size-asian="11pt" style:font-size-complex="11pt"/>
    </style:style>
    <style:style style:name="P1002" style:parent-style-name="Normal" style:family="paragraph">
      <style:text-properties style:font-name="Consolas" style:font-name-complex="Times New Roman" fo:font-size="11pt" style:font-size-asian="11pt" style:font-size-complex="11pt"/>
    </style:style>
    <style:style style:name="P1003" style:parent-style-name="Normal" style:family="paragraph">
      <style:text-properties style:font-name="Consolas" style:font-name-complex="Times New Roman" fo:font-size="11pt" style:font-size-asian="11pt" style:font-size-complex="11pt"/>
    </style:style>
    <style:style style:name="P1004" style:parent-style-name="Normal" style:family="paragraph">
      <style:text-properties style:font-name="Consolas" style:font-name-complex="Times New Roman" fo:font-size="11pt" style:font-size-asian="11pt" style:font-size-complex="11pt"/>
    </style:style>
    <style:style style:name="P1005" style:parent-style-name="Normal" style:family="paragraph">
      <style:text-properties style:font-name="Consolas" style:font-name-complex="Times New Roman" fo:font-size="11pt" style:font-size-asian="11pt" style:font-size-complex="11pt"/>
    </style:style>
    <style:style style:name="P1006" style:parent-style-name="Normal" style:family="paragraph">
      <style:text-properties style:font-name="Consolas" style:font-name-complex="Times New Roman" fo:font-size="11pt" style:font-size-asian="11pt" style:font-size-complex="11pt"/>
    </style:style>
    <style:style style:name="P1007" style:parent-style-name="Normal" style:family="paragraph">
      <style:text-properties style:font-name="Consolas" style:font-name-complex="Times New Roman" fo:font-size="11pt" style:font-size-asian="11pt" style:font-size-complex="11pt"/>
    </style:style>
    <style:style style:name="P1008" style:parent-style-name="Normal" style:family="paragraph">
      <style:text-properties style:font-name="Consolas" style:font-name-complex="Times New Roman" fo:font-size="11pt" style:font-size-asian="11pt" style:font-size-complex="11pt"/>
    </style:style>
    <style:style style:name="P1009" style:parent-style-name="Normal" style:family="paragraph">
      <style:text-properties style:font-name="Consolas" style:font-name-complex="Times New Roman" fo:font-size="11pt" style:font-size-asian="11pt" style:font-size-complex="11pt"/>
    </style:style>
    <style:style style:name="P1010" style:parent-style-name="Normal" style:family="paragraph">
      <style:text-properties style:font-name="Consolas" style:font-name-complex="Times New Roman" fo:font-size="11pt" style:font-size-asian="11pt" style:font-size-complex="11pt"/>
    </style:style>
    <style:style style:name="P1011" style:parent-style-name="Normal" style:family="paragraph">
      <style:text-properties style:font-name="Consolas" style:font-name-complex="Times New Roman" fo:font-size="11pt" style:font-size-asian="11pt" style:font-size-complex="11pt"/>
    </style:style>
    <style:style style:name="P1012" style:parent-style-name="Normal" style:family="paragraph">
      <style:text-properties style:font-name="Consolas" style:font-name-complex="Times New Roman" fo:font-size="11pt" style:font-size-asian="11pt" style:font-size-complex="11pt"/>
    </style:style>
    <style:style style:name="P1013" style:parent-style-name="Normal" style:family="paragraph">
      <style:text-properties style:font-name="Times New Roman" style:font-name-complex="Times New Roman" fo:font-size="14pt" style:font-size-asian="14pt" style:font-size-complex="14pt"/>
    </style:style>
    <style:style style:name="TableColumn1015" style:family="table-column">
      <style:table-column-properties style:column-width="3.7423in"/>
    </style:style>
    <style:style style:name="TableColumn1016" style:family="table-column">
      <style:table-column-properties style:column-width="2.7465in"/>
    </style:style>
    <style:style style:name="Table1014" style:family="table">
      <style:table-properties style:width="6.4888in" fo:margin-left="0in" table:align="left"/>
    </style:style>
    <style:style style:name="TableRow1017" style:family="table-row">
      <style:table-row-properties/>
    </style:style>
    <style:style style:name="TableCell101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19" style:parent-style-name="Normal" style:family="paragraph">
      <style:text-properties style:font-name="Times New Roman" style:font-name-complex="Times New Roman" fo:font-size="14pt" style:font-size-asian="14pt" style:font-size-complex="14pt"/>
    </style:style>
    <style:style style:name="P1020" style:parent-style-name="Normal" style:family="paragraph">
      <style:text-properties style:font-name="Times New Roman" style:font-name-complex="Times New Roman" fo:font-size="14pt" style:font-size-asian="14pt" style:font-size-complex="14pt"/>
    </style:style>
    <style:style style:name="TableCell102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22" style:parent-style-name="Normal" style:family="paragraph">
      <style:text-properties style:font-name="Times New Roman" style:font-name-complex="Times New Roman" fo:font-size="14pt" style:font-size-asian="14pt" style:font-size-complex="14pt"/>
    </style:style>
    <style:style style:name="P1023" style:parent-style-name="Normal" style:family="paragraph">
      <style:text-properties style:font-name="Times New Roman" style:font-name-complex="Times New Roman" fo:font-size="14pt" style:font-size-asian="14pt" style:font-size-complex="14pt"/>
    </style:style>
    <style:style style:name="TableRow1024" style:family="table-row">
      <style:table-row-properties/>
    </style:style>
    <style:style style:name="TableCell102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26" style:parent-style-name="Normal" style:family="paragraph">
      <style:text-properties style:font-name="Times New Roman" style:font-name-complex="Times New Roman" fo:font-size="14pt" style:font-size-asian="14pt" style:font-size-complex="14pt"/>
    </style:style>
    <style:style style:name="P1027" style:parent-style-name="Normal" style:family="paragraph">
      <style:text-properties style:font-name="Times New Roman" style:font-name-complex="Times New Roman" fo:font-size="14pt" style:font-size-asian="14pt" style:font-size-complex="14pt"/>
    </style:style>
    <style:style style:name="TableCell102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29" style:parent-style-name="Normal" style:family="paragraph">
      <style:text-properties style:font-name="Times New Roman" style:font-name-complex="Times New Roman" fo:font-size="14pt" style:font-size-asian="14pt" style:font-size-complex="14pt"/>
    </style:style>
    <style:style style:name="P1030" style:parent-style-name="Normal" style:family="paragraph">
      <style:text-properties style:font-name="Times New Roman" style:font-name-complex="Times New Roman" fo:font-size="14pt" style:font-size-asian="14pt" style:font-size-complex="14pt"/>
    </style:style>
    <style:style style:name="P1031" style:parent-style-name="Normal" style:family="paragraph">
      <style:text-properties style:font-name="Times New Roman" style:font-name-complex="Times New Roman" fo:font-size="14pt" style:font-size-asian="14pt" style:font-size-complex="14pt"/>
    </style:style>
    <style:style style:name="P1032" style:parent-style-name="Normal" style:family="paragraph">
      <style:text-properties style:font-name="Times New Roman" style:font-name-complex="Times New Roman" fo:font-size="14pt" style:font-size-asian="14pt" style:font-size-complex="14pt"/>
    </style:style>
    <style:style style:name="T10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34" style:parent-style-name="DefaultParagraphFont" style:family="text">
      <style:text-properties style:font-name="Times New Roman" style:font-name-complex="Times New Roman" fo:font-size="14pt" style:font-size-asian="14pt" style:font-size-complex="14pt"/>
    </style:style>
    <style:style style:name="T10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36" style:parent-style-name="Normal" style:family="paragraph">
      <style:text-properties style:font-name="Times New Roman" style:font-name-complex="Times New Roman" fo:font-size="14pt" style:font-size-asian="14pt" style:font-size-complex="14pt"/>
    </style:style>
    <style:style style:name="T1037" style:parent-style-name="DefaultParagraphFont" style:family="text">
      <style:text-properties style:font-name="Times New Roman" style:font-name-complex="Times New Roman" fo:font-size="14pt" style:font-size-asian="14pt" style:font-size-complex="14pt"/>
    </style:style>
    <style:style style:name="T1038" style:parent-style-name="DefaultParagraphFont" style:family="text">
      <style:text-properties style:font-name="Times New Roman" style:font-name-complex="Times New Roman" fo:font-size="14pt" style:font-size-asian="14pt" style:font-size-complex="14pt"/>
    </style:style>
    <style:style style:name="T1039" style:parent-style-name="DefaultParagraphFont" style:family="text">
      <style:text-properties style:font-name="Times New Roman" style:font-name-complex="Times New Roman" fo:font-size="14pt" style:font-size-asian="14pt" style:font-size-complex="14pt"/>
    </style:style>
    <style:style style:name="T10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41" style:parent-style-name="DefaultParagraphFont" style:family="text">
      <style:text-properties style:font-name="Times New Roman" style:font-name-complex="Times New Roman" fo:font-size="14pt" style:font-size-asian="14pt" style:font-size-complex="14pt"/>
    </style:style>
    <style:style style:name="T1042" style:parent-style-name="DefaultParagraphFont" style:family="text">
      <style:text-properties style:font-name="Times New Roman" style:font-name-complex="Times New Roman" fo:font-size="14pt" style:font-size-asian="14pt" style:font-size-complex="14pt"/>
    </style:style>
    <style:style style:name="P1043" style:parent-style-name="Normal" style:family="paragraph">
      <style:text-properties style:font-name="Times New Roman" style:font-name-complex="Times New Roman" fo:font-size="14pt" style:font-size-asian="14pt" style:font-size-complex="14pt"/>
    </style:style>
    <style:style style:name="T10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46" style:parent-style-name="Normal" style:family="paragraph">
      <style:text-properties style:font-name="Times New Roman" style:font-name-complex="Times New Roman" fo:font-size="14pt" style:font-size-asian="14pt" style:font-size-complex="14pt"/>
    </style:style>
    <style:style style:name="T1047" style:parent-style-name="DefaultParagraphFont" style:family="text">
      <style:text-properties style:font-name="Times New Roman" style:font-name-complex="Times New Roman" fo:font-size="14pt" style:font-size-asian="14pt" style:font-size-complex="14pt"/>
    </style:style>
    <style:style style:name="P1048" style:parent-style-name="Normal" style:family="paragraph">
      <style:text-properties style:font-name="Times New Roman" style:font-name-complex="Times New Roman" fo:font-size="14pt" style:font-size-asian="14pt" style:font-size-complex="14pt"/>
    </style:style>
    <style:style style:name="P1049" style:parent-style-name="Normal" style:family="paragraph">
      <style:text-properties style:font-name="Times New Roman" style:font-name-complex="Times New Roman" fo:font-size="14pt" style:font-size-asian="14pt" style:font-size-complex="14pt"/>
    </style:style>
    <style:style style:name="P1050" style:parent-style-name="Normal" style:family="paragraph">
      <style:text-properties style:font-name="Times New Roman" style:font-name-complex="Times New Roman" fo:font-size="14pt" style:font-size-asian="14pt" style:font-size-complex="14pt"/>
    </style:style>
    <style:style style:name="T10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2" style:parent-style-name="DefaultParagraphFont" style:family="text">
      <style:text-properties style:font-name="Times New Roman" style:font-name-complex="Times New Roman" fo:font-size="14pt" style:font-size-asian="14pt" style:font-size-complex="14pt"/>
    </style:style>
    <style:style style:name="T10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55" style:parent-style-name="Normal" style:family="paragraph">
      <style:text-properties style:font-name="Times New Roman" style:font-name-complex="Times New Roman" fo:font-size="14pt" style:font-size-asian="14pt" style:font-size-complex="14pt"/>
    </style:style>
    <style:style style:name="T1056" style:parent-style-name="DefaultParagraphFont" style:family="text">
      <style:text-properties style:font-name="Times New Roman" style:font-name-complex="Times New Roman" fo:font-size="14pt" style:font-size-asian="14pt" style:font-size-complex="14pt"/>
    </style:style>
    <style:style style:name="P1057" style:parent-style-name="Normal" style:family="paragraph">
      <style:text-properties style:font-name="Times New Roman" style:font-name-complex="Times New Roman" fo:font-size="14pt" style:font-size-asian="14pt" style:font-size-complex="14pt"/>
    </style:style>
    <style:style style:name="T10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59" style:parent-style-name="Normal" style:family="paragraph">
      <style:text-properties style:font-name="Times New Roman" style:font-name-complex="Times New Roman" fo:font-size="14pt" style:font-size-asian="14pt" style:font-size-complex="14pt"/>
    </style:style>
    <style:style style:name="T10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61" style:parent-style-name="Normal" style:family="paragraph">
      <style:text-properties style:font-name="Times New Roman" style:font-name-complex="Times New Roman" fo:font-size="14pt" style:font-size-asian="14pt" style:font-size-complex="14pt"/>
    </style:style>
    <style:style style:name="T1062" style:parent-style-name="DefaultParagraphFont" style:family="text">
      <style:text-properties style:font-name="Times New Roman" style:font-name-complex="Times New Roman" fo:font-size="14pt" style:font-size-asian="14pt" style:font-size-complex="14pt"/>
    </style:style>
    <style:style style:name="T10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64" style:parent-style-name="DefaultParagraphFont" style:family="text">
      <style:text-properties style:font-name="Times New Roman" style:font-name-complex="Times New Roman" fo:font-size="14pt" style:font-size-asian="14pt" style:font-size-complex="14pt"/>
    </style:style>
    <style:style style:name="T10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66" style:parent-style-name="DefaultParagraphFont" style:family="text">
      <style:text-properties style:font-name="Times New Roman" style:font-name-complex="Times New Roman" fo:font-size="14pt" style:font-size-asian="14pt" style:font-size-complex="14pt"/>
    </style:style>
    <style:style style:name="T10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68" style:parent-style-name="DefaultParagraphFont" style:family="text">
      <style:text-properties style:font-name="Times New Roman" style:font-name-complex="Times New Roman" fo:font-size="14pt" style:font-size-asian="14pt" style:font-size-complex="14pt"/>
    </style:style>
    <style:style style:name="T10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0" style:parent-style-name="DefaultParagraphFont" style:family="text">
      <style:text-properties style:font-name="Times New Roman" style:font-name-complex="Times New Roman" fo:font-size="14pt" style:font-size-asian="14pt" style:font-size-complex="14pt"/>
    </style:style>
    <style:style style:name="T1071" style:parent-style-name="DefaultParagraphFont" style:family="text">
      <style:text-properties style:font-name="Times New Roman" style:font-name-complex="Times New Roman" fo:font-size="14pt" style:font-size-asian="14pt" style:font-size-complex="14pt"/>
    </style:style>
    <style:style style:name="T10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3" style:parent-style-name="DefaultParagraphFont" style:family="text">
      <style:text-properties style:font-name="Times New Roman" style:font-name-complex="Times New Roman" fo:font-size="14pt" style:font-size-asian="14pt" style:font-size-complex="14pt"/>
    </style:style>
    <style:style style:name="T1074" style:parent-style-name="DefaultParagraphFont" style:family="text">
      <style:text-properties style:font-name="Times New Roman" style:font-name-complex="Times New Roman" fo:font-size="14pt" style:font-size-asian="14pt" style:font-size-complex="14pt"/>
    </style:style>
    <style:style style:name="T1075" style:parent-style-name="Hyperlink" style:family="text">
      <style:text-properties style:font-name="Times New Roman" style:font-name-complex="Times New Roman" fo:font-size="14pt" style:font-size-asian="14pt" style:font-size-complex="14pt"/>
    </style:style>
    <style:style style:name="T10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78" style:parent-style-name="Normal" style:family="paragraph">
      <style:text-properties style:font-name="Times New Roman" style:font-name-complex="Times New Roman" fo:font-size="14pt" style:font-size-asian="14pt" style:font-size-complex="14pt"/>
    </style:style>
    <style:style style:name="T1079" style:parent-style-name="DefaultParagraphFont" style:family="text">
      <style:text-properties style:font-name="Times New Roman" style:font-name-complex="Times New Roman" fo:font-size="14pt" style:font-size-asian="14pt" style:font-size-complex="14pt"/>
    </style:style>
    <style:style style:name="P1080" style:parent-style-name="Normal" style:family="paragraph">
      <style:text-properties style:font-name="Times New Roman" style:font-name-complex="Times New Roman" fo:font-size="14pt" style:font-size-asian="14pt" style:font-size-complex="14pt"/>
    </style:style>
    <style:style style:name="T10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3" style:parent-style-name="DefaultParagraphFont" style:family="text">
      <style:text-properties style:font-name="Times New Roman" style:font-name-complex="Times New Roman" fo:font-size="14pt" style:font-size-asian="14pt" style:font-size-complex="14pt"/>
    </style:style>
    <style:style style:name="T1084" style:parent-style-name="DefaultParagraphFont" style:family="text">
      <style:text-properties style:font-name="Times New Roman" style:font-name-complex="Times New Roman" fo:font-size="14pt" style:font-size-asian="14pt" style:font-size-complex="14pt"/>
    </style:style>
    <style:style style:name="T10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6" style:parent-style-name="DefaultParagraphFont" style:family="text">
      <style:text-properties style:font-name="Times New Roman" style:font-name-complex="Times New Roman" fo:font-size="14pt" style:font-size-asian="14pt" style:font-size-complex="14pt"/>
    </style:style>
    <style:style style:name="T1087" style:parent-style-name="DefaultParagraphFont" style:family="text">
      <style:text-properties style:font-name="Times New Roman" style:font-name-complex="Times New Roman" fo:font-size="14pt" style:font-size-asian="14pt" style:font-size-complex="14pt"/>
    </style:style>
    <style:style style:name="T10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90" style:parent-style-name="Normal" style:family="paragraph">
      <style:text-properties style:font-name="Times New Roman" style:font-name-complex="Times New Roman" fo:font-size="14pt" style:font-size-asian="14pt" style:font-size-complex="14pt"/>
    </style:style>
    <style:style style:name="P1091" style:parent-style-name="Normal" style:family="paragraph">
      <style:text-properties style:font-name="Times New Roman" style:font-name-complex="Times New Roman" fo:font-size="14pt" style:font-size-asian="14pt" style:font-size-complex="14pt"/>
    </style:style>
    <style:style style:name="P1092" style:parent-style-name="Normal" style:family="paragraph">
      <style:text-properties style:font-name="Times New Roman" style:font-name-complex="Times New Roman" fo:font-size="14pt" style:font-size-asian="14pt" style:font-size-complex="14pt"/>
    </style:style>
    <style:style style:name="P1093" style:parent-style-name="Normal" style:family="paragraph">
      <style:text-properties style:font-name="Times New Roman" style:font-name-complex="Times New Roman" fo:font-size="14pt" style:font-size-asian="14pt" style:font-size-complex="14pt"/>
    </style:style>
    <style:style style:name="P1094" style:parent-style-name="Normal" style:family="paragraph">
      <style:text-properties style:font-name="Times New Roman" style:font-name-complex="Times New Roman" fo:font-size="14pt" style:font-size-asian="14pt" style:font-size-complex="14pt"/>
    </style:style>
    <style:style style:name="P1095" style:parent-style-name="Normal" style:family="paragraph">
      <style:text-properties style:font-name="Times New Roman" style:font-name-complex="Times New Roman" fo:font-size="14pt" style:font-size-asian="14pt" style:font-size-complex="14pt"/>
    </style:style>
    <style:style style:name="P1096" style:parent-style-name="Normal" style:family="paragraph">
      <style:text-properties style:font-name="Times New Roman" style:font-name-complex="Times New Roman" fo:font-size="14pt" style:font-size-asian="14pt" style:font-size-complex="14pt"/>
    </style:style>
    <style:style style:name="P1097" style:parent-style-name="Normal" style:family="paragraph">
      <style:text-properties style:font-name="Times New Roman" style:font-name-complex="Times New Roman" fo:font-size="14pt" style:font-size-asian="14pt" style:font-size-complex="14pt"/>
    </style:style>
    <style:style style:name="P1098" style:parent-style-name="Normal" style:family="paragraph">
      <style:text-properties style:font-name="Times New Roman" style:font-name-complex="Times New Roman" fo:font-size="14pt" style:font-size-asian="14pt" style:font-size-complex="14pt"/>
    </style:style>
    <style:style style:name="P1099" style:parent-style-name="Normal" style:family="paragraph">
      <style:text-properties style:font-name="Times New Roman" style:font-name-complex="Times New Roman" fo:font-size="14pt" style:font-size-asian="14pt" style:font-size-complex="14pt"/>
    </style:style>
    <style:style style:name="P1100" style:parent-style-name="Normal" style:family="paragraph">
      <style:text-properties style:font-name="Times New Roman" style:font-name-complex="Times New Roman" fo:font-size="14pt" style:font-size-asian="14pt" style:font-size-complex="14pt"/>
    </style:style>
    <style:style style:name="P1101" style:parent-style-name="Normal" style:family="paragraph">
      <style:text-properties style:font-name="Times New Roman" style:font-name-complex="Times New Roman" fo:font-size="14pt" style:font-size-asian="14pt" style:font-size-complex="14pt"/>
    </style:style>
    <style:style style:name="P1102" style:parent-style-name="Normal" style:family="paragraph">
      <style:text-properties style:font-name="Times New Roman" style:font-name-complex="Times New Roman" fo:font-size="14pt" style:font-size-asian="14pt" style:font-size-complex="14pt"/>
    </style:style>
    <style:style style:name="P1103" style:parent-style-name="Normal" style:family="paragraph">
      <style:text-properties style:font-name="Times New Roman" style:font-name-complex="Times New Roman" fo:font-size="14pt" style:font-size-asian="14pt" style:font-size-complex="14pt"/>
    </style:style>
    <style:style style:name="P1104" style:parent-style-name="Normal" style:family="paragraph">
      <style:text-properties style:font-name="Times New Roman" style:font-name-complex="Times New Roman" fo:font-size="14pt" style:font-size-asian="14pt" style:font-size-complex="14pt"/>
    </style:style>
    <style:style style:name="P1105" style:parent-style-name="Normal" style:family="paragraph">
      <style:text-properties style:font-name="Times New Roman" style:font-name-complex="Times New Roman" fo:font-size="14pt" style:font-size-asian="14pt" style:font-size-complex="14pt"/>
    </style:style>
    <style:style style:name="T11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7" style:parent-style-name="DefaultParagraphFont" style:family="text">
      <style:text-properties style:font-name="Times New Roman" style:font-name-complex="Times New Roman" fo:font-size="14pt" style:font-size-asian="14pt" style:font-size-complex="14pt"/>
    </style:style>
    <style:style style:name="T11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09" style:parent-style-name="Normal" style:family="paragraph">
      <style:text-properties style:font-name="Times New Roman" style:font-name-complex="Times New Roman" fo:font-size="14pt" style:font-size-asian="14pt" style:font-size-complex="14pt"/>
    </style:style>
    <style:style style:name="P1110" style:parent-style-name="Normal" style:family="paragraph">
      <style:text-properties style:font-name="Times New Roman" style:font-name-complex="Times New Roman" fo:font-size="14pt" style:font-size-asian="14pt" style:font-size-complex="14pt"/>
    </style:style>
    <style:style style:name="P1111" style:parent-style-name="Normal" style:family="paragraph">
      <style:text-properties style:font-name="Times New Roman" style:font-name-complex="Times New Roman" fo:font-size="14pt" style:font-size-asian="14pt" style:font-size-complex="14pt"/>
    </style:style>
    <style:style style:name="T11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14" style:parent-style-name="Normal" style:family="paragraph">
      <style:text-properties style:font-name="Times New Roman" style:font-name-complex="Times New Roman" fo:font-size="14pt" style:font-size-asian="14pt" style:font-size-complex="14pt"/>
    </style:style>
    <style:style style:name="T1115" style:parent-style-name="DefaultParagraphFont" style:family="text">
      <style:text-properties style:font-name="Times New Roman" style:font-name-complex="Times New Roman" fo:font-size="14pt" style:font-size-asian="14pt" style:font-size-complex="14pt"/>
    </style:style>
    <style:style style:name="T1116" style:parent-style-name="DefaultParagraphFont" style:family="text">
      <style:text-properties style:font-name="Times New Roman" style:font-name-complex="Times New Roman" fo:font-size="14pt" style:font-size-asian="14pt" style:font-size-complex="14pt"/>
    </style:style>
    <style:style style:name="P1117" style:parent-style-name="Normal" style:family="paragraph">
      <style:text-properties style:font-name="Times New Roman" style:font-name-complex="Times New Roman" fo:font-size="14pt" style:font-size-asian="14pt" style:font-size-complex="14pt"/>
    </style:style>
    <style:style style:name="T11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9" style:parent-style-name="DefaultParagraphFont" style:family="text">
      <style:text-properties style:font-name="Times New Roman" style:font-name-complex="Times New Roman" fo:font-size="14pt" style:font-size-asian="14pt" style:font-size-complex="14pt"/>
    </style:style>
    <style:style style:name="T11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21" style:parent-style-name="DefaultParagraphFont" style:family="text">
      <style:text-properties style:font-name="Times New Roman" style:font-name-complex="Times New Roman" fo:font-size="14pt" style:font-size-asian="14pt" style:font-size-complex="14pt"/>
    </style:style>
    <style:style style:name="T1122" style:parent-style-name="DefaultParagraphFont" style:family="text">
      <style:text-properties style:font-name="Times New Roman" style:font-name-complex="Times New Roman" fo:font-size="14pt" style:font-size-asian="14pt" style:font-size-complex="14pt"/>
    </style:style>
    <style:style style:name="T1123" style:parent-style-name="DefaultParagraphFont" style:family="text">
      <style:text-properties style:font-name="Times New Roman" style:font-name-complex="Times New Roman" fo:font-size="14pt" style:font-size-asian="14pt" style:font-size-complex="14pt"/>
    </style:style>
    <style:style style:name="T11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25" style:parent-style-name="DefaultParagraphFont" style:family="text">
      <style:text-properties style:font-name="Times New Roman" style:font-name-complex="Times New Roman" fo:font-size="14pt" style:font-size-asian="14pt" style:font-size-complex="14pt"/>
    </style:style>
    <style:style style:name="T1126" style:parent-style-name="DefaultParagraphFont" style:family="text">
      <style:text-properties style:font-name="Times New Roman" style:font-name-complex="Times New Roman" fo:font-size="14pt" style:font-size-asian="14pt" style:font-size-complex="14pt"/>
    </style:style>
    <style:style style:name="T11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29" style:parent-style-name="Normal" style:family="paragraph">
      <style:text-properties style:font-name="Times New Roman" style:font-name-complex="Times New Roman" fo:font-size="14pt" style:font-size-asian="14pt" style:font-size-complex="14pt"/>
    </style:style>
    <style:style style:name="P1130" style:parent-style-name="Normal" style:family="paragraph">
      <style:text-properties style:font-name="Times New Roman" style:font-name-complex="Times New Roman" fo:font-size="14pt" style:font-size-asian="14pt" style:font-size-complex="14pt"/>
    </style:style>
    <style:style style:name="P1131" style:parent-style-name="Normal" style:family="paragraph">
      <style:text-properties style:font-name="Times New Roman" style:font-name-complex="Times New Roman" fo:font-size="14pt" style:font-size-asian="14pt" style:font-size-complex="14pt"/>
    </style:style>
    <style:style style:name="T11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3" style:parent-style-name="DefaultParagraphFont" style:family="text">
      <style:text-properties style:font-name="Times New Roman" style:font-name-complex="Times New Roman" fo:font-size="14pt" style:font-size-asian="14pt" style:font-size-complex="14pt"/>
    </style:style>
    <style:style style:name="T11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36" style:parent-style-name="Normal" style:family="paragraph">
      <style:text-properties style:font-name="Times New Roman" style:font-name-complex="Times New Roman" fo:font-size="14pt" style:font-size-asian="14pt" style:font-size-complex="14pt"/>
    </style:style>
    <style:style style:name="P1137" style:parent-style-name="Normal" style:family="paragraph">
      <style:text-properties style:font-name="Times New Roman" style:font-name-complex="Times New Roman" fo:font-size="14pt" style:font-size-asian="14pt" style:font-size-complex="14pt"/>
    </style:style>
    <style:style style:name="P1138" style:parent-style-name="Normal" style:family="paragraph">
      <style:text-properties style:font-name="Times New Roman" style:font-name-complex="Times New Roman" fo:font-size="14pt" style:font-size-asian="14pt" style:font-size-complex="14pt"/>
    </style:style>
    <style:style style:name="T11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40" style:parent-style-name="DefaultParagraphFont" style:family="text">
      <style:text-properties style:font-name="Times New Roman" style:font-name-complex="Times New Roman" fo:font-size="14pt" style:font-size-asian="14pt" style:font-size-complex="14pt"/>
    </style:style>
    <style:style style:name="T11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42" style:parent-style-name="DefaultParagraphFont" style:family="text">
      <style:text-properties style:font-name="Times New Roman" style:font-name-complex="Times New Roman" fo:font-size="14pt" style:font-size-asian="14pt" style:font-size-complex="14pt"/>
    </style:style>
    <style:style style:name="T11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44" style:parent-style-name="DefaultParagraphFont" style:family="text">
      <style:text-properties style:font-name="Times New Roman" style:font-name-complex="Times New Roman" fo:font-size="14pt" style:font-size-asian="14pt" style:font-size-complex="14pt"/>
    </style:style>
    <style:style style:name="T1145" style:parent-style-name="DefaultParagraphFont" style:family="text">
      <style:text-properties style:font-name="Times New Roman" style:font-name-complex="Times New Roman" fo:font-size="14pt" style:font-size-asian="14pt" style:font-size-complex="14pt"/>
    </style:style>
    <style:style style:name="T1146" style:parent-style-name="Hyperlink" style:family="text">
      <style:text-properties style:font-name="Times New Roman" style:font-name-complex="Times New Roman" fo:font-size="14pt" style:font-size-asian="14pt" style:font-size-complex="14pt"/>
    </style:style>
    <style:style style:name="T1147" style:parent-style-name="DefaultParagraphFont" style:family="text">
      <style:text-properties style:font-name="Times New Roman" style:font-name-complex="Times New Roman" fo:font-size="14pt" style:font-size-asian="14pt" style:font-size-complex="14pt"/>
    </style:style>
    <style:style style:name="T11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49" style:parent-style-name="DefaultParagraphFont" style:family="text">
      <style:text-properties style:font-name="Times New Roman" style:font-name-complex="Times New Roman" fo:font-size="14pt" style:font-size-asian="14pt" style:font-size-complex="14pt"/>
    </style:style>
    <style:style style:name="T1150" style:parent-style-name="DefaultParagraphFont" style:family="text">
      <style:text-properties style:font-name="Times New Roman" style:font-name-complex="Times New Roman" fo:font-size="14pt" style:font-size-asian="14pt" style:font-size-complex="14pt"/>
    </style:style>
    <style:style style:name="T1151" style:parent-style-name="Hyperlink" style:family="text">
      <style:text-properties style:font-name="Times New Roman" style:font-name-complex="Times New Roman" fo:font-size="14pt" style:font-size-asian="14pt" style:font-size-complex="14pt"/>
    </style:style>
    <style:style style:name="T11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54" style:parent-style-name="Normal" style:family="paragraph">
      <style:text-properties style:font-name="Times New Roman" style:font-name-complex="Times New Roman" fo:font-size="14pt" style:font-size-asian="14pt" style:font-size-complex="14pt"/>
    </style:style>
    <style:style style:name="T1155" style:parent-style-name="DefaultParagraphFont" style:family="text">
      <style:text-properties style:font-name="Times New Roman" style:font-name-complex="Times New Roman" fo:font-size="14pt" style:font-size-asian="14pt" style:font-size-complex="14pt"/>
    </style:style>
    <style:style style:name="P1156" style:parent-style-name="Normal" style:family="paragraph">
      <style:text-properties style:font-name="Times New Roman" style:font-name-complex="Times New Roman" fo:font-size="14pt" style:font-size-asian="14pt" style:font-size-complex="14pt"/>
    </style:style>
    <style:style style:name="T11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9" style:parent-style-name="DefaultParagraphFont" style:family="text">
      <style:text-properties style:font-name="Times New Roman" style:font-name-complex="Times New Roman" fo:font-size="14pt" style:font-size-asian="14pt" style:font-size-complex="14pt"/>
    </style:style>
    <style:style style:name="T1160" style:parent-style-name="DefaultParagraphFont" style:family="text">
      <style:text-properties style:font-name="Times New Roman" style:font-name-complex="Times New Roman" fo:font-size="14pt" style:font-size-asian="14pt" style:font-size-complex="14pt"/>
    </style:style>
    <style:style style:name="T1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2" style:parent-style-name="DefaultParagraphFont" style:family="text">
      <style:text-properties style:font-name="Times New Roman" style:font-name-complex="Times New Roman" fo:font-size="14pt" style:font-size-asian="14pt" style:font-size-complex="14pt"/>
    </style:style>
    <style:style style:name="T1163" style:parent-style-name="DefaultParagraphFont" style:family="text">
      <style:text-properties style:font-name="Times New Roman" style:font-name-complex="Times New Roman" fo:font-size="14pt" style:font-size-asian="14pt" style:font-size-complex="14pt"/>
    </style:style>
    <style:style style:name="T11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66" style:parent-style-name="Normal" style:family="paragraph">
      <style:text-properties style:font-name="Times New Roman" style:font-name-complex="Times New Roman" fo:font-size="14pt" style:font-size-asian="14pt" style:font-size-complex="14pt"/>
    </style:style>
    <style:style style:name="T1167" style:parent-style-name="DefaultParagraphFont" style:family="text">
      <style:text-properties style:font-name="Times New Roman" style:font-name-complex="Times New Roman" fo:font-size="14pt" style:font-size-asian="14pt" style:font-size-complex="14pt"/>
    </style:style>
    <style:style style:name="P1168" style:parent-style-name="Normal" style:family="paragraph">
      <style:text-properties style:font-name="Times New Roman" style:font-name-complex="Times New Roman" fo:font-size="14pt" style:font-size-asian="14pt" style:font-size-complex="14pt"/>
    </style:style>
    <style:style style:name="P1169" style:parent-style-name="Normal" style:family="paragraph">
      <style:text-properties style:font-name="Times New Roman" style:font-name-complex="Times New Roman" fo:font-size="14pt" style:font-size-asian="14pt" style:font-size-complex="14pt"/>
    </style:style>
    <style:style style:name="P1170" style:parent-style-name="Normal" style:family="paragraph">
      <style:text-properties style:font-name="Times New Roman" style:font-name-complex="Times New Roman" fo:font-size="14pt" style:font-size-asian="14pt" style:font-size-complex="14pt"/>
    </style:style>
    <style:style style:name="T11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72" style:parent-style-name="DefaultParagraphFont" style:family="text">
      <style:text-properties style:font-name="Times New Roman" style:font-name-complex="Times New Roman" fo:font-size="14pt" style:font-size-asian="14pt" style:font-size-complex="14pt"/>
    </style:style>
    <style:style style:name="T11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74" style:parent-style-name="Normal" style:family="paragraph">
      <style:text-properties style:font-name="Times New Roman" style:font-name-complex="Times New Roman" fo:font-size="14pt" style:font-size-asian="14pt" style:font-size-complex="14pt"/>
    </style:style>
    <style:style style:name="T11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77" style:parent-style-name="Normal" style:family="paragraph">
      <style:text-properties style:font-name="Times New Roman" style:font-name-complex="Times New Roman" fo:font-size="14pt" style:font-size-asian="14pt" style:font-size-complex="14pt"/>
    </style:style>
    <style:style style:name="P1178" style:parent-style-name="Normal" style:family="paragraph">
      <style:text-properties style:font-name="Times New Roman" style:font-name-complex="Times New Roman" fo:font-size="14pt" style:font-size-asian="14pt" style:font-size-complex="14pt"/>
    </style:style>
    <style:style style:name="P1179" style:parent-style-name="Normal" style:family="paragraph">
      <style:text-properties style:font-name="Times New Roman" style:font-name-complex="Times New Roman" fo:font-size="14pt" style:font-size-asian="14pt" style:font-size-complex="14pt"/>
    </style:style>
    <style:style style:name="T11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81" style:parent-style-name="DefaultParagraphFont" style:family="text">
      <style:text-properties style:font-name="Times New Roman" style:font-name-complex="Times New Roman" fo:font-size="14pt" style:font-size-asian="14pt" style:font-size-complex="14pt"/>
    </style:style>
    <style:style style:name="T11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84" style:parent-style-name="Normal" style:family="paragraph">
      <style:text-properties style:font-name="Times New Roman" style:font-name-complex="Times New Roman" fo:font-size="14pt" style:font-size-asian="14pt" style:font-size-complex="14pt"/>
    </style:style>
    <style:style style:name="P1185" style:parent-style-name="Normal" style:family="paragraph">
      <style:text-properties style:font-name="Times New Roman" style:font-name-complex="Times New Roman" fo:font-size="14pt" style:font-size-asian="14pt" style:font-size-complex="14pt"/>
    </style:style>
    <style:style style:name="P1186" style:parent-style-name="Normal" style:family="paragraph">
      <style:text-properties style:font-name="Times New Roman" style:font-name-complex="Times New Roman" fo:font-size="14pt" style:font-size-asian="14pt" style:font-size-complex="14pt"/>
    </style:style>
    <style:style style:name="T11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88" style:parent-style-name="DefaultParagraphFont" style:family="text">
      <style:text-properties style:font-name="Times New Roman" style:font-name-complex="Times New Roman" fo:font-size="14pt" style:font-size-asian="14pt" style:font-size-complex="14pt"/>
    </style:style>
    <style:style style:name="T11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90" style:parent-style-name="Normal" style:family="paragraph">
      <style:text-properties style:font-name="Times New Roman" style:font-name-complex="Times New Roman" fo:font-size="14pt" style:font-size-asian="14pt" style:font-size-complex="14pt"/>
    </style:style>
    <style:style style:name="P1191" style:parent-style-name="Normal" style:family="paragraph">
      <style:text-properties style:font-name="Times New Roman" style:font-name-complex="Times New Roman" fo:font-size="14pt" style:font-size-asian="14pt" style:font-size-complex="14pt"/>
    </style:style>
    <style:style style:name="P1192" style:parent-style-name="Normal" style:family="paragraph">
      <style:text-properties style:font-name="Times New Roman" style:font-name-complex="Times New Roman" fo:font-size="14pt" style:font-size-asian="14pt" style:font-size-complex="14pt"/>
    </style:style>
    <style:style style:name="T11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95" style:parent-style-name="Normal" style:family="paragraph">
      <style:text-properties style:font-name="Times New Roman" style:font-name-complex="Times New Roman" fo:font-size="14pt" style:font-size-asian="14pt" style:font-size-complex="14pt"/>
    </style:style>
    <style:style style:name="P1196" style:parent-style-name="Normal" style:family="paragraph">
      <style:text-properties style:font-name="Times New Roman" style:font-name-complex="Times New Roman" fo:font-size="14pt" style:font-size-asian="14pt" style:font-size-complex="14pt"/>
    </style:style>
    <style:style style:name="P1197" style:parent-style-name="Normal" style:family="paragraph">
      <style:text-properties style:font-name="Times New Roman" style:font-name-complex="Times New Roman" fo:font-size="14pt" style:font-size-asian="14pt" style:font-size-complex="14pt"/>
    </style:style>
    <style:style style:name="T11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9" style:parent-style-name="DefaultParagraphFont" style:family="text">
      <style:text-properties style:font-name="Times New Roman" style:font-name-complex="Times New Roman" fo:font-size="14pt" style:font-size-asian="14pt" style:font-size-complex="14pt"/>
    </style:style>
    <style:style style:name="T12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01" style:parent-style-name="Normal" style:family="paragraph">
      <style:text-properties style:font-name="Times New Roman" style:font-name-complex="Times New Roman" fo:font-size="14pt" style:font-size-asian="14pt" style:font-size-complex="14pt"/>
    </style:style>
    <style:style style:name="T12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04" style:parent-style-name="Normal" style:family="paragraph">
      <style:text-properties style:font-name="Times New Roman" style:font-name-complex="Times New Roman" fo:font-size="14pt" style:font-size-asian="14pt" style:font-size-complex="14pt"/>
    </style:style>
    <style:style style:name="P1205" style:parent-style-name="Normal" style:family="paragraph">
      <style:text-properties style:font-name="Times New Roman" style:font-name-complex="Times New Roman" fo:font-size="14pt" style:font-size-asian="14pt" style:font-size-complex="14pt"/>
    </style:style>
    <style:style style:name="P1206" style:parent-style-name="Normal" style:family="paragraph">
      <style:text-properties style:font-name="Times New Roman" style:font-name-complex="Times New Roman" fo:font-size="14pt" style:font-size-asian="14pt" style:font-size-complex="14pt"/>
    </style:style>
    <style:style style:name="T12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08" style:parent-style-name="DefaultParagraphFont" style:family="text">
      <style:text-properties style:font-name="Times New Roman" style:font-name-complex="Times New Roman" fo:font-size="14pt" style:font-size-asian="14pt" style:font-size-complex="14pt"/>
    </style:style>
    <style:style style:name="T12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10" style:parent-style-name="Normal" style:family="paragraph">
      <style:text-properties style:font-name="Times New Roman" style:font-name-complex="Times New Roman" fo:font-size="14pt" style:font-size-asian="14pt" style:font-size-complex="14pt"/>
    </style:style>
    <style:style style:name="P1211" style:parent-style-name="Normal" style:family="paragraph">
      <style:text-properties style:font-name="Times New Roman" style:font-name-complex="Times New Roman" fo:font-size="14pt" style:font-size-asian="14pt" style:font-size-complex="14pt"/>
    </style:style>
    <style:style style:name="P1212" style:parent-style-name="Normal" style:family="paragraph">
      <style:text-properties style:font-name="Times New Roman" style:font-name-complex="Times New Roman" fo:font-size="14pt" style:font-size-asian="14pt" style:font-size-complex="14pt"/>
    </style:style>
    <style:style style:name="P1213" style:parent-style-name="Normal" style:family="paragraph">
      <style:text-properties style:font-name="Times New Roman" style:font-name-complex="Times New Roman" fo:font-size="14pt" style:font-size-asian="14pt" style:font-size-complex="14pt"/>
    </style:style>
    <style:style style:name="T12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16" style:parent-style-name="Normal" style:family="paragraph">
      <style:text-properties style:font-name="Times New Roman" style:font-name-complex="Times New Roman" fo:font-size="14pt" style:font-size-asian="14pt" style:font-size-complex="14pt"/>
    </style:style>
    <style:style style:name="P1217" style:parent-style-name="Normal" style:family="paragraph">
      <style:text-properties style:font-name="Times New Roman" style:font-name-complex="Times New Roman" fo:font-size="14pt" style:font-size-asian="14pt" style:font-size-complex="14pt"/>
    </style:style>
    <style:style style:name="P1218" style:parent-style-name="Normal" style:family="paragraph">
      <style:text-properties style:font-name="Times New Roman" style:font-name-complex="Times New Roman" fo:font-size="14pt" style:font-size-asian="14pt" style:font-size-complex="14pt"/>
    </style:style>
    <style:style style:name="T12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20" style:parent-style-name="DefaultParagraphFont" style:family="text">
      <style:text-properties style:font-name="Times New Roman" style:font-name-complex="Times New Roman" fo:font-size="14pt" style:font-size-asian="14pt" style:font-size-complex="14pt"/>
    </style:style>
    <style:style style:name="T12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23" style:parent-style-name="Normal" style:family="paragraph">
      <style:text-properties style:font-name="Times New Roman" style:font-name-complex="Times New Roman" fo:font-size="14pt" style:font-size-asian="14pt" style:font-size-complex="14pt"/>
    </style:style>
    <style:style style:name="T1224" style:parent-style-name="DefaultParagraphFont" style:family="text">
      <style:text-properties style:font-name="Times New Roman" style:font-name-complex="Times New Roman" fo:font-size="14pt" style:font-size-asian="14pt" style:font-size-complex="14pt"/>
    </style:style>
    <style:style style:name="P1225" style:parent-style-name="Normal" style:family="paragraph">
      <style:text-properties style:font-name="Times New Roman" style:font-name-complex="Times New Roman" fo:font-size="14pt" style:font-size-asian="14pt" style:font-size-complex="14pt"/>
    </style:style>
    <style:style style:name="P1226" style:parent-style-name="Normal" style:family="paragraph">
      <style:text-properties style:font-name="Times New Roman" style:font-name-complex="Times New Roman" fo:font-size="14pt" style:font-size-asian="14pt" style:font-size-complex="14pt"/>
    </style:style>
    <style:style style:name="P1227" style:parent-style-name="Normal" style:family="paragraph">
      <style:text-properties style:font-name="Times New Roman" style:font-name-complex="Times New Roman" fo:font-size="14pt" style:font-size-asian="14pt" style:font-size-complex="14pt"/>
    </style:style>
    <style:style style:name="T12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29" style:parent-style-name="DefaultParagraphFont" style:family="text">
      <style:text-properties style:font-name="Times New Roman" style:font-name-complex="Times New Roman" fo:font-size="14pt" style:font-size-asian="14pt" style:font-size-complex="14pt"/>
    </style:style>
    <style:style style:name="T12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32" style:parent-style-name="Normal" style:family="paragraph">
      <style:text-properties style:font-name="Times New Roman" style:font-name-complex="Times New Roman" fo:font-size="14pt" style:font-size-asian="14pt" style:font-size-complex="14pt"/>
    </style:style>
    <style:style style:name="P1233" style:parent-style-name="Normal" style:family="paragraph">
      <style:text-properties style:font-name="Consolas" style:font-name-complex="Times New Roman" fo:font-size="11pt" style:font-size-asian="11pt" style:font-size-complex="11pt"/>
    </style:style>
    <style:style style:name="P1234" style:parent-style-name="Normal" style:family="paragraph">
      <style:text-properties style:font-name="Consolas" style:font-name-complex="Times New Roman" fo:font-size="11pt" style:font-size-asian="11pt" style:font-size-complex="11pt"/>
    </style:style>
    <style:style style:name="P1235" style:parent-style-name="Normal" style:family="paragraph">
      <style:text-properties style:font-name="Consolas" style:font-name-complex="Times New Roman" fo:font-size="11pt" style:font-size-asian="11pt" style:font-size-complex="11pt"/>
    </style:style>
    <style:style style:name="P1236" style:parent-style-name="Normal" style:family="paragraph">
      <style:text-properties style:font-name="Consolas" style:font-name-complex="Times New Roman" fo:font-size="11pt" style:font-size-asian="11pt" style:font-size-complex="11pt"/>
    </style:style>
    <style:style style:name="P1237" style:parent-style-name="Normal" style:family="paragraph">
      <style:text-properties style:font-name="Consolas" style:font-name-complex="Times New Roman" fo:font-size="11pt" style:font-size-asian="11pt" style:font-size-complex="11pt"/>
    </style:style>
    <style:style style:name="P1238" style:parent-style-name="Normal" style:family="paragraph">
      <style:text-properties style:font-name="Consolas" style:font-name-complex="Times New Roman" fo:font-size="11pt" style:font-size-asian="11pt" style:font-size-complex="11pt"/>
    </style:style>
    <style:style style:name="P1239" style:parent-style-name="Normal" style:family="paragraph">
      <style:text-properties style:font-name="Consolas" style:font-name-complex="Times New Roman" fo:font-size="11pt" style:font-size-asian="11pt" style:font-size-complex="11pt"/>
    </style:style>
    <style:style style:name="P1240" style:parent-style-name="Normal" style:family="paragraph">
      <style:text-properties style:font-name="Consolas" style:font-name-complex="Times New Roman" fo:font-size="11pt" style:font-size-asian="11pt" style:font-size-complex="11pt"/>
    </style:style>
    <style:style style:name="P1241" style:parent-style-name="Normal" style:family="paragraph">
      <style:text-properties style:font-name="Consolas" style:font-name-complex="Times New Roman" fo:font-size="11pt" style:font-size-asian="11pt" style:font-size-complex="11pt"/>
    </style:style>
    <style:style style:name="P1242" style:parent-style-name="Normal" style:family="paragraph">
      <style:text-properties style:font-name="Consolas" style:font-name-complex="Times New Roman" fo:font-size="11pt" style:font-size-asian="11pt" style:font-size-complex="11pt"/>
    </style:style>
    <style:style style:name="P1243" style:parent-style-name="Normal" style:family="paragraph">
      <style:text-properties style:font-name="Consolas" style:font-name-complex="Times New Roman" fo:font-size="11pt" style:font-size-asian="11pt" style:font-size-complex="11pt"/>
    </style:style>
    <style:style style:name="P1244" style:parent-style-name="Normal" style:family="paragraph">
      <style:text-properties style:font-name="Consolas" style:font-name-complex="Times New Roman" fo:font-size="11pt" style:font-size-asian="11pt" style:font-size-complex="11pt"/>
    </style:style>
    <style:style style:name="P1245" style:parent-style-name="Normal" style:family="paragraph">
      <style:text-properties style:font-name="Consolas" style:font-name-complex="Times New Roman" fo:font-size="11pt" style:font-size-asian="11pt" style:font-size-complex="11pt"/>
    </style:style>
    <style:style style:name="P1246" style:parent-style-name="Normal" style:family="paragraph">
      <style:text-properties style:font-name="Consolas" style:font-name-complex="Times New Roman" fo:font-size="11pt" style:font-size-asian="11pt" style:font-size-complex="11pt"/>
    </style:style>
    <style:style style:name="P1247" style:parent-style-name="Normal" style:family="paragraph">
      <style:text-properties style:font-name="Consolas" style:font-name-complex="Times New Roman" fo:font-size="11pt" style:font-size-asian="11pt" style:font-size-complex="11pt"/>
    </style:style>
    <style:style style:name="P1248" style:parent-style-name="Normal" style:family="paragraph">
      <style:text-properties style:font-name="Consolas" style:font-name-complex="Times New Roman" fo:font-size="11pt" style:font-size-asian="11pt" style:font-size-complex="11pt"/>
    </style:style>
    <style:style style:name="P1249" style:parent-style-name="Normal" style:family="paragraph">
      <style:text-properties style:font-name="Consolas" style:font-name-complex="Times New Roman" fo:font-size="11pt" style:font-size-asian="11pt" style:font-size-complex="11pt"/>
    </style:style>
    <style:style style:name="P1250" style:parent-style-name="Normal" style:family="paragraph">
      <style:text-properties style:font-name="Consolas" style:font-name-complex="Times New Roman" fo:font-size="11pt" style:font-size-asian="11pt" style:font-size-complex="11pt"/>
    </style:style>
    <style:style style:name="P1251" style:parent-style-name="Normal" style:family="paragraph">
      <style:text-properties style:font-name="Consolas" style:font-name-complex="Times New Roman" fo:font-size="11pt" style:font-size-asian="11pt" style:font-size-complex="11pt"/>
    </style:style>
    <style:style style:name="P1252" style:parent-style-name="Normal" style:family="paragraph">
      <style:text-properties style:font-name="Consolas" style:font-name-complex="Times New Roman" fo:font-size="11pt" style:font-size-asian="11pt" style:font-size-complex="11pt"/>
    </style:style>
    <style:style style:name="P1253" style:parent-style-name="Normal" style:family="paragraph">
      <style:text-properties style:font-name="Consolas" style:font-name-complex="Times New Roman" fo:font-size="11pt" style:font-size-asian="11pt" style:font-size-complex="11pt"/>
    </style:style>
    <style:style style:name="P1254" style:parent-style-name="Normal" style:family="paragraph">
      <style:text-properties style:font-name="Consolas" style:font-name-complex="Times New Roman" fo:font-size="11pt" style:font-size-asian="11pt" style:font-size-complex="11pt"/>
    </style:style>
    <style:style style:name="P1255" style:parent-style-name="Normal" style:family="paragraph">
      <style:text-properties style:font-name="Consolas" style:font-name-complex="Times New Roman" fo:font-size="11pt" style:font-size-asian="11pt" style:font-size-complex="11pt"/>
    </style:style>
    <style:style style:name="P1256" style:parent-style-name="Normal" style:family="paragraph">
      <style:text-properties style:font-name="Times New Roman" style:font-name-complex="Times New Roman" fo:font-size="14pt" style:font-size-asian="14pt" style:font-size-complex="14pt"/>
    </style:style>
    <style:style style:name="P1257" style:parent-style-name="Normal" style:family="paragraph">
      <style:text-properties style:font-name="Times New Roman" style:font-name-complex="Times New Roman" fo:font-size="14pt" style:font-size-asian="14pt" style:font-size-complex="14pt"/>
    </style:style>
    <style:style style:name="T12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59" style:parent-style-name="DefaultParagraphFont" style:family="text">
      <style:text-properties style:font-name="Times New Roman" style:font-name-complex="Times New Roman" fo:font-size="14pt" style:font-size-asian="14pt" style:font-size-complex="14pt"/>
    </style:style>
    <style:style style:name="T12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61" style:parent-style-name="Normal" style:family="paragraph">
      <style:text-properties style:font-name="Times New Roman" style:font-name-complex="Times New Roman" fo:font-size="14pt" style:font-size-asian="14pt" style:font-size-complex="14pt"/>
    </style:style>
    <style:style style:name="T12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64" style:parent-style-name="DefaultParagraphFont" style:family="text">
      <style:text-properties style:font-name="Times New Roman" style:font-name-complex="Times New Roman" fo:font-size="14pt" style:font-size-asian="14pt" style:font-size-complex="14pt"/>
    </style:style>
    <style:style style:name="T12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66" style:parent-style-name="DefaultParagraphFont" style:family="text">
      <style:text-properties style:font-name="Times New Roman" style:font-name-complex="Times New Roman" fo:font-size="14pt" style:font-size-asian="14pt" style:font-size-complex="14pt"/>
    </style:style>
    <style:style style:name="P1267" style:parent-style-name="Normal" style:family="paragraph">
      <style:text-properties style:font-name="Times New Roman" style:font-name-complex="Times New Roman" fo:font-size="14pt" style:font-size-asian="14pt" style:font-size-complex="14pt"/>
    </style:style>
    <style:style style:name="P1268" style:parent-style-name="Normal" style:family="paragraph">
      <style:text-properties style:font-name="Times New Roman" style:font-name-complex="Times New Roman" fo:font-size="14pt" style:font-size-asian="14pt" style:font-size-complex="14pt"/>
    </style:style>
    <style:style style:name="P1269" style:parent-style-name="Normal" style:family="paragraph">
      <style:text-properties style:font-name="Times New Roman" style:font-name-complex="Times New Roman" fo:font-size="14pt" style:font-size-asian="14pt" style:font-size-complex="14pt"/>
    </style:style>
    <style:style style:name="P1270" style:parent-style-name="Normal" style:family="paragraph">
      <style:text-properties style:font-name="Times New Roman" style:font-name-complex="Times New Roman" fo:font-size="14pt" style:font-size-asian="14pt" style:font-size-complex="14pt"/>
    </style:style>
    <style:style style:name="P1271" style:parent-style-name="Normal" style:family="paragraph">
      <style:text-properties style:font-name="Times New Roman" style:font-name-complex="Times New Roman" fo:font-size="14pt" style:font-size-asian="14pt" style:font-size-complex="14pt"/>
    </style:style>
    <style:style style:name="T12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73" style:parent-style-name="DefaultParagraphFont" style:family="text">
      <style:text-properties style:font-name="Times New Roman" style:font-name-complex="Times New Roman" fo:font-size="14pt" style:font-size-asian="14pt" style:font-size-complex="14pt"/>
    </style:style>
    <style:style style:name="T12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75" style:parent-style-name="DefaultParagraphFont" style:family="text">
      <style:text-properties style:font-name="Times New Roman" style:font-name-complex="Times New Roman" fo:font-size="14pt" style:font-size-asian="14pt" style:font-size-complex="14pt"/>
    </style:style>
    <style:style style:name="T1276"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277" style:parent-style-name="DefaultParagraphFont" style:family="text">
      <style:text-properties style:font-name="Times New Roman" style:font-name-complex="Times New Roman" fo:font-size="14pt" style:font-size-asian="14pt" style:font-size-complex="14pt"/>
    </style:style>
    <style:style style:name="T12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79" style:parent-style-name="DefaultParagraphFont" style:family="text">
      <style:text-properties style:font-name="Times New Roman" style:font-name-complex="Times New Roman" fo:font-size="14pt" style:font-size-asian="14pt" style:font-size-complex="14pt"/>
    </style:style>
    <style:style style:name="T1280" style:parent-style-name="DefaultParagraphFont" style:family="text">
      <style:text-properties style:font-name="Times New Roman" style:font-name-complex="Times New Roman" fo:font-size="14pt" style:font-size-asian="14pt" style:font-size-complex="14pt"/>
    </style:style>
    <style:style style:name="T1281" style:parent-style-name="Hyperlink" style:family="text">
      <style:text-properties style:font-name="Times New Roman" style:font-name-complex="Times New Roman" fo:font-size="14pt" style:font-size-asian="14pt" style:font-size-complex="14pt"/>
    </style:style>
    <style:style style:name="T12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84" style:parent-style-name="Normal" style:family="paragraph">
      <style:text-properties style:font-name="Times New Roman" style:font-name-complex="Times New Roman" fo:font-size="14pt" style:font-size-asian="14pt" style:font-size-complex="14pt"/>
    </style:style>
    <style:style style:name="T1285" style:parent-style-name="DefaultParagraphFont" style:family="text">
      <style:text-properties style:font-name="Times New Roman" style:font-name-complex="Times New Roman" fo:font-size="14pt" style:font-size-asian="14pt" style:font-size-complex="14pt"/>
    </style:style>
    <style:style style:name="P1286" style:parent-style-name="Normal" style:family="paragraph">
      <style:text-properties style:font-name="Times New Roman" style:font-name-complex="Times New Roman" fo:font-size="14pt" style:font-size-asian="14pt" style:font-size-complex="14pt"/>
    </style:style>
    <style:style style:name="P1287" style:parent-style-name="Normal" style:family="paragraph">
      <style:text-properties style:font-name="Times New Roman" style:font-name-complex="Times New Roman" fo:font-size="14pt" style:font-size-asian="14pt" style:font-size-complex="14pt"/>
    </style:style>
    <style:style style:name="P1288" style:parent-style-name="Normal" style:family="paragraph">
      <style:text-properties style:font-name="Times New Roman" style:font-name-complex="Times New Roman" fo:font-size="14pt" style:font-size-asian="14pt" style:font-size-complex="14pt"/>
    </style:style>
    <style:style style:name="T12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90" style:parent-style-name="DefaultParagraphFont" style:family="text">
      <style:text-properties style:font-name="Times New Roman" style:font-name-complex="Times New Roman" fo:font-size="14pt" style:font-size-asian="14pt" style:font-size-complex="14pt"/>
    </style:style>
    <style:style style:name="T12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92" style:parent-style-name="DefaultParagraphFont" style:family="text">
      <style:text-properties style:font-name="Times New Roman" style:font-name-complex="Times New Roman" fo:font-size="14pt" style:font-size-asian="14pt" style:font-size-complex="14pt"/>
    </style:style>
    <style:style style:name="T12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94" style:parent-style-name="DefaultParagraphFont" style:family="text">
      <style:text-properties style:font-name="Times New Roman" style:font-name-complex="Times New Roman" fo:font-size="14pt" style:font-size-asian="14pt" style:font-size-complex="14pt"/>
    </style:style>
    <style:style style:name="T12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97" style:parent-style-name="Normal" style:family="paragraph">
      <style:text-properties style:font-name="Times New Roman" style:font-name-complex="Times New Roman" fo:font-size="14pt" style:font-size-asian="14pt" style:font-size-complex="14pt"/>
    </style:style>
    <style:style style:name="P1298" style:parent-style-name="Normal" style:family="paragraph">
      <style:text-properties style:font-name="Times New Roman" style:font-name-complex="Times New Roman" fo:font-size="14pt" style:font-size-asian="14pt" style:font-size-complex="14pt"/>
    </style:style>
    <style:style style:name="P1299" style:parent-style-name="Normal" style:family="paragraph">
      <style:text-properties style:font-name="Times New Roman" style:font-name-complex="Times New Roman" fo:font-size="14pt" style:font-size-asian="14pt" style:font-size-complex="14pt"/>
    </style:style>
    <style:style style:name="T13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01" style:parent-style-name="DefaultParagraphFont" style:family="text">
      <style:text-properties style:font-name="Times New Roman" style:font-name-complex="Times New Roman" fo:font-size="14pt" style:font-size-asian="14pt" style:font-size-complex="14pt"/>
    </style:style>
    <style:style style:name="T13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03" style:parent-style-name="DefaultParagraphFont" style:family="text">
      <style:text-properties style:font-name="Times New Roman" style:font-name-complex="Times New Roman" fo:font-size="14pt" style:font-size-asian="14pt" style:font-size-complex="14pt"/>
    </style:style>
    <style:style style:name="T13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05" style:parent-style-name="DefaultParagraphFont" style:family="text">
      <style:text-properties style:font-name="Times New Roman" style:font-name-complex="Times New Roman" fo:font-size="14pt" style:font-size-asian="14pt" style:font-size-complex="14pt"/>
    </style:style>
    <style:style style:name="T13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07" style:parent-style-name="DefaultParagraphFont" style:family="text">
      <style:text-properties style:font-name="Times New Roman" style:font-name-complex="Times New Roman" fo:font-size="14pt" style:font-size-asian="14pt" style:font-size-complex="14pt"/>
    </style:style>
    <style:style style:name="T1308" style:parent-style-name="DefaultParagraphFont" style:family="text">
      <style:text-properties style:font-name="Times New Roman" style:font-name-complex="Times New Roman" fo:font-size="14pt" style:font-size-asian="14pt" style:font-size-complex="14pt"/>
    </style:style>
    <style:style style:name="T1309" style:parent-style-name="Hyperlink" style:family="text">
      <style:text-properties style:font-name="Times New Roman" style:font-name-complex="Times New Roman" fo:font-size="14pt" style:font-size-asian="14pt" style:font-size-complex="14pt"/>
    </style:style>
    <style:style style:name="T13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12" style:parent-style-name="Normal" style:family="paragraph">
      <style:text-properties style:font-name="Times New Roman" style:font-name-complex="Times New Roman" fo:font-size="14pt" style:font-size-asian="14pt" style:font-size-complex="14pt"/>
    </style:style>
    <style:style style:name="P1313" style:parent-style-name="Normal" style:family="paragraph">
      <style:text-properties style:font-name="Times New Roman" style:font-name-complex="Times New Roman" fo:font-size="14pt" style:font-size-asian="14pt" style:font-size-complex="14pt"/>
    </style:style>
    <style:style style:name="P1314" style:parent-style-name="Normal" style:family="paragraph">
      <style:text-properties style:font-name="Times New Roman" style:font-name-complex="Times New Roman" fo:font-size="14pt" style:font-size-asian="14pt" style:font-size-complex="14pt"/>
    </style:style>
    <style:style style:name="T13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16" style:parent-style-name="DefaultParagraphFont" style:family="text">
      <style:text-properties style:font-name="Times New Roman" style:font-name-complex="Times New Roman" fo:font-size="14pt" style:font-size-asian="14pt" style:font-size-complex="14pt"/>
    </style:style>
    <style:style style:name="T13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19" style:parent-style-name="Normal" style:family="paragraph">
      <style:text-properties style:font-name="Times New Roman" style:font-name-complex="Times New Roman" fo:font-size="14pt" style:font-size-asian="14pt" style:font-size-complex="14pt"/>
    </style:style>
    <style:style style:name="P1320" style:parent-style-name="Normal" style:family="paragraph">
      <style:text-properties style:font-name="Times New Roman" style:font-name-complex="Times New Roman" fo:font-size="14pt" style:font-size-asian="14pt" style:font-size-complex="14pt"/>
    </style:style>
    <style:style style:name="P1321" style:parent-style-name="Normal" style:family="paragraph">
      <style:text-properties style:font-name="Times New Roman" style:font-name-complex="Times New Roman" fo:font-size="14pt" style:font-size-asian="14pt" style:font-size-complex="14pt"/>
    </style:style>
    <style:style style:name="T13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23" style:parent-style-name="DefaultParagraphFont" style:family="text">
      <style:text-properties style:font-name="Times New Roman" style:font-name-complex="Times New Roman" fo:font-size="14pt" style:font-size-asian="14pt" style:font-size-complex="14pt"/>
    </style:style>
    <style:style style:name="T13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26" style:parent-style-name="Normal" style:family="paragraph">
      <style:text-properties style:font-name="Times New Roman" style:font-name-complex="Times New Roman" fo:font-size="14pt" style:font-size-asian="14pt" style:font-size-complex="14pt"/>
    </style:style>
    <style:style style:name="T1327" style:parent-style-name="DefaultParagraphFont" style:family="text">
      <style:text-properties style:font-name="Consolas" style:font-name-complex="Times New Roman" fo:font-size="11pt" style:font-size-asian="11pt" style:font-size-complex="11pt"/>
    </style:style>
    <style:style style:name="T1328" style:parent-style-name="DefaultParagraphFont" style:family="text">
      <style:text-properties style:font-name="Consolas" style:font-name-complex="Times New Roman" fo:font-weight="bold" style:font-weight-asian="bold" style:font-weight-complex="bold" fo:font-size="11pt" style:font-size-asian="11pt" style:font-size-complex="11pt"/>
    </style:style>
    <style:style style:name="P1329" style:parent-style-name="Normal" style:family="paragraph">
      <style:text-properties style:font-name="Consolas" style:font-name-complex="Times New Roman" fo:font-size="11pt" style:font-size-asian="11pt" style:font-size-complex="11pt"/>
    </style:style>
    <style:style style:name="P1330" style:parent-style-name="Normal" style:family="paragraph">
      <style:text-properties style:font-name="Consolas" style:font-name-complex="Times New Roman" fo:font-size="11pt" style:font-size-asian="11pt" style:font-size-complex="11pt"/>
    </style:style>
    <style:style style:name="P1331" style:parent-style-name="Normal" style:family="paragraph">
      <style:text-properties style:font-name="Consolas" style:font-name-complex="Times New Roman" fo:font-size="11pt" style:font-size-asian="11pt" style:font-size-complex="11pt"/>
    </style:style>
    <style:style style:name="P1332" style:parent-style-name="Normal" style:family="paragraph">
      <style:text-properties style:font-name="Consolas" style:font-name-complex="Times New Roman" fo:font-size="11pt" style:font-size-asian="11pt" style:font-size-complex="11pt"/>
    </style:style>
    <style:style style:name="P1333" style:parent-style-name="Normal" style:family="paragraph">
      <style:text-properties style:font-name="Consolas" style:font-name-complex="Times New Roman" fo:font-size="11pt" style:font-size-asian="11pt" style:font-size-complex="11pt"/>
    </style:style>
    <style:style style:name="P1334" style:parent-style-name="Normal" style:family="paragraph">
      <style:text-properties style:font-name="Consolas" style:font-name-complex="Times New Roman" fo:font-size="11pt" style:font-size-asian="11pt" style:font-size-complex="11pt"/>
    </style:style>
    <style:style style:name="P1335" style:parent-style-name="Normal" style:family="paragraph">
      <style:text-properties style:font-name="Consolas" style:font-name-complex="Times New Roman" fo:font-size="11pt" style:font-size-asian="11pt" style:font-size-complex="11pt"/>
    </style:style>
    <style:style style:name="P1336" style:parent-style-name="Normal" style:family="paragraph">
      <style:text-properties style:font-name="Consolas" style:font-name-complex="Times New Roman" fo:font-size="11pt" style:font-size-asian="11pt" style:font-size-complex="11pt"/>
    </style:style>
    <style:style style:name="P1337" style:parent-style-name="Normal" style:family="paragraph">
      <style:text-properties style:font-name="Consolas" style:font-name-complex="Times New Roman" fo:font-size="11pt" style:font-size-asian="11pt" style:font-size-complex="11pt"/>
    </style:style>
    <style:style style:name="P1338" style:parent-style-name="Normal" style:family="paragraph">
      <style:text-properties style:font-name="Consolas" style:font-name-complex="Times New Roman" fo:font-size="11pt" style:font-size-asian="11pt" style:font-size-complex="11pt"/>
    </style:style>
    <style:style style:name="P1339" style:parent-style-name="Normal" style:family="paragraph">
      <style:text-properties style:font-name="Consolas" style:font-name-complex="Times New Roman" fo:font-size="11pt" style:font-size-asian="11pt" style:font-size-complex="11pt"/>
    </style:style>
    <style:style style:name="P1340" style:parent-style-name="Normal" style:family="paragraph">
      <style:text-properties style:font-name="Consolas" style:font-name-complex="Times New Roman" fo:font-size="11pt" style:font-size-asian="11pt" style:font-size-complex="11pt"/>
    </style:style>
    <style:style style:name="P1341" style:parent-style-name="Normal" style:family="paragraph">
      <style:text-properties style:font-name="Consolas" style:font-name-complex="Times New Roman" fo:font-size="11pt" style:font-size-asian="11pt" style:font-size-complex="11pt"/>
    </style:style>
    <style:style style:name="P1342" style:parent-style-name="Normal" style:family="paragraph">
      <style:text-properties style:font-name="Consolas" style:font-name-complex="Times New Roman" fo:font-size="11pt" style:font-size-asian="11pt" style:font-size-complex="11pt"/>
    </style:style>
    <style:style style:name="P1343" style:parent-style-name="Normal" style:family="paragraph">
      <style:text-properties style:font-name="Consolas" style:font-name-complex="Times New Roman" fo:font-size="11pt" style:font-size-asian="11pt" style:font-size-complex="11pt"/>
    </style:style>
    <style:style style:name="P1344" style:parent-style-name="Normal" style:family="paragraph">
      <style:text-properties style:font-name="Consolas" style:font-name-complex="Times New Roman" fo:font-size="11pt" style:font-size-asian="11pt" style:font-size-complex="11pt"/>
    </style:style>
    <style:style style:name="P1345" style:parent-style-name="Normal" style:family="paragraph">
      <style:text-properties style:font-name="Consolas" style:font-name-complex="Times New Roman" fo:font-size="11pt" style:font-size-asian="11pt" style:font-size-complex="11pt"/>
    </style:style>
    <style:style style:name="P1346" style:parent-style-name="Normal" style:family="paragraph">
      <style:text-properties style:font-name="Consolas" style:font-name-complex="Times New Roman" fo:font-size="11pt" style:font-size-asian="11pt" style:font-size-complex="11pt"/>
    </style:style>
    <style:style style:name="P1347" style:parent-style-name="Normal" style:family="paragraph">
      <style:text-properties style:font-name="Consolas" style:font-name-complex="Times New Roman" fo:font-size="11pt" style:font-size-asian="11pt" style:font-size-complex="11pt"/>
    </style:style>
    <style:style style:name="P1348" style:parent-style-name="Normal" style:family="paragraph">
      <style:text-properties style:font-name="Consolas" style:font-name-complex="Times New Roman" fo:font-size="11pt" style:font-size-asian="11pt" style:font-size-complex="11pt"/>
    </style:style>
    <style:style style:name="P1349" style:parent-style-name="Normal" style:family="paragraph">
      <style:text-properties style:font-name="Consolas" style:font-name-complex="Times New Roman" fo:font-size="11pt" style:font-size-asian="11pt" style:font-size-complex="11pt"/>
    </style:style>
    <style:style style:name="P1350" style:parent-style-name="Normal" style:family="paragraph">
      <style:text-properties style:font-name="Consolas" style:font-name-complex="Times New Roman" fo:font-size="11pt" style:font-size-asian="11pt" style:font-size-complex="11pt"/>
    </style:style>
    <style:style style:name="P1351" style:parent-style-name="Normal" style:family="paragraph">
      <style:text-properties style:font-name="Consolas" style:font-name-complex="Times New Roman" fo:font-size="11pt" style:font-size-asian="11pt" style:font-size-complex="11pt"/>
    </style:style>
    <style:style style:name="P1352" style:parent-style-name="Normal" style:family="paragraph">
      <style:text-properties style:font-name="Consolas" style:font-name-complex="Times New Roman" fo:font-size="11pt" style:font-size-asian="11pt" style:font-size-complex="11pt"/>
    </style:style>
    <style:style style:name="P1353" style:parent-style-name="Normal" style:family="paragraph">
      <style:text-properties style:font-name="Consolas" style:font-name-complex="Times New Roman" fo:font-size="11pt" style:font-size-asian="11pt" style:font-size-complex="11pt"/>
    </style:style>
    <style:style style:name="P1354" style:parent-style-name="Normal" style:family="paragraph">
      <style:text-properties style:font-name="Consolas" style:font-name-complex="Times New Roman" fo:font-size="11pt" style:font-size-asian="11pt" style:font-size-complex="11pt"/>
    </style:style>
    <style:style style:name="P1355" style:parent-style-name="Normal" style:family="paragraph">
      <style:text-properties style:font-name="Consolas" style:font-name-complex="Times New Roman" fo:font-size="11pt" style:font-size-asian="11pt" style:font-size-complex="11pt"/>
    </style:style>
    <style:style style:name="P1356" style:parent-style-name="Normal" style:family="paragraph">
      <style:text-properties style:font-name="Consolas" style:font-name-complex="Times New Roman" fo:font-size="11pt" style:font-size-asian="11pt" style:font-size-complex="11pt"/>
    </style:style>
    <style:style style:name="P1357" style:parent-style-name="Normal" style:family="paragraph">
      <style:text-properties style:font-name="Consolas" style:font-name-complex="Times New Roman" fo:font-size="11pt" style:font-size-asian="11pt" style:font-size-complex="11pt"/>
    </style:style>
    <style:style style:name="P1358" style:parent-style-name="Normal" style:family="paragraph">
      <style:text-properties style:font-name="Times New Roman" style:font-name-complex="Times New Roman" fo:font-size="14pt" style:font-size-asian="14pt" style:font-size-complex="14pt"/>
    </style:style>
    <style:style style:name="P1359" style:parent-style-name="Normal" style:family="paragraph">
      <style:text-properties style:font-name="Times New Roman" style:font-name-complex="Times New Roman" fo:font-size="14pt" style:font-size-asian="14pt" style:font-size-complex="14pt"/>
    </style:style>
    <style:style style:name="T13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61" style:parent-style-name="DefaultParagraphFont" style:family="text">
      <style:text-properties style:font-name="Times New Roman" style:font-name-complex="Times New Roman" fo:font-size="14pt" style:font-size-asian="14pt" style:font-size-complex="14pt"/>
    </style:style>
    <style:style style:name="T13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63" style:parent-style-name="Normal" style:family="paragraph">
      <style:text-properties style:font-name="Times New Roman" style:font-name-complex="Times New Roman" fo:font-size="14pt" style:font-size-asian="14pt" style:font-size-complex="14pt"/>
    </style:style>
    <style:style style:name="P1364" style:parent-style-name="Normal" style:family="paragraph">
      <style:text-properties style:font-name="Times New Roman" style:font-name-complex="Times New Roman" fo:font-size="14pt" style:font-size-asian="14pt" style:font-size-complex="14pt"/>
    </style:style>
    <style:style style:name="T1365" style:parent-style-name="DefaultParagraphFont" style:family="text">
      <style:text-properties style:font-name="Times New Roman" style:font-name-complex="Times New Roman" fo:font-size="14pt" style:font-size-asian="14pt" style:font-size-complex="14pt"/>
    </style:style>
    <style:style style:name="T1366" style:parent-style-name="Hyperlink" style:family="text">
      <style:text-properties style:font-name="Times New Roman" style:font-name-complex="Times New Roman" fo:font-size="14pt" style:font-size-asian="14pt" style:font-size-complex="14pt"/>
    </style:style>
    <style:style style:name="T13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69" style:parent-style-name="Normal" style:family="paragraph">
      <style:text-properties style:font-name="Times New Roman" style:font-name-complex="Times New Roman" fo:font-size="14pt" style:font-size-asian="14pt" style:font-size-complex="14pt"/>
    </style:style>
    <style:style style:name="T1370" style:parent-style-name="DefaultParagraphFont" style:family="text">
      <style:text-properties style:font-name="Consolas" style:font-name-complex="Times New Roman" fo:font-size="11pt" style:font-size-asian="11pt" style:font-size-complex="11pt"/>
    </style:style>
    <style:style style:name="T1371" style:parent-style-name="DefaultParagraphFont" style:family="text">
      <style:text-properties style:font-name="Consolas" style:font-name-complex="Times New Roman" fo:font-weight="bold" style:font-weight-asian="bold" style:font-weight-complex="bold" fo:font-size="11pt" style:font-size-asian="11pt" style:font-size-complex="11pt"/>
    </style:style>
    <style:style style:name="P1372" style:parent-style-name="Normal" style:family="paragraph">
      <style:text-properties style:font-name="Consolas" style:font-name-complex="Times New Roman" fo:font-size="11pt" style:font-size-asian="11pt" style:font-size-complex="11pt"/>
    </style:style>
    <style:style style:name="P1373" style:parent-style-name="Normal" style:family="paragraph">
      <style:text-properties style:font-name="Consolas" style:font-name-complex="Times New Roman" fo:font-size="11pt" style:font-size-asian="11pt" style:font-size-complex="11pt"/>
    </style:style>
    <style:style style:name="P1374" style:parent-style-name="Normal" style:family="paragraph">
      <style:text-properties style:font-name="Consolas" style:font-name-complex="Times New Roman" fo:font-size="11pt" style:font-size-asian="11pt" style:font-size-complex="11pt"/>
    </style:style>
    <style:style style:name="P1375" style:parent-style-name="Normal" style:family="paragraph">
      <style:text-properties style:font-name="Consolas" style:font-name-complex="Times New Roman" fo:font-size="11pt" style:font-size-asian="11pt" style:font-size-complex="11pt"/>
    </style:style>
    <style:style style:name="P1376" style:parent-style-name="Normal" style:family="paragraph">
      <style:text-properties style:font-name="Consolas" style:font-name-complex="Times New Roman" fo:font-size="11pt" style:font-size-asian="11pt" style:font-size-complex="11pt"/>
    </style:style>
    <style:style style:name="P1377" style:parent-style-name="Normal" style:family="paragraph">
      <style:text-properties style:font-name="Consolas" style:font-name-complex="Times New Roman" fo:font-size="11pt" style:font-size-asian="11pt" style:font-size-complex="11pt"/>
    </style:style>
    <style:style style:name="P1378" style:parent-style-name="Normal" style:family="paragraph">
      <style:text-properties style:font-name="Consolas" style:font-name-complex="Times New Roman" fo:font-size="11pt" style:font-size-asian="11pt" style:font-size-complex="11pt"/>
    </style:style>
    <style:style style:name="P1379" style:parent-style-name="Normal" style:family="paragraph">
      <style:text-properties style:font-name="Consolas" style:font-name-complex="Times New Roman" fo:font-size="11pt" style:font-size-asian="11pt" style:font-size-complex="11pt"/>
    </style:style>
    <style:style style:name="P1380" style:parent-style-name="Normal" style:family="paragraph">
      <style:text-properties style:font-name="Consolas" style:font-name-complex="Times New Roman" fo:font-size="11pt" style:font-size-asian="11pt" style:font-size-complex="11pt"/>
    </style:style>
    <style:style style:name="P1381" style:parent-style-name="Normal" style:family="paragraph">
      <style:text-properties style:font-name="Consolas" style:font-name-complex="Times New Roman" fo:font-size="11pt" style:font-size-asian="11pt" style:font-size-complex="11pt"/>
    </style:style>
    <style:style style:name="P1382" style:parent-style-name="Normal" style:family="paragraph">
      <style:text-properties style:font-name="Consolas" style:font-name-complex="Times New Roman" fo:font-size="11pt" style:font-size-asian="11pt" style:font-size-complex="11pt"/>
    </style:style>
    <style:style style:name="P1383" style:parent-style-name="Normal" style:family="paragraph">
      <style:text-properties style:font-name="Consolas" style:font-name-complex="Times New Roman" fo:font-size="11pt" style:font-size-asian="11pt" style:font-size-complex="11pt"/>
    </style:style>
    <style:style style:name="P1384" style:parent-style-name="Normal" style:family="paragraph">
      <style:text-properties style:font-name="Consolas" style:font-name-complex="Times New Roman" fo:font-size="11pt" style:font-size-asian="11pt" style:font-size-complex="11pt"/>
    </style:style>
    <style:style style:name="P1385" style:parent-style-name="Normal" style:family="paragraph">
      <style:text-properties style:font-name="Consolas" style:font-name-complex="Times New Roman" fo:font-size="11pt" style:font-size-asian="11pt" style:font-size-complex="11pt"/>
    </style:style>
    <style:style style:name="P1386" style:parent-style-name="Normal" style:family="paragraph">
      <style:text-properties style:font-name="Consolas" style:font-name-complex="Times New Roman" fo:font-size="11pt" style:font-size-asian="11pt" style:font-size-complex="11pt"/>
    </style:style>
    <style:style style:name="P1387" style:parent-style-name="Normal" style:family="paragraph">
      <style:text-properties style:font-name="Consolas" style:font-name-complex="Times New Roman" fo:font-size="11pt" style:font-size-asian="11pt" style:font-size-complex="11pt"/>
    </style:style>
    <style:style style:name="P1388" style:parent-style-name="Normal" style:family="paragraph">
      <style:text-properties style:font-name="Consolas" style:font-name-complex="Times New Roman" fo:font-size="11pt" style:font-size-asian="11pt" style:font-size-complex="11pt"/>
    </style:style>
    <style:style style:name="P1389" style:parent-style-name="Normal" style:family="paragraph">
      <style:text-properties style:font-name="Consolas" style:font-name-complex="Times New Roman" fo:font-size="11pt" style:font-size-asian="11pt" style:font-size-complex="11pt"/>
    </style:style>
    <style:style style:name="P1390" style:parent-style-name="Normal" style:family="paragraph">
      <style:text-properties style:font-name="Consolas" style:font-name-complex="Times New Roman" fo:font-size="11pt" style:font-size-asian="11pt" style:font-size-complex="11pt"/>
    </style:style>
    <style:style style:name="P1391" style:parent-style-name="Normal" style:family="paragraph">
      <style:text-properties style:font-name="Consolas" style:font-name-complex="Times New Roman" fo:font-size="11pt" style:font-size-asian="11pt" style:font-size-complex="11pt"/>
    </style:style>
    <style:style style:name="P1392" style:parent-style-name="Normal" style:family="paragraph">
      <style:text-properties style:font-name="Consolas" style:font-name-complex="Times New Roman" fo:font-size="11pt" style:font-size-asian="11pt" style:font-size-complex="11pt"/>
    </style:style>
    <style:style style:name="P1393" style:parent-style-name="Normal" style:family="paragraph">
      <style:text-properties style:font-name="Consolas" style:font-name-complex="Times New Roman" fo:font-size="11pt" style:font-size-asian="11pt" style:font-size-complex="11pt"/>
    </style:style>
    <style:style style:name="P1394" style:parent-style-name="Normal" style:family="paragraph">
      <style:text-properties style:font-name="Consolas" style:font-name-complex="Times New Roman" fo:font-size="11pt" style:font-size-asian="11pt" style:font-size-complex="11pt"/>
    </style:style>
    <style:style style:name="P1395" style:parent-style-name="Normal" style:family="paragraph">
      <style:text-properties style:font-name="Consolas" style:font-name-complex="Times New Roman" fo:font-size="11pt" style:font-size-asian="11pt" style:font-size-complex="11pt"/>
    </style:style>
    <style:style style:name="P1396" style:parent-style-name="Normal" style:family="paragraph">
      <style:text-properties style:font-name="Consolas" style:font-name-complex="Times New Roman" fo:font-size="11pt" style:font-size-asian="11pt" style:font-size-complex="11pt"/>
    </style:style>
    <style:style style:name="P1397" style:parent-style-name="Normal" style:family="paragraph">
      <style:text-properties style:font-name="Consolas" style:font-name-complex="Times New Roman" fo:font-size="11pt" style:font-size-asian="11pt" style:font-size-complex="11pt"/>
    </style:style>
    <style:style style:name="P1398" style:parent-style-name="Normal" style:family="paragraph">
      <style:text-properties style:font-name="Consolas" style:font-name-complex="Times New Roman" fo:font-size="11pt" style:font-size-asian="11pt" style:font-size-complex="11pt"/>
    </style:style>
    <style:style style:name="P1399" style:parent-style-name="Normal" style:family="paragraph">
      <style:text-properties style:font-name="Consolas" style:font-name-complex="Times New Roman" fo:font-size="11pt" style:font-size-asian="11pt" style:font-size-complex="11pt"/>
    </style:style>
    <style:style style:name="P1400" style:parent-style-name="Normal" style:family="paragraph">
      <style:text-properties style:font-name="Consolas" style:font-name-complex="Times New Roman" fo:font-size="11pt" style:font-size-asian="11pt" style:font-size-complex="11pt"/>
    </style:style>
    <style:style style:name="P1401" style:parent-style-name="Normal" style:family="paragraph">
      <style:text-properties style:font-name="Times New Roman" style:font-name-complex="Times New Roman" fo:font-size="14pt" style:font-size-asian="14pt" style:font-size-complex="14pt"/>
    </style:style>
    <style:style style:name="P1402" style:parent-style-name="Normal" style:family="paragraph">
      <style:text-properties style:font-name="Times New Roman" style:font-name-complex="Times New Roman" fo:font-size="14pt" style:font-size-asian="14pt" style:font-size-complex="14pt"/>
    </style:style>
    <style:style style:name="T14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04" style:parent-style-name="DefaultParagraphFont" style:family="text">
      <style:text-properties style:font-name="Times New Roman" style:font-name-complex="Times New Roman" fo:font-size="14pt" style:font-size-asian="14pt" style:font-size-complex="14pt"/>
    </style:style>
    <style:style style:name="T14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06" style:parent-style-name="Normal" style:family="paragraph">
      <style:text-properties style:font-name="Times New Roman" style:font-name-complex="Times New Roman" fo:font-size="14pt" style:font-size-asian="14pt" style:font-size-complex="14pt"/>
    </style:style>
    <style:style style:name="T14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09" style:parent-style-name="Normal" style:family="paragraph">
      <style:text-properties style:font-name="Times New Roman" style:font-name-complex="Times New Roman" fo:font-size="14pt" style:font-size-asian="14pt" style:font-size-complex="14pt"/>
    </style:style>
    <style:style style:name="P1410" style:parent-style-name="Normal" style:family="paragraph">
      <style:text-properties style:font-name="Times New Roman" style:font-name-complex="Times New Roman" fo:font-size="14pt" style:font-size-asian="14pt" style:font-size-complex="14pt"/>
    </style:style>
    <style:style style:name="P1411" style:parent-style-name="Normal" style:family="paragraph">
      <style:text-properties style:font-name="Times New Roman" style:font-name-complex="Times New Roman" fo:font-size="14pt" style:font-size-asian="14pt" style:font-size-complex="14pt"/>
    </style:style>
    <style:style style:name="T14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13" style:parent-style-name="DefaultParagraphFont" style:family="text">
      <style:text-properties style:font-name="Times New Roman" style:font-name-complex="Times New Roman" fo:font-size="14pt" style:font-size-asian="14pt" style:font-size-complex="14pt"/>
    </style:style>
    <style:style style:name="T14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15" style:parent-style-name="DefaultParagraphFont" style:family="text">
      <style:text-properties style:font-name="Times New Roman" style:font-name-complex="Times New Roman" fo:font-size="14pt" style:font-size-asian="14pt" style:font-size-complex="14pt"/>
    </style:style>
    <style:style style:name="T1416"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1417" style:parent-style-name="DefaultParagraphFont" style:family="text">
      <style:text-properties style:font-name="Times New Roman" style:font-name-complex="Times New Roman" fo:font-size="14pt" style:font-size-asian="14pt" style:font-size-complex="14pt"/>
    </style:style>
    <style:style style:name="T1418" style:parent-style-name="DefaultParagraphFont" style:family="text">
      <style:text-properties style:font-name="Times New Roman" style:font-name-complex="Times New Roman" fo:font-size="14pt" style:font-size-asian="14pt" style:font-size-complex="14pt"/>
    </style:style>
    <style:style style:name="T14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21" style:parent-style-name="Normal" style:family="paragraph">
      <style:text-properties style:font-name="Times New Roman" style:font-name-complex="Times New Roman" fo:font-size="14pt" style:font-size-asian="14pt" style:font-size-complex="14pt"/>
    </style:style>
    <style:style style:name="P1422" style:parent-style-name="Normal" style:family="paragraph">
      <style:text-properties style:font-name="Times New Roman" style:font-name-complex="Times New Roman" fo:font-size="14pt" style:font-size-asian="14pt" style:font-size-complex="14pt"/>
    </style:style>
    <style:style style:name="P1423" style:parent-style-name="Normal" style:family="paragraph">
      <style:text-properties style:font-name="Times New Roman" style:font-name-complex="Times New Roman" fo:font-size="14pt" style:font-size-asian="14pt" style:font-size-complex="14pt"/>
    </style:style>
    <style:style style:name="T14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25" style:parent-style-name="DefaultParagraphFont" style:family="text">
      <style:text-properties style:font-name="Times New Roman" style:font-name-complex="Times New Roman" fo:font-size="14pt" style:font-size-asian="14pt" style:font-size-complex="14pt"/>
    </style:style>
    <style:style style:name="T14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27" style:parent-style-name="Normal" style:family="paragraph">
      <style:text-properties style:font-name="Times New Roman" style:font-name-complex="Times New Roman" fo:font-size="14pt" style:font-size-asian="14pt" style:font-size-complex="14pt"/>
    </style:style>
    <style:style style:name="P1428" style:parent-style-name="Normal" style:family="paragraph">
      <style:text-properties style:font-name="Times New Roman" style:font-name-complex="Times New Roman" fo:font-size="14pt" style:font-size-asian="14pt" style:font-size-complex="14pt"/>
    </style:style>
    <style:style style:name="T1429" style:parent-style-name="DefaultParagraphFont" style:family="text">
      <style:text-properties style:font-name="Times New Roman" style:font-name-complex="Times New Roman" fo:font-size="14pt" style:font-size-asian="14pt" style:font-size-complex="14pt"/>
    </style:style>
    <style:style style:name="T1430" style:parent-style-name="Hyperlink" style:family="text">
      <style:text-properties style:font-name="Times New Roman" style:font-name-complex="Times New Roman" fo:font-size="14pt" style:font-size-asian="14pt" style:font-size-complex="14pt"/>
    </style:style>
    <style:style style:name="T14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33" style:parent-style-name="Normal" style:family="paragraph">
      <style:text-properties style:font-name="Times New Roman" style:font-name-complex="Times New Roman" fo:font-size="14pt" style:font-size-asian="14pt" style:font-size-complex="14pt"/>
    </style:style>
    <style:style style:name="P1434" style:parent-style-name="Normal" style:family="paragraph">
      <style:text-properties style:font-name="Consolas" style:font-name-complex="Times New Roman" fo:font-size="11pt" style:font-size-asian="11pt" style:font-size-complex="11pt"/>
    </style:style>
    <style:style style:name="P1435" style:parent-style-name="Normal" style:family="paragraph">
      <style:text-properties style:font-name="Consolas" style:font-name-complex="Times New Roman" fo:font-size="11pt" style:font-size-asian="11pt" style:font-size-complex="11pt"/>
    </style:style>
    <style:style style:name="P1436" style:parent-style-name="Normal" style:family="paragraph">
      <style:text-properties style:font-name="Consolas" style:font-name-complex="Times New Roman" fo:font-size="11pt" style:font-size-asian="11pt" style:font-size-complex="11pt"/>
    </style:style>
    <style:style style:name="P1437" style:parent-style-name="Normal" style:family="paragraph">
      <style:text-properties style:font-name="Consolas" style:font-name-complex="Times New Roman" fo:font-size="11pt" style:font-size-asian="11pt" style:font-size-complex="11pt"/>
    </style:style>
    <style:style style:name="P1438" style:parent-style-name="Normal" style:family="paragraph">
      <style:text-properties style:font-name="Consolas" style:font-name-complex="Times New Roman" fo:font-size="11pt" style:font-size-asian="11pt" style:font-size-complex="11pt"/>
    </style:style>
    <style:style style:name="P1439" style:parent-style-name="Normal" style:family="paragraph">
      <style:text-properties style:font-name="Consolas" style:font-name-complex="Times New Roman" fo:font-size="11pt" style:font-size-asian="11pt" style:font-size-complex="11pt"/>
    </style:style>
    <style:style style:name="P1440" style:parent-style-name="Normal" style:family="paragraph">
      <style:text-properties style:font-name="Consolas" style:font-name-complex="Times New Roman" fo:font-size="11pt" style:font-size-asian="11pt" style:font-size-complex="11pt"/>
    </style:style>
    <style:style style:name="P1441" style:parent-style-name="Normal" style:family="paragraph">
      <style:text-properties style:font-name="Consolas" style:font-name-complex="Times New Roman" fo:font-size="11pt" style:font-size-asian="11pt" style:font-size-complex="11pt"/>
    </style:style>
    <style:style style:name="P1442" style:parent-style-name="Normal" style:family="paragraph">
      <style:text-properties style:font-name="Consolas" style:font-name-complex="Times New Roman" fo:font-size="11pt" style:font-size-asian="11pt" style:font-size-complex="11pt"/>
    </style:style>
    <style:style style:name="T1443" style:parent-style-name="DefaultParagraphFont" style:family="text">
      <style:text-properties style:font-name="Consolas" style:font-name-complex="Times New Roman" fo:font-size="11pt" style:font-size-asian="11pt" style:font-size-complex="11pt"/>
    </style:style>
    <style:style style:name="P1444" style:parent-style-name="Normal" style:family="paragraph">
      <style:text-properties style:font-name="Times New Roman" style:font-name-complex="Times New Roman" fo:font-size="14pt" style:font-size-asian="14pt" style:font-size-complex="14pt"/>
    </style:style>
    <style:style style:name="P1445" style:parent-style-name="Normal" style:family="paragraph">
      <style:text-properties style:font-name="Times New Roman" style:font-name-complex="Times New Roman" fo:font-size="14pt" style:font-size-asian="14pt" style:font-size-complex="14pt"/>
    </style:style>
    <style:style style:name="P1446" style:parent-style-name="Normal" style:family="paragraph">
      <style:text-properties style:font-name="Times New Roman" style:font-name-complex="Times New Roman" fo:font-size="14pt" style:font-size-asian="14pt" style:font-size-complex="14pt"/>
    </style:style>
    <style:style style:name="P1447" style:parent-style-name="Normal" style:family="paragraph">
      <style:text-properties style:font-name="Times New Roman" style:font-name-complex="Times New Roman" fo:font-size="14pt" style:font-size-asian="14pt" style:font-size-complex="14pt"/>
    </style:style>
    <style:style style:name="P1448" style:parent-style-name="Normal" style:family="paragraph">
      <style:text-properties style:font-name="Times New Roman" style:font-name-complex="Times New Roman" fo:font-size="14pt" style:font-size-asian="14pt" style:font-size-complex="14pt"/>
    </style:style>
    <style:style style:name="P1449" style:parent-style-name="Normal" style:family="paragraph">
      <style:text-properties style:font-name="Times New Roman" style:font-name-complex="Times New Roman" fo:font-size="14pt" style:font-size-asian="14pt" style:font-size-complex="14pt"/>
    </style:style>
    <style:style style:name="T14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51" style:parent-style-name="DefaultParagraphFont" style:family="text">
      <style:text-properties style:font-name="Times New Roman" style:font-name-complex="Times New Roman" fo:font-size="14pt" style:font-size-asian="14pt" style:font-size-complex="14pt"/>
    </style:style>
    <style:style style:name="T14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53" style:parent-style-name="DefaultParagraphFont" style:family="text">
      <style:text-properties style:font-name="Times New Roman" style:font-name-complex="Times New Roman" fo:font-size="14pt" style:font-size-asian="14pt" style:font-size-complex="14pt"/>
    </style:style>
    <style:style style:name="T1454"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455" style:parent-style-name="DefaultParagraphFont" style:family="text">
      <style:text-properties style:font-name="Times New Roman" style:font-name-complex="Times New Roman" fo:font-size="14pt" style:font-size-asian="14pt" style:font-size-complex="14pt"/>
    </style:style>
    <style:style style:name="T1456"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457" style:parent-style-name="DefaultParagraphFont" style:family="text">
      <style:text-properties style:font-name="Times New Roman" style:font-name-complex="Times New Roman" fo:font-size="14pt" style:font-size-asian="14pt" style:font-size-complex="14pt"/>
    </style:style>
    <style:style style:name="T145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459" style:parent-style-name="DefaultParagraphFont" style:family="text">
      <style:text-properties style:font-name="Times New Roman" style:font-name-complex="Times New Roman" fo:font-size="14pt" style:font-size-asian="14pt" style:font-size-complex="14pt"/>
    </style:style>
    <style:style style:name="T14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62" style:parent-style-name="Normal" style:family="paragraph">
      <style:text-properties style:font-name="Times New Roman" style:font-name-complex="Times New Roman" fo:font-size="14pt" style:font-size-asian="14pt" style:font-size-complex="14pt"/>
    </style:style>
    <style:style style:name="P1463" style:parent-style-name="consolas" style:family="paragraph">
      <style:text-properties fo:language="it" fo:country="IT"/>
    </style:style>
    <style:style style:name="P1464" style:parent-style-name="consolas" style:family="paragraph">
      <style:text-properties fo:language="it" fo:country="IT"/>
    </style:style>
    <style:style style:name="P1465" style:parent-style-name="Normal" style:family="paragraph">
      <style:text-properties style:font-name="Times New Roman" style:font-name-complex="Times New Roman" fo:font-size="14pt" style:font-size-asian="14pt" style:font-size-complex="14pt"/>
    </style:style>
    <style:style style:name="P1466" style:parent-style-name="Normal" style:family="paragraph">
      <style:text-properties style:font-name="Times New Roman" style:font-name-complex="Times New Roman" fo:font-size="14pt" style:font-size-asian="14pt" style:font-size-complex="14pt"/>
    </style:style>
    <style:style style:name="P1467" style:parent-style-name="Normal" style:family="paragraph">
      <style:text-properties style:font-name="Times New Roman" style:font-name-complex="Times New Roman" fo:font-size="14pt" style:font-size-asian="14pt" style:font-size-complex="14pt"/>
    </style:style>
    <style:style style:name="T14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69" style:parent-style-name="DefaultParagraphFont" style:family="text">
      <style:text-properties style:font-name="Times New Roman" style:font-name-complex="Times New Roman" fo:font-size="14pt" style:font-size-asian="14pt" style:font-size-complex="14pt"/>
    </style:style>
    <style:style style:name="T14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72" style:parent-style-name="Normal" style:family="paragraph">
      <style:text-properties style:font-name="Times New Roman" style:font-name-complex="Times New Roman" fo:font-size="14pt" style:font-size-asian="14pt" style:font-size-complex="14pt"/>
    </style:style>
    <style:style style:name="T1473" style:parent-style-name="DefaultParagraphFont" style:family="text">
      <style:text-properties style:font-name="Times New Roman" style:font-name-complex="Times New Roman" fo:font-size="14pt" style:font-size-asian="14pt" style:font-size-complex="14pt"/>
    </style:style>
    <style:style style:name="P1474" style:parent-style-name="Normal" style:family="paragraph">
      <style:text-properties style:font-name="Times New Roman" style:font-name-complex="Times New Roman" fo:font-size="14pt" style:font-size-asian="14pt" style:font-size-complex="14pt"/>
    </style:style>
    <style:style style:name="P1475" style:parent-style-name="Normal" style:family="paragraph">
      <style:text-properties style:font-name="Times New Roman" style:font-name-complex="Times New Roman" fo:font-size="14pt" style:font-size-asian="14pt" style:font-size-complex="14pt"/>
    </style:style>
    <style:style style:name="P1476" style:parent-style-name="Normal" style:family="paragraph">
      <style:text-properties style:font-name="Times New Roman" style:font-name-complex="Times New Roman" fo:font-size="14pt" style:font-size-asian="14pt" style:font-size-complex="14pt"/>
    </style:style>
    <style:style style:name="T14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78" style:parent-style-name="DefaultParagraphFont" style:family="text">
      <style:text-properties style:font-name="Times New Roman" style:font-name-complex="Times New Roman" fo:font-size="14pt" style:font-size-asian="14pt" style:font-size-complex="14pt"/>
    </style:style>
    <style:style style:name="T14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80" style:parent-style-name="Normal" style:family="paragraph">
      <style:text-properties style:font-name="Times New Roman" style:font-name-complex="Times New Roman" fo:font-size="14pt" style:font-size-asian="14pt" style:font-size-complex="14pt"/>
    </style:style>
    <style:style style:name="P1481" style:parent-style-name="Normal" style:family="paragraph">
      <style:text-properties style:font-name="Times New Roman" style:font-name-complex="Times New Roman" fo:font-size="14pt" style:font-size-asian="14pt" style:font-size-complex="14pt"/>
    </style:style>
    <style:style style:name="T14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84" style:parent-style-name="Normal" style:family="paragraph">
      <style:text-properties style:font-name="Times New Roman" style:font-name-complex="Times New Roman" fo:font-size="14pt" style:font-size-asian="14pt" style:font-size-complex="14pt"/>
    </style:style>
    <style:style style:name="T1485" style:parent-style-name="DefaultParagraphFont" style:family="text">
      <style:text-properties style:font-name="Times New Roman" style:font-name-complex="Times New Roman" fo:font-size="14pt" style:font-size-asian="14pt" style:font-size-complex="14pt"/>
    </style:style>
    <style:style style:name="P1486" style:parent-style-name="Normal" style:family="paragraph">
      <style:text-properties style:font-name="Times New Roman" style:font-name-complex="Times New Roman" fo:font-size="14pt" style:font-size-asian="14pt" style:font-size-complex="14pt"/>
    </style:style>
    <style:style style:name="P1487" style:parent-style-name="Normal" style:family="paragraph">
      <style:text-properties style:font-name="Times New Roman" style:font-name-complex="Times New Roman" fo:font-size="14pt" style:font-size-asian="14pt" style:font-size-complex="14pt"/>
    </style:style>
    <style:style style:name="P1488" style:parent-style-name="Normal" style:family="paragraph">
      <style:text-properties style:font-name="Times New Roman" style:font-name-complex="Times New Roman" fo:font-size="14pt" style:font-size-asian="14pt" style:font-size-complex="14pt"/>
    </style:style>
    <style:style style:name="T14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90" style:parent-style-name="DefaultParagraphFont" style:family="text">
      <style:text-properties style:font-name="Times New Roman" style:font-name-complex="Times New Roman" fo:font-size="14pt" style:font-size-asian="14pt" style:font-size-complex="14pt"/>
    </style:style>
    <style:style style:name="T14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93" style:parent-style-name="Normal" style:family="paragraph">
      <style:text-properties style:font-name="Times New Roman" style:font-name-complex="Times New Roman" fo:font-size="14pt" style:font-size-asian="14pt" style:font-size-complex="14pt"/>
    </style:style>
    <style:style style:name="TableColumn1495" style:family="table-column">
      <style:table-column-properties style:column-width="4.9743in"/>
    </style:style>
    <style:style style:name="TableColumn1496" style:family="table-column">
      <style:table-column-properties style:column-width="4.9743in"/>
    </style:style>
    <style:style style:name="Table1494" style:family="table">
      <style:table-properties style:width="9.9486in" fo:margin-left="0in" table:align="left"/>
    </style:style>
    <style:style style:name="TableRow1497" style:family="table-row">
      <style:table-row-properties/>
    </style:style>
    <style:style style:name="TableCell149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499" style:parent-style-name="Normal" style:family="paragraph">
      <style:text-properties style:font-name="Times New Roman" style:font-name-complex="Times New Roman" fo:font-size="14pt" style:font-size-asian="14pt" style:font-size-complex="14pt"/>
    </style:style>
    <style:style style:name="P1500" style:parent-style-name="Normal" style:family="paragraph">
      <style:text-properties style:font-name="Times New Roman" style:font-name-complex="Times New Roman" fo:font-size="14pt" style:font-size-asian="14pt" style:font-size-complex="14pt"/>
    </style:style>
    <style:style style:name="P1501" style:parent-style-name="Normal" style:family="paragraph">
      <style:text-properties style:font-name="Times New Roman" style:font-name-complex="Times New Roman" fo:font-size="14pt" style:font-size-asian="14pt" style:font-size-complex="14pt"/>
    </style:style>
    <style:style style:name="P1502" style:parent-style-name="Normal" style:family="paragraph">
      <style:text-properties style:font-name="Times New Roman" style:font-name-complex="Times New Roman" fo:font-size="14pt" style:font-size-asian="14pt" style:font-size-complex="14pt"/>
    </style:style>
    <style:style style:name="P1503" style:parent-style-name="Normal" style:family="paragraph">
      <style:text-properties style:font-name="Times New Roman" style:font-name-complex="Times New Roman" fo:font-size="14pt" style:font-size-asian="14pt" style:font-size-complex="14pt"/>
    </style:style>
    <style:style style:name="P1504" style:parent-style-name="Normal" style:family="paragraph">
      <style:text-properties style:font-name="Times New Roman" style:font-name-complex="Times New Roman" fo:font-size="14pt" style:font-size-asian="14pt" style:font-size-complex="14pt"/>
    </style:style>
    <style:style style:name="P1505" style:parent-style-name="Normal" style:family="paragraph">
      <style:text-properties style:font-name="Times New Roman" style:font-name-complex="Times New Roman" fo:font-size="14pt" style:font-size-asian="14pt" style:font-size-complex="14pt"/>
    </style:style>
    <style:style style:name="P1506" style:parent-style-name="Normal" style:family="paragraph">
      <style:text-properties style:font-name="Times New Roman" style:font-name-complex="Times New Roman" fo:font-size="14pt" style:font-size-asian="14pt" style:font-size-complex="14pt"/>
    </style:style>
    <style:style style:name="P1507" style:parent-style-name="Normal" style:family="paragraph">
      <style:text-properties style:font-name="Times New Roman" style:font-name-complex="Times New Roman" fo:font-size="14pt" style:font-size-asian="14pt" style:font-size-complex="14pt"/>
    </style:style>
    <style:style style:name="TableCell150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509" style:parent-style-name="Normal" style:family="paragraph">
      <style:text-properties style:font-name="Times New Roman" style:font-name-complex="Times New Roman" fo:font-size="14pt" style:font-size-asian="14pt" style:font-size-complex="14pt"/>
    </style:style>
    <style:style style:name="P1510" style:parent-style-name="Normal" style:family="paragraph">
      <style:text-properties style:font-name="Times New Roman" style:font-name-complex="Times New Roman" fo:font-size="14pt" style:font-size-asian="14pt" style:font-size-complex="14pt"/>
    </style:style>
    <style:style style:name="P1511" style:parent-style-name="Normal" style:family="paragraph">
      <style:text-properties style:font-name="Times New Roman" style:font-name-complex="Times New Roman" fo:font-size="14pt" style:font-size-asian="14pt" style:font-size-complex="14pt"/>
    </style:style>
    <style:style style:name="P1512" style:parent-style-name="Normal" style:family="paragraph">
      <style:text-properties style:font-name="Times New Roman" style:font-name-complex="Times New Roman" fo:font-size="14pt" style:font-size-asian="14pt" style:font-size-complex="14pt"/>
    </style:style>
    <style:style style:name="P1513" style:parent-style-name="Normal" style:family="paragraph">
      <style:text-properties style:font-name="Times New Roman" style:font-name-complex="Times New Roman" fo:font-size="14pt" style:font-size-asian="14pt" style:font-size-complex="14pt"/>
    </style:style>
    <style:style style:name="P1514" style:parent-style-name="Normal" style:family="paragraph">
      <style:text-properties style:font-name="Times New Roman" style:font-name-complex="Times New Roman" fo:font-size="14pt" style:font-size-asian="14pt" style:font-size-complex="14pt"/>
    </style:style>
    <style:style style:name="P1515" style:parent-style-name="Normal" style:family="paragraph">
      <style:text-properties style:font-name="Times New Roman" style:font-name-complex="Times New Roman" fo:font-size="14pt" style:font-size-asian="14pt" style:font-size-complex="14pt"/>
    </style:style>
    <style:style style:name="P1516" style:parent-style-name="Normal" style:family="paragraph">
      <style:text-properties style:font-name="Times New Roman" style:font-name-complex="Times New Roman" fo:font-size="14pt" style:font-size-asian="14pt" style:font-size-complex="14pt"/>
    </style:style>
    <style:style style:name="TableRow1517" style:family="table-row">
      <style:table-row-properties/>
    </style:style>
    <style:style style:name="TableCell151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519" style:parent-style-name="Normal" style:family="paragraph">
      <style:text-properties style:font-name="Times New Roman" style:font-name-complex="Times New Roman" fo:font-size="14pt" style:font-size-asian="14pt" style:font-size-complex="14pt"/>
    </style:style>
    <style:style style:name="P1520" style:parent-style-name="Normal" style:family="paragraph">
      <style:text-properties style:font-name="Times New Roman" style:font-name-complex="Times New Roman" fo:font-size="14pt" style:font-size-asian="14pt" style:font-size-complex="14pt"/>
    </style:style>
    <style:style style:name="P1521" style:parent-style-name="Normal" style:family="paragraph">
      <style:text-properties style:font-name="Times New Roman" style:font-name-complex="Times New Roman" fo:font-size="14pt" style:font-size-asian="14pt" style:font-size-complex="14pt"/>
    </style:style>
    <style:style style:name="P1522" style:parent-style-name="Normal" style:family="paragraph">
      <style:text-properties style:font-name="Times New Roman" style:font-name-complex="Times New Roman" fo:font-size="14pt" style:font-size-asian="14pt" style:font-size-complex="14pt"/>
    </style:style>
    <style:style style:name="P1523" style:parent-style-name="Normal" style:family="paragraph">
      <style:text-properties style:font-name="Times New Roman" style:font-name-complex="Times New Roman" fo:font-size="14pt" style:font-size-asian="14pt" style:font-size-complex="14pt"/>
    </style:style>
    <style:style style:name="P1524" style:parent-style-name="Normal" style:family="paragraph">
      <style:text-properties style:font-name="Times New Roman" style:font-name-complex="Times New Roman" fo:font-size="14pt" style:font-size-asian="14pt" style:font-size-complex="14pt"/>
    </style:style>
    <style:style style:name="P1525" style:parent-style-name="Normal" style:family="paragraph">
      <style:text-properties style:font-name="Times New Roman" style:font-name-complex="Times New Roman" fo:font-size="14pt" style:font-size-asian="14pt" style:font-size-complex="14pt"/>
    </style:style>
    <style:style style:name="P1526" style:parent-style-name="Normal" style:family="paragraph">
      <style:text-properties style:font-name="Times New Roman" style:font-name-complex="Times New Roman" fo:font-size="14pt" style:font-size-asian="14pt" style:font-size-complex="14pt"/>
    </style:style>
    <style:style style:name="P1527" style:parent-style-name="Normal" style:family="paragraph">
      <style:text-properties style:font-name="Times New Roman" style:font-name-complex="Times New Roman" fo:font-size="14pt" style:font-size-asian="14pt" style:font-size-complex="14pt"/>
    </style:style>
    <style:style style:name="TableCell152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529" style:parent-style-name="Normal" style:family="paragraph">
      <style:text-properties style:font-name="Times New Roman" style:font-name-complex="Times New Roman" fo:font-size="14pt" style:font-size-asian="14pt" style:font-size-complex="14pt"/>
    </style:style>
    <style:style style:name="P1530" style:parent-style-name="Normal" style:family="paragraph">
      <style:text-properties style:font-name="Times New Roman" style:font-name-complex="Times New Roman" fo:font-size="14pt" style:font-size-asian="14pt" style:font-size-complex="14pt"/>
    </style:style>
    <style:style style:name="P1531" style:parent-style-name="Normal" style:family="paragraph">
      <style:text-properties style:font-name="Times New Roman" style:font-name-complex="Times New Roman" fo:font-size="14pt" style:font-size-asian="14pt" style:font-size-complex="14pt"/>
    </style:style>
    <style:style style:name="P1532" style:parent-style-name="Normal" style:family="paragraph">
      <style:text-properties style:font-name="Times New Roman" style:font-name-complex="Times New Roman" fo:font-size="14pt" style:font-size-asian="14pt" style:font-size-complex="14pt"/>
    </style:style>
    <style:style style:name="P1533" style:parent-style-name="Normal" style:family="paragraph">
      <style:text-properties style:font-name="Times New Roman" style:font-name-complex="Times New Roman" fo:font-size="14pt" style:font-size-asian="14pt" style:font-size-complex="14pt"/>
    </style:style>
    <style:style style:name="P1534" style:parent-style-name="Normal" style:family="paragraph">
      <style:text-properties style:font-name="Times New Roman" style:font-name-complex="Times New Roman" fo:font-size="14pt" style:font-size-asian="14pt" style:font-size-complex="14pt"/>
    </style:style>
    <style:style style:name="P1535" style:parent-style-name="Normal" style:family="paragraph">
      <style:text-properties style:font-name="Times New Roman" style:font-name-complex="Times New Roman" fo:font-size="14pt" style:font-size-asian="14pt" style:font-size-complex="14pt"/>
    </style:style>
    <style:style style:name="P1536" style:parent-style-name="Normal" style:family="paragraph">
      <style:text-properties style:font-name="Times New Roman" style:font-name-complex="Times New Roman" fo:font-size="14pt" style:font-size-asian="14pt" style:font-size-complex="14pt"/>
    </style:style>
    <style:style style:name="P1537" style:parent-style-name="Normal" style:family="paragraph">
      <style:text-properties style:font-name="Times New Roman" style:font-name-complex="Times New Roman" fo:font-size="14pt" style:font-size-asian="14pt" style:font-size-complex="14pt"/>
    </style:style>
    <style:style style:name="P1538" style:parent-style-name="Normal" style:family="paragraph">
      <style:text-properties style:font-name="Times New Roman" style:font-name-complex="Times New Roman" fo:font-size="14pt" style:font-size-asian="14pt" style:font-size-complex="14pt"/>
    </style:style>
    <style:style style:name="P1539" style:parent-style-name="Normal" style:family="paragraph">
      <style:text-properties style:font-name="Times New Roman" style:font-name-complex="Times New Roman" fo:font-size="14pt" style:font-size-asian="14pt" style:font-size-complex="14pt"/>
    </style:style>
    <style:style style:name="T15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41" style:parent-style-name="DefaultParagraphFont" style:family="text">
      <style:text-properties style:font-name="Times New Roman" style:font-name-complex="Times New Roman" fo:font-size="14pt" style:font-size-asian="14pt" style:font-size-complex="14pt"/>
    </style:style>
    <style:style style:name="T15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43" style:parent-style-name="Normal" style:family="paragraph">
      <style:text-properties style:font-name="Times New Roman" style:font-name-complex="Times New Roman" fo:font-size="14pt" style:font-size-asian="14pt" style:font-size-complex="14pt"/>
    </style:style>
    <style:style style:name="P1544" style:parent-style-name="Normal" style:family="paragraph">
      <style:text-properties style:font-name="Times New Roman" style:font-name-complex="Times New Roman" fo:font-size="14pt" style:font-size-asian="14pt" style:font-size-complex="14pt"/>
    </style:style>
    <style:style style:name="P1545" style:parent-style-name="Normal" style:family="paragraph">
      <style:text-properties style:font-name="Times New Roman" style:font-name-complex="Times New Roman" fo:font-size="14pt" style:font-size-asian="14pt" style:font-size-complex="14pt"/>
    </style:style>
    <style:style style:name="T15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48" style:parent-style-name="Normal" style:family="paragraph">
      <style:text-properties style:font-name="Times New Roman" style:font-name-complex="Times New Roman" fo:font-size="14pt" style:font-size-asian="14pt" style:font-size-complex="14pt"/>
    </style:style>
    <style:style style:name="T1549" style:parent-style-name="DefaultParagraphFont" style:family="text">
      <style:text-properties style:font-name="Times New Roman" style:font-name-complex="Times New Roman" fo:font-size="14pt" style:font-size-asian="14pt" style:font-size-complex="14pt"/>
    </style:style>
    <style:style style:name="P1550" style:parent-style-name="Normal" style:family="paragraph">
      <style:text-properties style:font-name="Times New Roman" style:font-name-complex="Times New Roman" fo:font-size="14pt" style:font-size-asian="14pt" style:font-size-complex="14pt"/>
    </style:style>
    <style:style style:name="TableColumn1552" style:family="table-column">
      <style:table-column-properties style:column-width="2.0833in"/>
    </style:style>
    <style:style style:name="TableColumn1553" style:family="table-column">
      <style:table-column-properties style:column-width="2.0833in"/>
    </style:style>
    <style:style style:name="TableColumn1554" style:family="table-column">
      <style:table-column-properties style:column-width="2.0833in"/>
    </style:style>
    <style:style style:name="Table1551" style:family="table">
      <style:table-properties style:width="6.25in" fo:margin-left="0in" table:align="left"/>
    </style:style>
    <style:style style:name="TableRow1555" style:family="table-row">
      <style:table-row-properties/>
    </style:style>
    <style:style style:name="TableCell155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557" style:parent-style-name="Normal" style:family="paragraph">
      <style:text-properties style:font-name="Times New Roman" style:font-name-complex="Times New Roman" fo:font-size="14pt" style:font-size-asian="14pt" style:font-size-complex="14pt"/>
    </style:style>
    <style:style style:name="TableCell155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559" style:parent-style-name="Normal" style:family="paragraph">
      <style:text-properties style:font-name="Times New Roman" style:font-name-complex="Times New Roman" fo:font-size="14pt" style:font-size-asian="14pt" style:font-size-complex="14pt"/>
    </style:style>
    <style:style style:name="TableCell156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561" style:parent-style-name="Normal" style:family="paragraph">
      <style:text-properties style:font-name="Times New Roman" style:font-name-complex="Times New Roman" fo:font-size="14pt" style:font-size-asian="14pt" style:font-size-complex="14pt"/>
    </style:style>
    <style:style style:name="P1562" style:parent-style-name="Normal" style:family="paragraph">
      <style:text-properties style:font-name="Times New Roman" style:font-name-complex="Times New Roman" fo:font-size="14pt" style:font-size-asian="14pt" style:font-size-complex="14pt"/>
    </style:style>
    <style:style style:name="P1563" style:parent-style-name="Normal" style:family="paragraph">
      <style:text-properties style:font-name="Times New Roman" style:font-name-complex="Times New Roman" fo:font-size="14pt" style:font-size-asian="14pt" style:font-size-complex="14pt"/>
    </style:style>
    <style:style style:name="P1564" style:parent-style-name="Normal" style:family="paragraph">
      <style:text-properties style:font-name="Times New Roman" style:font-name-complex="Times New Roman" fo:font-size="14pt" style:font-size-asian="14pt" style:font-size-complex="14pt"/>
    </style:style>
    <style:style style:name="T15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66" style:parent-style-name="DefaultParagraphFont" style:family="text">
      <style:text-properties style:font-name="Times New Roman" style:font-name-complex="Times New Roman" fo:font-size="14pt" style:font-size-asian="14pt" style:font-size-complex="14pt"/>
    </style:style>
    <style:style style:name="T15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69" style:parent-style-name="Normal" style:family="paragraph">
      <style:text-properties style:font-name="Times New Roman" style:font-name-complex="Times New Roman" fo:font-size="14pt" style:font-size-asian="14pt" style:font-size-complex="14pt"/>
    </style:style>
    <style:style style:name="P1570" style:parent-style-name="Normal" style:family="paragraph">
      <style:text-properties style:font-name="Times New Roman" style:font-name-complex="Times New Roman" fo:font-size="14pt" style:font-size-asian="14pt" style:font-size-complex="14pt"/>
    </style:style>
    <style:style style:name="P1571" style:parent-style-name="Normal" style:family="paragraph">
      <style:text-properties style:font-name="Times New Roman" style:font-name-complex="Times New Roman" fo:font-size="14pt" style:font-size-asian="14pt" style:font-size-complex="14pt"/>
    </style:style>
    <style:style style:name="T15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73" style:parent-style-name="DefaultParagraphFont" style:family="text">
      <style:text-properties style:font-name="Times New Roman" style:font-name-complex="Times New Roman" fo:font-size="14pt" style:font-size-asian="14pt" style:font-size-complex="14pt"/>
    </style:style>
    <style:style style:name="T15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75" style:parent-style-name="Normal" style:family="paragraph">
      <style:text-properties style:font-name="Times New Roman" style:font-name-complex="Times New Roman" fo:font-size="14pt" style:font-size-asian="14pt" style:font-size-complex="14pt"/>
    </style:style>
    <style:style style:name="T15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78" style:parent-style-name="Normal" style:family="paragraph">
      <style:text-properties style:font-name="Times New Roman" style:font-name-complex="Times New Roman" fo:font-size="14pt" style:font-size-asian="14pt" style:font-size-complex="14pt"/>
    </style:style>
    <style:style style:name="P1579" style:parent-style-name="Normal" style:family="paragraph">
      <style:text-properties style:font-name="Times New Roman" style:font-name-complex="Times New Roman" fo:font-size="14pt" style:font-size-asian="14pt" style:font-size-complex="14pt"/>
    </style:style>
    <style:style style:name="P1580" style:parent-style-name="Normal" style:family="paragraph">
      <style:text-properties style:font-name="Times New Roman" style:font-name-complex="Times New Roman" fo:font-size="14pt" style:font-size-asian="14pt" style:font-size-complex="14pt"/>
    </style:style>
    <style:style style:name="T15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82" style:parent-style-name="DefaultParagraphFont" style:family="text">
      <style:text-properties style:font-name="Times New Roman" style:font-name-complex="Times New Roman" fo:font-size="14pt" style:font-size-asian="14pt" style:font-size-complex="14pt"/>
    </style:style>
    <style:style style:name="T15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84" style:parent-style-name="DefaultParagraphFont" style:family="text">
      <style:text-properties style:font-name="Times New Roman" style:font-name-complex="Times New Roman" fo:font-size="14pt" style:font-size-asian="14pt" style:font-size-complex="14pt"/>
    </style:style>
    <style:style style:name="T1585" style:parent-style-name="DefaultParagraphFont" style:family="text">
      <style:text-properties style:font-name="Times New Roman" style:font-name-complex="Times New Roman" fo:font-size="14pt" style:font-size-asian="14pt" style:font-size-complex="14pt"/>
    </style:style>
    <style:style style:name="T15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87" style:parent-style-name="DefaultParagraphFont" style:family="text">
      <style:text-properties style:font-name="Times New Roman" style:font-name-complex="Times New Roman" fo:font-size="14pt" style:font-size-asian="14pt" style:font-size-complex="14pt"/>
    </style:style>
    <style:style style:name="T158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589" style:parent-style-name="DefaultParagraphFont" style:family="text">
      <style:text-properties style:font-name="Times New Roman" style:font-name-complex="Times New Roman" fo:font-size="14pt" style:font-size-asian="14pt" style:font-size-complex="14pt"/>
    </style:style>
    <style:style style:name="T1590" style:parent-style-name="DefaultParagraphFont" style:family="text">
      <style:text-properties style:font-name="Times New Roman" style:font-name-complex="Times New Roman" fo:font-size="14pt" style:font-size-asian="14pt" style:font-size-complex="14pt"/>
    </style:style>
    <style:style style:name="T1591" style:parent-style-name="DefaultParagraphFont" style:family="text">
      <style:text-properties style:font-name="Times New Roman" style:font-name-complex="Times New Roman" fo:font-size="14pt" style:font-size-asian="14pt" style:font-size-complex="14pt"/>
    </style:style>
    <style:style style:name="T1592" style:parent-style-name="Hyperlink" style:family="text">
      <style:text-properties style:font-name="Times New Roman" style:font-name-complex="Times New Roman" fo:font-size="14pt" style:font-size-asian="14pt" style:font-size-complex="14pt"/>
    </style:style>
    <style:style style:name="T15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95" style:parent-style-name="Normal" style:family="paragraph">
      <style:text-properties style:font-name="Times New Roman" style:font-name-complex="Times New Roman" fo:font-size="14pt" style:font-size-asian="14pt" style:font-size-complex="14pt"/>
    </style:style>
    <style:style style:name="P1596" style:parent-style-name="Normal" style:family="paragraph">
      <style:text-properties style:font-name="Times New Roman" style:font-name-complex="Times New Roman" fo:font-size="14pt" style:font-size-asian="14pt" style:font-size-complex="14pt"/>
    </style:style>
    <style:style style:name="P1597" style:parent-style-name="Normal" style:family="paragraph">
      <style:text-properties style:font-name="Times New Roman" style:font-name-complex="Times New Roman" fo:font-size="14pt" style:font-size-asian="14pt" style:font-size-complex="14pt"/>
    </style:style>
    <style:style style:name="T15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99" style:parent-style-name="DefaultParagraphFont" style:family="text">
      <style:text-properties style:font-name="Times New Roman" style:font-name-complex="Times New Roman" fo:font-size="14pt" style:font-size-asian="14pt" style:font-size-complex="14pt"/>
    </style:style>
    <style:style style:name="T16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01" style:parent-style-name="Normal" style:family="paragraph">
      <style:text-properties style:font-name="Times New Roman" style:font-name-complex="Times New Roman" fo:font-size="14pt" style:font-size-asian="14pt" style:font-size-complex="14pt"/>
    </style:style>
    <style:style style:name="P1602" style:parent-style-name="Normal" style:family="paragraph">
      <style:text-properties style:font-name="Times New Roman" style:font-name-complex="Times New Roman" fo:font-size="14pt" style:font-size-asian="14pt" style:font-size-complex="14pt"/>
    </style:style>
    <style:style style:name="P1603" style:parent-style-name="Normal" style:family="paragraph">
      <style:text-properties style:font-name="Times New Roman" style:font-name-complex="Times New Roman" fo:font-size="14pt" style:font-size-asian="14pt" style:font-size-complex="14pt"/>
    </style:style>
    <style:style style:name="T16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06" style:parent-style-name="Normal" style:family="paragraph">
      <style:text-properties style:font-name="Times New Roman" style:font-name-complex="Times New Roman" fo:font-size="14pt" style:font-size-asian="14pt" style:font-size-complex="14pt"/>
    </style:style>
    <style:style style:name="P1607" style:parent-style-name="Normal" style:family="paragraph">
      <style:text-properties style:font-name="Times New Roman" style:font-name-complex="Times New Roman" fo:font-size="14pt" style:font-size-asian="14pt" style:font-size-complex="14pt"/>
    </style:style>
    <style:style style:name="P1608" style:parent-style-name="Normal" style:family="paragraph">
      <style:text-properties style:font-name="Times New Roman" style:font-name-complex="Times New Roman" fo:font-size="14pt" style:font-size-asian="14pt" style:font-size-complex="14pt"/>
    </style:style>
    <style:style style:name="T16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10" style:parent-style-name="DefaultParagraphFont" style:family="text">
      <style:text-properties style:font-name="Times New Roman" style:font-name-complex="Times New Roman" fo:font-size="14pt" style:font-size-asian="14pt" style:font-size-complex="14pt"/>
    </style:style>
    <style:style style:name="T16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12" style:parent-style-name="Normal" style:family="paragraph">
      <style:text-properties style:font-name="Times New Roman" style:font-name-complex="Times New Roman" fo:font-size="14pt" style:font-size-asian="14pt" style:font-size-complex="14pt"/>
    </style:style>
    <style:style style:name="P1613" style:parent-style-name="Normal" style:family="paragraph">
      <style:text-properties style:font-name="Times New Roman" style:font-name-complex="Times New Roman" fo:font-size="14pt" style:font-size-asian="14pt" style:font-size-complex="14pt"/>
    </style:style>
    <style:style style:name="T16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16" style:parent-style-name="Normal" style:family="paragraph">
      <style:text-properties style:font-name="Times New Roman" style:font-name-complex="Times New Roman" fo:font-size="14pt" style:font-size-asian="14pt" style:font-size-complex="14pt"/>
    </style:style>
    <style:style style:name="P1617" style:parent-style-name="Normal" style:family="paragraph">
      <style:text-properties style:font-name="Times New Roman" style:font-name-complex="Times New Roman" fo:font-size="14pt" style:font-size-asian="14pt" style:font-size-complex="14pt"/>
    </style:style>
    <style:style style:name="P1618" style:parent-style-name="Normal" style:family="paragraph">
      <style:text-properties style:font-name="Times New Roman" style:font-name-complex="Times New Roman" fo:font-size="14pt" style:font-size-asian="14pt" style:font-size-complex="14pt"/>
    </style:style>
    <style:style style:name="T16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20" style:parent-style-name="DefaultParagraphFont" style:family="text">
      <style:text-properties style:font-name="Times New Roman" style:font-name-complex="Times New Roman" fo:font-size="14pt" style:font-size-asian="14pt" style:font-size-complex="14pt"/>
    </style:style>
    <style:style style:name="T16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22" style:parent-style-name="Normal" style:family="paragraph">
      <style:text-properties style:font-name="Times New Roman" style:font-name-complex="Times New Roman" fo:font-size="14pt" style:font-size-asian="14pt" style:font-size-complex="14pt"/>
    </style:style>
    <style:style style:name="P1623" style:parent-style-name="Normal" style:family="paragraph">
      <style:text-properties style:font-name="Times New Roman" style:font-name-complex="Times New Roman" fo:font-size="14pt" style:font-size-asian="14pt" style:font-size-complex="14pt"/>
    </style:style>
    <style:style style:name="P1624" style:parent-style-name="Normal" style:family="paragraph">
      <style:text-properties style:font-name="Times New Roman" style:font-name-complex="Times New Roman" fo:font-size="14pt" style:font-size-asian="14pt" style:font-size-complex="14pt"/>
    </style:style>
    <style:style style:name="T16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27" style:parent-style-name="Normal" style:family="paragraph">
      <style:text-properties style:font-name="Times New Roman" style:font-name-complex="Times New Roman" fo:font-size="14pt" style:font-size-asian="14pt" style:font-size-complex="14pt"/>
    </style:style>
    <style:style style:name="P1628" style:parent-style-name="Normal" style:family="paragraph">
      <style:text-properties style:font-name="Times New Roman" style:font-name-complex="Times New Roman" fo:font-size="14pt" style:font-size-asian="14pt" style:font-size-complex="14pt"/>
    </style:style>
    <style:style style:name="TableColumn1630" style:family="table-column">
      <style:table-column-properties style:column-width="3.7423in"/>
    </style:style>
    <style:style style:name="TableColumn1631" style:family="table-column">
      <style:table-column-properties style:column-width="2.7465in"/>
    </style:style>
    <style:style style:name="Table1629" style:family="table">
      <style:table-properties style:width="6.4888in" fo:margin-left="0in" table:align="left"/>
    </style:style>
    <style:style style:name="TableRow1632" style:family="table-row">
      <style:table-row-properties/>
    </style:style>
    <style:style style:name="TableCell163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634" style:parent-style-name="Normal" style:family="paragraph">
      <style:text-properties style:font-name="Times New Roman" style:font-name-complex="Times New Roman" fo:font-size="14pt" style:font-size-asian="14pt" style:font-size-complex="14pt"/>
    </style:style>
    <style:style style:name="P1635" style:parent-style-name="Normal" style:family="paragraph">
      <style:text-properties style:font-name="Times New Roman" style:font-name-complex="Times New Roman" fo:font-size="14pt" style:font-size-asian="14pt" style:font-size-complex="14pt"/>
    </style:style>
    <style:style style:name="TableCell163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637" style:parent-style-name="Normal" style:family="paragraph">
      <style:text-properties style:font-name="Times New Roman" style:font-name-complex="Times New Roman" fo:font-size="14pt" style:font-size-asian="14pt" style:font-size-complex="14pt"/>
    </style:style>
    <style:style style:name="P1638" style:parent-style-name="Normal" style:family="paragraph">
      <style:text-properties style:font-name="Times New Roman" style:font-name-complex="Times New Roman" fo:font-size="14pt" style:font-size-asian="14pt" style:font-size-complex="14pt"/>
    </style:style>
    <style:style style:name="TableRow1639" style:family="table-row">
      <style:table-row-properties/>
    </style:style>
    <style:style style:name="TableCell164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641" style:parent-style-name="Normal" style:family="paragraph">
      <style:text-properties style:font-name="Times New Roman" style:font-name-complex="Times New Roman" fo:font-size="14pt" style:font-size-asian="14pt" style:font-size-complex="14pt"/>
    </style:style>
    <style:style style:name="P1642" style:parent-style-name="Normal" style:family="paragraph">
      <style:text-properties style:font-name="Times New Roman" style:font-name-complex="Times New Roman" fo:font-size="14pt" style:font-size-asian="14pt" style:font-size-complex="14pt"/>
    </style:style>
    <style:style style:name="TableCell164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644" style:parent-style-name="Normal" style:family="paragraph">
      <style:text-properties style:font-name="Times New Roman" style:font-name-complex="Times New Roman" fo:font-size="14pt" style:font-size-asian="14pt" style:font-size-complex="14pt"/>
    </style:style>
    <style:style style:name="P1645" style:parent-style-name="Normal" style:family="paragraph">
      <style:text-properties style:font-name="Times New Roman" style:font-name-complex="Times New Roman" fo:font-size="14pt" style:font-size-asian="14pt" style:font-size-complex="14pt"/>
    </style:style>
    <style:style style:name="P1646" style:parent-style-name="Normal" style:family="paragraph">
      <style:text-properties style:font-name="Times New Roman" style:font-name-complex="Times New Roman" fo:font-size="14pt" style:font-size-asian="14pt" style:font-size-complex="14pt"/>
    </style:style>
    <style:style style:name="P1647" style:parent-style-name="Normal" style:family="paragraph">
      <style:text-properties style:font-name="Times New Roman" style:font-name-complex="Times New Roman" fo:font-size="14pt" style:font-size-asian="14pt" style:font-size-complex="14pt"/>
    </style:style>
    <style:style style:name="T16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49" style:parent-style-name="DefaultParagraphFont" style:family="text">
      <style:text-properties style:font-name="Times New Roman" style:font-name-complex="Times New Roman" fo:font-size="14pt" style:font-size-asian="14pt" style:font-size-complex="14pt"/>
    </style:style>
    <style:style style:name="T16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51" style:parent-style-name="Normal" style:family="paragraph">
      <style:text-properties style:font-name="Times New Roman" style:font-name-complex="Times New Roman" fo:font-size="14pt" style:font-size-asian="14pt" style:font-size-complex="14pt"/>
    </style:style>
    <style:style style:name="T1652" style:parent-style-name="DefaultParagraphFont" style:family="text">
      <style:text-properties style:font-name="Times New Roman" style:font-name-complex="Times New Roman" fo:font-size="14pt" style:font-size-asian="14pt" style:font-size-complex="14pt"/>
    </style:style>
    <style:style style:name="T1653" style:parent-style-name="DefaultParagraphFont" style:family="text">
      <style:text-properties style:font-name="Times New Roman" style:font-name-complex="Times New Roman" fo:font-size="14pt" style:font-size-asian="14pt" style:font-size-complex="14pt"/>
    </style:style>
    <style:style style:name="T1654" style:parent-style-name="DefaultParagraphFont" style:family="text">
      <style:text-properties style:font-name="Times New Roman" style:font-name-complex="Times New Roman" fo:font-size="14pt" style:font-size-asian="14pt" style:font-size-complex="14pt"/>
    </style:style>
    <style:style style:name="T16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56" style:parent-style-name="DefaultParagraphFont" style:family="text">
      <style:text-properties style:font-name="Times New Roman" style:font-name-complex="Times New Roman" fo:font-size="14pt" style:font-size-asian="14pt" style:font-size-complex="14pt"/>
    </style:style>
    <style:style style:name="T1657" style:parent-style-name="DefaultParagraphFont" style:family="text">
      <style:text-properties style:font-name="Times New Roman" style:font-name-complex="Times New Roman" fo:font-size="14pt" style:font-size-asian="14pt" style:font-size-complex="14pt"/>
    </style:style>
    <style:style style:name="P1658" style:parent-style-name="Normal" style:family="paragraph">
      <style:text-properties style:font-name="Times New Roman" style:font-name-complex="Times New Roman" fo:font-size="14pt" style:font-size-asian="14pt" style:font-size-complex="14pt"/>
    </style:style>
    <style:style style:name="T16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61" style:parent-style-name="Normal" style:family="paragraph">
      <style:text-properties style:font-name="Times New Roman" style:font-name-complex="Times New Roman" fo:font-size="14pt" style:font-size-asian="14pt" style:font-size-complex="14pt"/>
    </style:style>
    <style:style style:name="P1662" style:parent-style-name="Normal" style:family="paragraph">
      <style:text-properties style:font-name="Times New Roman" style:font-name-complex="Times New Roman" fo:font-size="14pt" style:font-size-asian="14pt" style:font-size-complex="14pt"/>
    </style:style>
    <style:style style:name="P1663" style:parent-style-name="Normal" style:family="paragraph">
      <style:text-properties style:font-name="Times New Roman" style:font-name-complex="Times New Roman" fo:font-size="14pt" style:font-size-asian="14pt" style:font-size-complex="14pt"/>
    </style:style>
    <style:style style:name="T16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65" style:parent-style-name="DefaultParagraphFont" style:family="text">
      <style:text-properties style:font-name="Times New Roman" style:font-name-complex="Times New Roman" fo:font-size="14pt" style:font-size-asian="14pt" style:font-size-complex="14pt"/>
    </style:style>
    <style:style style:name="T16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67" style:parent-style-name="Normal" style:family="paragraph">
      <style:text-properties style:font-name="Times New Roman" style:font-name-complex="Times New Roman" fo:font-size="14pt" style:font-size-asian="14pt" style:font-size-complex="14pt"/>
    </style:style>
    <style:style style:name="P1668" style:parent-style-name="Normal" style:family="paragraph">
      <style:text-properties style:font-name="Times New Roman" style:font-name-complex="Times New Roman" fo:font-size="14pt" style:font-size-asian="14pt" style:font-size-complex="14pt"/>
    </style:style>
    <style:style style:name="T1669" style:parent-style-name="DefaultParagraphFont" style:family="text">
      <style:text-properties style:font-name="Times New Roman" style:font-name-complex="Times New Roman" fo:font-size="14pt" style:font-size-asian="14pt" style:font-size-complex="14pt"/>
    </style:style>
    <style:style style:name="T1670" style:parent-style-name="Hyperlink" style:family="text">
      <style:text-properties style:font-name="Times New Roman" style:font-name-complex="Times New Roman" fo:font-size="14pt" style:font-size-asian="14pt" style:font-size-complex="14pt"/>
    </style:style>
    <style:style style:name="T16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73" style:parent-style-name="Normal" style:family="paragraph">
      <style:text-properties style:font-name="Times New Roman" style:font-name-complex="Times New Roman" fo:font-size="14pt" style:font-size-asian="14pt" style:font-size-complex="14pt"/>
    </style:style>
    <style:style style:name="P1674" style:parent-style-name="Normal" style:family="paragraph">
      <style:text-properties style:font-name="Times New Roman" style:font-name-complex="Times New Roman" fo:font-size="14pt" style:font-size-asian="14pt" style:font-size-complex="14pt"/>
    </style:style>
    <style:style style:name="P1675" style:parent-style-name="Normal" style:family="paragraph">
      <style:text-properties style:font-name="Times New Roman" style:font-name-complex="Times New Roman" fo:font-size="14pt" style:font-size-asian="14pt" style:font-size-complex="14pt"/>
    </style:style>
    <style:style style:name="T16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77" style:parent-style-name="DefaultParagraphFont" style:family="text">
      <style:text-properties style:font-name="Times New Roman" style:font-name-complex="Times New Roman" fo:font-size="14pt" style:font-size-asian="14pt" style:font-size-complex="14pt"/>
    </style:style>
    <style:style style:name="T16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79" style:parent-style-name="Normal" style:family="paragraph">
      <style:text-properties style:font-name="Times New Roman" style:font-name-complex="Times New Roman" fo:font-size="14pt" style:font-size-asian="14pt" style:font-size-complex="14pt"/>
    </style:style>
    <style:style style:name="TableColumn1681" style:family="table-column">
      <style:table-column-properties style:column-width="0.6625in"/>
    </style:style>
    <style:style style:name="TableColumn1682" style:family="table-column">
      <style:table-column-properties style:column-width="1.2673in"/>
    </style:style>
    <style:style style:name="TableColumn1683" style:family="table-column">
      <style:table-column-properties style:column-width="3.3409in"/>
    </style:style>
    <style:style style:name="Table1680" style:family="table">
      <style:table-properties style:width="5.2708in" fo:margin-left="0in" table:align="left"/>
    </style:style>
    <style:style style:name="TableRow1684" style:family="table-row">
      <style:table-row-properties/>
    </style:style>
    <style:style style:name="TableCell168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6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168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6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168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6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Row1691" style:family="table-row">
      <style:table-row-properties/>
    </style:style>
    <style:style style:name="TableCell169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693" style:parent-style-name="Normal" style:family="paragraph">
      <style:text-properties style:font-name="Times New Roman" style:font-name-complex="Times New Roman" fo:font-size="14pt" style:font-size-asian="14pt" style:font-size-complex="14pt"/>
    </style:style>
    <style:style style:name="TableCell169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695" style:parent-style-name="Normal" style:family="paragraph">
      <style:text-properties style:font-name="Times New Roman" style:font-name-complex="Times New Roman" fo:font-size="14pt" style:font-size-asian="14pt" style:font-size-complex="14pt"/>
    </style:style>
    <style:style style:name="TableCell169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697" style:parent-style-name="Normal" style:family="paragraph">
      <style:text-properties style:font-name="Times New Roman" style:font-name-complex="Times New Roman" fo:font-size="14pt" style:font-size-asian="14pt" style:font-size-complex="14pt"/>
    </style:style>
    <style:style style:name="TableRow1698" style:family="table-row">
      <style:table-row-properties/>
    </style:style>
    <style:style style:name="TableCell169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00" style:parent-style-name="Normal" style:family="paragraph">
      <style:text-properties style:font-name="Times New Roman" style:font-name-complex="Times New Roman" fo:font-size="14pt" style:font-size-asian="14pt" style:font-size-complex="14pt"/>
    </style:style>
    <style:style style:name="TableCell170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02" style:parent-style-name="Normal" style:family="paragraph">
      <style:text-properties style:font-name="Times New Roman" style:font-name-complex="Times New Roman" fo:font-size="14pt" style:font-size-asian="14pt" style:font-size-complex="14pt"/>
    </style:style>
    <style:style style:name="TableCell170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04" style:parent-style-name="Normal" style:family="paragraph">
      <style:text-properties style:font-name="Times New Roman" style:font-name-complex="Times New Roman" fo:font-size="14pt" style:font-size-asian="14pt" style:font-size-complex="14pt"/>
    </style:style>
    <style:style style:name="TableRow1705" style:family="table-row">
      <style:table-row-properties/>
    </style:style>
    <style:style style:name="TableCell170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07" style:parent-style-name="Normal" style:family="paragraph">
      <style:text-properties style:font-name="Times New Roman" style:font-name-complex="Times New Roman" fo:font-size="14pt" style:font-size-asian="14pt" style:font-size-complex="14pt"/>
    </style:style>
    <style:style style:name="TableCell170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09" style:parent-style-name="Normal" style:family="paragraph">
      <style:text-properties style:font-name="Times New Roman" style:font-name-complex="Times New Roman" fo:font-size="14pt" style:font-size-asian="14pt" style:font-size-complex="14pt"/>
    </style:style>
    <style:style style:name="TableCell171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11" style:parent-style-name="Normal" style:family="paragraph">
      <style:text-properties style:font-name="Times New Roman" style:font-name-complex="Times New Roman" fo:font-size="14pt" style:font-size-asian="14pt" style:font-size-complex="14pt"/>
    </style:style>
    <style:style style:name="TableRow1712" style:family="table-row">
      <style:table-row-properties/>
    </style:style>
    <style:style style:name="TableCell171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14" style:parent-style-name="Normal" style:family="paragraph">
      <style:text-properties style:font-name="Times New Roman" style:font-name-complex="Times New Roman" fo:font-size="14pt" style:font-size-asian="14pt" style:font-size-complex="14pt"/>
    </style:style>
    <style:style style:name="TableCell171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16" style:parent-style-name="Normal" style:family="paragraph">
      <style:text-properties style:font-name="Times New Roman" style:font-name-complex="Times New Roman" fo:font-size="14pt" style:font-size-asian="14pt" style:font-size-complex="14pt"/>
    </style:style>
    <style:style style:name="TableCell171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18" style:parent-style-name="Normal" style:family="paragraph">
      <style:text-properties style:font-name="Times New Roman" style:font-name-complex="Times New Roman" fo:font-size="14pt" style:font-size-asian="14pt" style:font-size-complex="14pt"/>
    </style:style>
    <style:style style:name="TableRow1719" style:family="table-row">
      <style:table-row-properties/>
    </style:style>
    <style:style style:name="TableCell172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21" style:parent-style-name="Normal" style:family="paragraph">
      <style:text-properties style:font-name="Times New Roman" style:font-name-complex="Times New Roman" fo:font-size="14pt" style:font-size-asian="14pt" style:font-size-complex="14pt"/>
    </style:style>
    <style:style style:name="TableCell172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23" style:parent-style-name="Normal" style:family="paragraph">
      <style:text-properties style:font-name="Times New Roman" style:font-name-complex="Times New Roman" fo:font-size="14pt" style:font-size-asian="14pt" style:font-size-complex="14pt"/>
    </style:style>
    <style:style style:name="TableCell172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25" style:parent-style-name="Normal" style:family="paragraph">
      <style:text-properties style:font-name="Times New Roman" style:font-name-complex="Times New Roman" fo:font-size="14pt" style:font-size-asian="14pt" style:font-size-complex="14pt"/>
    </style:style>
    <style:style style:name="TableRow1726" style:family="table-row">
      <style:table-row-properties/>
    </style:style>
    <style:style style:name="TableCell172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28" style:parent-style-name="Normal" style:family="paragraph">
      <style:text-properties style:font-name="Times New Roman" style:font-name-complex="Times New Roman" fo:font-size="14pt" style:font-size-asian="14pt" style:font-size-complex="14pt"/>
    </style:style>
    <style:style style:name="TableCell172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30" style:parent-style-name="Normal" style:family="paragraph">
      <style:text-properties style:font-name="Times New Roman" style:font-name-complex="Times New Roman" fo:font-size="14pt" style:font-size-asian="14pt" style:font-size-complex="14pt"/>
    </style:style>
    <style:style style:name="TableCell173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32" style:parent-style-name="Normal" style:family="paragraph">
      <style:text-properties style:font-name="Times New Roman" style:font-name-complex="Times New Roman" fo:font-size="14pt" style:font-size-asian="14pt" style:font-size-complex="14pt"/>
    </style:style>
    <style:style style:name="TableRow1733" style:family="table-row">
      <style:table-row-properties/>
    </style:style>
    <style:style style:name="TableCell173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35" style:parent-style-name="Normal" style:family="paragraph">
      <style:text-properties style:font-name="Times New Roman" style:font-name-complex="Times New Roman" fo:font-size="14pt" style:font-size-asian="14pt" style:font-size-complex="14pt"/>
    </style:style>
    <style:style style:name="TableCell173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37" style:parent-style-name="Normal" style:family="paragraph">
      <style:text-properties style:font-name="Times New Roman" style:font-name-complex="Times New Roman" fo:font-size="14pt" style:font-size-asian="14pt" style:font-size-complex="14pt"/>
    </style:style>
    <style:style style:name="TableCell173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39" style:parent-style-name="Normal" style:family="paragraph">
      <style:text-properties style:font-name="Times New Roman" style:font-name-complex="Times New Roman" fo:font-size="14pt" style:font-size-asian="14pt" style:font-size-complex="14pt"/>
    </style:style>
    <style:style style:name="TableRow1740" style:family="table-row">
      <style:table-row-properties/>
    </style:style>
    <style:style style:name="TableCell174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42" style:parent-style-name="Normal" style:family="paragraph">
      <style:text-properties style:font-name="Times New Roman" style:font-name-complex="Times New Roman" fo:font-size="14pt" style:font-size-asian="14pt" style:font-size-complex="14pt"/>
    </style:style>
    <style:style style:name="TableCell174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44" style:parent-style-name="Normal" style:family="paragraph">
      <style:text-properties style:font-name="Times New Roman" style:font-name-complex="Times New Roman" fo:font-size="14pt" style:font-size-asian="14pt" style:font-size-complex="14pt"/>
    </style:style>
    <style:style style:name="TableCell174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746" style:parent-style-name="Normal" style:family="paragraph">
      <style:text-properties style:font-name="Times New Roman" style:font-name-complex="Times New Roman" fo:font-size="14pt" style:font-size-asian="14pt" style:font-size-complex="14pt"/>
    </style:style>
    <style:style style:name="T17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49" style:parent-style-name="Normal" style:family="paragraph">
      <style:text-properties style:font-name="Times New Roman" style:font-name-complex="Times New Roman" fo:font-size="14pt" style:font-size-asian="14pt" style:font-size-complex="14pt"/>
    </style:style>
    <style:style style:name="T1750" style:parent-style-name="DefaultParagraphFont" style:family="text">
      <style:text-properties style:font-name="Times New Roman" style:font-name-complex="Times New Roman" fo:font-size="14pt" style:font-size-asian="14pt" style:font-size-complex="14pt"/>
    </style:style>
    <style:style style:name="P1751" style:parent-style-name="Normal" style:family="paragraph">
      <style:text-properties style:font-name="Times New Roman" style:font-name-complex="Times New Roman" fo:font-size="14pt" style:font-size-asian="14pt" style:font-size-complex="14pt"/>
    </style:style>
    <style:style style:name="T17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54" style:parent-style-name="DefaultParagraphFont" style:family="text">
      <style:text-properties style:font-name="Times New Roman" style:font-name-complex="Times New Roman" fo:font-size="14pt" style:font-size-asian="14pt" style:font-size-complex="14pt"/>
    </style:style>
    <style:style style:name="T1755" style:parent-style-name="DefaultParagraphFont" style:family="text">
      <style:text-properties style:font-name="Times New Roman" style:font-name-complex="Times New Roman" fo:font-size="14pt" style:font-size-asian="14pt" style:font-size-complex="14pt"/>
    </style:style>
    <style:style style:name="T17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57" style:parent-style-name="DefaultParagraphFont" style:family="text">
      <style:text-properties style:font-name="Times New Roman" style:font-name-complex="Times New Roman" fo:font-size="14pt" style:font-size-asian="14pt" style:font-size-complex="14pt"/>
    </style:style>
    <style:style style:name="T1758" style:parent-style-name="DefaultParagraphFont" style:family="text">
      <style:text-properties style:font-name="Times New Roman" style:font-name-complex="Times New Roman" fo:font-size="14pt" style:font-size-asian="14pt" style:font-size-complex="14pt"/>
    </style:style>
    <style:style style:name="T17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60" style:parent-style-name="Normal" style:family="paragraph">
      <style:text-properties style:font-name="Times New Roman" style:font-name-complex="Times New Roman" fo:font-size="14pt" style:font-size-asian="14pt" style:font-size-complex="14pt"/>
    </style:style>
    <style:style style:name="P1761" style:parent-style-name="Normal" style:family="paragraph">
      <style:text-properties style:font-name="Times New Roman" style:font-name-complex="Times New Roman" fo:font-size="14pt" style:font-size-asian="14pt" style:font-size-complex="14pt"/>
    </style:style>
    <style:style style:name="P1762" style:parent-style-name="Normal" style:family="paragraph">
      <style:text-properties style:font-name="Times New Roman" style:font-name-complex="Times New Roman" fo:font-size="14pt" style:font-size-asian="14pt" style:font-size-complex="14pt"/>
    </style:style>
    <style:style style:name="T17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65" style:parent-style-name="Normal" style:family="paragraph">
      <style:text-properties style:font-name="Times New Roman" style:font-name-complex="Times New Roman" fo:font-size="14pt" style:font-size-asian="14pt" style:font-size-complex="14pt"/>
    </style:style>
    <style:style style:name="P1766" style:parent-style-name="Normal" style:family="paragraph">
      <style:text-properties style:font-name="Times New Roman" style:font-name-complex="Times New Roman" fo:font-size="14pt" style:font-size-asian="14pt" style:font-size-complex="14pt"/>
    </style:style>
    <style:style style:name="P1767" style:parent-style-name="Normal" style:family="paragraph">
      <style:text-properties style:font-name="Times New Roman" style:font-name-complex="Times New Roman" fo:font-size="14pt" style:font-size-asian="14pt" style:font-size-complex="14pt"/>
    </style:style>
    <style:style style:name="T17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69" style:parent-style-name="DefaultParagraphFont" style:family="text">
      <style:text-properties style:font-name="Times New Roman" style:font-name-complex="Times New Roman" fo:font-size="14pt" style:font-size-asian="14pt" style:font-size-complex="14pt"/>
    </style:style>
    <style:style style:name="T17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72" style:parent-style-name="Normal" style:family="paragraph">
      <style:text-properties style:font-name="Times New Roman" style:font-name-complex="Times New Roman" fo:font-size="14pt" style:font-size-asian="14pt" style:font-size-complex="14pt"/>
    </style:style>
    <style:style style:name="P1773" style:parent-style-name="Normal" style:family="paragraph">
      <style:text-properties style:font-name="Times New Roman" style:font-name-complex="Times New Roman" fo:font-size="14pt" style:font-size-asian="14pt" style:font-size-complex="14pt"/>
    </style:style>
    <style:style style:name="P1774" style:parent-style-name="Normal" style:family="paragraph">
      <style:text-properties style:font-name="Times New Roman" style:font-name-complex="Times New Roman" fo:font-size="14pt" style:font-size-asian="14pt" style:font-size-complex="14pt"/>
    </style:style>
    <style:style style:name="T17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76" style:parent-style-name="DefaultParagraphFont" style:family="text">
      <style:text-properties style:font-name="Times New Roman" style:font-name-complex="Times New Roman" fo:font-size="14pt" style:font-size-asian="14pt" style:font-size-complex="14pt"/>
    </style:style>
    <style:style style:name="T17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78" style:parent-style-name="Normal" style:family="paragraph">
      <style:text-properties style:font-name="Times New Roman" style:font-name-complex="Times New Roman" fo:font-size="14pt" style:font-size-asian="14pt" style:font-size-complex="14pt"/>
    </style:style>
    <style:style style:name="T17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81" style:parent-style-name="Normal" style:family="paragraph">
      <style:text-properties style:font-name="Times New Roman" style:font-name-complex="Times New Roman" fo:font-size="14pt" style:font-size-asian="14pt" style:font-size-complex="14pt"/>
    </style:style>
    <style:style style:name="T1782" style:parent-style-name="DefaultParagraphFont" style:family="text">
      <style:text-properties style:font-name="Times New Roman" style:font-name-complex="Times New Roman" fo:font-size="14pt" style:font-size-asian="14pt" style:font-size-complex="14pt"/>
    </style:style>
    <style:style style:name="P1783" style:parent-style-name="Normal" style:family="paragraph">
      <style:text-properties style:font-name="Times New Roman" style:font-name-complex="Times New Roman" fo:font-size="14pt" style:font-size-asian="14pt" style:font-size-complex="14pt"/>
    </style:style>
    <style:style style:name="T17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85" style:parent-style-name="Normal" style:family="paragraph">
      <style:text-properties style:font-name="Times New Roman" style:font-name-complex="Times New Roman" fo:font-size="14pt" style:font-size-asian="14pt" style:font-size-complex="14pt"/>
    </style:style>
    <style:style style:name="T17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87" style:parent-style-name="DefaultParagraphFont" style:family="text">
      <style:text-properties style:font-name="Times New Roman" style:font-name-complex="Times New Roman" fo:font-size="14pt" style:font-size-asian="14pt" style:font-size-complex="14pt"/>
    </style:style>
    <style:style style:name="T178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789" style:parent-style-name="DefaultParagraphFont" style:family="text">
      <style:text-properties style:font-name="Times New Roman" style:font-name-complex="Times New Roman" fo:font-size="14pt" style:font-size-asian="14pt" style:font-size-complex="14pt"/>
    </style:style>
    <style:style style:name="T1790" style:parent-style-name="DefaultParagraphFont" style:family="text">
      <style:text-properties style:font-name="Times New Roman" style:font-name-complex="Times New Roman" fo:font-size="14pt" style:font-size-asian="14pt" style:font-size-complex="14pt"/>
    </style:style>
    <style:style style:name="T17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92" style:parent-style-name="DefaultParagraphFont" style:family="text">
      <style:text-properties style:font-name="Times New Roman" style:font-name-complex="Times New Roman" fo:font-size="14pt" style:font-size-asian="14pt" style:font-size-complex="14pt"/>
    </style:style>
    <style:style style:name="T179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794" style:parent-style-name="DefaultParagraphFont" style:family="text">
      <style:text-properties style:font-name="Times New Roman" style:font-name-complex="Times New Roman" fo:font-size="14pt" style:font-size-asian="14pt" style:font-size-complex="14pt"/>
    </style:style>
    <style:style style:name="T1795" style:parent-style-name="DefaultParagraphFont" style:family="text">
      <style:text-properties style:font-name="Times New Roman" style:font-name-complex="Times New Roman" fo:font-size="14pt" style:font-size-asian="14pt" style:font-size-complex="14pt"/>
    </style:style>
    <style:style style:name="T17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98" style:parent-style-name="Normal" style:family="paragraph">
      <style:text-properties style:font-name="Times New Roman" style:font-name-complex="Times New Roman" fo:font-size="14pt" style:font-size-asian="14pt" style:font-size-complex="14pt"/>
    </style:style>
    <style:style style:name="P1799" style:parent-style-name="Normal" style:family="paragraph">
      <style:text-properties style:font-name="Times New Roman" style:font-name-complex="Times New Roman" fo:font-size="14pt" style:font-size-asian="14pt" style:font-size-complex="14pt"/>
    </style:style>
    <style:style style:name="P1800" style:parent-style-name="Normal" style:family="paragraph">
      <style:text-properties style:font-name="Times New Roman" style:font-name-complex="Times New Roman" fo:font-size="14pt" style:font-size-asian="14pt" style:font-size-complex="14pt"/>
    </style:style>
    <style:style style:name="T18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02" style:parent-style-name="DefaultParagraphFont" style:family="text">
      <style:text-properties style:font-name="Times New Roman" style:font-name-complex="Times New Roman" fo:font-size="14pt" style:font-size-asian="14pt" style:font-size-complex="14pt"/>
    </style:style>
    <style:style style:name="T18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04" style:parent-style-name="Normal" style:family="paragraph">
      <style:text-properties style:font-name="Times New Roman" style:font-name-complex="Times New Roman" fo:font-size="14pt" style:font-size-asian="14pt" style:font-size-complex="14pt"/>
    </style:style>
    <style:style style:name="T1805" style:parent-style-name="DefaultParagraphFont" style:family="text">
      <style:text-properties style:font-name="Times New Roman" style:font-name-complex="Times New Roman" fo:font-size="14pt" style:font-size-asian="14pt" style:font-size-complex="14pt"/>
    </style:style>
    <style:style style:name="T1806" style:parent-style-name="Hyperlink" style:family="text">
      <style:text-properties style:font-name="Times New Roman" style:font-name-complex="Times New Roman" fo:font-size="14pt" style:font-size-asian="14pt" style:font-size-complex="14pt"/>
    </style:style>
    <style:style style:name="T18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09" style:parent-style-name="Normal" style:family="paragraph">
      <style:text-properties style:font-name="Times New Roman" style:font-name-complex="Times New Roman" fo:font-size="14pt" style:font-size-asian="14pt" style:font-size-complex="14pt"/>
    </style:style>
    <style:style style:name="T1810" style:parent-style-name="DefaultParagraphFont" style:family="text">
      <style:text-properties style:font-name="Times New Roman" style:font-name-complex="Times New Roman" fo:font-size="14pt" style:font-size-asian="14pt" style:font-size-complex="14pt"/>
    </style:style>
    <style:style style:name="P1811" style:parent-style-name="Normal" style:family="paragraph">
      <style:text-properties style:font-name="Times New Roman" style:font-name-complex="Times New Roman" fo:font-size="14pt" style:font-size-asian="14pt" style:font-size-complex="14pt"/>
    </style:style>
    <style:style style:name="T18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14" style:parent-style-name="DefaultParagraphFont" style:family="text">
      <style:text-properties style:font-name="Times New Roman" style:font-name-complex="Times New Roman" fo:font-size="14pt" style:font-size-asian="14pt" style:font-size-complex="14pt"/>
    </style:style>
    <style:style style:name="T1815" style:parent-style-name="DefaultParagraphFont" style:family="text">
      <style:text-properties style:font-name="Times New Roman" style:font-name-complex="Times New Roman" fo:font-size="14pt" style:font-size-asian="14pt" style:font-size-complex="14pt"/>
    </style:style>
    <style:style style:name="T18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17" style:parent-style-name="DefaultParagraphFont" style:family="text">
      <style:text-properties style:font-name="Times New Roman" style:font-name-complex="Times New Roman" fo:font-size="14pt" style:font-size-asian="14pt" style:font-size-complex="14pt"/>
    </style:style>
    <style:style style:name="T1818" style:parent-style-name="DefaultParagraphFont" style:family="text">
      <style:text-properties style:font-name="Times New Roman" style:font-name-complex="Times New Roman" fo:font-size="14pt" style:font-size-asian="14pt" style:font-size-complex="14pt"/>
    </style:style>
    <style:style style:name="T18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20" style:parent-style-name="DefaultParagraphFont" style:family="text">
      <style:text-properties style:font-name="Times New Roman" style:font-name-complex="Times New Roman" fo:font-size="14pt" style:font-size-asian="14pt" style:font-size-complex="14pt"/>
    </style:style>
    <style:style style:name="T1821" style:parent-style-name="DefaultParagraphFont" style:family="text">
      <style:text-properties style:font-name="Times New Roman" style:font-name-complex="Times New Roman" fo:font-size="14pt" style:font-size-asian="14pt" style:font-size-complex="14pt"/>
    </style:style>
    <style:style style:name="T18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23" style:parent-style-name="DefaultParagraphFont" style:family="text">
      <style:text-properties style:font-name="Times New Roman" style:font-name-complex="Times New Roman" fo:font-size="14pt" style:font-size-asian="14pt" style:font-size-complex="14pt"/>
    </style:style>
    <style:style style:name="T18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25" style:parent-style-name="DefaultParagraphFont" style:family="text">
      <style:text-properties style:font-name="Times New Roman" style:font-name-complex="Times New Roman" fo:font-size="14pt" style:font-size-asian="14pt" style:font-size-complex="14pt"/>
    </style:style>
    <style:style style:name="T1826" style:parent-style-name="DefaultParagraphFont" style:family="text">
      <style:text-properties style:font-name="Times New Roman" style:font-name-complex="Times New Roman" fo:font-size="14pt" style:font-size-asian="14pt" style:font-size-complex="14pt"/>
    </style:style>
    <style:style style:name="T1827" style:parent-style-name="DefaultParagraphFont" style:family="text">
      <style:text-properties style:font-name="Times New Roman" style:font-name-complex="Times New Roman" fo:font-size="14pt" style:font-size-asian="14pt" style:font-size-complex="14pt"/>
    </style:style>
    <style:style style:name="T18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29" style:parent-style-name="DefaultParagraphFont" style:family="text">
      <style:text-properties style:font-name="Times New Roman" style:font-name-complex="Times New Roman" fo:font-size="14pt" style:font-size-asian="14pt" style:font-size-complex="14pt"/>
    </style:style>
    <style:style style:name="T1830"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831" style:parent-style-name="DefaultParagraphFont" style:family="text">
      <style:text-properties style:font-name="Times New Roman" style:font-name-complex="Times New Roman" fo:font-size="14pt" style:font-size-asian="14pt" style:font-size-complex="14pt"/>
    </style:style>
    <style:style style:name="T1832"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833" style:parent-style-name="DefaultParagraphFont" style:family="text">
      <style:text-properties style:font-name="Times New Roman" style:font-name-complex="Times New Roman" fo:font-size="14pt" style:font-size-asian="14pt" style:font-size-complex="14pt"/>
    </style:style>
    <style:style style:name="T1834"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835" style:parent-style-name="DefaultParagraphFont" style:family="text">
      <style:text-properties style:font-name="Times New Roman" style:font-name-complex="Times New Roman" fo:font-size="14pt" style:font-size-asian="14pt" style:font-size-complex="14pt"/>
    </style:style>
    <style:style style:name="T1836" style:parent-style-name="DefaultParagraphFont" style:family="text">
      <style:text-properties style:font-name="Times New Roman" style:font-name-complex="Times New Roman" fo:font-size="14pt" style:font-size-asian="14pt" style:font-size-complex="14pt"/>
    </style:style>
    <style:style style:name="T18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38" style:parent-style-name="DefaultParagraphFont" style:family="text">
      <style:text-properties style:font-name="Times New Roman" style:font-name-complex="Times New Roman" fo:font-size="14pt" style:font-size-asian="14pt" style:font-size-complex="14pt"/>
    </style:style>
    <style:style style:name="T1839"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840" style:parent-style-name="DefaultParagraphFont" style:family="text">
      <style:text-properties style:font-name="Times New Roman" style:font-name-complex="Times New Roman" fo:font-size="14pt" style:font-size-asian="14pt" style:font-size-complex="14pt"/>
    </style:style>
    <style:style style:name="T1841"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842" style:parent-style-name="DefaultParagraphFont" style:family="text">
      <style:text-properties style:font-name="Times New Roman" style:font-name-complex="Times New Roman" fo:font-size="14pt" style:font-size-asian="14pt" style:font-size-complex="14pt"/>
    </style:style>
    <style:style style:name="T184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844" style:parent-style-name="DefaultParagraphFont" style:family="text">
      <style:text-properties style:font-name="Times New Roman" style:font-name-complex="Times New Roman" fo:font-size="14pt" style:font-size-asian="14pt" style:font-size-complex="14pt"/>
    </style:style>
    <style:style style:name="T1845" style:parent-style-name="DefaultParagraphFont" style:family="text">
      <style:text-properties style:font-name="Times New Roman" style:font-name-complex="Times New Roman" fo:font-size="14pt" style:font-size-asian="14pt" style:font-size-complex="14pt"/>
    </style:style>
    <style:style style:name="T1846" style:parent-style-name="Hyperlink" style:family="text">
      <style:text-properties style:font-name="Times New Roman" style:font-name-complex="Times New Roman" fo:font-size="14pt" style:font-size-asian="14pt" style:font-size-complex="14pt"/>
    </style:style>
    <style:style style:name="T1847" style:parent-style-name="DefaultParagraphFont" style:family="text">
      <style:text-properties style:font-name="Times New Roman" style:font-name-complex="Times New Roman" fo:font-size="14pt" style:font-size-asian="14pt" style:font-size-complex="14pt"/>
    </style:style>
    <style:style style:name="T18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49" style:parent-style-name="DefaultParagraphFont" style:family="text">
      <style:text-properties style:font-name="Times New Roman" style:font-name-complex="Times New Roman" fo:font-size="14pt" style:font-size-asian="14pt" style:font-size-complex="14pt"/>
    </style:style>
    <style:style style:name="T1850"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851" style:parent-style-name="DefaultParagraphFont" style:family="text">
      <style:text-properties style:font-name="Times New Roman" style:font-name-complex="Times New Roman" fo:font-size="14pt" style:font-size-asian="14pt" style:font-size-complex="14pt"/>
    </style:style>
    <style:style style:name="T1852" style:parent-style-name="DefaultParagraphFont" style:family="text">
      <style:text-properties style:font-name="Times New Roman" style:font-name-complex="Times New Roman" fo:font-size="14pt" style:font-size-asian="14pt" style:font-size-complex="14pt"/>
    </style:style>
    <style:style style:name="T1853" style:parent-style-name="DefaultParagraphFont" style:family="text">
      <style:text-properties style:font-name="Times New Roman" style:font-name-complex="Times New Roman" fo:font-size="14pt" style:font-size-asian="14pt" style:font-size-complex="14pt"/>
    </style:style>
    <style:style style:name="T1854" style:parent-style-name="Hyperlink" style:family="text">
      <style:text-properties style:font-name="Times New Roman" style:font-name-complex="Times New Roman" fo:font-size="14pt" style:font-size-asian="14pt" style:font-size-complex="14pt"/>
    </style:style>
    <style:style style:name="T1855" style:parent-style-name="DefaultParagraphFont" style:family="text">
      <style:text-properties style:font-name="Times New Roman" style:font-name-complex="Times New Roman" fo:font-size="14pt" style:font-size-asian="14pt" style:font-size-complex="14pt"/>
    </style:style>
    <style:style style:name="T1856" style:parent-style-name="DefaultParagraphFont" style:family="text">
      <style:text-properties style:font-name="Times New Roman" style:font-name-complex="Times New Roman" fo:font-size="14pt" style:font-size-asian="14pt" style:font-size-complex="14pt"/>
    </style:style>
    <style:style style:name="T1857" style:parent-style-name="DefaultParagraphFont" style:family="text">
      <style:text-properties style:font-name="Times New Roman" style:font-name-complex="Times New Roman" fo:font-size="14pt" style:font-size-asian="14pt" style:font-size-complex="14pt"/>
    </style:style>
    <style:style style:name="T185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859" style:parent-style-name="DefaultParagraphFont" style:family="text">
      <style:text-properties style:font-name="Times New Roman" style:font-name-complex="Times New Roman" fo:font-size="14pt" style:font-size-asian="14pt" style:font-size-complex="14pt"/>
    </style:style>
    <style:style style:name="T1860"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861" style:parent-style-name="DefaultParagraphFont" style:family="text">
      <style:text-properties style:font-name="Times New Roman" style:font-name-complex="Times New Roman" fo:font-size="14pt" style:font-size-asian="14pt" style:font-size-complex="14pt"/>
    </style:style>
    <style:style style:name="T1862"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863" style:parent-style-name="DefaultParagraphFont" style:family="text">
      <style:text-properties style:font-name="Times New Roman" style:font-name-complex="Times New Roman" fo:font-size="14pt" style:font-size-asian="14pt" style:font-size-complex="14pt"/>
    </style:style>
    <style:style style:name="T1864" style:parent-style-name="DefaultParagraphFont" style:family="text">
      <style:text-properties style:font-name="Times New Roman" style:font-name-complex="Times New Roman" fo:font-size="14pt" style:font-size-asian="14pt" style:font-size-complex="14pt"/>
    </style:style>
    <style:style style:name="T1865" style:parent-style-name="Hyperlink" style:family="text">
      <style:text-properties style:font-name="Times New Roman" style:font-name-complex="Times New Roman" fo:font-size="14pt" style:font-size-asian="14pt" style:font-size-complex="14pt"/>
    </style:style>
    <style:style style:name="T18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67" style:parent-style-name="DefaultParagraphFont" style:family="text">
      <style:text-properties style:font-name="Times New Roman" style:font-name-complex="Times New Roman" fo:font-size="14pt" style:font-size-asian="14pt" style:font-size-complex="14pt"/>
    </style:style>
    <style:style style:name="T186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869" style:parent-style-name="DefaultParagraphFont" style:family="text">
      <style:text-properties style:font-name="Times New Roman" style:font-name-complex="Times New Roman" fo:font-size="14pt" style:font-size-asian="14pt" style:font-size-complex="14pt"/>
    </style:style>
    <style:style style:name="T1870" style:parent-style-name="DefaultParagraphFont" style:family="text">
      <style:text-properties style:font-name="Times New Roman" style:font-name-complex="Times New Roman" fo:font-size="14pt" style:font-size-asian="14pt" style:font-size-complex="14pt"/>
    </style:style>
    <style:style style:name="T1871" style:parent-style-name="Hyperlink" style:family="text">
      <style:text-properties style:font-name="Times New Roman" style:font-name-complex="Times New Roman" fo:font-size="14pt" style:font-size-asian="14pt" style:font-size-complex="14pt"/>
    </style:style>
    <style:style style:name="T18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74" style:parent-style-name="Normal" style:family="paragraph">
      <style:text-properties style:font-name="Times New Roman" style:font-name-complex="Times New Roman" fo:font-size="14pt" style:font-size-asian="14pt" style:font-size-complex="14pt"/>
    </style:style>
    <style:style style:name="T1875" style:parent-style-name="DefaultParagraphFont" style:family="text">
      <style:text-properties style:font-name="Times New Roman" style:font-name-complex="Times New Roman" fo:font-size="14pt" style:font-size-asian="14pt" style:font-size-complex="14pt"/>
    </style:style>
    <style:style style:name="P1876" style:parent-style-name="Normal" style:family="paragraph">
      <style:text-properties style:font-name="Times New Roman" style:font-name-complex="Times New Roman" fo:font-size="14pt" style:font-size-asian="14pt" style:font-size-complex="14pt"/>
    </style:style>
    <style:style style:name="P1877" style:parent-style-name="Normal" style:family="paragraph">
      <style:text-properties style:font-name="Times New Roman" style:font-name-complex="Times New Roman" fo:font-size="14pt" style:font-size-asian="14pt" style:font-size-complex="14pt"/>
    </style:style>
    <style:style style:name="P1878" style:parent-style-name="Normal" style:family="paragraph">
      <style:text-properties style:font-name="Times New Roman" style:font-name-complex="Times New Roman" fo:font-size="14pt" style:font-size-asian="14pt" style:font-size-complex="14pt"/>
    </style:style>
    <style:style style:name="P1879" style:parent-style-name="Normal" style:family="paragraph">
      <style:text-properties style:font-name="Times New Roman" style:font-name-complex="Times New Roman" fo:font-size="14pt" style:font-size-asian="14pt" style:font-size-complex="14pt"/>
    </style:style>
    <style:style style:name="P1880" style:parent-style-name="Normal" style:family="paragraph">
      <style:text-properties style:font-name="Times New Roman" style:font-name-complex="Times New Roman" fo:font-size="14pt" style:font-size-asian="14pt" style:font-size-complex="14pt"/>
    </style:style>
    <style:style style:name="P1881" style:parent-style-name="Normal" style:family="paragraph">
      <style:text-properties style:font-name="Times New Roman" style:font-name-complex="Times New Roman" fo:font-size="14pt" style:font-size-asian="14pt" style:font-size-complex="14pt"/>
    </style:style>
    <style:style style:name="P1882" style:parent-style-name="Normal" style:family="paragraph">
      <style:text-properties style:font-name="Times New Roman" style:font-name-complex="Times New Roman" fo:font-size="14pt" style:font-size-asian="14pt" style:font-size-complex="14pt"/>
    </style:style>
    <style:style style:name="P1883" style:parent-style-name="Normal" style:family="paragraph">
      <style:text-properties style:font-name="Times New Roman" style:font-name-complex="Times New Roman" fo:font-size="14pt" style:font-size-asian="14pt" style:font-size-complex="14pt"/>
    </style:style>
    <style:style style:name="P1884" style:parent-style-name="Normal" style:family="paragraph">
      <style:text-properties style:font-name="Times New Roman" style:font-name-complex="Times New Roman" fo:font-size="14pt" style:font-size-asian="14pt" style:font-size-complex="14pt"/>
    </style:style>
    <style:style style:name="P1885" style:parent-style-name="Normal" style:family="paragraph">
      <style:text-properties style:font-name="Times New Roman" style:font-name-complex="Times New Roman" fo:font-size="14pt" style:font-size-asian="14pt" style:font-size-complex="14pt"/>
    </style:style>
    <style:style style:name="P1886" style:parent-style-name="Normal" style:family="paragraph">
      <style:text-properties style:font-name="Times New Roman" style:font-name-complex="Times New Roman" fo:font-size="14pt" style:font-size-asian="14pt" style:font-size-complex="14pt" fo:language="it" fo:country="IT"/>
    </style:style>
    <style:style style:name="P1887" style:parent-style-name="Normal" style:family="paragraph">
      <style:text-properties style:font-name="Times New Roman" style:font-name-complex="Times New Roman" fo:font-size="14pt" style:font-size-asian="14pt" style:font-size-complex="14pt" fo:language="it" fo:country="IT"/>
    </style:style>
    <style:style style:name="P1888" style:parent-style-name="Normal" style:family="paragraph">
      <style:text-properties style:font-name="Times New Roman" style:font-name-complex="Times New Roman" fo:font-size="14pt" style:font-size-asian="14pt" style:font-size-complex="14pt" fo:language="it" fo:country="IT"/>
    </style:style>
    <style:style style:name="P1889" style:parent-style-name="Normal" style:family="paragraph">
      <style:text-properties style:font-name="Times New Roman" style:font-name-complex="Times New Roman" fo:font-size="14pt" style:font-size-asian="14pt" style:font-size-complex="14pt" fo:language="it" fo:country="IT"/>
    </style:style>
    <style:style style:name="P1890" style:parent-style-name="Normal" style:family="paragraph">
      <style:text-properties style:font-name="Times New Roman" style:font-name-complex="Times New Roman" fo:font-size="14pt" style:font-size-asian="14pt" style:font-size-complex="14pt"/>
    </style:style>
    <style:style style:name="P1891" style:parent-style-name="Normal" style:family="paragraph">
      <style:text-properties style:font-name="Times New Roman" style:font-name-complex="Times New Roman" fo:font-size="14pt" style:font-size-asian="14pt" style:font-size-complex="14pt"/>
    </style:style>
    <style:style style:name="T1892" style:parent-style-name="DefaultParagraphFont" style:family="text">
      <style:text-properties style:font-name="Times New Roman" style:font-name-complex="Times New Roman" fo:font-size="14pt" style:font-size-asian="14pt" style:font-size-complex="14pt"/>
    </style:style>
    <style:style style:name="P1893" style:parent-style-name="Normal" style:family="paragraph">
      <style:text-properties style:font-name="Times New Roman" style:font-name-complex="Times New Roman" fo:font-size="14pt" style:font-size-asian="14pt" style:font-size-complex="14pt"/>
    </style:style>
    <style:style style:name="T18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95" style:parent-style-name="Normal" style:family="paragraph">
      <style:text-properties style:font-name="Times New Roman" style:font-name-complex="Times New Roman" fo:font-size="14pt" style:font-size-asian="14pt" style:font-size-complex="14pt"/>
    </style:style>
    <style:style style:name="T18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97" style:parent-style-name="Normal" style:family="paragraph">
      <style:text-properties style:font-name="Times New Roman" style:font-name-complex="Times New Roman" fo:font-size="14pt" style:font-size-asian="14pt" style:font-size-complex="14pt"/>
    </style:style>
    <style:style style:name="T18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00" style:parent-style-name="Normal" style:family="paragraph">
      <style:text-properties style:font-name="Times New Roman" style:font-name-complex="Times New Roman" fo:font-size="14pt" style:font-size-asian="14pt" style:font-size-complex="14pt"/>
    </style:style>
    <style:style style:name="T1901" style:parent-style-name="DefaultParagraphFont" style:family="text">
      <style:text-properties style:font-name="Times New Roman" style:font-name-complex="Times New Roman" fo:font-size="14pt" style:font-size-asian="14pt" style:font-size-complex="14pt"/>
    </style:style>
    <style:style style:name="P1902" style:parent-style-name="Normal" style:family="paragraph">
      <style:text-properties style:font-name="Times New Roman" style:font-name-complex="Times New Roman" fo:font-size="14pt" style:font-size-asian="14pt" style:font-size-complex="14pt"/>
    </style:style>
    <style:style style:name="T19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05" style:parent-style-name="DefaultParagraphFont" style:family="text">
      <style:text-properties style:font-name="Times New Roman" style:font-name-complex="Times New Roman" fo:font-size="14pt" style:font-size-asian="14pt" style:font-size-complex="14pt"/>
    </style:style>
    <style:style style:name="T1906" style:parent-style-name="DefaultParagraphFont" style:family="text">
      <style:text-properties style:font-name="Times New Roman" style:font-name-complex="Times New Roman" fo:font-size="14pt" style:font-size-asian="14pt" style:font-size-complex="14pt"/>
    </style:style>
    <style:style style:name="T1907" style:parent-style-name="DefaultParagraphFont" style:family="text">
      <style:text-properties style:font-name="Times New Roman" style:font-name-complex="Times New Roman" fo:font-size="14pt" style:font-size-asian="14pt" style:font-size-complex="14pt"/>
    </style:style>
    <style:style style:name="T19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09" style:parent-style-name="DefaultParagraphFont" style:family="text">
      <style:text-properties style:font-name="Times New Roman" style:font-name-complex="Times New Roman" fo:font-size="14pt" style:font-size-asian="14pt" style:font-size-complex="14pt"/>
    </style:style>
    <style:style style:name="T1910" style:parent-style-name="DefaultParagraphFont" style:family="text">
      <style:text-properties style:font-name="Times New Roman" style:font-name-complex="Times New Roman" fo:font-size="14pt" style:font-size-asian="14pt" style:font-size-complex="14pt"/>
    </style:style>
    <style:style style:name="T19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12" style:parent-style-name="Normal" style:family="paragraph">
      <style:text-properties style:font-name="Times New Roman" style:font-name-complex="Times New Roman" fo:font-size="14pt" style:font-size-asian="14pt" style:font-size-complex="14pt"/>
    </style:style>
    <style:style style:name="P1913" style:parent-style-name="Normal" style:family="paragraph">
      <style:text-properties style:font-name="Times New Roman" style:font-name-complex="Times New Roman" fo:font-size="14pt" style:font-size-asian="14pt" style:font-size-complex="14pt"/>
    </style:style>
    <style:style style:name="T1914" style:parent-style-name="DefaultParagraphFont" style:family="text">
      <style:text-properties style:font-name="Times New Roman" style:font-name-complex="Times New Roman" fo:font-size="14pt" style:font-size-asian="14pt" style:font-size-complex="14pt"/>
    </style:style>
    <style:style style:name="T1915"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916" style:parent-style-name="DefaultParagraphFont" style:family="text">
      <style:text-properties style:font-name="Times New Roman" style:font-name-complex="Times New Roman" fo:font-size="14pt" style:font-size-asian="14pt" style:font-size-complex="14pt"/>
    </style:style>
    <style:style style:name="T1917" style:parent-style-name="DefaultParagraphFont" style:family="text">
      <style:text-properties style:font-name="Times New Roman" style:font-name-complex="Times New Roman" fo:font-size="14pt" style:font-size-asian="14pt" style:font-size-complex="14pt"/>
    </style:style>
    <style:style style:name="T1918" style:parent-style-name="Hyperlink" style:family="text">
      <style:text-properties style:font-name="Times New Roman" style:font-name-complex="Times New Roman" fo:font-size="14pt" style:font-size-asian="14pt" style:font-size-complex="14pt"/>
    </style:style>
    <style:style style:name="T19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22" style:parent-style-name="Normal" style:family="paragraph">
      <style:text-properties style:font-name="Times New Roman" style:font-name-complex="Times New Roman" fo:font-size="14pt" style:font-size-asian="14pt" style:font-size-complex="14pt"/>
    </style:style>
    <style:style style:name="P1923" style:parent-style-name="Normal" style:family="paragraph">
      <style:text-properties style:font-name="Times New Roman" style:font-name-complex="Times New Roman" fo:font-size="14pt" style:font-size-asian="14pt" style:font-size-complex="14pt"/>
    </style:style>
    <style:style style:name="P1924" style:parent-style-name="Normal" style:family="paragraph">
      <style:text-properties style:font-name="Times New Roman" style:font-name-complex="Times New Roman" fo:font-size="14pt" style:font-size-asian="14pt" style:font-size-complex="14pt"/>
    </style:style>
    <style:style style:name="T19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26" style:parent-style-name="DefaultParagraphFont" style:family="text">
      <style:text-properties style:font-name="Times New Roman" style:font-name-complex="Times New Roman" fo:font-size="14pt" style:font-size-asian="14pt" style:font-size-complex="14pt"/>
    </style:style>
    <style:style style:name="T19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28" style:parent-style-name="Normal" style:family="paragraph">
      <style:text-properties style:font-name="Times New Roman" style:font-name-complex="Times New Roman" fo:font-size="14pt" style:font-size-asian="14pt" style:font-size-complex="14pt"/>
    </style:style>
    <style:style style:name="P1929" style:parent-style-name="Normal" style:family="paragraph">
      <style:text-properties style:font-name="Times New Roman" style:font-name-complex="Times New Roman" fo:font-size="14pt" style:font-size-asian="14pt" style:font-size-complex="14pt"/>
    </style:style>
    <style:style style:name="T1930" style:parent-style-name="DefaultParagraphFont" style:family="text">
      <style:text-properties style:font-name="Times New Roman" style:font-name-complex="Times New Roman" fo:font-size="14pt" style:font-size-asian="14pt" style:font-size-complex="14pt"/>
    </style:style>
    <style:style style:name="T1931" style:parent-style-name="DefaultParagraphFont" style:family="text">
      <style:text-properties style:font-name="Times New Roman" style:font-name-complex="Times New Roman" fo:font-size="14pt" style:font-size-asian="14pt" style:font-size-complex="14pt"/>
    </style:style>
    <style:style style:name="T19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33" style:parent-style-name="DefaultParagraphFont" style:family="text">
      <style:text-properties style:font-name="Times New Roman" style:font-name-complex="Times New Roman" fo:font-size="14pt" style:font-size-asian="14pt" style:font-size-complex="14pt"/>
    </style:style>
    <style:style style:name="T1934" style:parent-style-name="DefaultParagraphFont" style:family="text">
      <style:text-properties style:font-name="Times New Roman" style:font-name-complex="Times New Roman" fo:font-size="14pt" style:font-size-asian="14pt" style:font-size-complex="14pt"/>
    </style:style>
    <style:style style:name="T1935" style:parent-style-name="Hyperlink" style:family="text">
      <style:text-properties style:font-name="Times New Roman" style:font-name-complex="Times New Roman" fo:font-size="14pt" style:font-size-asian="14pt" style:font-size-complex="14pt"/>
    </style:style>
    <style:style style:name="T19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39" style:parent-style-name="Normal" style:family="paragraph">
      <style:text-properties style:font-name="Times New Roman" style:font-name-complex="Times New Roman" fo:font-size="14pt" style:font-size-asian="14pt" style:font-size-complex="14pt"/>
    </style:style>
    <style:style style:name="TableColumn1941" style:family="table-column">
      <style:table-column-properties style:column-width="4.3618in"/>
    </style:style>
    <style:style style:name="Table1940" style:family="table">
      <style:table-properties style:width="4.3618in" fo:margin-left="0in" table:align="left"/>
    </style:style>
    <style:style style:name="TableRow1942" style:family="table-row">
      <style:table-row-properties/>
    </style:style>
    <style:style style:name="TableCell194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944" style:parent-style-name="Normal" style:family="paragraph">
      <style:text-properties style:font-name="Times New Roman" style:font-name-complex="Times New Roman" fo:font-size="14pt" style:font-size-asian="14pt" style:font-size-complex="14pt"/>
    </style:style>
    <style:style style:name="P1945" style:parent-style-name="Normal" style:family="paragraph">
      <style:text-properties style:font-name="Times New Roman" style:font-name-complex="Times New Roman" fo:font-size="14pt" style:font-size-asian="14pt" style:font-size-complex="14pt"/>
    </style:style>
    <style:style style:name="P1946" style:parent-style-name="Normal" style:family="paragraph">
      <style:text-properties style:font-name="Times New Roman" style:font-name-complex="Times New Roman" fo:font-size="14pt" style:font-size-asian="14pt" style:font-size-complex="14pt"/>
    </style:style>
    <style:style style:name="P1947" style:parent-style-name="Normal" style:family="paragraph">
      <style:text-properties style:font-name="Times New Roman" style:font-name-complex="Times New Roman" fo:font-size="14pt" style:font-size-asian="14pt" style:font-size-complex="14pt"/>
    </style:style>
    <style:style style:name="P1948" style:parent-style-name="Normal" style:family="paragraph">
      <style:text-properties style:font-name="Times New Roman" style:font-name-complex="Times New Roman" fo:font-size="14pt" style:font-size-asian="14pt" style:font-size-complex="14pt"/>
    </style:style>
    <style:style style:name="P1949" style:parent-style-name="Normal" style:family="paragraph">
      <style:text-properties style:font-name="Times New Roman" style:font-name-complex="Times New Roman" fo:font-size="14pt" style:font-size-asian="14pt" style:font-size-complex="14pt"/>
    </style:style>
    <style:style style:name="P1950" style:parent-style-name="Normal" style:family="paragraph">
      <style:text-properties style:font-name="Times New Roman" style:font-name-complex="Times New Roman" fo:font-size="14pt" style:font-size-asian="14pt" style:font-size-complex="14pt"/>
    </style:style>
    <style:style style:name="T19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52" style:parent-style-name="DefaultParagraphFont" style:family="text">
      <style:text-properties style:font-name="Times New Roman" style:font-name-complex="Times New Roman" fo:font-size="14pt" style:font-size-asian="14pt" style:font-size-complex="14pt"/>
    </style:style>
    <style:style style:name="T19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55" style:parent-style-name="Normal" style:family="paragraph">
      <style:text-properties style:font-name="Times New Roman" style:font-name-complex="Times New Roman" fo:font-size="14pt" style:font-size-asian="14pt" style:font-size-complex="14pt"/>
    </style:style>
    <style:style style:name="P1956" style:parent-style-name="Normal" style:family="paragraph">
      <style:text-properties style:font-name="Times New Roman" style:font-name-complex="Times New Roman" fo:font-size="14pt" style:font-size-asian="14pt" style:font-size-complex="14pt"/>
    </style:style>
    <style:style style:name="P1957" style:parent-style-name="Normal" style:family="paragraph">
      <style:text-properties style:font-name="Times New Roman" style:font-name-complex="Times New Roman" fo:font-size="14pt" style:font-size-asian="14pt" style:font-size-complex="14pt"/>
    </style:style>
    <style:style style:name="T19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59" style:parent-style-name="DefaultParagraphFont" style:family="text">
      <style:text-properties style:font-name="Times New Roman" style:font-name-complex="Times New Roman" fo:font-size="14pt" style:font-size-asian="14pt" style:font-size-complex="14pt"/>
    </style:style>
    <style:style style:name="T19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61" style:parent-style-name="Normal" style:family="paragraph">
      <style:text-properties style:font-name="Times New Roman" style:font-name-complex="Times New Roman" fo:font-size="14pt" style:font-size-asian="14pt" style:font-size-complex="14pt"/>
    </style:style>
    <style:style style:name="T1962" style:parent-style-name="DefaultParagraphFont" style:family="text">
      <style:text-properties style:font-name="Times New Roman" style:font-name-complex="Times New Roman" fo:font-size="14pt" style:font-size-asian="14pt" style:font-size-complex="14pt"/>
    </style:style>
    <style:style style:name="T1963" style:parent-style-name="Hyperlink" style:family="text">
      <style:text-properties style:font-name="Times New Roman" style:font-name-complex="Times New Roman" fo:font-size="14pt" style:font-size-asian="14pt" style:font-size-complex="14pt"/>
    </style:style>
    <style:style style:name="T19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66" style:parent-style-name="Normal" style:family="paragraph">
      <style:text-properties style:font-name="Times New Roman" style:font-name-complex="Times New Roman" fo:font-size="14pt" style:font-size-asian="14pt" style:font-size-complex="14pt"/>
    </style:style>
    <style:style style:name="T1967" style:parent-style-name="DefaultParagraphFont" style:family="text">
      <style:text-properties style:font-name="Times New Roman" style:font-name-complex="Times New Roman" fo:font-size="14pt" style:font-size-asian="14pt" style:font-size-complex="14pt"/>
    </style:style>
    <style:style style:name="P1968" style:parent-style-name="Normal" style:family="paragraph">
      <style:text-properties style:font-name="Times New Roman" style:font-name-complex="Times New Roman" fo:font-size="14pt" style:font-size-asian="14pt" style:font-size-complex="14pt"/>
    </style:style>
    <style:style style:name="P1969" style:parent-style-name="consolas" style:family="paragraph">
      <style:text-properties fo:language="it" fo:country="IT"/>
    </style:style>
    <style:style style:name="P1970" style:parent-style-name="consolas" style:family="paragraph">
      <style:text-properties fo:language="it" fo:country="IT"/>
    </style:style>
    <style:style style:name="P1971" style:parent-style-name="consolas" style:family="paragraph">
      <style:text-properties fo:language="it" fo:country="IT"/>
    </style:style>
    <style:style style:name="P1972" style:parent-style-name="consolas" style:family="paragraph">
      <style:text-properties fo:language="it" fo:country="IT"/>
    </style:style>
    <style:style style:name="P1973" style:parent-style-name="consolas" style:family="paragraph">
      <style:text-properties fo:language="it" fo:country="IT"/>
    </style:style>
    <style:style style:name="P1974" style:parent-style-name="Normal" style:family="paragraph">
      <style:text-properties style:font-name="Times New Roman" style:font-name-complex="Times New Roman" fo:font-size="14pt" style:font-size-asian="14pt" style:font-size-complex="14pt"/>
    </style:style>
    <style:style style:name="P1975" style:parent-style-name="Normal" style:family="paragraph">
      <style:text-properties style:font-name="Times New Roman" style:font-name-complex="Times New Roman" fo:font-size="14pt" style:font-size-asian="14pt" style:font-size-complex="14pt"/>
    </style:style>
    <style:style style:name="P1976" style:parent-style-name="Normal" style:family="paragraph">
      <style:text-properties style:font-name="Times New Roman" style:font-name-complex="Times New Roman" fo:font-size="14pt" style:font-size-asian="14pt" style:font-size-complex="14pt"/>
    </style:style>
    <style:style style:name="T19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78" style:parent-style-name="DefaultParagraphFont" style:family="text">
      <style:text-properties style:font-name="Times New Roman" style:font-name-complex="Times New Roman" fo:font-size="14pt" style:font-size-asian="14pt" style:font-size-complex="14pt"/>
    </style:style>
    <style:style style:name="T19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80" style:parent-style-name="Normal" style:family="paragraph">
      <style:text-properties style:font-name="Times New Roman" style:font-name-complex="Times New Roman" fo:font-size="14pt" style:font-size-asian="14pt" style:font-size-complex="14pt"/>
    </style:style>
    <style:style style:name="T19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83" style:parent-style-name="Normal" style:family="paragraph">
      <style:text-properties style:font-name="Times New Roman" style:font-name-complex="Times New Roman" fo:font-size="14pt" style:font-size-asian="14pt" style:font-size-complex="14pt"/>
    </style:style>
    <style:style style:name="P1984" style:parent-style-name="Normal" style:family="paragraph">
      <style:text-properties style:font-name="Times New Roman" style:font-name-complex="Times New Roman" fo:font-size="14pt" style:font-size-asian="14pt" style:font-size-complex="14pt"/>
    </style:style>
    <style:style style:name="P1985" style:parent-style-name="Normal" style:family="paragraph">
      <style:text-properties style:font-name="Times New Roman" style:font-name-complex="Times New Roman" fo:font-size="14pt" style:font-size-asian="14pt" style:font-size-complex="14pt"/>
    </style:style>
    <style:style style:name="T19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87" style:parent-style-name="DefaultParagraphFont" style:family="text">
      <style:text-properties style:font-name="Times New Roman" style:font-name-complex="Times New Roman" fo:font-size="14pt" style:font-size-asian="14pt" style:font-size-complex="14pt"/>
    </style:style>
    <style:style style:name="T19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89" style:parent-style-name="Normal" style:family="paragraph">
      <style:text-properties style:font-name="Times New Roman" style:font-name-complex="Times New Roman" fo:font-size="14pt" style:font-size-asian="14pt" style:font-size-complex="14pt"/>
    </style:style>
    <style:style style:name="T19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92" style:parent-style-name="Normal" style:family="paragraph">
      <style:text-properties style:font-name="Times New Roman" style:font-name-complex="Times New Roman" fo:font-size="14pt" style:font-size-asian="14pt" style:font-size-complex="14pt"/>
    </style:style>
    <style:style style:name="T1993" style:parent-style-name="DefaultParagraphFont" style:family="text">
      <style:text-properties style:font-name="Times New Roman" style:font-name-complex="Times New Roman" fo:font-size="14pt" style:font-size-asian="14pt" style:font-size-complex="14pt"/>
    </style:style>
    <style:style style:name="P1994" style:parent-style-name="consolas" style:family="paragraph">
      <style:text-properties fo:language="it" fo:country="IT"/>
    </style:style>
    <style:style style:name="P1995" style:parent-style-name="consolas" style:family="paragraph">
      <style:text-properties fo:language="it" fo:country="IT"/>
    </style:style>
    <style:style style:name="P1996" style:parent-style-name="Normal" style:family="paragraph">
      <style:text-properties style:font-name="Times New Roman" style:font-name-complex="Times New Roman" fo:font-size="14pt" style:font-size-asian="14pt" style:font-size-complex="14pt"/>
    </style:style>
    <style:style style:name="P1997" style:parent-style-name="Normal" style:family="paragraph">
      <style:text-properties style:font-name="Times New Roman" style:font-name-complex="Times New Roman" fo:font-size="14pt" style:font-size-asian="14pt" style:font-size-complex="14pt"/>
    </style:style>
    <style:style style:name="P1998" style:parent-style-name="Normal" style:family="paragraph">
      <style:text-properties style:font-name="Times New Roman" style:font-name-complex="Times New Roman" fo:font-size="14pt" style:font-size-asian="14pt" style:font-size-complex="14pt"/>
    </style:style>
    <style:style style:name="T19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00" style:parent-style-name="DefaultParagraphFont" style:family="text">
      <style:text-properties style:font-name="Times New Roman" style:font-name-complex="Times New Roman" fo:font-size="14pt" style:font-size-asian="14pt" style:font-size-complex="14pt"/>
    </style:style>
    <style:style style:name="T20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02" style:parent-style-name="Normal" style:family="paragraph">
      <style:text-properties style:font-name="Times New Roman" style:font-name-complex="Times New Roman" fo:font-size="14pt" style:font-size-asian="14pt" style:font-size-complex="14pt"/>
    </style:style>
    <style:style style:name="P2003" style:parent-style-name="Normal" style:family="paragraph">
      <style:text-properties style:font-name="Times New Roman" style:font-name-complex="Times New Roman" fo:font-size="14pt" style:font-size-asian="14pt" style:font-size-complex="14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Question 12.1</text:p>
      <text:p text:style-name="P2">Drag and drop the SNMP components from the left onto the descriptions on the right.</text:p>
      <text:p text:style-name="Normal"><text:span text:style-name="T3"><draw:frame draw:style-name="a0" draw:name="Picture 100" text:anchor-type="as-char" svg:x="0in" svg:y="0in" svg:width="6.5in" svg:height="2.18056in" style:rel-width="scale" style:rel-height="scale"><draw:image xlink:href="media/image1.jpeg" xlink:type="simple" xlink:show="embed" xlink:actuate="onLoad"/><svg:title/><svg:desc/></draw:frame></text:span></text:p>
      <text:p text:style-name="P4"> </text:p>
      <text:p text:style-name="Normal"><text:span text:style-name="T5">Answer:</text:span></text:p>
      <text:p text:style-name="P6">+ network node controlled by SNMP: managed device<text:line-break/>+ collection of uniquely identifiable objects whose state can be interrogated over SNMP: MIB<text:line-break/>+ system that runs monitoring applications and controls network nodes: NMS<text:line-break/>+ SNMP component that captures and translates device and network data: agent</text:p>
      <text:p text:style-name="Normal"><text:span text:style-name="T7">Explanation</text:span></text:p>
      <text:p text:style-name="P8">The SNMP agent is the software component within the managed device that maintains the data for the device and reports these data, as needed, to managing systems. The agent and MIB reside on the routing device (router, access server, or switch). To enable the SNMP agent on a Cisco routing device, you must define the relationship between the manager and the agent.</text:p>
      <text:p text:style-name="Normal"><text:span text:style-name="T9">Question 12.</text:span><text:span text:style-name="T10">2</text:span></text:p>
      <text:p text:style-name="P11">Refer to the exhibit.</text:p>
      <text:soft-page-break/>
      <text:p text:style-name="Normal"><text:span text:style-name="T12"><draw:frame draw:style-name="a1" draw:name="Picture 99" text:anchor-type="as-char" svg:x="0in" svg:y="0in" svg:width="4.94444in" svg:height="1.43056in" style:rel-width="scale" style:rel-height="scale"><draw:image xlink:href="media/image2.jpeg" xlink:type="simple" xlink:show="embed" xlink:actuate="onLoad"/><svg:title/><svg:desc/></draw:frame></text:span></text:p>
      <text:p text:style-name="P13">An engineer must configure a floating static route on an external EIGRP network. The destination subnet is the /29 on the LAN interface of R86. Which command must be executed on R14?</text:p>
      <text:p text:style-name="P14">A. ip route 10.80.65.0 255.255.248.0 10.73.65.66 1<text:line-break/>B. ip route 10.80.65.0 255.255.255.240 fa0/1 89<text:line-break/>C. ip route 10.80.65.0 255.255.255.248 10.73.65.66 171<text:line-break/>D. ip route 10.73.65.66 0.0.0.224 10.80.65.0 255</text:p>
      <text:p text:style-name="P15"> </text:p>
      <text:p text:style-name="Normal"><text:span text:style-name="T16">Answer:</text:span><text:span text:style-name="T17"> C</text:span></text:p>
      <text:p text:style-name="Normal"><text:span text:style-name="T18">Question 12.</text:span><text:span text:style-name="T19">3</text:span></text:p>
      <text:p text:style-name="P20">Drag and drop the statements about device management from the left onto the corresponding types on the right.</text:p>
      <text:p text:style-name="Normal"><text:span text:style-name="T21"><draw:frame draw:style-name="a2" draw:name="Picture 98" text:anchor-type="as-char" svg:x="0in" svg:y="0in" svg:width="5.77083in" svg:height="3.35417in" style:rel-width="scale" style:rel-height="scale"><draw:image xlink:href="media/image3.jpeg" xlink:type="simple" xlink:show="embed" xlink:actuate="onLoad"/><svg:title/><svg:desc/></draw:frame></text:span></text:p>
      <text:soft-page-break/>
      <text:p text:style-name="P22"> </text:p>
      <text:p text:style-name="P23"> </text:p>
      <text:p text:style-name="Normal"><text:span text:style-name="T24">Answer:</text:span></text:p>
      <text:p text:style-name="Normal"><text:span text:style-name="T25">Traditional Campus Device Management:</text:span><text:span text:style-name="T26"><text:line-break/>+ requires manual configuration of complex protocols</text:span><text:span text:style-name="T27"><text:line-break/>+ leverages Cisco Prime Infrastructure</text:span><text:span text:style-name="T28"><text:line-break/>+ lacks support for SDA</text:span></text:p>
      <text:p text:style-name="Normal"><text:span text:style-name="T29">Cisco DNA Center:</text:span><text:span text:style-name="T30"><text:line-break/>+ reduces the workload for enterprise customers</text:span><text:span text:style-name="T31"><text:line-break/>+ uses algorithms to detect security threats</text:span><text:span text:style-name="T32"><text:line-break/>+ uses northbound APIs</text:span></text:p>
      <text:p text:style-name="Normal"><text:span text:style-name="T33">Explanation</text:span></text:p>
      <text:p text:style-name="Normal"><text:span text:style-name="T34">One of the example of </text:span><text:span text:style-name="T35">traditional network management</text:span><text:span text:style-name="T36">, </text:span><text:span text:style-name="T37">Cisco Prime Infrastructure</text:span><text:span text:style-name="T38"> (PI) Management has been used to manage enterprise networks.</text:span></text:p>
      <text:p text:style-name="Normal"><text:span text:style-name="T39">Reference: </text:span><text:a xlink:href="https://ipcisco.com/lesson/traditional-network-management-versus-cisco-dna-center/" office:target-frame-name="_blank" xlink:show="new"><text:span text:style-name="T40">https://ipcisco.com/lesson/traditional-network-management-versus-cisco-dna-center/</text:span></text:a></text:p>
      <text:p text:style-name="Normal"><text:span text:style-name="T41">Question 12.</text:span><text:span text:style-name="T42">4</text:span></text:p>
      <text:p text:style-name="P43">A network engineer is implementing a corporate SSID for WPA3-Personal security with a PSK. Which encryption cipher must be configured?</text:p>
      <text:p text:style-name="P44">A. GCMP128<text:line-break/>B. GCMP256<text:line-break/>C. CCMP256<text:line-break/>D. CCMP128</text:p>
      <text:p text:style-name="P45"> </text:p>
      <text:p text:style-name="Normal"><text:span text:style-name="T46">Answer:</text:span><text:span text:style-name="T47"> D</text:span></text:p>
      <text:p text:style-name="Normal"><text:span text:style-name="T48">Explanation</text:span></text:p>
      <text:p text:style-name="Normal"><text:span text:style-name="T49">WPA3 mandates the adoption of Protected Management Frames, which help guard against eavesdropping and forging. It also standardizes the 128-bit cryptographic<text:s/></text:span><text:soft-page-break/><text:span text:style-name="T50">suite and disallows obsolete security protocols. WPA3-Enterprise has optional 192-bit security encryption and a 48-bit IV for heightened protection of sensitive corporate, financial and governmental data. </text:span><text:span text:style-name="T51">WPA3-Personal uses CCMP-128</text:span><text:span text:style-name="T52"> and AES-128.</text:span></text:p>
      <text:p text:style-name="Normal"><text:span text:style-name="T53">Reference: </text:span><text:a xlink:href="https://www.techtarget.com/searchnetworking/feature/Wireless-encryption-basics-Understanding-WEP-WPA-and-WPA2" office:target-frame-name="_blank" xlink:show="new"><text:span text:style-name="T54">https://www.techtarget.com/searchnetworking/feature/Wireless-encryption-basics-Understanding-WEP-WPA-and-WPA2</text:span></text:a></text:p>
      <text:p text:style-name="Normal"><text:span text:style-name="T55">Configuring WPA3 (GUI)</text:span></text:p>
      <text:p text:style-name="P56">…</text:p>
      <text:p text:style-name="Normal"><text:span text:style-name="T57">Step 8 – In the WPA2+WPA3 Parameters section, choose </text:span><text:span text:style-name="T58">WPA3</text:span><text:span text:style-name="T59"> as the Policy.</text:span><text:span text:style-name="T60"><text:line-break/>If you choose </text:span><text:span text:style-name="T61">Personal</text:span><text:span text:style-name="T62">, </text:span><text:span text:style-name="T63">Encryption Cipher is limited to CCMP128(AES)</text:span><text:span text:style-name="T64"> and Authentication Key Management is in the PSK format.</text:span></text:p>
      <text:p text:style-name="P65">Step 9</text:p>
      <text:p text:style-name="Normal"><text:span text:style-name="T66">Chose the </text:span><text:span text:style-name="T67">Encryption Cipher</text:span><text:span text:style-name="T68"> from the following options:</text:span><text:span text:style-name="T69"><text:line-break/>CCMP128(AES)</text:span><text:span text:style-name="T70"><text:line-break/>CCMP256 (not available for Personal security type)</text:span><text:span text:style-name="T71"><text:line-break/>GCMP128 (not available for Personal security type)</text:span><text:span text:style-name="T72"><text:line-break/>GCMP256 (not available for Personal security type)</text:span></text:p>
      <text:p text:style-name="Normal"><text:span text:style-name="T73">Reference: </text:span><text:a xlink:href="https://www.cisco.com/c/en/us/td/docs/wireless/controller/8-10/config-guide/b_cg810/wlan_security.html" office:target-frame-name="_blank" xlink:show="new"><text:span text:style-name="T74">https://www.cisco.com/c/en/us/td/docs/wireless/controller/8-10/config-guide/b_cg810/wlan_security.html</text:span></text:a></text:p>
      <text:p text:style-name="Normal"><text:span text:style-name="T75">Question 12.</text:span><text:span text:style-name="T76">5</text:span></text:p>
      <text:p text:style-name="P77">What is the functionality of the Cisco DNA Center?</text:p>
      <text:p text:style-name="P78">A. data center network policy controller<text:line-break/>B. software-defined controller for automation of devices and services<text:line-break/>C. console server that permits secure access to all network devices<text:line-break/>D. IP address pool distribution scheduler</text:p>
      <text:p text:style-name="P79"> </text:p>
      <text:p text:style-name="Normal"><text:span text:style-name="T80">Answer:</text:span><text:span text:style-name="T81"> B</text:span></text:p>
      <text:p text:style-name="Normal"><text:span text:style-name="T82">Question 12.</text:span><text:span text:style-name="T83">6</text:span></text:p>
      <text:soft-page-break/>
      <text:p text:style-name="P84">Which IP header field is changed by a Cisco device when QoS marking is enabled?</text:p>
      <text:p text:style-name="P85">A. Header Checksum<text:line-break/>B. Type of Service<text:line-break/>C. DSCP<text:line-break/>D. ECN</text:p>
      <text:p text:style-name="P86"> </text:p>
      <text:p text:style-name="Normal"><text:span text:style-name="T87">Answer:</text:span><text:span text:style-name="T88"> B</text:span></text:p>
      <text:p text:style-name="Normal"><text:span text:style-name="T89">Question 12.</text:span><text:span text:style-name="T90">7</text:span></text:p>
      <text:p text:style-name="P91">Refer to the exhibit.</text:p>
      <text:p text:style-name="Normal"><text:span text:style-name="T92"><draw:frame draw:style-name="a3" draw:name="Picture 97" text:anchor-type="as-char" svg:x="0in" svg:y="0in" svg:width="5.51389in" svg:height="2.67361in" style:rel-width="scale" style:rel-height="scale"><draw:image xlink:href="media/image4.jpeg" xlink:type="simple" xlink:show="embed" xlink:actuate="onLoad"/><svg:title/><svg:desc/></draw:frame></text:span></text:p>
      <text:p text:style-name="P93">An IPv6 address must be obtained automatically on the LAN interface on R1. Which command must be implemented to accomplish the task?</text:p>
      <text:p text:style-name="P94">A. ipv6 address 2001:db8:d8d2:1008:4358:23:1390::/64<text:line-break/>B. ipv6 address fe80::/10<text:line-break/>C. ipv6 address dhcp<text:line-break/>D. ipv6 address autoconfig</text:p>
      <text:p text:style-name="P95"> </text:p>
      <text:p text:style-name="Normal"><text:span text:style-name="T96">Answer:</text:span><text:span text:style-name="T97"> C</text:span></text:p>
      <text:p text:style-name="Normal"><text:span text:style-name="T98">Explanation</text:span></text:p>
      <text:soft-page-break/>
      <text:p text:style-name="P99">In fact there are two correct answers for this question, which are “ipv6 address autoconfig” and “ipv6 address dhcp”. The first command can work with or without a DHCPv6 server. The second command “ipv6 address dhcp” is correct too as we can see there is a DHCPv6 on the same LAN so this command works well in this question. As the author of this question put a DHCPv6 server in the topology so maybe answer “ipv6 address dhcp” is the better choice!</text:p>
      <text:p text:style-name="P100">Note: The “ipv6 address autoconfig” command causes the device to perform IPv6 stateless address auto-configuration to discover prefixes on the link and then to add the EUI-64 based addresses to the interface.</text:p>
      <text:p text:style-name="Normal"><text:span text:style-name="T101">Question 12.</text:span><text:span text:style-name="T102">8</text:span></text:p>
      <text:p text:style-name="P103">Refer to the exhibit.</text:p>
      <text:p text:style-name="Normal"><text:span text:style-name="T104"><draw:frame draw:style-name="a4" draw:name="Picture 96" text:anchor-type="as-char" svg:x="0in" svg:y="0in" svg:width="6.5in" svg:height="3.31597in" style:rel-width="scale" style:rel-height="scale"><draw:image xlink:href="media/image5.jpeg" xlink:type="simple" xlink:show="embed" xlink:actuate="onLoad"/><svg:title/><svg:desc/></draw:frame></text:span></text:p>
      <text:p text:style-name="P105">Router-Y#show ip route</text:p>
      <text:p text:style-name="P106"/>
      <text:p text:style-name="P107">Codes: L - local, C - connected, S - static, R - RIP, M - mobile, B - BGP</text:p>
      <text:p text:style-name="P108"><text:s text:c="7"/>D - EIGRP, EX - EIGRP external, O - OSPF, IA - OSPF inter area<text:s/></text:p>
      <text:p text:style-name="P109"><text:s text:c="7"/>N1 - OSPF NSSA external type 1, N2 - OSPF NSSA external type 2</text:p>
      <text:p text:style-name="P110"><text:s text:c="7"/>E1 - OSPF external type 1, E2 - OSPF external type 2</text:p>
      <text:p text:style-name="P111"><text:s text:c="7"/>i - IS-IS, su - IS-IS summary, L1 - IS-IS level-1, L2 - IS-IS level-2</text:p>
      <text:soft-page-break/>
      <text:p text:style-name="P112"><text:s text:c="7"/>ia - IS-IS inter area, * - candidate default, U - per-user static route</text:p>
      <text:p text:style-name="P113"><text:s text:c="7"/>o - ODR, P - periodic downloaded static route, H - NHRP, l - LISP</text:p>
      <text:p text:style-name="P114"><text:s text:c="7"/>+ - replicated route, % - next hop override, p - overrides from PfR</text:p>
      <text:p text:style-name="P115"/>
      <text:p text:style-name="P116">Gateway of last resort is not set</text:p>
      <text:p text:style-name="P117"/>
      <text:p text:style-name="P118">10.0.0.0/8 is variably subnetted<text:s/></text:p>
      <text:p text:style-name="P119">B <text:s text:c="6"/>10.0.0.0/8 [1/0] via 10.224.1.2</text:p>
      <text:p text:style-name="P120">B <text:s text:c="6"/>10.27.150.224/27 [20/0] via 10.224.1.3, 1w6d</text:p>
      <text:p text:style-name="P121">S <text:s text:c="6"/>10.128.0.0/9 [1/0] via 10.224.1.3</text:p>
      <text:p text:style-name="P122">B <text:s text:c="6"/>10.224.0.0/11 [20/0] via 10.224.1.5, 5d18h</text:p>
      <text:p text:style-name="P123">B <text:s text:c="6"/>10.224.0.0/15 [20/0] via 10.224.1.4, 5d18h</text:p>
      <text:p text:style-name="P124">C <text:s text:c="6"/>10.223.0.0/24 is directly connected, GigabitEthernet0/1</text:p>
      <text:p text:style-name="P125">C <text:s text:c="6"/>10.224.0.0/24 is directly connected, GigabitEthernet0/0<text:s/></text:p>
      <text:p text:style-name="P126">B <text:s text:c="6"/>10.226.34.0/24 [20/0] via 10.224.1.5, 5d18h</text:p>
      <text:p text:style-name="P127">PC A is communicating with another device at IP address 10.227.225.255. Through which router does router Y route the traffic?</text:p>
      <text:p text:style-name="P128">A. router A<text:line-break/>B. router B<text:line-break/>C. router C<text:line-break/>D. router D</text:p>
      <text:p text:style-name="P129"> </text:p>
      <text:p text:style-name="Normal"><text:span text:style-name="T130">Answer:</text:span><text:span text:style-name="T131"> D</text:span></text:p>
      <text:p text:style-name="Normal"><text:span text:style-name="T132">Explanation</text:span></text:p>
      <text:p text:style-name="P133">The destination IP address 10.227.225.255 belongs to 10.224.0.0/11 subnet and this is the longest prefix subnet so router Y will send traffic from PC A to 10.224.1.5, which is router D.</text:p>
      <text:p text:style-name="Normal"><text:span text:style-name="T134">Question 12.</text:span><text:span text:style-name="T135">9</text:span></text:p>
      <text:soft-page-break/>
      <text:p text:style-name="P136">What are two protocols within the IPsec suite? (Choose two)</text:p>
      <text:p text:style-name="P137">A. 3DES<text:line-break/>B. AH<text:line-break/>C. ESP<text:line-break/>D. TLS<text:line-break/>E. AES</text:p>
      <text:p text:style-name="P138"> </text:p>
      <text:p text:style-name="Normal"><text:span text:style-name="T139">Answer:</text:span><text:span text:style-name="T140"> B C</text:span></text:p>
      <text:p text:style-name="Normal"><text:span text:style-name="T141">Explanation</text:span></text:p>
      <text:p text:style-name="Normal"><text:span text:style-name="T142">IPsec is a suite of protocols widely used to secure connections over the internet. The three main protocols comprising IPsec are: </text:span><text:span text:style-name="T143">Authentication Header (AH), Encapsulating Security Payload (ESP)</text:span><text:span text:style-name="T144">, and Internet Key Exchange (IKE).</text:span></text:p>
      <text:p text:style-name="Normal"><text:span text:style-name="T145">Reference: </text:span><text:a xlink:href="https://www.twingate.com/blog/ipsec/" office:target-frame-name="_blank" xlink:show="new"><text:span text:style-name="T146">https://www.twingate.com/blog/ipsec/</text:span></text:a></text:p>
      <text:p text:style-name="Normal"><text:span text:style-name="T147">Question 12.</text:span><text:span text:style-name="T148">10</text:span></text:p>
      <text:p text:style-name="P149">Drag and drop the IPv6 address type characteristics from the left to the right.</text:p>
      <text:p text:style-name="Normal"><text:span text:style-name="T150"><draw:frame draw:style-name="a5" draw:name="Picture 95" text:anchor-type="as-char" svg:x="0in" svg:y="0in" svg:width="5.52083in" svg:height="2.47917in" style:rel-width="scale" style:rel-height="scale"><draw:image xlink:href="media/image6.jpeg" xlink:type="simple" xlink:show="embed" xlink:actuate="onLoad"/><svg:title/><svg:desc/></draw:frame></text:span></text:p>
      <text:p text:style-name="P151"> </text:p>
      <text:p text:style-name="Normal"><text:span text:style-name="T152">Answer:</text:span></text:p>
      <text:p text:style-name="Normal"><text:span text:style-name="T153">Global Unicast Address</text:span><text:span text:style-name="T154"><text:line-break/>+ routable and reachable via the Internet</text:span><text:span text:style-name="T155"><text:line-break/>+ equivalent to public IPv4 addresses</text:span></text:p>
      <text:soft-page-break/>
      <text:p text:style-name="Normal"><text:span text:style-name="T156">Unique Local Address</text:span><text:span text:style-name="T157"><text:line-break/>+ addresses with prefix FC00::/7</text:span><text:span text:style-name="T158"><text:line-break/>+ addressing for exclusive use internally without Internet routing</text:span></text:p>
      <text:p text:style-name="Normal"><text:span text:style-name="T159">Explanation</text:span></text:p>
      <text:p text:style-name="Normal"><text:span text:style-name="T160">A IPv6 </text:span><text:span text:style-name="T161">Unique Local Address</text:span><text:span text:style-name="T162"> is an IPv6 address in the block FC00::/7. It is the approximate IPv6 counterpart of the IPv4 private address. It is not routable on the global Internet.</text:span></text:p>
      <text:p text:style-name="P163">Note: In the past, Site-local addresses (FEC0::/10) are equivalent to private IP addresses in IPv4 but now they are deprecated.</text:p>
      <text:p text:style-name="Normal"><text:span text:style-name="T164">Question 12.</text:span><text:span text:style-name="T165">11</text:span></text:p>
      <text:p text:style-name="P166">What are two benefits of private IPv4 addressing? (Choose two)</text:p>
      <text:p text:style-name="P167">A. reuses addresses at multiple sites<text:line-break/>B. provides external internet network connectivity<text:line-break/>C. conserves globally unique address space<text:line-break/>D. propagates routing information to WAN links<text:line-break/>E. provides unlimited address ranges</text:p>
      <text:p text:style-name="P168"> </text:p>
      <text:p text:style-name="Normal"><text:span text:style-name="T169">Answer:</text:span><text:span text:style-name="T170"> A C</text:span></text:p>
      <text:p text:style-name="Normal"><text:span text:style-name="T171">Question 12.</text:span><text:span text:style-name="T172">12</text:span></text:p>
      <text:p text:style-name="P173">Refer to the exhibit.</text:p>
      <text:p text:style-name="Normal"><text:span text:style-name="T174"><draw:frame draw:style-name="a6" draw:name="Picture 94" text:anchor-type="as-char" svg:x="0in" svg:y="0in" svg:width="4.94444in" svg:height="2.13889in" style:rel-width="scale" style:rel-height="scale"><draw:image xlink:href="media/image7.jpeg" xlink:type="simple" xlink:show="embed" xlink:actuate="onLoad"/><svg:title/><svg:desc/></draw:frame></text:span></text:p>
      <text:soft-page-break/>
      <text:p text:style-name="P175">Router R14 is in the process of being configured. Which configuration must be used to establish a host route to PC 10?</text:p>
      <text:p text:style-name="P176">A. ip route 10.80.65.10 255.255.255.254 10.80.65.1<text:line-break/>B. ip route 10.73.65.66 0.0.0.255 10.80.65.10<text:line-break/>C. ip route 10.80.65.10 255.255.255.255 10.73.65.66<text:line-break/>D. ip route 10.73.65.65 255.0.0.0 10.80.65.10</text:p>
      <text:p text:style-name="P177"> </text:p>
      <text:p text:style-name="Normal"><text:span text:style-name="T178">Answer:</text:span><text:span text:style-name="T179"> C</text:span></text:p>
      <text:p text:style-name="Normal"><text:span text:style-name="T180">Explanation</text:span></text:p>
      <text:p text:style-name="P181">A host route is an IPv4 address with a 32-bit mask (255.255.255.255).</text:p>
      <text:p text:style-name="Normal"><text:span text:style-name="T182">Question 12.</text:span><text:span text:style-name="T183">13</text:span></text:p>
      <text:p text:style-name="P184">Refer to the exhibit.</text:p>
      <text:p text:style-name="Normal"><text:span text:style-name="T185"><draw:frame draw:style-name="a7" draw:name="Picture 93" text:anchor-type="as-char" svg:x="0in" svg:y="0in" svg:width="4.22917in" svg:height="0.47917in" style:rel-width="scale" style:rel-height="scale"><draw:image xlink:href="media/image8.jpeg" xlink:type="simple" xlink:show="embed" xlink:actuate="onLoad"/><svg:title/><svg:desc/></draw:frame></text:span></text:p>
      <text:p text:style-name="P186">A static route must be configured on R86 to forward traffic for the 172.16.34.0/29 network, which resides on R14. Which command must be used to fulfill the request?</text:p>
      <text:p text:style-name="P187">A. ip route 172.16.34.0 255.255.255.248 10.73.65.65<text:line-break/>B. ip route 172.16.34.0 255.255.255.224 10.73.65.66<text:line-break/>C. ip route 10.73.65.65 255.255.255.248 172.16.34.0<text:line-break/>D. ip route 172.16.34.0 0.0.0.7 10.73.65.64</text:p>
      <text:p text:style-name="P188"> </text:p>
      <text:p text:style-name="Normal"><text:span text:style-name="T189">Answer:</text:span><text:span text:style-name="T190"> A</text:span></text:p>
      <text:p text:style-name="Normal"><text:span text:style-name="T191">Question 12.</text:span><text:span text:style-name="T192">14</text:span></text:p>
      <text:p text:style-name="P193">Refer to the exhibit.</text:p>
      <text:soft-page-break/>
      <text:p text:style-name="Normal"><text:span text:style-name="T194"><draw:frame draw:style-name="a8" draw:name="Picture 92" text:anchor-type="as-char" svg:x="0in" svg:y="0in" svg:width="6.5in" svg:height="5.71111in" style:rel-width="scale" style:rel-height="scale"><draw:image xlink:href="media/image9.jpeg" xlink:type="simple" xlink:show="embed" xlink:actuate="onLoad"/><svg:title/><svg:desc/></draw:frame></text:span></text:p>
      <text:p text:style-name="P195">The network engineer is configuring a new WLAN and is told to use a setup password for authentication instead of the RADIUS servers. Which additional set of tasks must the engineer perform to complete the configuration?</text:p>
      <text:p text:style-name="Normal"><text:span text:style-name="T196">A. Disable </text:span><text:span text:style-name="T197">PMF</text:span><text:span text:style-name="T198"><text:line-break/>Enable </text:span><text:span text:style-name="T199">PSK</text:span><text:span text:style-name="T200"><text:line-break/>Enable </text:span><text:span text:style-name="T201">802.1x</text:span></text:p>
      <text:p text:style-name="Normal"><text:span text:style-name="T202">B. Select </text:span><text:span text:style-name="T203">WPA Policy</text:span><text:span text:style-name="T204"><text:line-break/>Select </text:span><text:span text:style-name="T205">WPA2 Policy</text:span><text:span text:style-name="T206"><text:line-break/>Enable </text:span><text:span text:style-name="T207">FT PSK</text:span></text:p>
      <text:soft-page-break/>
      <text:p text:style-name="Normal"><text:span text:style-name="T208">C. Select </text:span><text:span text:style-name="T209">WPA2 Policy</text:span><text:span text:style-name="T210"><text:line-break/>Disable </text:span><text:span text:style-name="T211">PMF</text:span><text:span text:style-name="T212"><text:line-break/>Enable </text:span><text:span text:style-name="T213">PSK</text:span></text:p>
      <text:p text:style-name="Normal"><text:span text:style-name="T214">D. Select </text:span><text:span text:style-name="T215">WPA Policy</text:span><text:span text:style-name="T216"><text:line-break/>Enable </text:span><text:span text:style-name="T217">CCKM</text:span><text:span text:style-name="T218"><text:line-break/>Enable </text:span><text:span text:style-name="T219">PSK</text:span></text:p>
      <text:p text:style-name="P220"> </text:p>
      <text:p text:style-name="Normal"><text:span text:style-name="T221">Answer:</text:span><text:span text:style-name="T222"> C</text:span></text:p>
      <text:p text:style-name="Normal"><text:span text:style-name="T223">Explanation</text:span></text:p>
      <text:p text:style-name="P224">Answer A is not correct as we can not enable “PSK” and “802.1x” at the same time.</text:p>
      <text:p text:style-name="P225">Answer B is not correct as we can only choose either “WPA Policy” or WPA2 Policy”.</text:p>
      <text:p text:style-name="P226">Answer D is not correct as we can not enable “CCKM” and “PSK” at the same time.</text:p>
      <text:p text:style-name="P227">We tested answer C successfully and we can configure a password for authentication with either “WPA Policy” or “WPA2 Policy”:</text:p>
      <table:table table:style-name="Table228">
        <table:table-columns>
          <table:table-column table:style-name="TableColumn229"/>
          <table:table-column table:style-name="TableColumn230"/>
        </table:table-columns>
        <table:table-row table:style-name="TableRow231">
          <table:table-cell table:style-name="TableCell232">
            <text:soft-page-break/>
            <text:p text:style-name="Normal"><text:span text:style-name="T233"><draw:frame draw:style-name="a9" draw:name="Picture 91" text:anchor-type="as-char" svg:x="0in" svg:y="0in" svg:width="3.00694in" svg:height="4.70139in" style:rel-width="scale" style:rel-height="scale"><draw:image xlink:href="media/image10.jpeg" xlink:type="simple" xlink:show="embed" xlink:actuate="onLoad"/><svg:title/><svg:desc/></draw:frame></text:span></text:p>
          </table:table-cell>
          <table:table-cell table:style-name="TableCell234">
            <text:p text:style-name="Normal"><text:span text:style-name="T235"><draw:frame draw:style-name="a10" draw:name="Picture 90" text:anchor-type="as-char" svg:x="0in" svg:y="0in" svg:width="3.33333in" svg:height="4.98611in" style:rel-width="scale" style:rel-height="scale"><draw:image xlink:href="media/image11.jpeg" xlink:type="simple" xlink:show="embed" xlink:actuate="onLoad"/><svg:title/><svg:desc/></draw:frame></text:span></text:p>
          </table:table-cell>
        </table:table-row>
      </table:table>
      <text:p text:style-name="Normal"><text:span text:style-name="T236">Question 12.</text:span><text:span text:style-name="T237">15</text:span></text:p>
      <text:p text:style-name="P238">Refer to the exhibit.</text:p>
      <text:p text:style-name="P239">SW1#show run</text:p>
      <text:p text:style-name="P240">Building configuration...</text:p>
      <text:p text:style-name="P241">!</text:p>
      <text:p text:style-name="P242">hostname SW1</text:p>
      <text:p text:style-name="P243">!</text:p>
      <text:p text:style-name="P244">ip domain-name test</text:p>
      <text:p text:style-name="P245">!</text:p>
      <text:p text:style-name="P246">username CCNA privilege 1 password 0 ciscol23</text:p>
      <text:p text:style-name="P247">!</text:p>
      <text:p text:style-name="P248">interface FastEthernet0/1<text:s/></text:p>
      <text:soft-page-break/>
      <text:p text:style-name="P249"><text:s/>switchport access vlan 10</text:p>
      <text:p text:style-name="P250">!</text:p>
      <text:p text:style-name="P251">interface Vlan10</text:p>
      <text:p text:style-name="P252"><text:s/>ip address 192.168.1.2 255.255.255.0</text:p>
      <text:p text:style-name="P253">!</text:p>
      <text:p text:style-name="P254">line vty 0 4<text:s/></text:p>
      <text:p text:style-name="P255"><text:s/>login local</text:p>
      <text:p text:style-name="P256"><text:s/>transport input telnet<text:s/></text:p>
      <text:p text:style-name="P257">line vty 5 15<text:s/></text:p>
      <text:p text:style-name="P258"><text:s/>login local</text:p>
      <text:p text:style-name="P259"><text:s/>transport input telnet<text:s/></text:p>
      <text:p text:style-name="P260"><text:s/></text:p>
      <text:p text:style-name="P261">SW1#show crypto key mypubkey rsa</text:p>
      <text:p text:style-name="P262">% Key pair was generated at: 0:1:23 UTC Mar 1 2021</text:p>
      <text:p text:style-name="P263">Key name: SW1.test</text:p>
      <text:p text:style-name="P264">An engineer is updating the management access configuration of switch SW1 to allow secured, encrypted remote configuration. Which two commands or command sequences must the engineer apply to the switch? (Choose two)</text:p>
      <text:p text:style-name="P265">A. SW1(config)#line vty 0 15<text:line-break/>SW1(config-line)#transport input ssh</text:p>
      <text:p text:style-name="P266">B. SW1(config)# crypto key generate rsa</text:p>
      <text:p text:style-name="P267">C. SW1(config)# interface f0/1<text:line-break/>SW1(config-if)# switch port mode trunk</text:p>
      <text:p text:style-name="P268">D. SW1(config)#enable secret ccnaTest123</text:p>
      <text:p text:style-name="P269">E. SW1(config)# username NEW secret R3mote123</text:p>
      <text:p text:style-name="P270"> </text:p>
      <text:p text:style-name="Normal"><text:span text:style-name="T271">Answer:</text:span><text:span text:style-name="T272"> A D</text:span></text:p>
      <text:p text:style-name="Normal"><text:span text:style-name="T273">Explanation</text:span></text:p>
      <text:soft-page-break/>
      <text:p text:style-name="P274">“encrypted remote configuration” -&gt; configure SSH.</text:p>
      <text:p text:style-name="P275">On VTY lines we configured “login local” command which means that authentication uses locally configured credentials using the “username … secret …” command or “username … password …” command. In this question we already had the latter so we don’t need to configure the former -&gt; Answer E is not correct.</text:p>
      <text:p text:style-name="P276">From the “show crypto key mypubkey rsa”, “Key pair was generated” we learned that the command “crypto key generate rsa” has been issued to create the key -&gt; Answer B is not correct.</text:p>
      <text:p text:style-name="P277">One interesting of SSH is we need to configure an “enable secret” password or we cannot login to the device. We tested it with IOU Web IOSv15.4 with the configuration above and see this result:</text:p>
      <text:p text:style-name="Normal"><text:span text:style-name="T278"><draw:frame draw:style-name="a11" draw:name="Picture 89" text:anchor-type="as-char" svg:x="0in" svg:y="0in" svg:width="2.89583in" svg:height="1.11806in" style:rel-width="scale" style:rel-height="scale"><draw:image xlink:href="media/image12.jpeg" xlink:type="simple" xlink:show="embed" xlink:actuate="onLoad"/><svg:title/><svg:desc/></draw:frame></text:span></text:p>
      <text:p text:style-name="P279">We also created the “NEW” username with command “username NEW secret R3mote123” and received the same result:</text:p>
      <text:p text:style-name="Normal"><text:span text:style-name="T280"><draw:frame draw:style-name="a12" draw:name="Picture 88" text:anchor-type="as-char" svg:x="0in" svg:y="0in" svg:width="2.77083in" svg:height="0.9375in" style:rel-width="scale" style:rel-height="scale"><draw:image xlink:href="media/image13.jpeg" xlink:type="simple" xlink:show="embed" xlink:actuate="onLoad"/><svg:title/><svg:desc/></draw:frame></text:span></text:p>
      <text:p text:style-name="P281">-&gt; Answer D is correct.</text:p>
      <text:p text:style-name="Normal"><text:span text:style-name="T282">Question 12.</text:span><text:span text:style-name="T283">16</text:span></text:p>
      <text:p text:style-name="P284">Refer to the exhibit.</text:p>
      <text:soft-page-break/>
      <text:p text:style-name="Normal"><text:span text:style-name="T285"><draw:frame draw:style-name="a13" draw:name="Picture 87" text:anchor-type="as-char" svg:x="0in" svg:y="0in" svg:width="4.25in" svg:height="4.86806in" style:rel-width="scale" style:rel-height="scale"><draw:image xlink:href="media/image14.jpeg" xlink:type="simple" xlink:show="embed" xlink:actuate="onLoad"/><svg:title/><svg:desc/></draw:frame></text:span></text:p>
      <text:p text:style-name="P286">Which two values does router R1 use to identify valid routes for the R3 loopback address 1.1.1.3/32? (Choose two)</text:p>
      <text:p text:style-name="P287">A. lowest cost to reach the next hop<text:line-break/>B. lowest administrative distance<text:line-break/>C. lowest metric<text:line-break/>D. highest metric<text:line-break/>E. highest administrative distance</text:p>
      <text:p text:style-name="P288"> </text:p>
      <text:p text:style-name="Normal"><text:span text:style-name="T289">Answer:</text:span><text:span text:style-name="T290"> B C</text:span></text:p>
      <text:p text:style-name="Normal"><text:span text:style-name="T291">Explanation</text:span></text:p>
      <text:p text:style-name="P292">It seems there are two versions of this question. If this question has the answer “longest prefix match” then please choose it (instead of “lowest metric” answer).</text:p>
      <text:soft-page-break/>
      <text:p text:style-name="Normal"><text:span text:style-name="T293">Question 12.</text:span><text:span text:style-name="T294">17</text:span></text:p>
      <text:p text:style-name="P295">Refer to the exhibit.</text:p>
      <text:p text:style-name="P296">[</text:p>
      <text:p text:style-name="P297"><text:s text:c="2"/>{"switch": "3750", "port": e2},</text:p>
      <text:p text:style-name="P298"><text:s text:c="2"/>{"router": "2951", "port": e20},</text:p>
      <text:p text:style-name="P299"><text:s text:c="2"/>{"switch": "3750", "port": e23}</text:p>
      <text:p text:style-name="P300">]</text:p>
      <text:p text:style-name="P301">What is represented by the word “switch” in line 2 of the JSON schema?</text:p>
      <text:p text:style-name="P302">A. object<text:line-break/>B. key<text:line-break/>C. value<text:line-break/>D. array</text:p>
      <text:p text:style-name="P303"> </text:p>
      <text:p text:style-name="Normal"><text:span text:style-name="T304">Answer:</text:span><text:span text:style-name="T305"> B</text:span></text:p>
      <text:p text:style-name="Normal"><text:span text:style-name="T306">Explanation</text:span></text:p>
      <text:p text:style-name="Normal"><text:span text:style-name="T307">JSON uses curly braces {} to </text:span><text:span text:style-name="T308">hold objects</text:span><text:span text:style-name="T309"> and square brackets [] to hold arrays.</text:span></text:p>
      <text:p text:style-name="Normal"><text:span text:style-name="T310">Question 12.</text:span><text:span text:style-name="T311">18</text:span></text:p>
      <text:p text:style-name="P312">Refer to the exhibit.</text:p>
      <text:soft-page-break/>
      <text:p text:style-name="Normal"><text:span text:style-name="T313"><draw:frame draw:style-name="a14" draw:name="Picture 86" text:anchor-type="as-char" svg:x="0in" svg:y="0in" svg:width="5.29861in" svg:height="2.9375in" style:rel-width="scale" style:rel-height="scale"><draw:image xlink:href="media/image15.jpeg" xlink:type="simple" xlink:show="embed" xlink:actuate="onLoad"/><svg:title/><svg:desc/></draw:frame></text:span></text:p>
      <text:p text:style-name="P314">User traffic originating within site B is failing to reach an application hosted on IP address 192.168.0.10, which is located within site A. What is determined by the routing table?</text:p>
      <text:p text:style-name="P315">A. The traffic to 192.168.0.10 requires a static route to be configured in router1<text:line-break/>B. The lack of a default route prevents delivery of the traffic<text:line-break/>C. The default gateway for site B is configured incorrectly.<text:line-break/>D. The traffic is blocked by an implicit deny in an ACL on router2.</text:p>
      <text:p text:style-name="P316"> </text:p>
      <text:p text:style-name="Normal"><text:span text:style-name="T317">Answer:</text:span><text:span text:style-name="T318"> B</text:span></text:p>
      <text:p text:style-name="Normal"><text:span text:style-name="T319">Explanation</text:span></text:p>
      <text:p text:style-name="P320">There is no route destined to network 192.168.0.0 so we need this route or the default route.</text:p>
      <text:p text:style-name="Normal"><text:span text:style-name="T321">Question 12.</text:span><text:span text:style-name="T322">19</text:span></text:p>
      <text:p text:style-name="P323">Which cable type must be used to interconnect one switch using 1000 BASE-SX GBIC modules and another switch using 1000 BASE-SX SFP modules?</text:p>
      <text:p text:style-name="P324">A. LC to LC<text:line-break/>B. LC to SC<text:line-break/>C. SC to SC<text:line-break/>D. SC to ST</text:p>
      <text:soft-page-break/>
      <text:p text:style-name="P325"> </text:p>
      <text:p text:style-name="Normal"><text:span text:style-name="T326">Answer:</text:span><text:span text:style-name="T327"> B</text:span></text:p>
      <text:p text:style-name="Normal"><text:span text:style-name="T328">Explanation</text:span></text:p>
      <text:p text:style-name="Normal"><text:span text:style-name="T329">GBIC and SFP are both hot-swappable input/output devices that plug into a physical port or a slot. GBIC is commonly used with Gigabit Ethernet and Fibre Channel. But its applications are not limited to these two types. There is also Fast Ethernet (FE) GBIC, BIDI GBIC, CWDM GBIC, DWDM GBIC, etc. Generally, </text:span><text:span text:style-name="T330">GBIC is with the SC connector</text:span><text:span text:style-name="T331">.</text:span></text:p>
      <text:p text:style-name="Normal"><text:span text:style-name="T332">SFP came into existence later than GBIC. SFP transceivers are designed to support SONET (Synchronous Optical Network), Gigabit Ethernet, Fibre Channel, and other communications standards. </text:span><text:span text:style-name="T333">It is usually with LC connector</text:span><text:span text:style-name="T334">. SFP is also known as mini-GBIC because it has the same functionality as GBIC but in a smaller form factor.</text:span></text:p>
      <text:p text:style-name="Normal"><text:span text:style-name="T335"><draw:frame draw:style-name="a15" draw:name="Picture 85" text:anchor-type="as-char" svg:x="0in" svg:y="0in" svg:width="6.5in" svg:height="2.47639in" style:rel-width="scale" style:rel-height="scale"><draw:image xlink:href="media/image16.jpeg" xlink:type="simple" xlink:show="embed" xlink:actuate="onLoad"/><svg:title/><svg:desc/></draw:frame></text:span><text:span text:style-name="T336">-&gt; In summary, GBIC uses SC connector while SFP uses LC connector. Therefore in this question, to connect GBIC to SFP we need LC to SC cable type.</text:span></text:p>
      <text:p text:style-name="Normal"><text:span text:style-name="T337">Question 12.</text:span><text:span text:style-name="T338">20</text:span></text:p>
      <text:p text:style-name="P339">Drag and drop the virtualization concepts from the left onto the matching statements on the right.</text:p>
      <text:soft-page-break/>
      <text:p text:style-name="Normal"><text:span text:style-name="T340"><draw:frame draw:style-name="a16" draw:name="Picture 84" text:anchor-type="as-char" svg:x="0in" svg:y="0in" svg:width="4.60417in" svg:height="2.41667in" style:rel-width="scale" style:rel-height="scale"><draw:image xlink:href="media/image17.jpeg" xlink:type="simple" xlink:show="embed" xlink:actuate="onLoad"/><svg:title/><svg:desc/></draw:frame></text:span></text:p>
      <text:p text:style-name="P341"> </text:p>
      <text:p text:style-name="Normal"><text:span text:style-name="T342">Answer:</text:span></text:p>
      <text:p text:style-name="Normal"><text:span text:style-name="T343">+ An operating system instance that is decoupled from the server hardware: </text:span><text:span text:style-name="T344">virtual machine</text:span><text:span text:style-name="T345"><text:line-break/>+ Each core can run more than one process simultaneously: </text:span><text:span text:style-name="T346">multithreading</text:span><text:span text:style-name="T347"><text:line-break/>+ Runs on a physical server, manages, and allocates the physical resources: </text:span><text:span text:style-name="T348">hypervisor</text:span><text:span text:style-name="T349"><text:line-break/>+ The software that manages the basic functions of the physical hardware: </text:span><text:span text:style-name="T350">host operating system</text:span><text:span text:style-name="T351"><text:line-break/>+ The software that manages the basic functions of the virtual machine: </text:span><text:span text:style-name="T352">guest operating system</text:span></text:p>
      <text:p text:style-name="Normal"><text:span text:style-name="T353">Explanation</text:span></text:p>
      <text:p text:style-name="Normal"><text:span text:style-name="T354">Surely answer 2 (Each core can run more than one process simultaneously: </text:span><text:span text:style-name="T355">multithreading</text:span><text:span text:style-name="T356">) and answer 3 (Runs on a physical server, manages, and allocates the physical resources: </text:span><text:span text:style-name="T357">hypervisor</text:span><text:span text:style-name="T358">) are correct so we only have three matches left.</text:span></text:p>
      <text:p text:style-name="Normal"><text:span text:style-name="T359">A virtual machine (VM) is an operating system (OS)</text:span><text:span text:style-name="T360"> or application environment installed on software that imitates dedicated hardware.</text:span></text:p>
      <text:p text:style-name="Normal"><text:span text:style-name="T361">Reference: </text:span><text:a xlink:href="https://www.techtarget.com/searchitoperations/definition/virtual-machine-VM" office:target-frame-name="_blank" xlink:show="new"><text:span text:style-name="T362">https://www.techtarget.com/searchitoperations/definition/virtual-machine-VM</text:span></text:a></text:p>
      <text:soft-page-break/>
      <text:p text:style-name="P363">The definition of “Operating system” is:<text:line-break/>“An operating system (OS) is a software that manages computer hardware and software resources …”</text:p>
      <text:p text:style-name="Normal"><text:span text:style-name="T364">Reference: </text:span><text:a xlink:href="https://www.studysmarter.co.uk/explanations/computer-science/computer-systems/operating-systems/" office:target-frame-name="_blank" xlink:show="new"><text:span text:style-name="T365">https://www.studysmarter.co.uk/explanations/computer-science/computer-systems/operating-systems/</text:span></text:a></text:p>
      <text:p text:style-name="P366">And in our question there are two options “the software that manages …” so they should be matched for two types of OS.</text:p>
      <text:p text:style-name="Normal"><text:span text:style-name="T367">There are only 2 matches of “guest operating system” and “host operating system” so let’s find out the differences between them. The comparison below is taken from this link (</text:span><text:a xlink:href="https://www.sangfor.com/glossary/cloud-and-infrastructure/what-is-host-operating-system" office:target-frame-name="_blank" xlink:show="new"><text:span text:style-name="T368">https://www.sangfor.com/glossary/cloud-and-infrastructure/what-is-host-operating-system</text:span></text:a><text:span text:style-name="T369">):</text:span></text:p>
      <text:p text:style-name="Normal"><text:span text:style-name="T370">Host Operating Systems vs Guest Operating Systems</text:span><text:span text:style-name="T371"><text:line-break/>While both host operating systems and guest operating use the same resources, they function independently from one another. Guest operating systems differ from the host operating system in several ways:</text:span></text:p>
      <text:p text:style-name="Normal"><text:span text:style-name="T372">+ The host operating system is software installed on a computer system that communicates with the underlying hardware. While a </text:span><text:span text:style-name="T373">guest OS is software that is installed in a virtual machine</text:span><text:span text:style-name="T374">.</text:span><text:span text:style-name="T375"><text:line-break/>+ The </text:span><text:span text:style-name="T376">host operating system executes directly on the hardware</text:span><text:span text:style-name="T377"> while a guest operating system executes on a virtual machine.</text:span></text:p>
      <text:p text:style-name="Normal"><text:span text:style-name="T378">Therefore the best matches should be “The software that manages the basic functions of the virtual machine: </text:span><text:span text:style-name="T379">guest operating system</text:span><text:span text:style-name="T380">” and “An operating system instance that is decoupled from the server hardware: </text:span><text:span text:style-name="T381">host operating system</text:span><text:span text:style-name="T382">“.</text:span></text:p>
      <text:p text:style-name="Normal"><text:span text:style-name="T383">Question 12.</text:span><text:span text:style-name="T384">21</text:span></text:p>
      <text:p text:style-name="P385">Which channel-group mode must be configured when multiple distribution switch interfaces connected to a WLC are bundled?</text:p>
      <text:p text:style-name="P386">A. channel-group mode active<text:line-break/>B. channel-group mode on<text:line-break/>C. channel-group mode desirable <text:line-break/>D. channel-group mode passive</text:p>
      <text:soft-page-break/>
      <text:p text:style-name="P387"> </text:p>
      <text:p text:style-name="Normal"><text:span text:style-name="T388">Answer:</text:span><text:span text:style-name="T389"> B</text:span></text:p>
      <text:p text:style-name="Normal"><text:span text:style-name="T390">Explanation</text:span></text:p>
      <text:p text:style-name="P391">Cisco Wireless LAN Controller Configuration Guide, Release 7.4</text:p>
      <text:p text:style-name="P392">Link aggregation (LAG) is a partial implementation of the 802.3ad port aggregation standard. It bundles all of the controller’s distribution system ports into a single 802.3ad port channel. This reduces the number of IP addresses required to configure the ports on your controller. When LAG is enabled, the system dynamically manages port redundancy and load balances access points transparently to the user.</text:p>
      <text:p text:style-name="P393">LAG requires the EtherChannel to be configured for ‘mode on’ on both the controller and the Catalyst switch.</text:p>
      <text:p text:style-name="Normal"><text:span text:style-name="T394">Reference: </text:span><text:a xlink:href="https://www.cisco.com/c/en/us/td/docs/wireless/controller/7-4/configuration/guides/consolidated/b_cg74_CONSOLIDATED/b_cg74_CONSOLIDATED_chapter_010100001.html" office:target-frame-name="_blank" xlink:show="new"><text:span text:style-name="T395">https://www.cisco.com/c/en/us/td/docs/wireless/controller/7-4/configuration/guides/consolidated/b_cg74_CONSOLIDATED/b_cg74_CONSOLIDATED_chapter_010100001.html</text:span></text:a></text:p>
      <text:p text:style-name="Normal"><text:span text:style-name="T396">Question 12.</text:span><text:span text:style-name="T397">22</text:span></text:p>
      <text:p text:style-name="P398">Refer to the exhibit.</text:p>
      <text:p text:style-name="Normal"><text:span text:style-name="T399"><draw:frame draw:style-name="a17" draw:name="Picture 83" text:anchor-type="as-char" svg:x="0in" svg:y="0in" svg:width="5.15972in" svg:height="1.04167in" style:rel-width="scale" style:rel-height="scale"><draw:image xlink:href="media/image18.jpeg" xlink:type="simple" xlink:show="embed" xlink:actuate="onLoad"/><svg:title/><svg:desc/></draw:frame></text:span></text:p>
      <text:p text:style-name="P400">R1#</text:p>
      <text:p text:style-name="P401">!</text:p>
      <text:p text:style-name="P402">interface Loopback0</text:p>
      <text:p text:style-name="P403"><text:s/>ip address 10.1.1.1 255.255.255.255</text:p>
      <text:p text:style-name="P404">!</text:p>
      <text:p text:style-name="P405">interface FastEthernet0/0</text:p>
      <text:p text:style-name="P406"><text:s/>ip address 10.139.91.1 255.255.255.252</text:p>
      <text:p text:style-name="P407"><text:s/>ip virtual—reassembly in</text:p>
      <text:soft-page-break/>
      <text:p text:style-name="P408">!</text:p>
      <text:p text:style-name="P409">interface FastEthernet1/0</text:p>
      <text:p text:style-name="P410"><text:s/>ip address 172.16.29.1 255.255.255.0</text:p>
      <text:p text:style-name="P411"><text:s/>ip virtual-reassembly in</text:p>
      <text:p text:style-name="P412">!</text:p>
      <text:p text:style-name="P413">router eigrp 100</text:p>
      <text:p text:style-name="P414"><text:s/>network 10.1.1.1 0.0.0.0</text:p>
      <text:p text:style-name="P415"><text:s/>network 10.139.91.0 0.0.0.3</text:p>
      <text:p text:style-name="P416">!</text:p>
      <text:p text:style-name="P417">--output suppressed--</text:p>
      <text:p text:style-name="P418">An engineer must translate the PC1 IP address to 10.199.77.100 and permit PC1 to ping the loopback 0 interface on router R2. Which configuration must be used?</text:p>
      <table:table table:style-name="Table419">
        <table:table-columns>
          <table:table-column table:style-name="TableColumn420"/>
          <table:table-column table:style-name="TableColumn421"/>
        </table:table-columns>
        <table:table-row table:style-name="TableRow422">
          <table:table-cell table:style-name="TableCell423">
            <text:p text:style-name="P424">Option A</text:p>
            <text:p text:style-name="P425">R1#<text:line-break/>!<text:line-break/>interface FastEthernet0/0<text:line-break/>ip nat outside<text:line-break/>!<text:line-break/>interface FastEthernet1/0<text:line-break/>ip nat inside<text:line-break/>!<text:line-break/>ip nat inside source static 172.16.29.78 10.199.77.100</text:p>
            <text:p text:style-name="P426">R2<text:line-break/>ip route 10.199.77.100 255.255.255.255 10.139.91.1</text:p>
          </table:table-cell>
          <table:table-cell table:style-name="TableCell427">
            <text:p text:style-name="P428">Option B</text:p>
            <text:p text:style-name="P429">R1#<text:line-break/>!<text:line-break/>interface FastEthernet0/0<text:line-break/>ip nat inside<text:line-break/>!<text:line-break/>interface FastEthernet1/0 <text:line-break/>ip nat outside<text:line-break/>!<text:line-break/>ip nat inside source static 10.199.77.100 172.16.29.78</text:p>
            <text:p text:style-name="P430">R2<text:line-break/>ip route 10.199.77.100 255.255.255.255 10.139.91.1</text:p>
          </table:table-cell>
        </table:table-row>
        <table:table-row table:style-name="TableRow431">
          <table:table-cell table:style-name="TableCell432">
            <text:p text:style-name="P433">Option C</text:p>
            <text:p text:style-name="P434">R1#<text:line-break/>!<text:line-break/><text:soft-page-break/>interface FastEthernet0/0<text:line-break/>ip nat outside<text:line-break/>!<text:line-break/>interface FastEthernet1/0<text:line-break/>ip nat inside<text:line-break/>!<text:line-break/>ip nat inside source static 172.16.29.78 10.199.77.100</text:p>
            <text:p text:style-name="P435">R2<text:line-break/>ip route 172.16.29.78 255.255.255.255 10.139.91.1</text:p>
          </table:table-cell>
          <table:table-cell table:style-name="TableCell436">
            <text:p text:style-name="P437">Option D</text:p>
            <text:p text:style-name="P438">R1#<text:line-break/>!<text:line-break/><text:soft-page-break/>interface FastEthernet0/0<text:line-break/>ip nat outside<text:line-break/>!<text:line-break/>interface FastEthernet1/0<text:line-break/>ip nat inside<text:line-break/>!<text:line-break/>ip nat inside source static 172.16.29.78 10.199.77.100</text:p>
            <text:p text:style-name="P439">R2<text:line-break/>ip route 172.16.29.78 255.255.255.255 10.139.91.1</text:p>
          </table:table-cell>
        </table:table-row>
      </table:table>
      <text:soft-page-break/>
      <text:p text:style-name="P440">A. Option A<text:line-break/>B. Option B<text:line-break/>C. Option C<text:line-break/>D. Option D</text:p>
      <text:p text:style-name="P441"> </text:p>
      <text:p text:style-name="Normal"><text:span text:style-name="T442">Answer:</text:span><text:span text:style-name="T443"> A</text:span></text:p>
      <text:p text:style-name="Normal"><text:span text:style-name="T444">Explanation</text:span></text:p>
      <text:p text:style-name="P445">PC1 can ping the loopback 0 interface on R2 so R2 must know how to route to 10.199.77.100. In this question R2 uses a static route so it should be:</text:p>
      <text:p text:style-name="P446">R2:<text:line-break/>ip route 10.199.77.100 255.255.255.255 10.139.91.1 -&gt; Only Option A and Option B are correct.<text:line-break/>Interface F1/0 on R1 must be “ip nat inside” and F0/0 must be “ip nat outside” -&gt; Only Option A is correct.</text:p>
      <text:p text:style-name="Normal"><text:span text:style-name="T447">Question 12.</text:span><text:span text:style-name="T448">23</text:span></text:p>
      <text:p text:style-name="P449">Drag and drop the TCP or UDP details from the left onto their corresponding protocols on the right.</text:p>
      <text:soft-page-break/>
      <text:p text:style-name="Normal"><text:span text:style-name="T450"><draw:frame draw:style-name="a18" draw:name="Picture 82" text:anchor-type="as-char" svg:x="0in" svg:y="0in" svg:width="6.5in" svg:height="2.72708in" style:rel-width="scale" style:rel-height="scale"><draw:image xlink:href="media/image19.jpeg" xlink:type="simple" xlink:show="embed" xlink:actuate="onLoad"/><svg:title/><svg:desc/></draw:frame></text:span></text:p>
      <text:p text:style-name="P451"> </text:p>
      <text:p text:style-name="Normal"><text:span text:style-name="T452">Answer:</text:span></text:p>
      <text:p text:style-name="Normal"><text:span text:style-name="T453">TCP</text:span><text:span text:style-name="T454"><text:line-break/>+ used to reliably share files between devices</text:span><text:span text:style-name="T455"><text:line-break/>+ supports reliable data transmission</text:span></text:p>
      <text:p text:style-name="Normal"><text:span text:style-name="T456">UDP</text:span><text:span text:style-name="T457"><text:line-break/>+ provides best-effort service</text:span><text:span text:style-name="T458"><text:line-break/>+ appropriate for streaming operations with minimal latency</text:span></text:p>
      <text:p text:style-name="Normal"><text:span text:style-name="T459">Question 12.</text:span><text:span text:style-name="T460">24</text:span></text:p>
      <text:p text:style-name="P461">A network engineer must configure an interface with IP address 10.10.10.145 and a subnet mask equivalent to 11111111.11111111.11111111.11111000. Which subnet mask must the engineer use?</text:p>
      <text:p text:style-name="P462">A. /27<text:line-break/>B. /28<text:line-break/>C. /29<text:line-break/>D. /30</text:p>
      <text:p text:style-name="P463"> </text:p>
      <text:p text:style-name="Normal"><text:span text:style-name="T464">Answer:</text:span><text:span text:style-name="T465"> C</text:span></text:p>
      <text:p text:style-name="Normal"><text:span text:style-name="T466">Question 12.</text:span><text:span text:style-name="T467">25</text:span></text:p>
      <text:soft-page-break/>
      <text:p text:style-name="P468">Which two server types support domain name to IP address resolution? (Choose two)</text:p>
      <text:p text:style-name="P469">A. ESX host<text:line-break/>B. web<text:line-break/>C. resolver<text:line-break/>D. authoritative<text:line-break/>E. file transfer</text:p>
      <text:p text:style-name="P470"> </text:p>
      <text:p text:style-name="Normal"><text:span text:style-name="T471">Answer:</text:span><text:span text:style-name="T472"> C D</text:span></text:p>
      <text:p text:style-name="Normal"><text:span text:style-name="T473">Explanation</text:span></text:p>
      <text:p text:style-name="P474">All DNS servers fall into one of four categories: Recursive resolvers, root nameservers, TLD nameservers, and authoritative nameservers.</text:p>
      <text:p text:style-name="Normal"><text:span text:style-name="T475">Question 12.</text:span><text:span text:style-name="T476">26</text:span></text:p>
      <text:p text:style-name="P477">Refer to the exhibit.</text:p>
      <text:p text:style-name="Normal"><text:span text:style-name="T478"><draw:frame draw:style-name="a19" draw:name="Picture 81" text:anchor-type="as-char" svg:x="0in" svg:y="0in" svg:width="6.5in" svg:height="2.84583in" style:rel-width="scale" style:rel-height="scale"><draw:image xlink:href="media/image20.jpeg" xlink:type="simple" xlink:show="embed" xlink:actuate="onLoad"/><svg:title/><svg:desc/></draw:frame></text:span></text:p>
      <text:p text:style-name="P479">The router R1 is in the process of being configured. Routers R2 and R3 are configured correctly for the new environment. Which two commands must be configured on R1 for PC1 to communicate to all PCs on the 10.10.10.0/24 network? (Choose two)</text:p>
      <text:soft-page-break/>
      <text:p text:style-name="P480">A. ip route 10.10.10.8 255.255.255.248 g0/1<text:line-break/>B. ip route 10.10.10.10 255.255.255.255 g0/1<text:line-break/>C. ip route 10.10.10.0 255.255.255.248 192.168.2.2<text:line-break/>D. ip route 10.10.10.0 255.255.255.0 192.168.2.3<text:line-break/>E. ip route 10.10.10.10 255.255.255.255 192.168.2.2</text:p>
      <text:p text:style-name="P481"> </text:p>
      <text:p text:style-name="Normal"><text:span text:style-name="T482">Answer:</text:span><text:span text:style-name="T483"> D E</text:span></text:p>
      <text:p text:style-name="Normal"><text:span text:style-name="T484">Question 12.</text:span><text:span text:style-name="T485">27</text:span></text:p>
      <text:p text:style-name="P486">Which switching feature removes unused MAC addresses from the MAC address table, which allows new MAC addresses to be added?</text:p>
      <text:p text:style-name="P487">A. MAC move<text:line-break/>B. MAC address aging<text:line-break/>C. dynamic MAC address learning<text:line-break/>D. MAC address auto purge</text:p>
      <text:p text:style-name="P488"> </text:p>
      <text:p text:style-name="Normal"><text:span text:style-name="T489">Answer:</text:span><text:span text:style-name="T490"> B</text:span></text:p>
      <text:p text:style-name="Normal"><text:span text:style-name="T491">Question 12.</text:span><text:span text:style-name="T492">28</text:span></text:p>
      <text:p text:style-name="P493">Which two northbound APIs are found in a software-defined network? (Choose two)</text:p>
      <text:p text:style-name="P494">A. SOAP<text:line-break/>B. OpFlex<text:line-break/>C. REST<text:line-break/>D. NETCONF<text:line-break/>E. OpenFlow</text:p>
      <text:p text:style-name="P495"> </text:p>
      <text:p text:style-name="Normal"><text:span text:style-name="T496">Answer:</text:span><text:span text:style-name="T497"> A C</text:span></text:p>
      <text:p text:style-name="Normal"><text:span text:style-name="T498">Explanation</text:span></text:p>
      <text:soft-page-break/>
      <text:p text:style-name="P499">SDN northbound APIs are usually RESTful APIs used to communicate between the SDN Controller and the services and applications running over the network. Another northbound API is Simple Object Access Protocol (SOAP).</text:p>
      <text:p text:style-name="Normal"><text:span text:style-name="T500">Question 12.</text:span><text:span text:style-name="T501">29</text:span></text:p>
      <text:p text:style-name="P502">What uses HTTP messages to transfer data to applications residing on different hosts?</text:p>
      <text:p text:style-name="P503">A. REST<text:line-break/>B. OpenStack<text:line-break/>C. OpFlex<text:line-break/>D. OpenFlow </text:p>
      <text:p text:style-name="P504"> </text:p>
      <text:p text:style-name="Normal"><text:span text:style-name="T505">Answer:</text:span><text:span text:style-name="T506"> A</text:span></text:p>
      <text:p text:style-name="Normal"><text:span text:style-name="T507">Explanation</text:span></text:p>
      <text:p text:style-name="Normal"><text:span text:style-name="T508">REST</text:span><text:span text:style-name="T509"> (Representational State Transfer) describes a type of API that allows applications to sit on different hosts, using HTTP messages to transfer data over the API.</text:span></text:p>
      <text:p text:style-name="Normal"><text:span text:style-name="T510">Question 12.</text:span><text:span text:style-name="T511">30</text:span></text:p>
      <text:p text:style-name="P512">Refer to the exhibit.</text:p>
      <text:soft-page-break/>
      <text:p text:style-name="Normal"><text:span text:style-name="T513"><draw:frame draw:style-name="a20" draw:name="Picture 80" text:anchor-type="as-char" svg:x="0in" svg:y="0in" svg:width="4.58333in" svg:height="3.5in" style:rel-width="scale" style:rel-height="scale"><draw:image xlink:href="media/image21.jpeg" xlink:type="simple" xlink:show="embed" xlink:actuate="onLoad"/><svg:title/><svg:desc/></draw:frame></text:span></text:p>
      <text:p text:style-name="P514">What is the next-hop IP address for R2 so that PC2 reaches the application server via EIGRP?</text:p>
      <text:p text:style-name="P515">A. 10.10.10.5<text:line-break/>B. 192.168.20.1<text:line-break/>C. 10.10.10.6<text:line-break/>D. 192.168.30.1</text:p>
      <text:p text:style-name="P516"> </text:p>
      <text:p text:style-name="Normal"><text:span text:style-name="T517">Answer:</text:span><text:span text:style-name="T518"> C</text:span></text:p>
      <text:p text:style-name="Normal"><text:span text:style-name="T519">Question 12.</text:span><text:span text:style-name="T520">31</text:span></text:p>
      <text:p text:style-name="P521">Drag and drop the configuration management terms from the left onto the descriptions on the right. Not all terms are used.</text:p>
      <text:soft-page-break/>
      <text:p text:style-name="Normal"><text:span text:style-name="T522"><draw:frame draw:style-name="a21" draw:name="Picture 79" text:anchor-type="as-char" svg:x="0in" svg:y="0in" svg:width="4.60417in" svg:height="2.72917in" style:rel-width="scale" style:rel-height="scale"><draw:image xlink:href="media/image22.jpeg" xlink:type="simple" xlink:show="embed" xlink:actuate="onLoad"/><svg:title/><svg:desc/></draw:frame></text:span></text:p>
      <text:p text:style-name="P523"> </text:p>
      <text:p text:style-name="Normal"><text:span text:style-name="T524">Answer:</text:span></text:p>
      <text:p text:style-name="P525">+ easy-to-manage deployment option that may lack scalability: agent<text:line-break/>+ device hardware that runs without embedded management features: agentless<text:line-break/>+ to automatically install or deploy a configuration or update: pull<text:line-break/>+ daemon that determines when the central authority has updates available: provision<text:line-break/>+ model in which the central server sends updates to nodes on an as-needed basis: push</text:p>
      <text:p text:style-name="Normal"><text:span text:style-name="T526">Question 12.</text:span><text:span text:style-name="T527">32</text:span></text:p>
      <text:p text:style-name="P528">A switch is forwarding a frame out of all interfaces except the interface that received the frame. What is the technical term for this process?</text:p>
      <text:p text:style-name="P529">A. CDP<text:line-break/>B. multicast<text:line-break/>C. flooding<text:line-break/>D. ARP</text:p>
      <text:p text:style-name="P530"> </text:p>
      <text:p text:style-name="Normal"><text:span text:style-name="T531">Answer:</text:span><text:span text:style-name="T532"> C</text:span></text:p>
      <text:p text:style-name="Normal"><text:span text:style-name="T533">Question 12.</text:span><text:span text:style-name="T534">33</text:span></text:p>
      <text:soft-page-break/>
      <text:p text:style-name="P535">What is a characteristic of RSA?</text:p>
      <text:p text:style-name="P536">A. It uses preshared keys for encryption<text:line-break/>B. It is an asymmetric encryption algorithm<text:line-break/>C. It requires both sides to have identical keys for encryption<text:line-break/>D. It is a symmetric decryption algorithm.</text:p>
      <text:p text:style-name="P537"> </text:p>
      <text:p text:style-name="Normal"><text:span text:style-name="T538">Answer:</text:span><text:span text:style-name="T539"> B</text:span></text:p>
      <text:p text:style-name="Normal"><text:span text:style-name="T540">Explanation</text:span></text:p>
      <text:p text:style-name="Normal"><text:span text:style-name="T541">RSA is a public-key encryption algorithm that uses an </text:span><text:span text:style-name="T542">asymmetric</text:span><text:span text:style-name="T543"> encryption algorithm to encrypt data. Asymmetric encryption uses a key pair that is mathematically linked to encrypt and decrypt data. A private and public key are created, with the public key being accessible to anyone and the private key being a secret known only by the key pair creator. With RSA, either the private or public key can encrypt the data, while the other key decrypts it. This is one of the reasons RSA is the most used asymmetric encryption algorithm.</text:span></text:p>
      <text:p text:style-name="Normal"><text:span text:style-name="T544">Question 12.</text:span><text:span text:style-name="T545">34</text:span></text:p>
      <text:p text:style-name="P546">Refer to the exhibit.</text:p>
      <text:p text:style-name="Normal"><text:span text:style-name="T547"><draw:frame draw:style-name="a22" draw:name="Picture 78" text:anchor-type="as-char" svg:x="0in" svg:y="0in" svg:width="2.90972in" svg:height="2.64583in" style:rel-width="scale" style:rel-height="scale"><draw:image xlink:href="media/image23.jpeg" xlink:type="simple" xlink:show="embed" xlink:actuate="onLoad"/><svg:title/><svg:desc/></draw:frame></text:span></text:p>
      <text:p text:style-name="P548">All interfaces are in the same VLAN. All switches are configured with the default STP priorities. During the STP elections, which switch becomes the root bridge?</text:p>
      <text:soft-page-break/>
      <text:p text:style-name="P549">A. MDF-DC-3: 08:0E:18:1A:3C:9D<text:line-break/>B. MDF-DC-4: 08:E0:19:A1:B3:19<text:line-break/>C. MDF-DC-2: 08:0E:18:22:05:97<text:line-break/>D. MDF-DC-1: 08:E0:43:78:24:50</text:p>
      <text:p text:style-name="P550"> </text:p>
      <text:p text:style-name="Normal"><text:span text:style-name="T551">Answer:</text:span><text:span text:style-name="T552"> A</text:span></text:p>
      <text:p text:style-name="Normal"><text:span text:style-name="T553">Question 12.</text:span><text:span text:style-name="T554">35</text:span></text:p>
      <text:p text:style-name="P555">Which advantage does the network assurance capability of Cisco DNA Center provide over traditional campus management?</text:p>
      <text:p text:style-name="P556">A. Cisco DNA Center leverages YANG and NETCONF to assess the status of fabric and nonfabric devices, and traditional campus management uses CLI exclusively<text:line-break/>B. Cisco DNA Center correlates information from different management protocols to obtain insights, and traditional campus management requires manual analysis<text:line-break/>C. Cisco DNA Center automatically compares security postures among network devices, and traditional campus management needs manual comparisons<text:line-break/>D. Cisco DNA Center handles management tasks at the controller to reduce the load on infrastructure devices, and traditional campus management uses the data backbone.</text:p>
      <text:p text:style-name="P557"> </text:p>
      <text:p text:style-name="Normal"><text:span text:style-name="T558">Answer:</text:span><text:span text:style-name="T559"> B</text:span></text:p>
      <text:p text:style-name="Normal"><text:span text:style-name="T560">Explanation</text:span></text:p>
      <text:p text:style-name="P561">DNA Center uses many management protocols to provide a single pane of glass for all devices.</text:p>
      <text:p text:style-name="Normal"><text:span text:style-name="T562">Question 12.</text:span><text:span text:style-name="T563">36</text:span></text:p>
      <text:p text:style-name="P564">Which signal frequency appears 60 times per minute?</text:p>
      <text:p text:style-name="P565">A. 1 Hz signal<text:line-break/>B. 1 GHz signal<text:line-break/><text:soft-page-break/>C. 60 Hz signal<text:line-break/>D. 60 GHz signal</text:p>
      <text:p text:style-name="P566"> </text:p>
      <text:p text:style-name="Normal"><text:span text:style-name="T567">Answer:</text:span><text:span text:style-name="T568"> A</text:span></text:p>
      <text:p text:style-name="Normal"><text:span text:style-name="T569">Explanation</text:span></text:p>
      <text:p text:style-name="P570">“60 times per minutes” means “60 times per 60 seconds”.</text:p>
      <text:p text:style-name="P571">Frequency of 1 Hz implies to 1 complete vibration per second. This means, 60 complete vibrations in 60 second, or, in 1 minute.</text:p>
      <text:p text:style-name="Normal"><text:span text:style-name="T572">Question 12.</text:span><text:span text:style-name="T573">37</text:span></text:p>
      <text:p text:style-name="P574">Which port type does a lightweight AP use to connect to the wired network when it is configured in local mode?</text:p>
      <text:p text:style-name="P575">A. access<text:line-break/>B. trunk<text:line-break/>C. EtherChannel<text:line-break/>D. LAG</text:p>
      <text:p text:style-name="P576"> </text:p>
      <text:p text:style-name="Normal"><text:span text:style-name="T577">Answer:</text:span><text:span text:style-name="T578"> A</text:span></text:p>
      <text:p text:style-name="Normal"><text:span text:style-name="T579">Explanation</text:span></text:p>
      <text:p text:style-name="P580">Trunk mode is only required when using FlexConnect mode or when using an autonomous AP that has multiple SSIDs assigned to multiple VLANs.</text:p>
      <text:p text:style-name="Normal"><text:span text:style-name="T581">Question 12.</text:span><text:span text:style-name="T582">38</text:span></text:p>
      <text:p text:style-name="P583">Refer to the exhibit.</text:p>
      <text:p text:style-name="P584">Cat9300-1# show interface g1/0/1 switchport</text:p>
      <text:p text:style-name="P585">Name: Gi1/0/1</text:p>
      <text:p text:style-name="P586">Switchport: Enabled</text:p>
      <text:p text:style-name="P587">Administrative Mode: trunk</text:p>
      <text:p text:style-name="P588">Operational Mode: trunk</text:p>
      <text:soft-page-break/>
      <text:p text:style-name="P589">Administrative Trunking Encapsulation: dot1q<text:s/></text:p>
      <text:p text:style-name="P590">Operational Trunking Encapsulation: dot1q<text:s/></text:p>
      <text:p text:style-name="P591">Negotiation of Trunking: On<text:s/></text:p>
      <text:p text:style-name="P592">Access Mode VLAN: 1 (default)</text:p>
      <text:p text:style-name="P593">Trunking Native Mode VLAN: 321 (VLAN0321)<text:s/></text:p>
      <text:p text:style-name="P594">Administrative Native VLAN tagging: enabled<text:s/></text:p>
      <text:p text:style-name="P595">Trunking VLANs Enabled: 100,200,300<text:s/></text:p>
      <text:p text:style-name="P596">Pruning VLANs Enabled: 2-1001</text:p>
      <text:p text:style-name="P597">A network administrator configures an interface on a new switch so that it connects to interface Gi1/0/1 on switch Cat9300-1. Which configuration must be applied to the new interface?</text:p>
      <text:p text:style-name="P598">A. switchport trunk encapsulation dot1q<text:line-break/>switchport trunk native vlan 321<text:line-break/>switchport trunk allowed vlan 100-300</text:p>
      <text:p text:style-name="P599">B. switchport mode dynamic desirable<text:line-break/>switchport trunk native vlan 321<text:line-break/>switchport trunk allowed vlan 100,200,300</text:p>
      <text:p text:style-name="P600">C. switchport nonegotiate<text:line-break/>switchport access vlan 321<text:line-break/>switchport trunk allowed vlan except 2-1001</text:p>
      <text:p text:style-name="P601">D. switchport mode trunk<text:line-break/>switchport trunk native vlan 321<text:line-break/>switchport trunk allowed vlan 100,200,300</text:p>
      <text:p text:style-name="P602"> </text:p>
      <text:p text:style-name="Normal"><text:span text:style-name="T603">Answer:</text:span><text:span text:style-name="T604"> D</text:span></text:p>
      <text:p text:style-name="Normal"><text:span text:style-name="T605">Explanation</text:span></text:p>
      <text:p text:style-name="P606">“Administrative mode” is what’s configured on the switch port (via the “switchport mode access/trunk/dynamic auto/dynamic desirable” command) while<text:s/><text:soft-page-break/>“Operational mode” is the actual status (result of interaction with the device connected to the port), like trunk with ISL or 802.1Q encapsulation.</text:p>
      <text:p text:style-name="P607">In this question, the “Administrative mode” is “trunk” so it was configured with the “switchport mode trunk” command. And “Trunking VLANs Enabled: 100,200,300” means it only allows three VLANs 100, 200 and 300 so we have to use the “switchport trunk allowed vlan 100,200,300” on the new switch interface.</text:p>
      <text:p text:style-name="Normal"><text:span text:style-name="T608">Question 12.</text:span><text:span text:style-name="T609">39</text:span></text:p>
      <text:p text:style-name="P610">What is the function of a controller in a software-defined network?</text:p>
      <text:p text:style-name="P611">A. multicast replication at the hardware level<text:line-break/>B. setting packet-handling policies<text:line-break/>C. forwarding packets<text:line-break/>D. fragmenting and reassembling packets</text:p>
      <text:p text:style-name="P612"> </text:p>
      <text:p text:style-name="Normal"><text:span text:style-name="T613">Answer:</text:span><text:span text:style-name="T614"> B</text:span></text:p>
      <text:p text:style-name="Normal"><text:span text:style-name="T615">Question 12.</text:span><text:span text:style-name="T616">40</text:span></text:p>
      <text:p text:style-name="P617">A client experiences slow throughput from a server that is directly connected to the core switch in a data center. A network engineer finds minimal latency on connections to the server, but data transfers are unreliable, and the output of the show interfaces counters errors command shows a high FCS-Err count on the interface that is connected to the server. What is the cause of the throughput issue?</text:p>
      <text:p text:style-name="P618">A. high bandwidth usage<text:line-break/>B. a physical cable fault<text:line-break/>C. a speed mismatch<text:line-break/>D. a cable that is too long</text:p>
      <text:p text:style-name="P619"> </text:p>
      <text:p text:style-name="Normal"><text:span text:style-name="T620">Answer:</text:span><text:span text:style-name="T621"> B</text:span></text:p>
      <text:p text:style-name="Normal"><text:span text:style-name="T622">Explanation</text:span></text:p>
      <text:p text:style-name="Normal"><text:span text:style-name="T623">Frame Check Sequence Errors</text:span><text:span text:style-name="T624">: The number of frame check sequence errors during the latest collection interval. Frame check sequence (FCS) errors indicate<text:s/></text:span><text:soft-page-break/><text:span text:style-name="T625">that frames of data are being corrupted during transmission. FCS error count is the number of frames that were transmitted or received with a bad checksum (CRC value) in the Ethernet frame.</text:span></text:p>
      <text:p text:style-name="Normal"><text:span text:style-name="T626">Reference: </text:span><text:a xlink:href="https://www.ibm.com/docs/en/omegamon-networks/5.5.0?topic=attributes-kn3-osa-express5s-ports-errors" office:target-frame-name="_blank" xlink:show="new"><text:span text:style-name="T627">https://www.ibm.com/docs/en/omegamon-networks/5.5.0?topic=attributes-kn3-osa-express5s-ports-errors</text:span></text:a></text:p>
      <text:p text:style-name="P628">FCS is a checksum error, this is highly likely to be a physical layer issue.</text:p>
      <text:p text:style-name="P629">Answer D is not correct as the latency on long cable is high.</text:p>
      <text:p text:style-name="Normal"><text:span text:style-name="T630">Question 12.</text:span><text:span text:style-name="T631">41</text:span></text:p>
      <text:p text:style-name="P632">Which component controls and distributes physical resources for each virtual machine?</text:p>
      <text:p text:style-name="P633">A. physical enclosure<text:line-break/>B. OS<text:line-break/>C. hypervisor<text:line-break/>D. CPU</text:p>
      <text:p text:style-name="P634"> </text:p>
      <text:p text:style-name="Normal"><text:span text:style-name="T635">Answer:</text:span><text:span text:style-name="T636"> C</text:span></text:p>
      <text:p text:style-name="Normal"><text:span text:style-name="T637">Explanation</text:span></text:p>
      <text:p text:style-name="P638">The hypervisor abstracts and isolates the VMs and their programs from the underlying server hardware, enabling a more efficient use of physical resources, simpler maintenance and operations, and reduced costs.</text:p>
      <text:p text:style-name="Normal"><text:span text:style-name="T639">Reference: </text:span><text:a xlink:href="https://www.nutanix.com/info/hypervisor" office:target-frame-name="_blank" xlink:show="new"><text:span text:style-name="T640">https://www.nutanix.com/info/hypervisor</text:span></text:a></text:p>
      <text:p text:style-name="Normal"><text:span text:style-name="T641">Question 12.</text:span><text:span text:style-name="T642">42</text:span></text:p>
      <text:p text:style-name="P643">Which command enables HTTP access to the Cisco WLC?</text:p>
      <text:p text:style-name="P644">A. config network secureweb enable<text:line-break/>B. config certificate generate webadmin<text:line-break/>C. config network webmode enable<text:line-break/>D. config network telnet enable</text:p>
      <text:p text:style-name="P645"> </text:p>
      <text:soft-page-break/>
      <text:p text:style-name="Normal"><text:span text:style-name="T646">Answer:</text:span><text:span text:style-name="T647"> C</text:span></text:p>
      <text:p text:style-name="Normal"><text:span text:style-name="T648">Explanation</text:span></text:p>
      <text:p text:style-name="P649">Enable or disable web mode by entering this command:</text:p>
      <text:p text:style-name="Normal"><text:span text:style-name="T650">config network webmode</text:span><text:span text:style-name="T651"> {</text:span><text:span text:style-name="T652">enable</text:span><text:span text:style-name="T653"> | </text:span><text:span text:style-name="T654">disable</text:span><text:span text:style-name="T655">}</text:span></text:p>
      <text:p text:style-name="P656">This command allows users to access the controller GUI using “http://ip-address.” The default value is disabled. Web mode is not a secure connection.</text:p>
      <text:p text:style-name="Normal"><text:span text:style-name="T657">Reference: </text:span><text:a xlink:href="https://www.cisco.com/c/en/us/td/docs/wireless/controller/8-0/configuration-guide/b_cg80/b_cg80_chapter_011.html" office:target-frame-name="_blank" xlink:show="new"><text:span text:style-name="T658">https://www.cisco.com/c/en/us/td/docs/wireless/controller/8-0/configuration-guide/b_cg80/b_cg80_chapter_011.html</text:span></text:a></text:p>
      <text:p text:style-name="P659">Note: The command “config network secureweb enable” enables HTTPS access to the WLC.</text:p>
      <text:p text:style-name="Normal"><text:span text:style-name="T660">Question 12.</text:span><text:span text:style-name="T661">43</text:span></text:p>
      <text:p text:style-name="P662">A network engineer must migrate a router loopback interface to the IPv6 address space. If the current IPv4 address of the interface is 10.54.73.1/32, and the engineer configures IPv6 address 0:0:0:0:0:ffff:a36:4901, which prefix length must be used?</text:p>
      <text:p text:style-name="P663">A. /64<text:line-break/>B. /96<text:line-break/>C. /124<text:line-break/>D. /128</text:p>
      <text:p text:style-name="P664"> </text:p>
      <text:p text:style-name="Normal"><text:span text:style-name="T665">Answer:</text:span><text:span text:style-name="T666"> D</text:span></text:p>
      <text:p text:style-name="Normal"><text:span text:style-name="T667">Explanation</text:span></text:p>
      <text:p text:style-name="Normal"><text:span text:style-name="T668">IPv4 Mapped Address – 0:0:0:0:0:FFFF::/</text:span><text:span text:style-name="T669">96</text:span></text:p>
      <text:p text:style-name="P670">The format for IPv4 Mapped address has the first 80 bits set to zeros, followed by the next 16 bits set to all ones and finally, the last 32 bits written in dotted decimal appended to then end forming 128 bit IPv6 address.</text:p>
      <text:soft-page-break/>
      <text:p text:style-name="P671">An example of an IPv4 Class A address of 12.155.166.101 would look like this in IPv4 Mapped address 0000:0000:0000:0000:0000:FFFF:12.155.166.101 or ::FFFF:12.155.166.101 in IPv6’s short form.</text:p>
      <text:p text:style-name="P672">But in this question we are migrate a /32 IP address to IPv6 so the IPv6 address should be /128.</text:p>
      <text:p text:style-name="Normal"><text:span text:style-name="T673">We can see a similar conversion at this link: </text:span><text:a xlink:href="https://docs.aws.amazon.com/waf/latest/developerguide/classic-web-acl-ip-conditions.html" office:target-frame-name="_blank" xlink:show="new"><text:span text:style-name="T674">https://docs.aws.amazon.com/waf/latest/developerguide/classic-web-acl-ip-conditions.html</text:span></text:a></text:p>
      <text:p text:style-name="Normal"><text:span text:style-name="T675">– To specify the IPv4 address 192.0.2.44, enter 192.0.2.44</text:span><text:span text:style-name="T676">/32</text:span><text:span text:style-name="T677">.</text:span><text:span text:style-name="T678"><text:line-break/>– To specify the IPv6 address 0:0:0:0:0:ffff:c000:22c, enter 0:0:0:0:0:ffff:c000:22c</text:span><text:span text:style-name="T679">/128</text:span><text:span text:style-name="T680">.</text:span></text:p>
      <text:p text:style-name="Normal"><text:span text:style-name="T681">Question 12.</text:span><text:span text:style-name="T682">44</text:span></text:p>
      <text:p text:style-name="P683">What is the primary purpose of a console port on a Cisco WLC?</text:p>
      <text:p text:style-name="P684">A. out-of-band management via an IP transport<text:line-break/>B. out-of-band management via an asynchronous transport<text:line-break/>C. in-band management via an asynchronous transport<text:line-break/>D. in-band management via an IP transport</text:p>
      <text:p text:style-name="P685"> </text:p>
      <text:p text:style-name="Normal"><text:span text:style-name="T686">Answer:</text:span><text:span text:style-name="T687"> B</text:span></text:p>
      <text:p text:style-name="Normal"><text:span text:style-name="T688">Explanation</text:span></text:p>
      <text:p text:style-name="P689">The console port is used for out-of-band management, system recovery, and early boot operations.</text:p>
      <text:p text:style-name="Normal"><text:span text:style-name="T690">Reference: </text:span><text:a xlink:href="https://www.geeksforgeeks.org/physical-infrastructure-connections-of-wlan-components/" office:target-frame-name="_blank" xlink:show="new"><text:span text:style-name="T691">https://www.geeksforgeeks.org/physical-infrastructure-connections-of-wlan-components/</text:span></text:a></text:p>
      <text:p text:style-name="P692">Console port does not use IP. It is an asynchronous transport.</text:p>
      <text:p text:style-name="Normal"><text:span text:style-name="T693">Question 12.</text:span><text:span text:style-name="T694">45</text:span></text:p>
      <text:p text:style-name="P695">Drag and drop the AAA features from the left onto the corresponding AAA security services on the right. Not all options are used</text:p>
      <text:soft-page-break/>
      <text:p text:style-name="Normal"><text:span text:style-name="T696"><draw:frame draw:style-name="a23" draw:name="Picture 77" text:anchor-type="as-char" svg:x="0in" svg:y="0in" svg:width="6.5in" svg:height="3.15278in" style:rel-width="scale" style:rel-height="scale"><draw:image xlink:href="media/image24.jpeg" xlink:type="simple" xlink:show="embed" xlink:actuate="onLoad"/><svg:title/><svg:desc/></draw:frame></text:span></text:p>
      <text:p text:style-name="P697"> </text:p>
      <text:p text:style-name="Normal"><text:span text:style-name="T698">Answer:</text:span></text:p>
      <text:p text:style-name="Normal"><text:span text:style-name="T699">Authentication</text:span><text:span text:style-name="T700"><text:line-break/>+ It leverages a RADIUS server to grant user access to a reverse Telnet session</text:span><text:span text:style-name="T701"><text:line-break/>+ It verifies the user before granting access to the device</text:span></text:p>
      <text:p text:style-name="Normal"><text:span text:style-name="T702">Authorization</text:span><text:span text:style-name="T703"><text:line-break/>+ It enables the device to allow user- or group-based access</text:span><text:span text:style-name="T704"><text:line-break/>+ It restricts the CLI commands that a user is able to perform</text:span></text:p>
      <text:p text:style-name="Normal"><text:span text:style-name="T705">Explanation</text:span></text:p>
      <text:p text:style-name="Normal"><text:span text:style-name="T706">The two unused options “It records the amount of time for which a user accesses the network on a remote server” and “It uses TACACS+ to log the configuration commands entered by a network administrator” are </text:span><text:span text:style-name="T707">Accounting</text:span><text:span text:style-name="T708"> features.</text:span></text:p>
      <text:p text:style-name="Normal"><text:span text:style-name="T709">To use RADIUS server to allow a reverse Telnet session we have to use such command “aaa </text:span><text:span text:style-name="T710">authentication</text:span><text:span text:style-name="T711"> login reverse-access group radius”. Therefore the option “It leverages a RADIUS server to grant user access to a reverse Telnet session” should belong to Authentication, not Authorization.</text:span></text:p>
      <text:p text:style-name="Normal"><text:span text:style-name="T712">Note: </text:span><text:span text:style-name="T713">Reverse telnet</text:span><text:span text:style-name="T714"> allows you to telnet to a device then from that device connect to the console of another device.</text:span></text:p>
      <text:soft-page-break/>
      <text:p text:style-name="Normal"><text:span text:style-name="T715">Question 12.</text:span><text:span text:style-name="T716">46</text:span></text:p>
      <text:p text:style-name="P717">What does the implementation of a first-hop redundancy protocol protect against on a network?</text:p>
      <text:p text:style-name="P718">A. BGP neighbor flapping<text:line-break/>B. default gateway failure<text:line-break/>C. root-bridge loss<text:line-break/>D. spanning-tree loops</text:p>
      <text:p text:style-name="P719"> </text:p>
      <text:p text:style-name="Normal"><text:span text:style-name="T720">Answer:</text:span><text:span text:style-name="T721"> B</text:span></text:p>
      <text:p text:style-name="Normal"><text:span text:style-name="T722">Question 12.</text:span><text:span text:style-name="T723">47</text:span></text:p>
      <text:p text:style-name="P724">Refer to the exhibit.</text:p>
      <text:p text:style-name="P725">Codes: L - local, C - connected, S - static, R - RIP, M - mobile, B - BGP</text:p>
      <text:p text:style-name="P726"><text:s text:c="7"/>D - EIGRP, EX - EIGRP external, O - OSPF, IA - OSPF inter area<text:s/></text:p>
      <text:p text:style-name="P727"><text:s text:c="7"/>N1 - OSPF NSSA external type 1, N2 - OSPF NSSA external type 2</text:p>
      <text:p text:style-name="P728"><text:s text:c="7"/>E1 - OSPF external type 1, E2 - OSPF external type 2</text:p>
      <text:p text:style-name="P729"><text:s text:c="7"/>i - IS-IS, su - IS-IS summary, L1 - IS-IS level-1, L2 - IS-IS level-2</text:p>
      <text:p text:style-name="P730"><text:s text:c="7"/>ia - IS-IS inter area, * - candidate default, U - per-user static route</text:p>
      <text:p text:style-name="P731"><text:s text:c="7"/>o - ODR, P - periodic downloaded static route, H - NHRP, l - LISP</text:p>
      <text:p text:style-name="P732"><text:s text:c="7"/>+ - replicated route, % - next hop override, p - overrides from PfR<text:s/></text:p>
      <text:p text:style-name="P733">Gateway of last resort is 0.0.0.0 to network 0.0.0.0</text:p>
      <text:p text:style-name="P734">S*<text:tab/>0.0.0.0/0 is directly connected, Null0</text:p>
      <text:p text:style-name="P735"><text:s text:c="8"/>10.0.0.0/8 is variably subnetted, 6 subnets, 2 masks<text:s/></text:p>
      <text:p text:style-name="P736">C<text:tab/>10.0.12.0/24 is directly connected, GigabitEthernet0/1</text:p>
      <text:p text:style-name="P737">L<text:tab/>10.0.12.1/32 is directly connected, GigabitEthernet0/1</text:p>
      <text:p text:style-name="P738">C<text:tab/>10.0.13.0/24 is directly connected, GigabitEthernet0/2</text:p>
      <text:p text:style-name="P739">L<text:tab/>10.0.13.1/32 is directly connected, GigabitEthernet0/2</text:p>
      <text:p text:style-name="P740">C<text:tab/>10.0.14.0/24 is directly connected, GigabitEthernet0/3</text:p>
      <text:soft-page-break/>
      <text:p text:style-name="P741">L<text:tab/>10.0.14.1/32 is directly connected, GigabitEthernet0/3</text:p>
      <text:p text:style-name="P742">D<text:tab/>192.168.0.0/16 [90/130816] via 10.0.13.3, 00:10:09, GigabitEthernet0/2</text:p>
      <text:p text:style-name="P743">O<text:tab/>192.168.0.0/23 [110/2] via 10.0.14.4, 00:00:46, GigabitEthernet0/3</text:p>
      <text:p text:style-name="P744">S<text:tab/>192.168.0.0/24 [100/0] via 10.0.12.2</text:p>
      <text:p text:style-name="P745">Which interface is chosen to forward traffic to the host at 192.168.0.55?</text:p>
      <text:p text:style-name="P746">A. GigabitEthernet0/1<text:line-break/>B. Null0<text:line-break/>C. GigabitEthernet0/3<text:line-break/>D. GigabitEthernet0/2</text:p>
      <text:p text:style-name="P747"> </text:p>
      <text:p text:style-name="Normal"><text:span text:style-name="T748">Answer:</text:span><text:span text:style-name="T749"> A</text:span></text:p>
      <text:p text:style-name="Normal"><text:span text:style-name="T750">Explanation</text:span></text:p>
      <text:p text:style-name="P751">The best match for the destination host 192.168.0.55 is the last statement in the output. But the exit interface of this entry has been hidden so we have to figure it out. We only know the next hop IP address is 10.0.12.2.</text:p>
      <text:p text:style-name="Normal"><text:span text:style-name="T752">We see only Gi0/1 belongs to this subnet from the entry “C </text:span><text:span text:style-name="T753">10.0.12.0/24</text:span><text:span text:style-name="T754"> is directly connected, GigabitEthernet0/1″ so the best answer is Gi0/1.</text:span></text:p>
      <text:p text:style-name="Normal"><text:span text:style-name="T755">Question 12.</text:span><text:span text:style-name="T756">48</text:span></text:p>
      <text:p text:style-name="P757">Refer to the exhibit.</text:p>
      <text:soft-page-break/>
      <text:p text:style-name="Normal"><text:span text:style-name="T758"><draw:frame draw:style-name="a24" draw:name="Picture 76" text:anchor-type="as-char" svg:x="0in" svg:y="0in" svg:width="4.65278in" svg:height="3.9375in" style:rel-width="scale" style:rel-height="scale"><draw:image xlink:href="media/image25.jpeg" xlink:type="simple" xlink:show="embed" xlink:actuate="onLoad"/><svg:title/><svg:desc/></draw:frame></text:span></text:p>
      <text:p text:style-name="P759">SW_1 and SW_12 represent two companies that are merging. They use separate network vendors. The VLANs on both sides have been migrated to share IP subnets. Which command sequence must be issued on both sides to join the two companies and pass all VLANs between the companies?</text:p>
      <text:p text:style-name="P760">A. switchport mode trunk<text:line-break/>switchport trunk encapsulation dot1q</text:p>
      <text:p text:style-name="P761">B. switchport mode trunk<text:line-break/>switchport trunk allowed vlan all<text:line-break/>switchport dot1q ethertype 0800</text:p>
      <text:p text:style-name="P762">C. switchport mode dynamic desirable<text:line-break/>switchport trunk allowed vlan all<text:line-break/>switchport trunk native vlan 7</text:p>
      <text:p text:style-name="P763">D. switchport dynamic auto<text:line-break/>switchport nonegotiate</text:p>
      <text:p text:style-name="P764"> </text:p>
      <text:p text:style-name="Normal"><text:span text:style-name="T765">Answer:</text:span><text:span text:style-name="T766"> A</text:span></text:p>
      <text:soft-page-break/>
      <text:p text:style-name="Normal"><text:span text:style-name="T767">Explanation</text:span></text:p>
      <text:p text:style-name="P768">From the output above, we learn that one of the switch is using ISL trunking protocol which is Cisco proprietary so we must change it to 802.1Q trunking protocol to match with the other switch via the command “switchport trunk encapsulation dot1q”.</text:p>
      <text:p text:style-name="Normal"><text:span text:style-name="T769">Question 12.</text:span><text:span text:style-name="T770">49</text:span></text:p>
      <text:p text:style-name="P771">A Cisco engineer notices that two OSPF neighbors are connected using a crossover Ethernet cable. The neighbors are taking too long to become fully adjacent. Which command must be issued under the interface configuration on each router to reduce the time required for the adjacency to reach the FULL state?</text:p>
      <text:p text:style-name="P772">A. ip ospf priority 0<text:line-break/>B. ip ospf network broadcast<text:line-break/>C. ip ospf dead-interval 40<text:line-break/>D. ip ospf network point-to-point</text:p>
      <text:p text:style-name="P773"> </text:p>
      <text:p text:style-name="Normal"><text:span text:style-name="T774">Answer:</text:span><text:span text:style-name="T775"> D</text:span></text:p>
      <text:p text:style-name="Normal"><text:span text:style-name="T776">Explanation</text:span></text:p>
      <text:p text:style-name="P777">OSPF detects neighbors by means of Hello packets. Maybe the reason for “The neighbors are taking too long to become fully adjacent” is hello packets are not sent frequently.</text:p>
      <text:p text:style-name="P778">With OSPF priority of 0, the OSPF router becomes ineligible for being the DR/BDR on that segment so they cannot reach the FULL state. They will be in DROTHER state -&gt; Answer A is not correct.</text:p>
      <text:p text:style-name="P779">The default network type of two OSPF neighbors connected using an Ethernet cable is broadcast already -&gt; Answer B is not correct.</text:p>
      <text:p text:style-name="P780">Changing the Dead Interval does not automatically change the Hello Interval -&gt; Answer C is not correct.</text:p>
      <text:p text:style-name="P781">Set the network type to “point-to-point”, the OSPF routers will not elect DR/BDR and the routers directly transition to the FULL state once they establish adjacency.<text:s/><text:soft-page-break/>If we use the “show ip ospf neighbor” command for point-to-point network, we will see something like this:</text:p>
      <text:p text:style-name="P782">Router#sh ip ospf <text:s/>neighbor<text:s/></text:p>
      <text:p text:style-name="P783"/>
      <text:p text:style-name="P784">Neighbor ID <text:s text:c="4"/>Pri <text:s text:c="2"/>State <text:s text:c="10"/>Dead Time <text:s text:c="2"/>Address <text:s text:c="8"/>Interface</text:p>
      <text:p text:style-name="P785">2.2.2.2 <text:s text:c="10"/>0 <text:s text:c="2"/>FULL/- <text:s text:c="9"/>00:00:37 <text:s text:c="3"/>10.1.1.2 <text:s text:c="7"/>GigabitEthernet0/0</text:p>
      <text:p text:style-name="P786">-&gt; Answer D is correct.</text:p>
      <text:p text:style-name="Normal"><text:span text:style-name="T787">Question 12.</text:span><text:span text:style-name="T788">50</text:span></text:p>
      <text:p text:style-name="P789">Refer to the exhibit.</text:p>
      <text:p text:style-name="P790">{</text:p>
      <text:p text:style-name="P791"><text:s text:c="4"/>"Test_Questions" : [</text:p>
      <text:p text:style-name="P792"><text:s text:c="16"/>"Automation",<text:s/></text:p>
      <text:p text:style-name="P793"><text:tab/><text:tab/>"Configuration",</text:p>
      <text:p text:style-name="P794"><text:s text:c="4"/>],</text:p>
      <text:p text:style-name="P795"><text:s text:c="4"/>"Test__Exam_Level" : [</text:p>
      <text:p text:style-name="P796"><text:s text:c="16"/>"CCNA",</text:p>
      <text:p text:style-name="P797"><text:s text:c="16"/>"CCNP",</text:p>
      <text:p text:style-name="P798"><text:s text:c="4"/>],</text:p>
      <text:p text:style-name="P799"><text:s text:c="4"/>"Test_Response" : [</text:p>
      <text:p text:style-name="P800"><text:s text:c="16"/>"Correct",<text:s/></text:p>
      <text:p text:style-name="P801"><text:tab/><text:tab/>"Incorrect",</text:p>
      <text:p text:style-name="P802"><text:tab/>],</text:p>
      <text:p text:style-name="P803">}</text:p>
      <text:p text:style-name="P804">How many objects, keys, and JSON list values are present?</text:p>
      <text:p text:style-name="P805">A. three objects, three keys, and two JSON list values<text:line-break/>B. one object, three keys, and two JSON list values<text:line-break/><text:soft-page-break/>C. three objects, two keys, and three JSON list values<text:line-break/>D. one object, three keys, and three JSON list values</text:p>
      <text:p text:style-name="P806"> </text:p>
      <text:p text:style-name="Normal"><text:span text:style-name="T807">Answer:</text:span><text:span text:style-name="T808"> D</text:span></text:p>
      <text:p text:style-name="Normal"><text:span text:style-name="T809">Explanation</text:span></text:p>
      <text:p text:style-name="P810">JSON uses curly braces {} to hold objects and square brackets [] to hold arrays. Therefore in this question there is only one object.</text:p>
      <text:p text:style-name="P811">We are not sure what is a “list” value. But if “list” is “array” then there are three of them in this questions.</text:p>
      <text:p text:style-name="Normal"><text:span text:style-name="T812">Question 12.</text:span><text:span text:style-name="T813">51</text:span></text:p>
      <text:p text:style-name="P814">What is a benefit of a point-to-point leased line?</text:p>
      <text:p text:style-name="P815">A. full-mesh capability<text:line-break/>B. flexibility of design<text:line-break/>C. low cost<text:line-break/>D. simplicity of configuration</text:p>
      <text:p text:style-name="P816"> </text:p>
      <text:p text:style-name="Normal"><text:span text:style-name="T817">Answer:</text:span><text:span text:style-name="T818"> D</text:span></text:p>
      <text:p text:style-name="Normal"><text:span text:style-name="T819">Explanation</text:span></text:p>
      <text:p text:style-name="P820">Point-to-point lines are usually leased from a service provider and are called leased lines…</text:p>
      <text:p text:style-name="P821">The advantages of leased lines include</text:p>
      <text:p text:style-name="P822">Simplicity: Point-to-point communication links require minimal expertise to install and maintain.</text:p>
      <text:p text:style-name="Normal"><text:span text:style-name="T823">Reference: </text:span><text:a xlink:href="https://www.ciscopress.com/articles/article.asp?p=2202411&amp;seqNum=7" office:target-frame-name="_blank" xlink:show="new"><text:span text:style-name="T824">https://www.ciscopress.com/articles/article.asp?p=2202411&amp;seqNum=7</text:span></text:a></text:p>
      <text:p text:style-name="Normal"><text:span text:style-name="T825">Question 12.</text:span><text:span text:style-name="T826">52</text:span></text:p>
      <text:soft-page-break/>
      <text:p text:style-name="P827">What are two differences between WPA2 and WPA3 wireless security? (Choose two)</text:p>
      <text:p text:style-name="P828">A. WPA3 uses SAE for stronger protection than WPA2, which uses AES<text:line-break/>B. WPA2 uses 128-bit key encryption, and WPA3 supports 128-bit and 192-bit key encryption<text:line-break/>C. WPA3 uses AES for stronger protection than WPA2, which uses SAE<text:line-break/>D. WPA3 uses AES for stronger protection than WPA2, which uses TKIP<text:line-break/>E. WPA2 uses 192-bit key encryption, and WPA3 requires 256-bit key encryption</text:p>
      <text:p text:style-name="P829"> </text:p>
      <text:p text:style-name="Normal"><text:span text:style-name="T830">Answer:</text:span><text:span text:style-name="T831"> A B</text:span></text:p>
      <text:p text:style-name="Normal"><text:span text:style-name="T832">Explanation</text:span></text:p>
      <text:p text:style-name="P833">WPA3 provides improvements to the general Wi-Fi encryption, thanks to Simultaneous Authentication of Equals (SAE) replacing the Pre-Shared Key (PSK) authentication method used in prior WPA versions -&gt; Answer C and answer D are not correct.</text:p>
      <text:p text:style-name="Normal"><text:span text:style-name="T834">Reference: </text:span><text:a xlink:href="https://www.networkworld.com/article/3316567/what-is-wpa3-wi-fi-security-protocol-strengthens-connections.html" office:target-frame-name="_blank" xlink:show="new"><text:span text:style-name="T835">https://www.networkworld.com/article/3316567/what-is-wpa3-wi-fi-security-protocol-strengthens-connections.html</text:span></text:a></text:p>
      <text:p text:style-name="P836">Most WPA2 implementations use 128-bit AES encryption keys. In WPA3, longer key sizes – the equivalent of 192-bit security – are mandated only for WPA3-Enterprise -&gt; Answer E is not correct.</text:p>
      <text:p text:style-name="P837">WPA3-Enterprise supports 128-bit Advanced Encryption Standard Counter Mode with Cipher Block Chaining Message Authentication (AES-CCMP 128) as the minimum requirement. It also offers an optional mode using 192-bit encryption.</text:p>
      <text:p text:style-name="Normal"><text:span text:style-name="T838">Question 12.</text:span><text:span text:style-name="T839">53</text:span></text:p>
      <text:p text:style-name="P840">Refer to the exhibit.</text:p>
      <text:soft-page-break/>
      <text:p text:style-name="Normal"><text:span text:style-name="T841"><draw:frame draw:style-name="a25" draw:name="Picture 75" text:anchor-type="as-char" svg:x="0in" svg:y="0in" svg:width="4.3125in" svg:height="3.14583in" style:rel-width="scale" style:rel-height="scale"><draw:image xlink:href="media/image26.jpeg" xlink:type="simple" xlink:show="embed" xlink:actuate="onLoad"/><svg:title/><svg:desc/></draw:frame></text:span></text:p>
      <text:p text:style-name="P842">Each router must be configured with the last usable IP address in the subnet. Which configuration fulfills this requirement?</text:p>
      <table:table table:style-name="Table843">
        <table:table-columns>
          <table:table-column table:style-name="TableColumn844"/>
          <table:table-column table:style-name="TableColumn845"/>
        </table:table-columns>
        <table:table-row table:style-name="TableRow846">
          <table:table-cell table:style-name="TableCell847">
            <text:p text:style-name="P848">Option A</text:p>
            <text:p text:style-name="P849">R7#<text:line-break/>interface FastEthernet1/0<text:line-break/>ip address 10.88.31.126 255.255.255.192</text:p>
            <text:p text:style-name="P850">R8#<text:line-break/>interface FastEthernet0/0<text:line-break/>ip address 10.19.63.95 255.255.255.192</text:p>
            <text:p text:style-name="P851">R9#<text:line-break/>interface FastEthernet1/1<text:line-break/>ip address 10.23.98.159 255.255.255.248</text:p>
          </table:table-cell>
          <table:table-cell table:style-name="TableCell852">
            <text:p text:style-name="P853">Option B</text:p>
            <text:p text:style-name="P854">R7#<text:line-break/>interface FastEthernet1/0<text:line-break/>ip address 10.88.31.126 255.255.255.240</text:p>
            <text:p text:style-name="P855">R8#<text:line-break/>interface FastEthernet0/0<text:line-break/>ip address 10.19.63.94 255.255.255.192</text:p>
            <text:p text:style-name="P856">R9#<text:line-break/>interface FastEthernet1/1<text:line-break/>ip address 10.23.98.158 255.255.255.248</text:p>
          </table:table-cell>
        </table:table-row>
        <table:table-row table:style-name="TableRow857">
          <table:table-cell table:style-name="TableCell858">
            <text:p text:style-name="P859">Option C</text:p>
            <text:p text:style-name="P860">R7#<text:line-break/>interface FastEthernet1/0<text:line-break/><text:soft-page-break/>ip address 10.88.31.127 255.255.255.240</text:p>
            <text:p text:style-name="P861">R8#<text:line-break/>interface FastEthernet0/0<text:line-break/>ip address 10.19.63.95 255.255.255.192</text:p>
            <text:p text:style-name="P862">R9#<text:line-break/>interface FastEthernet1/1<text:line-break/>ip address 10.23.98.159 255.255.255.248</text:p>
          </table:table-cell>
          <table:table-cell table:style-name="TableCell863">
            <text:p text:style-name="P864">Option D</text:p>
            <text:p text:style-name="P865">R7#<text:line-break/>interface FastEthernet1/0<text:line-break/><text:soft-page-break/>ip address 10.88.31.127 255.255.255.192</text:p>
            <text:p text:style-name="P866">R8#<text:line-break/>interface FastEthernet0/0<text:line-break/>ip address 10.19.63.95 255.255.255.240</text:p>
            <text:p text:style-name="P867">R9#<text:line-break/>interface FastEthernet1/1<text:line-break/>ip address 10.23.98.159 255.255.255.224</text:p>
          </table:table-cell>
        </table:table-row>
      </table:table>
      <text:soft-page-break/>
      <text:p text:style-name="P868">A. Option A<text:line-break/>B. Option B<text:line-break/>C. Option C<text:line-break/>D. Option D</text:p>
      <text:p text:style-name="P869"> </text:p>
      <text:p text:style-name="Normal"><text:span text:style-name="T870">Answer:</text:span><text:span text:style-name="T871"> B (?)</text:span></text:p>
      <text:p text:style-name="Normal"><text:span text:style-name="T872">Explanation</text:span></text:p>
      <text:p text:style-name="Normal"><text:span text:style-name="T873">On R7 subnet 10.88.31.64/26</text:span><text:span text:style-name="T874"><text:line-break/>Increment: 64</text:span><text:span text:style-name="T875"><text:line-break/>Network address: 10.88.31.64</text:span><text:span text:style-name="T876"><text:line-break/>Broadcast address: 10.88.31.127</text:span><text:span text:style-name="T877"><text:line-break/>-&gt; Last usable IP address: </text:span><text:span text:style-name="T878">10.88.31.126</text:span></text:p>
      <text:p text:style-name="Normal"><text:span text:style-name="T879">On R8 subnet 10.19.63.80/28</text:span><text:span text:style-name="T880"><text:line-break/>Increment: 16</text:span><text:span text:style-name="T881"><text:line-break/>Network address: 10.19.63.80</text:span><text:span text:style-name="T882"><text:line-break/>Broadcast address: 10.19.63.95</text:span><text:span text:style-name="T883"><text:line-break/>-&gt; Last usable IP address: </text:span><text:span text:style-name="T884">10.19.63.94</text:span></text:p>
      <text:p text:style-name="Normal"><text:span text:style-name="T885">On R9 subnet 10.23.98.128/27</text:span><text:span text:style-name="T886"><text:line-break/>Increment: 32</text:span><text:span text:style-name="T887"><text:line-break/>Network address: 10.23.98.128</text:span><text:span text:style-name="T888"><text:line-break/></text:span><text:soft-page-break/><text:span text:style-name="T889">Broadcast address: 10.23.98.159</text:span><text:span text:style-name="T890"><text:line-break/>-&gt; Last usable IP address: </text:span><text:span text:style-name="T891">10.23.98.158</text:span></text:p>
      <text:p text:style-name="P892">In this question only Option B has correct last usable IP addresses but their subnet masks are not correct. For example on R7 the subnet mask should be /26 = 255.255.255.192 (not 255.255.255.240 like in Option B). Maybe they are typos but it is still the best choice.</text:p>
      <text:p text:style-name="Normal"><text:span text:style-name="T893">Question 12.</text:span><text:span text:style-name="T894">54</text:span></text:p>
      <text:p text:style-name="P895">Refer to the exhibit.</text:p>
      <text:p text:style-name="Normal"><text:span text:style-name="T896"><draw:frame draw:style-name="a26" draw:name="Picture 74" text:anchor-type="as-char" svg:x="0in" svg:y="0in" svg:width="5.875in" svg:height="1.65278in" style:rel-width="scale" style:rel-height="scale"><draw:image xlink:href="media/image27.jpeg" xlink:type="simple" xlink:show="embed" xlink:actuate="onLoad"/><svg:title/><svg:desc/></draw:frame></text:span></text:p>
      <text:p text:style-name="P897">A network engineer is updating the configuration on router R1 to connect a new branch office to the company network. R2 has been configured correctly. Which command must the engineer configure so that devices at the new site communicate with the main office?</text:p>
      <text:p text:style-name="P898">A. ip route 172.25.25.1 255.255.255.255 g0/2<text:line-break/>B. ip route 172.25.25.0 255.255.255.0 192.168.2.1<text:line-break/>C. ip route 172.25.25.1 255.255.255.255 g0/1<text:line-break/>D. ip route 172.25.25.0 255.255.255.0 192.168.2.2</text:p>
      <text:p text:style-name="P899"> </text:p>
      <text:p text:style-name="Normal"><text:span text:style-name="T900">Answer:</text:span><text:span text:style-name="T901"> D</text:span></text:p>
      <text:p text:style-name="Normal"><text:span text:style-name="T902">Question 12.</text:span><text:span text:style-name="T903">55</text:span></text:p>
      <text:p text:style-name="P904">Which two transport layer protocols carry syslog messages? (Choose two)</text:p>
      <text:p text:style-name="P905">A. TCP<text:line-break/>B. UDP<text:line-break/>C. ARP<text:line-break/><text:soft-page-break/>D. RTP<text:line-break/>E. IP</text:p>
      <text:p text:style-name="P906"> </text:p>
      <text:p text:style-name="Normal"><text:span text:style-name="T907">Answer:</text:span><text:span text:style-name="T908"> A B</text:span></text:p>
      <text:p text:style-name="Normal"><text:span text:style-name="T909">Explanation</text:span></text:p>
      <text:p text:style-name="P910">In case of logging significant events, the syslog messages needs to be transported over a reliable channel for it to be stored safely in a server. Usually syslog messages are transported using UDP protocol to the server which is not reliable. This calls for the need for a reliable transport protocol like TCP to transfer the messages to the syslog server.</text:p>
      <text:p text:style-name="Normal"><text:span text:style-name="T911">Reference: </text:span><text:a xlink:href="https://support.citrix.com/article/CTX205824/how-to-enable-syslog-over-tcp-in-adc" office:target-frame-name="_blank" xlink:show="new"><text:span text:style-name="T912">https://support.citrix.com/article/CTX205824/how-to-enable-syslog-over-tcp-in-adc</text:span></text:a></text:p>
      <text:p text:style-name="Normal"><text:span text:style-name="T913">Question 12.</text:span><text:span text:style-name="T914">56</text:span></text:p>
      <text:p text:style-name="P915">Refer to the exhibit.</text:p>
      <text:p text:style-name="P916">Gateway of last resort is 172.16.2.2 to network 0.0.0.0</text:p>
      <text:p text:style-name="P917"/>
      <text:p text:style-name="P918"><text:s text:c="4"/>10.0.0.0/8 is variably subnetted, 3 subnets, 3 masks<text:s/></text:p>
      <text:p text:style-name="P919"><text:s text:c="7"/>10.10.100.0/26 is directly connected, GigabitEthernet0/0/6<text:s/></text:p>
      <text:p text:style-name="P920">C <text:s text:c="5"/>10.10.10.0/24 is directly connected, GigabitEthernet0/0/0<text:s/></text:p>
      <text:p text:style-name="P921">L <text:s text:c="5"/>10.10.10.3/32 is directly connected, GigabitEthernet0/0/0</text:p>
      <text:p text:style-name="P922"><text:s text:c="4"/>172.16.0.0/16 is variably subnetted, 3 subnets, 2 masks</text:p>
      <text:p text:style-name="P923">S <text:s text:c="5"/>172.16.1.33/32 is directly connected, GigabitEthernet0/0/1</text:p>
      <text:p text:style-name="P924">C <text:s text:c="5"/>172.16.2.0/23 is directly connected, GigabitEthernet0/0/1</text:p>
      <text:p text:style-name="P925">L <text:s text:c="5"/>172.16.2.1/32 is directly connected, GigabitEthernet0/0/1</text:p>
      <text:p text:style-name="P926">S* <text:s/>0.0.0.0/0 [1/0] via 172.16.2.2</text:p>
      <text:p text:style-name="P927">A packet sourced from 10.10.10.32 is destined for the Internet. What is the administrative distance for the destination route?</text:p>
      <text:soft-page-break/>
      <text:p text:style-name="P928">A. 0<text:line-break/>B. 1<text:line-break/>C. 2<text:line-break/>D. 32</text:p>
      <text:p text:style-name="P929"> </text:p>
      <text:p text:style-name="Normal"><text:span text:style-name="T930">Answer:</text:span><text:span text:style-name="T931"> B</text:span></text:p>
      <text:p text:style-name="Normal"><text:span text:style-name="T932">Explanation</text:span></text:p>
      <text:p text:style-name="P933">There is a trick in this question. It says the “source”, not the destination of the packet is 10.10.10.32 but this information is not useful for finding the destination route. This packet is destined for the Internet (with unknown destination) so it will match the default static route, which is the last entry “S* 0.0.0.0/0 [1/0] via 172.16.2.2”. This entry has the Administrative Distance of 1.</text:p>
      <text:p text:style-name="Normal"><text:span text:style-name="T934">Question 12.</text:span><text:span text:style-name="T935">57</text:span></text:p>
      <text:p text:style-name="P936">When is the PUT method used within HTTP?</text:p>
      <text:p text:style-name="P937">A. to update a DNS server<text:line-break/>B. when a read-only operation is required<text:line-break/>C. to display a web site<text:line-break/>D. when a nonidempotent operation is needed</text:p>
      <text:p text:style-name="P938"> </text:p>
      <text:p text:style-name="Normal"><text:span text:style-name="T939">Answer:</text:span><text:span text:style-name="T940"> A</text:span></text:p>
      <text:p text:style-name="Normal"><text:span text:style-name="T941">Explanation</text:span></text:p>
      <text:p text:style-name="P942">PUT is similar to POST in that it can create resources, but it does so when there is a defined URL wherein PUT replaces the entire resource if it exists or creates new if it does not exist.</text:p>
      <text:p text:style-name="Normal"><text:span text:style-name="T943">Question 12.</text:span><text:span text:style-name="T944">58</text:span></text:p>
      <text:p text:style-name="P945">What describes a northbound REST API for SDN?</text:p>
      <text:p text:style-name="P946">A. network-element-facing interface for the control and data planes<text:line-break/>B. application-facing interface for GET, POST, PUT, and DELETE methods<text:line-break/><text:soft-page-break/>C. network-element-facing interface for GET, POST, PUT, and DELETE methods<text:line-break/>D. application-facing interface for SNMP GET requests</text:p>
      <text:p text:style-name="P947"> </text:p>
      <text:p text:style-name="Normal"><text:span text:style-name="T948">Answer:</text:span><text:span text:style-name="T949"> B</text:span></text:p>
      <text:p text:style-name="Normal"><text:span text:style-name="T950">Question 12.</text:span><text:span text:style-name="T951">59</text:span></text:p>
      <text:p text:style-name="P952">Refer to the exhibit.</text:p>
      <text:p text:style-name="Normal"><text:span text:style-name="T953"><draw:frame draw:style-name="a27" draw:name="Picture 73" text:anchor-type="as-char" svg:x="0in" svg:y="0in" svg:width="4.29861in" svg:height="2.85417in" style:rel-width="scale" style:rel-height="scale"><draw:image xlink:href="media/image28.jpeg" xlink:type="simple" xlink:show="embed" xlink:actuate="onLoad"/><svg:title/><svg:desc/></draw:frame></text:span></text:p>
      <text:p text:style-name="P954">SW1 supports connectivity for a lobby conference room and must be secured. The engineer must limit the connectivity from PC1 to the SW1 and SW2 network. The MAC addresses allowed must be limited to two. Which configuration secures the conference room connectivity?</text:p>
      <text:p text:style-name="P955">A. interface gi1/0/15<text:line-break/>switchport port-security<text:line-break/>switchport port-security mac-address 0000.abcd.0004 vlan 100</text:p>
      <text:p text:style-name="P956">B. interface gi1/0/15<text:line-break/>switchport port-security mac-address 0000.abcd.0004 vlan 100</text:p>
      <text:p text:style-name="P957">C. interface gi1/0/15<text:line-break/>switchport port-security mac-address 0000.abcd.0004 vlan 100<text:line-break/>interface switchport secure-mac limit 2</text:p>
      <text:soft-page-break/>
      <text:p text:style-name="P958">D. interface gi1/0/15<text:line-break/>switchport port-security<text:line-break/>switchport port-security maximum 2</text:p>
      <text:p text:style-name="P959"> </text:p>
      <text:p text:style-name="Normal"><text:span text:style-name="T960">Answer:</text:span><text:span text:style-name="T961"> D</text:span></text:p>
      <text:p text:style-name="Normal"><text:span text:style-name="T962">Question 12.</text:span><text:span text:style-name="T963">60</text:span></text:p>
      <text:p text:style-name="P964">Refer to the exhibit.</text:p>
      <text:p text:style-name="P965">R1# show ip route</text:p>
      <text:p text:style-name="P966">Codes: C — connected, S — static, I — IGRP, R - RIP, M - mobile, B — BGP<text:s/></text:p>
      <text:p text:style-name="P967"><text:s text:c="7"/>D — EIGRP, EX - EIGRP external, O — OSPF, IA — OSPF inter area<text:s/></text:p>
      <text:p text:style-name="P968"><text:tab/><text:s text:c="3"/>N1 — OSPF NSSA external type 1, N2 - OSPF NSSA external type 2<text:s/></text:p>
      <text:p text:style-name="P969"><text:tab/><text:s text:c="3"/>E1 - OSPF external type 1, E2 — OSPF external type 2, E — EGP<text:s/></text:p>
      <text:p text:style-name="P970"><text:tab/><text:s text:c="3"/>i — IS-IS, L1 - IS-IS level-1, L2 — IS-IS level-2, * — candidate default<text:s/></text:p>
      <text:p text:style-name="P971"><text:tab/><text:s text:c="3"/>U - per-user static route, o — ODR<text:s/></text:p>
      <text:p text:style-name="P972">Gateway of last resort is not set</text:p>
      <text:p text:style-name="P973">C <text:s text:c="2"/>172.16.0.0/16 is directly connected, Loopback0</text:p>
      <text:p text:style-name="P974"><text:s text:c="4"/>172.16.0/16 is variably subnetted, 4 subnets, 2 masks</text:p>
      <text:p text:style-name="P975">O<text:tab/><text:s text:c="2"/>172.16.1.3/3 [110/100] via 192.168.7.40, 00:39:08, Serial0</text:p>
      <text:p text:style-name="P976">C<text:tab/><text:s text:c="2"/>172.16.1.0/24 is directly connected, Serial0</text:p>
      <text:p text:style-name="P977">O<text:tab/><text:s text:c="2"/>172.16.1.184/29 [110/5] via 192.168.7.35, 00:39:08, Serial0</text:p>
      <text:p text:style-name="P978">O<text:tab/><text:s text:c="2"/>172.16.3.0/24 [110/10] via 192.168.7.4, 00:39:08, GigabitEthernet 0/0</text:p>
      <text:p text:style-name="P979">D<text:tab/><text:s text:c="2"/>172.16.1.0/28 [90/10] via 192.168.7.7, 00:39:08, GigabitEthernet 0/0</text:p>
      <text:p text:style-name="P980">Load-balanced traffic is coming in from the WAN destined to a host at 172.16.1.190. Which next-hop is used by the router to forward the request?</text:p>
      <text:p text:style-name="P981">A. 192.168.7.4<text:line-break/>B. 192.168.7.7<text:line-break/>C. 192.168.7.35<text:line-break/>D. 192.168.7.40</text:p>
      <text:soft-page-break/>
      <text:p text:style-name="P982"> </text:p>
      <text:p text:style-name="Normal"><text:span text:style-name="T983">Answer:</text:span><text:span text:style-name="T984"> C</text:span></text:p>
      <text:p text:style-name="Normal"><text:span text:style-name="T985">Question 12.</text:span><text:span text:style-name="T986">61</text:span></text:p>
      <text:p text:style-name="P987">Refer to the exhibit.</text:p>
      <text:p text:style-name="P988">R1#show ip ospf interface g0/0/0<text:s/></text:p>
      <text:p text:style-name="P989">GigabitEthernet0/0/0 is up, line protocol is up<text:s/></text:p>
      <text:p text:style-name="P990"><text:s text:c="2"/>Internet address is 192.168.1.2/24, Area 0</text:p>
      <text:p text:style-name="P991"><text:s text:c="2"/>Process ID 1, Router ID 192.168.1.2, Network Type POINT-TO-POINT, Cost: 1</text:p>
      <text:p text:style-name="P992"><text:s text:c="2"/>Transmit Delay is 1 sec, State POINT-TO-POINT,</text:p>
      <text:p text:style-name="P993"><text:s text:c="2"/>Timer intervals configured, Hello 15, Dead 40, Wait 40, Retransmit 5<text:s/></text:p>
      <text:p text:style-name="P994"><text:s text:c="4"/>Hello due in 00:00:08<text:s/></text:p>
      <text:p text:style-name="P995"><text:s text:c="2"/>Index 1/1, flood queue length 0<text:s/></text:p>
      <text:p text:style-name="P996"><text:s text:c="2"/>Next 0x0(0) /0x0(0)</text:p>
      <text:p text:style-name="P997"><text:s text:c="2"/>Last flood scan length is 1, maximum is 1</text:p>
      <text:p text:style-name="P998"><text:s text:c="2"/>Last flood scan time is 0 msec, maximum is 0 msec</text:p>
      <text:p text:style-name="P999"><text:s text:c="2"/>Suppress hello for 0 neighbor(s)</text:p>
      <text:p text:style-name="P1000"/>
      <text:p text:style-name="P1001">R2#show ip ospf interface g0/0/0<text:s/></text:p>
      <text:p text:style-name="P1002">GigabitEthernet0/0/0 is up, line protocol is up<text:s/></text:p>
      <text:p text:style-name="P1003"><text:s text:c="2"/>Internet address is 192.168.1.1/24, Area 0</text:p>
      <text:p text:style-name="P1004"><text:s text:c="2"/>Process ID 1, Router ID 10.1.1.1, Network Type POINT-TO-POINT, Cost: 1<text:s/></text:p>
      <text:p text:style-name="P1005"><text:s text:c="2"/>Transmit Delay is 1 sec, State POINT-TO-POINT,</text:p>
      <text:p text:style-name="P1006"><text:s text:c="2"/>Timer intervals configured, Hello 15, Dead 45, Wait 15, Retransmit 5<text:s/></text:p>
      <text:p text:style-name="P1007"><text:s text:c="4"/>Hello due in 00:00:11<text:s/></text:p>
      <text:p text:style-name="P1008"><text:s text:c="2"/>Index 1/1, flood queue length 0<text:s/></text:p>
      <text:p text:style-name="P1009"><text:s text:c="2"/>Next 0x0(0)/0x0(0)</text:p>
      <text:p text:style-name="P1010"><text:s text:c="2"/>Last flood scan length is 1, maximum is 1</text:p>
      <text:p text:style-name="P1011"><text:s text:c="2"/>Last flood scan time is 0 msec, maximum is 0 msec</text:p>
      <text:soft-page-break/>
      <text:p text:style-name="P1012"><text:s text:c="2"/>Suppress hello for 0 neighbor(s)</text:p>
      <text:p text:style-name="P1013">The network engineer is configuring router R2 as a replacement router on the network. After the initial configuration is applied it is determined that R2 failed to show R1 as a neighbor. Which configuration must be applied to R2 to complete the OSPF configuration and enable it to establish the neighbor relationship with R1?</text:p>
      <table:table table:style-name="Table1014">
        <table:table-columns>
          <table:table-column table:style-name="TableColumn1015"/>
          <table:table-column table:style-name="TableColumn1016"/>
        </table:table-columns>
        <table:table-row table:style-name="TableRow1017">
          <table:table-cell table:style-name="TableCell1018">
            <text:p text:style-name="P1019">Option A</text:p>
            <text:p text:style-name="P1020">R2(config)#interface g0/0/0<text:line-break/>R2(config-if)#ip ospf hello-interval 10</text:p>
          </table:table-cell>
          <table:table-cell table:style-name="TableCell1021">
            <text:p text:style-name="P1022">Option B</text:p>
            <text:p text:style-name="P1023">R2(config)#router ospf 1<text:line-break/>R2(config-router)#router-id 192.168.1.2</text:p>
          </table:table-cell>
        </table:table-row>
        <table:table-row table:style-name="TableRow1024">
          <table:table-cell table:style-name="TableCell1025">
            <text:p text:style-name="P1026">Option C</text:p>
            <text:p text:style-name="P1027">R2(config)#router ospf 1<text:line-break/>R2(config-router)#network 192.168.1.0 255.255.255.0 area 2</text:p>
          </table:table-cell>
          <table:table-cell table:style-name="TableCell1028">
            <text:p text:style-name="P1029">Option D</text:p>
            <text:p text:style-name="P1030">R2(config)#interface g0/0/0<text:line-break/>R2(config-if)#ip ospf dead-interval 40</text:p>
          </table:table-cell>
        </table:table-row>
      </table:table>
      <text:p text:style-name="P1031">A. Option A<text:line-break/>B. Option B<text:line-break/>C. Option C<text:line-break/>D. Option D</text:p>
      <text:p text:style-name="P1032"> </text:p>
      <text:p text:style-name="Normal"><text:span text:style-name="T1033">Answer:</text:span><text:span text:style-name="T1034"> D</text:span></text:p>
      <text:p text:style-name="Normal"><text:span text:style-name="T1035">Explanation</text:span></text:p>
      <text:p text:style-name="P1036">In order to become OSPF neighbor, the following values must be matched on both routers:</text:p>
      <text:p text:style-name="Normal"><text:span text:style-name="T1037">+ Area ID</text:span><text:span text:style-name="T1038"><text:line-break/>+ Authentication</text:span><text:span text:style-name="T1039"><text:line-break/>+ </text:span><text:span text:style-name="T1040">Hello and Dead Intervals</text:span><text:span text:style-name="T1041"><text:line-break/>+ Stub area Flag</text:span><text:span text:style-name="T1042"><text:line-break/>+ MTU Size</text:span></text:p>
      <text:p text:style-name="P1043">In this question we see the Dead intervals are mismatched so we must correct it on one end.</text:p>
      <text:soft-page-break/>
      <text:p text:style-name="Normal"><text:span text:style-name="T1044">Question 12.</text:span><text:span text:style-name="T1045">62</text:span></text:p>
      <text:p text:style-name="P1046">Refer to the exhibit.</text:p>
      <text:p text:style-name="Normal"><text:span text:style-name="T1047"><draw:frame draw:style-name="a28" draw:name="Picture 72" text:anchor-type="as-char" svg:x="0in" svg:y="0in" svg:width="6.5in" svg:height="4.16389in" style:rel-width="scale" style:rel-height="scale"><draw:image xlink:href="media/image29.jpeg" xlink:type="simple" xlink:show="embed" xlink:actuate="onLoad"/><svg:title/><svg:desc/></draw:frame></text:span></text:p>
      <text:p text:style-name="P1048">The DHCP server is configured with a DHCP pool for each of the subnets represented. Which command must be configured on switch SW1 to allow DHCP clients on VLAN 10 to receive dynamic IP addresses from the DHCP server?</text:p>
      <text:p text:style-name="P1049">A. SW1(config-if)#ip helper-address 192.168.10.2<text:line-break/>B. SW1(config-if)#ip helper-address 192.168.20.1<text:line-break/>C. SW1(config-if)#ip helper-address 192.168.20.2<text:line-break/>D. SW1(config-if)#ip helper-address 192.168.10.1</text:p>
      <text:p text:style-name="P1050"> </text:p>
      <text:p text:style-name="Normal"><text:span text:style-name="T1051">Answer:</text:span><text:span text:style-name="T1052"> C</text:span></text:p>
      <text:p text:style-name="Normal"><text:span text:style-name="T1053">Question 12.</text:span><text:span text:style-name="T1054">63</text:span></text:p>
      <text:p text:style-name="P1055">Drag and drop the DNS lookup commands from the left onto the functions on the right.</text:p>
      <text:soft-page-break/>
      <text:p text:style-name="Normal"><text:span text:style-name="T1056"><draw:frame draw:style-name="a29" draw:name="Picture 71" text:anchor-type="as-char" svg:x="0in" svg:y="0in" svg:width="5.55556in" svg:height="2.75694in" style:rel-width="scale" style:rel-height="scale"><draw:image xlink:href="media/image30.jpeg" xlink:type="simple" xlink:show="embed" xlink:actuate="onLoad"/><svg:title/><svg:desc/></draw:frame></text:span></text:p>
      <text:p text:style-name="P1057"> </text:p>
      <text:p text:style-name="Normal"><text:span text:style-name="T1058">Answer:</text:span></text:p>
      <text:p text:style-name="P1059">+ enables DNS lookup on an individual interface: ip domain lookup source-interface<text:line-break/>+ enables the DNS server on the device: ip dns server<text:line-break/>+ identifies a DNS server to provide lookup services: ip name-server<text:line-break/>+ specifies a sequence of domain names: ip domain list<text:line-break/>+ specifies the default domain to append to unqualified host names: ip domain name<text:line-break/>+ statically maps an IP address to a hostname: ip host</text:p>
      <text:p text:style-name="Normal"><text:span text:style-name="T1060">Explanation</text:span></text:p>
      <text:p text:style-name="P1061">The command “ip domain-lookup” enables DNS-based host name-to-address translation. This command is enabled by default.</text:p>
      <text:p text:style-name="Normal"><text:span text:style-name="T1062">The </text:span><text:span text:style-name="T1063">ip domain name</text:span><text:span text:style-name="T1064"> defines a list of default domain names to complete unqualified hostnames. The </text:span><text:span text:style-name="T1065">ip domain list</text:span><text:span text:style-name="T1066"> command is similar to the </text:span><text:span text:style-name="T1067">ip domain name</text:span><text:span text:style-name="T1068"> command, except that with the </text:span><text:span text:style-name="T1069">ip domain list</text:span><text:span text:style-name="T1070"> command you can define a list of domains, each to be tried in turn until the system finds a match.</text:span></text:p>
      <text:p text:style-name="Normal"><text:span text:style-name="T1071">The </text:span><text:span text:style-name="T1072">ip host</text:span><text:span text:style-name="T1073"> defines a static hostname-to-address mapping in the hostname cache. For example: Device(config)# ip host cisco-rtp 192.168.0.148</text:span></text:p>
      <text:soft-page-break/>
      <text:p text:style-name="Normal"><text:span text:style-name="T1074">Reference: </text:span><text:a xlink:href="https://www.cisco.com/c/en/us/td/docs/ios-xml/ios/ipaddr_dns/configuration/15-mt/dns-15-mt-book/dns-config-dns.html" office:target-frame-name="_blank" xlink:show="new"><text:span text:style-name="T1075">https://www.cisco.com/c/en/us/td/docs/ios-xml/ios/ipaddr_dns/configuration/15-mt/dns-15-mt-book/dns-config-dns.html</text:span></text:a></text:p>
      <text:p text:style-name="Normal"><text:span text:style-name="T1076">Question 12.</text:span><text:span text:style-name="T1077">64</text:span></text:p>
      <text:p text:style-name="P1078">Drag and drop the TCP or UDP details from the left onto their corresponding protocols on the right.</text:p>
      <text:p text:style-name="Normal"><text:span text:style-name="T1079"><draw:frame draw:style-name="a30" draw:name="Picture 70" text:anchor-type="as-char" svg:x="0in" svg:y="0in" svg:width="6.5in" svg:height="2.72708in" style:rel-width="scale" style:rel-height="scale"><draw:image xlink:href="media/image31.jpeg" xlink:type="simple" xlink:show="embed" xlink:actuate="onLoad"/><svg:title/><svg:desc/></draw:frame></text:span></text:p>
      <text:p text:style-name="P1080"> </text:p>
      <text:p text:style-name="Normal"><text:span text:style-name="T1081">Answer:</text:span></text:p>
      <text:p text:style-name="Normal"><text:span text:style-name="T1082">TCP</text:span><text:span text:style-name="T1083"><text:line-break/>+ requires the client and the server to establish a connection before sending the packet</text:span><text:span text:style-name="T1084"><text:line-break/>+ supports reliable data transmission</text:span></text:p>
      <text:p text:style-name="Normal"><text:span text:style-name="T1085">UDP</text:span><text:span text:style-name="T1086"><text:line-break/>+ provides best-effort service</text:span><text:span text:style-name="T1087"><text:line-break/>+ transmitted based on data contained in the packet without the need for a data channel</text:span></text:p>
      <text:p text:style-name="Normal"><text:span text:style-name="T1088">Question 12.</text:span><text:span text:style-name="T1089">65</text:span></text:p>
      <text:p text:style-name="P1090">Refer to the exhibit.</text:p>
      <text:p text:style-name="P1091">hostname CPE</text:p>
      <text:p text:style-name="P1092">service password-encryption</text:p>
      <text:soft-page-break/>
      <text:p text:style-name="P1093">ip domain name ccna.cisco.com<text:s/></text:p>
      <text:p text:style-name="P1094">ip name-server 198.51.100.210</text:p>
      <text:p text:style-name="P1095"/>
      <text:p text:style-name="P1096">crypto key generate rsa modulus 1024</text:p>
      <text:p text:style-name="P1097"/>
      <text:p text:style-name="P1098">username admin privilege 15 secret S0m3s3cr3t</text:p>
      <text:p text:style-name="P1099"/>
      <text:p text:style-name="P1100">line vty 0 4</text:p>
      <text:p text:style-name="P1101"><text:s/>transport input ssh<text:s/></text:p>
      <text:p text:style-name="P1102"><text:s/>login local</text:p>
      <text:p text:style-name="P1103">An engineer executed the script and added commands that were not necessary for SSH and now must remove the commands. Which two commands must be executed to correct the configuration? (Choose two)</text:p>
      <text:p text:style-name="P1104">A. no ip domain name ccna.cisco.com<text:line-break/>B. no login local<text:line-break/>C. no ip name-server 198.51.100.210<text:line-break/>D. no service password-encryption<text:line-break/>E. no hostname CPE</text:p>
      <text:p text:style-name="P1105"> </text:p>
      <text:p text:style-name="Normal"><text:span text:style-name="T1106">Answer:</text:span><text:span text:style-name="T1107"> C D</text:span></text:p>
      <text:p text:style-name="Normal"><text:span text:style-name="T1108">Explanation</text:span></text:p>
      <text:p text:style-name="P1109">In order to configure SSH we need to configure ip domain name first. Then allow SSH with the “transport input ssh” and ask the device to use the local username and password with “login local” command.</text:p>
      <text:p text:style-name="P1110">We don’t need the “service password-encryption” as “secret” password is always encrypted.</text:p>
      <text:soft-page-break/>
      <text:p text:style-name="P1111">Note: The  “login local” command means that authentication uses locally configured credentials using the “username … secret …” command.</text:p>
      <text:p text:style-name="Normal"><text:span text:style-name="T1112">Question 12.</text:span><text:span text:style-name="T1113">66</text:span></text:p>
      <text:p text:style-name="P1114">Refer to the exhibit.</text:p>
      <text:p text:style-name="Normal"><text:span text:style-name="T1115"><draw:frame draw:style-name="a31" draw:name="Picture 69" text:anchor-type="as-char" svg:x="0in" svg:y="0in" svg:width="5.79167in" svg:height="7.09722in" style:rel-width="scale" style:rel-height="scale"><draw:image xlink:href="media/image32.jpeg" xlink:type="simple" xlink:show="embed" xlink:actuate="onLoad"/><svg:title/><svg:desc/></draw:frame></text:span></text:p>
      <text:soft-page-break/>
      <text:p text:style-name="Normal"><text:span text:style-name="T1116"><draw:frame draw:style-name="a32" draw:name="Picture 68" text:anchor-type="as-char" svg:x="0in" svg:y="0in" svg:width="5.54167in" svg:height="2.93056in" style:rel-width="scale" style:rel-height="scale"><draw:image xlink:href="media/image33.jpeg" xlink:type="simple" xlink:show="embed" xlink:actuate="onLoad"/><svg:title/><svg:desc/></draw:frame></text:span></text:p>
      <text:p text:style-name="P1117">OSPF is running between site A and site B. Drag and drop the destination IPs from the left onto the network segments used to reach the destination on the right.</text:p>
      <text:p text:style-name="Normal"><text:span text:style-name="T1118">Answer:</text:span><text:span text:style-name="T1119"> </text:span></text:p>
      <text:p text:style-name="Normal"><text:span text:style-name="T1120">Internet</text:span><text:span text:style-name="T1121"><text:line-break/>+ 10.10.10.16</text:span><text:span text:style-name="T1122"><text:line-break/>+ 10.10.13.129</text:span><text:span text:style-name="T1123"><text:line-break/>+ 10.10.100.128</text:span></text:p>
      <text:p text:style-name="Normal"><text:span text:style-name="T1124">Router1</text:span><text:span text:style-name="T1125"><text:line-break/>+ 10.10.13.1</text:span><text:span text:style-name="T1126"><text:line-break/>+ 10.10.13.150</text:span></text:p>
      <text:p text:style-name="Normal"><text:span text:style-name="T1127">Question 12.</text:span><text:span text:style-name="T1128">67</text:span></text:p>
      <text:p text:style-name="P1129">What is a reason to implement LAG on a Cisco WLC?</text:p>
      <text:p text:style-name="P1130">A. Enable the connected switch ports to use different Layer 2 configurations.<text:line-break/>B. Increase the available throughput on the link.<text:line-break/>C. Allow for stateful failover between WLCs.<text:line-break/>D. Increase security by encrypting management frames.</text:p>
      <text:p text:style-name="P1131"> </text:p>
      <text:p text:style-name="Normal"><text:span text:style-name="T1132">Answer:</text:span><text:span text:style-name="T1133"> B</text:span></text:p>
      <text:p text:style-name="Normal"><text:span text:style-name="T1134">Question 12.</text:span><text:span text:style-name="T1135">68</text:span></text:p>
      <text:soft-page-break/>
      <text:p text:style-name="P1136">What are two port types used by a Cisco WLC for out-of-band management? (Choose two)</text:p>
      <text:p text:style-name="P1137">A. redundant<text:line-break/>B. distribution system<text:line-break/>C. service<text:line-break/>D. management<text:line-break/>E. console</text:p>
      <text:p text:style-name="P1138"> </text:p>
      <text:p text:style-name="Normal"><text:span text:style-name="T1139">Answer:</text:span><text:span text:style-name="T1140"> C E</text:span></text:p>
      <text:p text:style-name="Normal"><text:span text:style-name="T1141">Explanation</text:span></text:p>
      <text:p text:style-name="Normal"><text:span text:style-name="T1142">The </text:span><text:span text:style-name="T1143">service</text:span><text:span text:style-name="T1144"> port is used for out-of-band management of the controller and system recovery and maintenance in the event of a network failure.</text:span></text:p>
      <text:p text:style-name="Normal"><text:span text:style-name="T1145">Reference: </text:span><text:a xlink:href="https://www.firewall.cx/cisco-technical-knowledgebase/cisco-wireless/1077-cisco-wireless-controllers-interfaces-ports-functionality.html" office:target-frame-name="_blank" xlink:show="new"><text:span text:style-name="T1146">https://www.firewall.cx/cisco-technical-knowledgebase/cisco-wireless/1077-cisco-wireless-controllers-interfaces-ports-functionality.html</text:span></text:a></text:p>
      <text:p text:style-name="Normal"><text:span text:style-name="T1147">The </text:span><text:span text:style-name="T1148">console</text:span><text:span text:style-name="T1149"> port is used for out-of-band management, system recovery, and early boot operations.</text:span></text:p>
      <text:p text:style-name="Normal"><text:span text:style-name="T1150">Reference: </text:span><text:a xlink:href="https://www.geeksforgeeks.org/physical-infrastructure-connections-of-wlan-components/" office:target-frame-name="_blank" xlink:show="new"><text:span text:style-name="T1151">https://www.geeksforgeeks.org/physical-infrastructure-connections-of-wlan-components/</text:span></text:a></text:p>
      <text:p text:style-name="Normal"><text:span text:style-name="T1152">Question 12.</text:span><text:span text:style-name="T1153">69</text:span></text:p>
      <text:p text:style-name="P1154">Drag and drop the statement about AAA services from the left to the corresponding AAA services on the right.</text:p>
      <text:soft-page-break/>
      <text:p text:style-name="Normal"><text:span text:style-name="T1155"><draw:frame draw:style-name="a33" draw:name="Picture 67" text:anchor-type="as-char" svg:x="0in" svg:y="0in" svg:width="5.5625in" svg:height="2.71528in" style:rel-width="scale" style:rel-height="scale"><draw:image xlink:href="media/image34.jpeg" xlink:type="simple" xlink:show="embed" xlink:actuate="onLoad"/><svg:title/><svg:desc/></draw:frame></text:span></text:p>
      <text:p text:style-name="P1156"> </text:p>
      <text:p text:style-name="Normal"><text:span text:style-name="T1157">Answer:</text:span></text:p>
      <text:p text:style-name="Normal"><text:span text:style-name="T1158">Accounting:</text:span><text:span text:style-name="T1159"><text:line-break/>+ It records the duration of each connection.</text:span><text:span text:style-name="T1160"><text:line-break/>+ It supports User Access Reporting.</text:span></text:p>
      <text:p text:style-name="Normal"><text:span text:style-name="T1161">Authentication:</text:span><text:span text:style-name="T1162"><text:line-break/>+ It performs user validation via TACACS+.</text:span><text:span text:style-name="T1163"><text:line-break/>+ It verifies “who you are”.</text:span></text:p>
      <text:p text:style-name="Normal"><text:span text:style-name="T1164">Question 12.</text:span><text:span text:style-name="T1165">70</text:span></text:p>
      <text:p text:style-name="P1166">Refer to the exhibit.</text:p>
      <text:p text:style-name="Normal"><text:span text:style-name="T1167"><draw:frame draw:style-name="a34" draw:name="Picture 66" text:anchor-type="as-char" svg:x="0in" svg:y="0in" svg:width="4.41667in" svg:height="2.54167in" style:rel-width="scale" style:rel-height="scale"><draw:image xlink:href="media/image35.jpeg" xlink:type="simple" xlink:show="embed" xlink:actuate="onLoad"/><svg:title/><svg:desc/></draw:frame></text:span></text:p>
      <text:soft-page-break/>
      <text:p text:style-name="P1168">Routers R1 and R2 are configured with RIP as the dynamic routing protocol. A network engineer must configure R1 with floating static route to serve as a backup route to network 192.168.23.0. Which command must the engineer configure on R1?</text:p>
      <text:p text:style-name="P1169">A. ip route 192.168.23.0 255.255.255.255 192.168.13.3 121<text:line-break/>B. ip route 192.168.23.0 255.255.255.0 192.168.13.3 100<text:line-break/>C. ip route 192.168.23.0 255.255.255.0 192.168.13.3<text:line-break/>D. ip route 192.168.23.0 255.255.255.0 192.168.13.3 121</text:p>
      <text:p text:style-name="P1170"> </text:p>
      <text:p text:style-name="Normal"><text:span text:style-name="T1171">Answer:</text:span><text:span text:style-name="T1172"> D</text:span></text:p>
      <text:p text:style-name="Normal"><text:span text:style-name="T1173">Explanation</text:span></text:p>
      <text:p text:style-name="P1174">The Administrative Distance (AD) of RIP is 120 so we have to configure a higher AD value (121, for example) for the floating static route to serve as the backup route. Also the subnet mask to this network must be /24 (255.255.255.0).</text:p>
      <text:p text:style-name="Normal"><text:span text:style-name="T1175">Question 12.</text:span><text:span text:style-name="T1176">71</text:span></text:p>
      <text:p text:style-name="P1177">What are two facts that differentiate optical-fiber cabling from copper cabling? (Choose two)</text:p>
      <text:p text:style-name="P1178">A. It carries signals for longer distances.<text:line-break/>B. It provides greater throughput options.<text:line-break/>C. It carries electrical current further distances for PoE devices.<text:line-break/>D. It is less expensive when purchasing patch cables.<text:line-break/>E. It has a greater sensitivity to changes in temperature and moisture</text:p>
      <text:p text:style-name="P1179"> </text:p>
      <text:p text:style-name="Normal"><text:span text:style-name="T1180">Answer:</text:span><text:span text:style-name="T1181"> A B</text:span></text:p>
      <text:p text:style-name="Normal"><text:span text:style-name="T1182">Question 12.</text:span><text:span text:style-name="T1183">72</text:span></text:p>
      <text:p text:style-name="P1184">Why would VRRP be implemented when configuring a new subnet in a multivendor environment?</text:p>
      <text:p text:style-name="P1185">A. to ensure that the spanning-tree forwarding path to the gateway is loop-free<text:line-break/>B. when a gateway protocol is required that supports more than two Cisco devices<text:s/><text:soft-page-break/>for redundancy<text:line-break/>C. to interoperate normally with all vendors and provide additional security features for Cisco devices<text:line-break/>D. to enable normal operations to continue after a member failure without requiring a change in a host ARP cache</text:p>
      <text:p text:style-name="P1186"> </text:p>
      <text:p text:style-name="Normal"><text:span text:style-name="T1187">Answer:</text:span><text:span text:style-name="T1188"> D</text:span></text:p>
      <text:p text:style-name="Normal"><text:span text:style-name="T1189">Explanation</text:span></text:p>
      <text:p text:style-name="P1190">VRRP is an open standard protocol so it is a must when using along with another vendor.</text:p>
      <text:p text:style-name="P1191">The first part of answer C is correct but VRRP does not provide additional security features so this answer is not correct.</text:p>
      <text:p text:style-name="P1192">All VRRP routers share the MAC address of the virtual IP address (in the form 0000.5E00.01xx, where xx is the VRRP group number) so even when a member fails, the hosts do not need to change its ARP cache by sending an ARP request again -&gt; Answer D is correct.</text:p>
      <text:p text:style-name="Normal"><text:span text:style-name="T1193">Question 12.</text:span><text:span text:style-name="T1194">73</text:span></text:p>
      <text:p text:style-name="P1195">What must a network administrator consider when deciding whether to configure a new wireless network with APs in autonomous mode or APs running in cloud-based mode?</text:p>
      <text:p text:style-name="P1196">A. Autonomous mode APs are less dependent on an underlay but more complex to maintain than APs in cloud-based mode<text:line-break/>B. Autonomous mode APs are easy to deploy and automate than APs in cloud-based mode<text:line-break/>C. Cloud-based mode APs are easy to deploy but harder to automate than APs in autonomous mode<text:line-break/>D. Cloud-based mode APs rely on underlays and are more complex to maintain than APs in autonomous mode</text:p>
      <text:p text:style-name="P1197"> </text:p>
      <text:p text:style-name="Normal"><text:span text:style-name="T1198">Answer:</text:span><text:span text:style-name="T1199"> A</text:span></text:p>
      <text:soft-page-break/>
      <text:p text:style-name="Normal"><text:span text:style-name="T1200">Explanation</text:span></text:p>
      <text:p text:style-name="P1201">Autonomous AP can work on it’s own. Cloud-based AP management is an alternative to purchasing a management platform. The AP management function is pushed into the Internet cloud -&gt; The Cloud-based AP is easier to manage than “traditional” autonomous mode APs as we have to configure autonomous APs one by one.</text:p>
      <text:p text:style-name="Normal"><text:span text:style-name="T1202">Question 12.</text:span><text:span text:style-name="T1203">74</text:span></text:p>
      <text:p text:style-name="P1204">Under the CRUD model, which two HTTP methods support the UPDATE operation? (Choose two)</text:p>
      <text:p text:style-name="P1205">A. PUT<text:line-break/>B. PATCH<text:line-break/>C. DELETE<text:line-break/>D. POST<text:line-break/>E. GET</text:p>
      <text:p text:style-name="P1206"> </text:p>
      <text:p text:style-name="Normal"><text:span text:style-name="T1207">Answer:</text:span><text:span text:style-name="T1208"> A B</text:span></text:p>
      <text:p text:style-name="Normal"><text:span text:style-name="T1209">Explanation</text:span></text:p>
      <text:p text:style-name="P1210">CRUD is short for CREATE, READ, UPDATE and DELETE operations. Only UPDATE operation modifies an existing table or view so it is equivalent to PUT and PATCH in HTTP methods.</text:p>
      <text:p text:style-name="P1211">PUT: fully update (i.e. replace) an existing record<text:line-break/>PATCH: update part of an existing record</text:p>
      <text:p text:style-name="P1212">PUT is similar to POST in that it can create resources, but it does so when there is a defined URL wherein PUT replaces the entire resource if it exists or creates new if it does not exist.</text:p>
      <text:p text:style-name="P1213">Unlike PUT Request, PATCH does partial update. Fields that need to be updated by the client, only that field is updated without modifying the other field.</text:p>
      <text:p text:style-name="Normal"><text:span text:style-name="T1214">Question 12.</text:span><text:span text:style-name="T1215">75</text:span></text:p>
      <text:soft-page-break/>
      <text:p text:style-name="P1216">What are two advantages of implementing a controller-based architecture instead of a traditional network architecture? (Choose two)</text:p>
      <text:p text:style-name="P1217">A. It supports complex and high-scale IP addressing schemes.<text:line-break/>B. It provides increased scalability and management options.<text:line-break/>C. It allows for seamless connectivity to virtual machines.<text:line-break/>D. It enables configuration task automation.<text:line-break/>E. It increases security against denial-of-service attacks.</text:p>
      <text:p text:style-name="P1218"> </text:p>
      <text:p text:style-name="Normal"><text:span text:style-name="T1219">Answer:</text:span><text:span text:style-name="T1220"> B D</text:span></text:p>
      <text:p text:style-name="Normal"><text:span text:style-name="T1221">Question 12.</text:span><text:span text:style-name="T1222">76</text:span></text:p>
      <text:p text:style-name="P1223">Refer to the exhibit.</text:p>
      <text:p text:style-name="Normal"><text:span text:style-name="T1224"><draw:frame draw:style-name="a35" draw:name="Picture 65" text:anchor-type="as-char" svg:x="0in" svg:y="0in" svg:width="4.5625in" svg:height="1.34722in" style:rel-width="scale" style:rel-height="scale"><draw:image xlink:href="media/image36.jpeg" xlink:type="simple" xlink:show="embed" xlink:actuate="onLoad"/><svg:title/><svg:desc/></draw:frame></text:span></text:p>
      <text:p text:style-name="P1225">The switches are connected via a Cat5 Ethernet cable that was successfully tested. The interfaces are configured as access ports and are both in a “down” status. What is the cause of this issue?</text:p>
      <text:p text:style-name="P1226">A. The switches are configured with incompatible duplex settings.<text:line-break/>B. The speed settings on the switches are mismatched.<text:line-break/>C. The distance between the two switches is not supported by Cat5.<text:line-break/>D. The portfast command is missing from the configuration.</text:p>
      <text:p text:style-name="P1227"> </text:p>
      <text:p text:style-name="Normal"><text:span text:style-name="T1228">Answer:</text:span><text:span text:style-name="T1229"> B</text:span></text:p>
      <text:p text:style-name="Normal"><text:span text:style-name="T1230">Question 12.</text:span><text:span text:style-name="T1231">77</text:span></text:p>
      <text:p text:style-name="P1232">A technician receives a report of network slowness and the issue has been isolated to the interface FastEthernet0/13. What is the root cause of the issue?</text:p>
      <text:p text:style-name="P1233">FastEthernet0/13 is up, line protocol is up</text:p>
      <text:soft-page-break/>
      <text:p text:style-name="P1234">Hardware is Fast Ethernet, address is 0001.4d27.66cd (bia 0001.4d27.66cd)</text:p>
      <text:p text:style-name="P1235">MTU 1500 bytes, BW 100000 Kbit, DLY 100 usec,</text:p>
      <text:p text:style-name="P1236">reliability 250/255, txload 1/255, ndoad 1/255</text:p>
      <text:p text:style-name="P1237">Encapsulation ARPA, loopback not set</text:p>
      <text:p text:style-name="P1238">Keepalive not set</text:p>
      <text:p text:style-name="P1239">Auto-duplex (Full), Auto Speed (100), 100BaseTX/FX</text:p>
      <text:p text:style-name="P1240">ARP type: ARPA, ARP Timeout 04:00:00</text:p>
      <text:p text:style-name="P1241">Last input 18:52:43, output 00:00:01, output hang never</text:p>
      <text:p text:style-name="P1242">Last clearing of "show interface" counters never</text:p>
      <text:p text:style-name="P1243">Queueing strategy: fifo</text:p>
      <text:p text:style-name="P1244">Output queue 0/40,0 drops; input queue 0/75, 0 drops</text:p>
      <text:p text:style-name="P1245">5 minute input rate 12000 bits/sec, 6 packets/sec</text:p>
      <text:p text:style-name="P1246">5 minute output rate 24000 bits/sec, 6 packets/sec</text:p>
      <text:p text:style-name="P1247">14488019 packets input, 2441805322 bytes</text:p>
      <text:p text:style-name="P1248">Received 345346 broadcasts, 0 runts, 0 giants, 0 throttles</text:p>
      <text:p text:style-name="P1249">261028 input errors, 259429 CRC, 1599 frame, 0 overrun, 0 ignored</text:p>
      <text:p text:style-name="P1250">0 watchdog, 84207 multicast 0 input packets with dribble condition detected</text:p>
      <text:p text:style-name="P1251">19658279 packets output, 3529106068 bytes, 0 underruns</text:p>
      <text:p text:style-name="P1252">0 output errors, 0 collisions, 1 interface resets</text:p>
      <text:p text:style-name="P1253">0 babbles, 0 late collision, 0 deferred</text:p>
      <text:p text:style-name="P1254">0 lost carrier, 0 no carrier</text:p>
      <text:p text:style-name="P1255">0 output buffer failures, 0 output buffers swapped out</text:p>
      <text:p text:style-name="P1256">A. physical errors<text:line-break/>B. local buffer overload<text:line-break/>C. duplicate IP addressing<text:line-break/>D. err-disabled port on the far end</text:p>
      <text:p text:style-name="P1257"> </text:p>
      <text:p text:style-name="Normal"><text:span text:style-name="T1258">Answer:</text:span><text:span text:style-name="T1259"> A</text:span></text:p>
      <text:soft-page-break/>
      <text:p text:style-name="Normal"><text:span text:style-name="T1260">Explanation</text:span></text:p>
      <text:p text:style-name="P1261">In this question, the input errors and CRC errors grow so the most likely cause of this problem is cable connected between two devices is faulty (physical errors).</text:p>
      <text:p text:style-name="Normal"><text:span text:style-name="T1262">Question 12.</text:span><text:span text:style-name="T1263">78</text:span></text:p>
      <text:p text:style-name="Normal"><text:span text:style-name="T1264">A router received three destination prefixes: 10.0.0.0/8, 10.0.0.0/16, and 10.0.0.0/24. When the </text:span><text:span text:style-name="T1265">show ip route</text:span><text:span text:style-name="T1266"> command is executed, which output does it return?</text:span></text:p>
      <text:p text:style-name="P1267">A. Gateway of last resort is 172.16.1.1 to network 0.0.0.0<text:line-break/>O E2 10.0.0.0/24[110/5] via 192.168.3.1, 0:01:00, Ethernet2</text:p>
      <text:p text:style-name="P1268">B. Gateway of last resort is 172.16.1.1 to network 0.0.0.0<text:line-break/>O E2 10.0.0.0/16[110/5] via 192.168.2.1, 0:01:00, Ethernet1<text:line-break/>O E2 10.0.0.0/24[110/5] via 192.168.3.1, 0:01:00, Ethernet2</text:p>
      <text:p text:style-name="P1269">C. Gateway of last resort is 172.16.1.1 to network 0.0.0.0<text:line-break/>O E2 10.0.0.0/8 [110/5] via 192.168.1.1, 0:01:00, Ethernet0</text:p>
      <text:p text:style-name="P1270">D. Gateway of last resort is 172.16.1.1 to network 0.0.0.0<text:line-break/>O E2 10.0.0.0/8 [110/5] via 192.168.1.1, 0:01:00, Ethernet0<text:line-break/>O E2 10.0.0.0/16[110/5] via 192.168.2.1, 0:01:00, Ethernet1<text:line-break/>O E2 10.0.0.0/24[110/5] via 192.168.3.1, 0:01:00, Ethernet2</text:p>
      <text:p text:style-name="P1271"> </text:p>
      <text:p text:style-name="Normal"><text:span text:style-name="T1272">Answer:</text:span><text:span text:style-name="T1273"> D</text:span></text:p>
      <text:p text:style-name="Normal"><text:span text:style-name="T1274">Explanation</text:span></text:p>
      <text:p text:style-name="Normal"><text:span text:style-name="T1275">For the purpose of installing routes in the routing table, the router considers </text:span><text:span text:style-name="T1276">different prefix lengths as different destinations</text:span><text:span text:style-name="T1277">. That is why multiple routes from the same and/or different routing protocols are installed in the routing table. Tie breaker is longest match rule, that </text:span><text:span text:style-name="T1278">selects</text:span><text:span text:style-name="T1279"> the route with the longest subnet mask (prefix length) from among routes already in the routing table.</text:span></text:p>
      <text:p text:style-name="Normal"><text:span text:style-name="T1280">Reference: </text:span><text:a xlink:href="https://www.cisconetsolutions.com/introduction-to-routing-protocols/" office:target-frame-name="_blank" xlink:show="new"><text:span text:style-name="T1281">https://www.cisconetsolutions.com/introduction-to-routing-protocols/</text:span></text:a></text:p>
      <text:p text:style-name="Normal"><text:span text:style-name="T1282">Question 12.</text:span><text:span text:style-name="T1283">79</text:span></text:p>
      <text:soft-page-break/>
      <text:p text:style-name="P1284">Refer to the exhibit.</text:p>
      <text:p text:style-name="Normal"><text:span text:style-name="T1285"><draw:frame draw:style-name="a36" draw:name="Picture 64" text:anchor-type="as-char" svg:x="0in" svg:y="0in" svg:width="6.5in" svg:height="3.51806in" style:rel-width="scale" style:rel-height="scale"><draw:image xlink:href="media/image37.jpeg" xlink:type="simple" xlink:show="embed" xlink:actuate="onLoad"/><svg:title/><svg:desc/></draw:frame></text:span></text:p>
      <text:p text:style-name="P1286">A network engineer configures the CCNA WLAN so that clients must reauthenticate hourly and to limit the number of simultaneous connections to the WLAN to 10. Which two actions complete this configuration? (Choose two)</text:p>
      <text:p text:style-name="P1287">A. Set the Maximum Allowed Clients value to 10.<text:line-break/>B. Enable the Client Exclusion option and set the value to 3600.<text:line-break/>C. Set the Maximum Allowed Clients Per AP Radio value to 10.<text:line-break/>D. Enable the Wi-Fi Direct Clients Policy option.<text:line-break/>E. Enable the Enable Session Timeout option and set the value to 3600.</text:p>
      <text:p text:style-name="P1288"> </text:p>
      <text:p text:style-name="Normal"><text:span text:style-name="T1289">Answer:</text:span><text:span text:style-name="T1290"> A E</text:span></text:p>
      <text:p text:style-name="Normal"><text:span text:style-name="T1291">Explanation</text:span></text:p>
      <text:p text:style-name="Normal"><text:span text:style-name="T1292">By default, client sessions with the WLAN are limited to 1800 seconds (30 minutes). Once that session time expires, a client will be required to re-authenticate. This setting is controlled by the </text:span><text:span text:style-name="T1293">Enable Session Timeout</text:span><text:span text:style-name="T1294"> check box and the Timeout field.</text:span></text:p>
      <text:p text:style-name="Normal"><text:span text:style-name="T1295">Question 12.</text:span><text:span text:style-name="T1296">80</text:span></text:p>
      <text:soft-page-break/>
      <text:p text:style-name="P1297">Which state is bypassed in Rapid PVST+ when PortFast is enabled on a port?</text:p>
      <text:p text:style-name="P1298">A. discarding<text:line-break/>B. learning<text:line-break/>C. blocking<text:line-break/>D. forwarding</text:p>
      <text:p text:style-name="P1299"> </text:p>
      <text:p text:style-name="Normal"><text:span text:style-name="T1300">Answer:</text:span><text:span text:style-name="T1301"> B</text:span></text:p>
      <text:p text:style-name="Normal"><text:span text:style-name="T1302">Explanation</text:span></text:p>
      <text:p text:style-name="Normal"><text:span text:style-name="T1303">PortFast causes a switch or trunk port to enter the spanning tree forwarding state immediately, bypassing the </text:span><text:span text:style-name="T1304">listening</text:span><text:span text:style-name="T1305"> and </text:span><text:span text:style-name="T1306">learning</text:span><text:span text:style-name="T1307"> states.</text:span></text:p>
      <text:p text:style-name="Normal"><text:span text:style-name="T1308">Reference: </text:span><text:a xlink:href="https://www.cisco.com/c/en/us/td/docs/switches/lan/catalyst4000/8-2glx/configuration/guide/stp_enha.html" office:target-frame-name="_blank" xlink:show="new"><text:span text:style-name="T1309">https://www.cisco.com/c/en/us/td/docs/switches/lan/catalyst4000/8-2glx/configuration/guide/stp_enha.html</text:span></text:a></text:p>
      <text:p text:style-name="Normal"><text:span text:style-name="T1310">Question 12.</text:span><text:span text:style-name="T1311">81</text:span></text:p>
      <text:p text:style-name="P1312">When a switch receives a frame from an unknown source MAC address, which action does the switch take with the frame?</text:p>
      <text:p text:style-name="P1313">A. It floods the frame out all interfaces, including the interface it was received on.<text:line-break/>B. It attempts to send the frame back to the source to ensure that the source MAC address is still available for transmissions.<text:line-break/>C. It sends the frame to ports within the CAM table identified with an unknown source MAC address.<text:line-break/>D. It associate the source MAC address with the LAN port on which it was received and saves it to the MAC address table.</text:p>
      <text:p text:style-name="P1314"> </text:p>
      <text:p text:style-name="Normal"><text:span text:style-name="T1315">Answer:</text:span><text:span text:style-name="T1316"> D</text:span></text:p>
      <text:p text:style-name="Normal"><text:span text:style-name="T1317">Question 12.</text:span><text:span text:style-name="T1318">82</text:span></text:p>
      <text:p text:style-name="P1319">What is a function of a southbound API?</text:p>
      <text:p text:style-name="P1320">A. Automate configuration changes between a server and a switching fabric.<text:line-break/>B. Manage flow control between an SDN controller and a switching fabric.<text:line-break/><text:soft-page-break/>C. Use orchestration to provision a virtual server configuration from a web server.<text:line-break/>D. Facilitate the information exchange between an SDN controller and application.</text:p>
      <text:p text:style-name="P1321"> </text:p>
      <text:p text:style-name="Normal"><text:span text:style-name="T1322">Answer:</text:span><text:span text:style-name="T1323"> B</text:span></text:p>
      <text:p text:style-name="Normal"><text:span text:style-name="T1324">Question 12.</text:span><text:span text:style-name="T1325">83</text:span></text:p>
      <text:p text:style-name="P1326">Which interface condition is occurring in this output?</text:p>
      <text:p text:style-name="Normal"><text:span text:style-name="T1327">R25#<text:s/></text:span><text:span text:style-name="T1328">show interface fa0/0</text:span></text:p>
      <text:p text:style-name="P1329">FastEthernet0/0 is up, line protocol is up</text:p>
      <text:p text:style-name="P1330">Hardware is DEC21140, address is ca02.7788.0000 (bia ca02.7788.0000)</text:p>
      <text:p text:style-name="P1331">Description: atlanta_subnet</text:p>
      <text:p text:style-name="P1332">Internet address is 10.32.102.2/30</text:p>
      <text:p text:style-name="P1333">MTU 1500 bytes, BW 100000 Kbit/sec, DLY 100 usec,</text:p>
      <text:p text:style-name="P1334">reliability 255/255, txload 1/255, rxload 1/255</text:p>
      <text:p text:style-name="P1335">Encapsulation ARPA, loopback not set</text:p>
      <text:p text:style-name="P1336">Keepalive set (60 sec)</text:p>
      <text:p text:style-name="P1337">Full-duplex, 100 Mb/s, 100BaseTX/FX</text:p>
      <text:p text:style-name="P1338">ARP type: ARPA, ARP Timeout 04:00:00</text:p>
      <text:p text:style-name="P1339">Last input 00:00:01, output 00:00:00, output hang never</text:p>
      <text:p text:style-name="P1340">Last clearing of "show interface" counters never</text:p>
      <text:p text:style-name="P1341">Input queue: 0/300/0/0 (size/max/drops/flushes); Total output drops: 0</text:p>
      <text:p text:style-name="P1342">Queueing strategy: fifo</text:p>
      <text:p text:style-name="P1343">Output queue: 0/300 (size/max)</text:p>
      <text:p text:style-name="P1344">30 second input rate 0 bits/sec, 0 packets/sec</text:p>
      <text:p text:style-name="P1345">30 second output rate 0 bits/sec, 0 packets/sec</text:p>
      <text:p text:style-name="P1346">7331 packets input, 7101162 bytes</text:p>
      <text:p text:style-name="P1347">Received 267 broadcasts (0 IP multicasts)</text:p>
      <text:p text:style-name="P1348">1876 runts, 0 giants, 0 throttles</text:p>
      <text:p text:style-name="P1349">0 input errors, 0 CRC, 0 frame, 0 overrun, 0 ignored</text:p>
      <text:soft-page-break/>
      <text:p text:style-name="P1350">0 watchdog</text:p>
      <text:p text:style-name="P1351">0 input packets with dribble condition detected</text:p>
      <text:p text:style-name="P1352">3927 packets output, 1440403 bytes, 0 underruns</text:p>
      <text:p text:style-name="P1353">0 output errors, 0 collisions, 0 interface resets</text:p>
      <text:p text:style-name="P1354">0 unknown protocol drops</text:p>
      <text:p text:style-name="P1355">0 babbles, 0 late collision, 0 deferred</text:p>
      <text:p text:style-name="P1356">0 lost carrier, 0 no carrier</text:p>
      <text:p text:style-name="P1357">0 output buffer failures, 0 output buffers swapped out</text:p>
      <text:p text:style-name="P1358">A. bad NIC<text:line-break/>B. duplex mismatch<text:line-break/>C. collisions<text:line-break/>D. high throughput</text:p>
      <text:p text:style-name="P1359"> </text:p>
      <text:p text:style-name="Normal"><text:span text:style-name="T1360">Answer:</text:span><text:span text:style-name="T1361"> A</text:span></text:p>
      <text:p text:style-name="Normal"><text:span text:style-name="T1362">Explanation</text:span></text:p>
      <text:p text:style-name="P1363">In the output we see a high number of runts (“1876 runts”). Runts are frames which do not meet the minimum frame size of 64 bytes. Although runts are usually created by collisions but it is not the reason for this question because the collision in the output above is 0.</text:p>
      <text:p text:style-name="P1364">There is another usual cause of excessive runt frames, which is malfunctioning (bad) NICs.</text:p>
      <text:p text:style-name="Normal"><text:span text:style-name="T1365">Reference: </text:span><text:a xlink:href="https://www.ii.pwr.edu.pl/~kano/course/module2/2.1.2.5/2.1.2.5.html" office:target-frame-name="_blank" xlink:show="new"><text:span text:style-name="T1366">https://www.ii.pwr.edu.pl/~kano/course/module2/2.1.2.5/2.1.2.5.html</text:span></text:a></text:p>
      <text:p text:style-name="Normal"><text:span text:style-name="T1367">Question 12.</text:span><text:span text:style-name="T1368">84</text:span></text:p>
      <text:p text:style-name="P1369">Which interface condition is occurring in this output?</text:p>
      <text:p text:style-name="Normal"><text:span text:style-name="T1370">R25#<text:s/></text:span><text:span text:style-name="T1371">show interface fa0/0</text:span></text:p>
      <text:p text:style-name="P1372">FastEthernet0/0 is up, line protocol is up</text:p>
      <text:p text:style-name="P1373">Hardware is DEC21140, address is ca02.7788.0000 (bia ca02.7788.0000)</text:p>
      <text:p text:style-name="P1374">Description: singapore_subnet</text:p>
      <text:soft-page-break/>
      <text:p text:style-name="P1375">Internet address is 10.32.102.2/30</text:p>
      <text:p text:style-name="P1376">MTU 1500 bytes, BW 100000 Kbit/sec, DLY 100 usec,</text:p>
      <text:p text:style-name="P1377">reliability 255/255, txload 255/255, rxload 255/255</text:p>
      <text:p text:style-name="P1378">Encapsulation ARPA, loopback not set</text:p>
      <text:p text:style-name="P1379">Keepalive set (60 sec)</text:p>
      <text:p text:style-name="P1380">Full-duplex, 100 Mb/s, 100BaseTX/FX</text:p>
      <text:p text:style-name="P1381">ARP type: ARPA, ARP Timeout 04:00:00</text:p>
      <text:p text:style-name="P1382">Last input 00:00:01, output 00:00:00, output hang never</text:p>
      <text:p text:style-name="P1383">Last clearing of "show interface" counters never</text:p>
      <text:p text:style-name="P1384">Input queue: 0/300/0/0 (size/max/drops/flushes); Total output drops: 0</text:p>
      <text:p text:style-name="P1385">Queueing strategy: fifo</text:p>
      <text:p text:style-name="P1386">Output queue: 0/300 (size/max)</text:p>
      <text:p text:style-name="P1387">30 second input rate 225953751 bits/sec, 0 packets/sec</text:p>
      <text:p text:style-name="P1388">30 second output rate 232423817 bits/sec, 0 packets/sec</text:p>
      <text:p text:style-name="P1389">7331 packets input, 7101162 bytes</text:p>
      <text:p text:style-name="P1390">Received 267 broadcasts (0 IP multicasts)</text:p>
      <text:p text:style-name="P1391">0 runts, 0 giants, 0 throttles</text:p>
      <text:p text:style-name="P1392">0 input errors, 0 CRC, 0 frame, 0 overrun, 0 ignored</text:p>
      <text:p text:style-name="P1393">0 watchdog</text:p>
      <text:p text:style-name="P1394">0 input packets with dribble condition detected</text:p>
      <text:p text:style-name="P1395">3927 packets output, 1440403 bytes, 0 underruns</text:p>
      <text:p text:style-name="P1396">0 output errors, 0 collisions, 0 interface resets</text:p>
      <text:p text:style-name="P1397">0 unknown protocol drops</text:p>
      <text:p text:style-name="P1398">0 babbles, 0 late collision, 0 deferred</text:p>
      <text:p text:style-name="P1399">0 lost carrier, 0 no carrier</text:p>
      <text:p text:style-name="P1400">0 output buffer failures, 0 output buffers swapped out</text:p>
      <text:p text:style-name="P1401">A. bad NIC<text:line-break/>B. duplex mismatch<text:line-break/><text:soft-page-break/>C. collisions<text:line-break/>D. high throughput</text:p>
      <text:p text:style-name="P1402"> </text:p>
      <text:p text:style-name="Normal"><text:span text:style-name="T1403">Answer:</text:span><text:span text:style-name="T1404"> D</text:span></text:p>
      <text:p text:style-name="Normal"><text:span text:style-name="T1405">Explanation</text:span></text:p>
      <text:p text:style-name="P1406">Both txload and rxload on this interface are “255/255” so this interface is busy in transmitting and receiving traffic.</text:p>
      <text:p text:style-name="Normal"><text:span text:style-name="T1407">Question 12.</text:span><text:span text:style-name="T1408">85</text:span></text:p>
      <text:p text:style-name="P1409">The clients and DHCP server reside on different subnets. Which command must be used to forward requests and replies between clients on the 10.10.0.1/24 subnet and the DHCP server at 192.168.10.1?</text:p>
      <text:p text:style-name="P1410">A. ip route 192.168.10.1<text:line-break/>B. ip helper-address 192.168.10.1<text:line-break/>C. ip dhcp address 192.168.10.1<text:line-break/>D. ip default-gateway 192.168.10.1</text:p>
      <text:p text:style-name="P1411"> </text:p>
      <text:p text:style-name="Normal"><text:span text:style-name="T1412">Answer:</text:span><text:span text:style-name="T1413"> B</text:span></text:p>
      <text:p text:style-name="Normal"><text:span text:style-name="T1414">Explanation</text:span></text:p>
      <text:p text:style-name="Normal"><text:span text:style-name="T1415">To make a router a DHCP Relay Agent, simply put the “ip helper-address &lt;</text:span><text:span text:style-name="T1416">IP-address-of-DHCP-Server</text:span><text:span text:style-name="T1417">&gt;” command under the interface that receives the DHCP messages from the DHCP Client.</text:span></text:p>
      <text:p text:style-name="Normal"><text:span text:style-name="T1418"><draw:frame draw:style-name="a37" draw:name="Picture 63" text:anchor-type="as-char" svg:x="0in" svg:y="0in" svg:width="6.20833in" svg:height="1.84722in" style:rel-width="scale" style:rel-height="scale"><draw:image xlink:href="media/image38.jpeg" xlink:type="simple" xlink:show="embed" xlink:actuate="onLoad"/><svg:title/><svg:desc/></draw:frame></text:span></text:p>
      <text:p text:style-name="Normal"><text:span text:style-name="T1419">Question 12.</text:span><text:span text:style-name="T1420">86</text:span></text:p>
      <text:soft-page-break/>
      <text:p text:style-name="P1421">What is the PUT method within HTTP?</text:p>
      <text:p text:style-name="P1422">A. It replaces data at the destination.<text:line-break/>B. It displays a web site.<text:line-break/>C. It is a read-only operation.<text:line-break/>D. It is a nonidempotent operation.</text:p>
      <text:p text:style-name="P1423"> </text:p>
      <text:p text:style-name="Normal"><text:span text:style-name="T1424">Answer:</text:span><text:span text:style-name="T1425"> A</text:span></text:p>
      <text:p text:style-name="Normal"><text:span text:style-name="T1426">Explanation</text:span></text:p>
      <text:p text:style-name="P1427">The HTTP PUT request method creates a new resource or replaces a representation of the target resource with the request payload -&gt; Answer A is correct.</text:p>
      <text:p text:style-name="P1428">The difference between PUT and POST is that PUT is idempotent: calling it once or several times successively has the same effect (that is no side effect), whereas successive identical POST requests may have additional effects, akin to placing an order several times -&gt; Answer D is not correct.</text:p>
      <text:p text:style-name="Normal"><text:span text:style-name="T1429">Reference: </text:span><text:a xlink:href="https://developer.mozilla.org/en-US/docs/Web/HTTP/Methods/PUT" office:target-frame-name="_blank" xlink:show="new"><text:span text:style-name="T1430">https://developer.mozilla.org/en-US/docs/Web/HTTP/Methods/PUT</text:span></text:a></text:p>
      <text:p text:style-name="Normal"><text:span text:style-name="T1431">Question 12.</text:span><text:span text:style-name="T1432">87</text:span></text:p>
      <text:p text:style-name="P1433">Refer to the exhibit.</text:p>
      <text:p text:style-name="P1434">R1</text:p>
      <text:p text:style-name="P1435">interface GigabitEthernet0/1</text:p>
      <text:p text:style-name="P1436"><text:s/>ip address 192.168.12.1 255.255.255.128</text:p>
      <text:p text:style-name="P1437"><text:s/>no shutdown</text:p>
      <text:p text:style-name="P1438">router ospf 1</text:p>
      <text:p text:style-name="P1439"><text:s/>network 192.168.12.1 0.0.0.0 area 1</text:p>
      <text:p text:style-name="P1440"/>
      <text:p text:style-name="P1441">R2</text:p>
      <text:p text:style-name="P1442">interface GigabitEthernet0/1</text:p>
      <text:p text:style-name="consolas"><text:s/>ip address 192.168.12.2 255.255.255.128</text:p>
      <text:p text:style-name="Normal"><text:span text:style-name="T1443"><text:s/>no shutdown</text:span></text:p>
      <text:soft-page-break/>
      <text:p text:style-name="P1444">A network engineer started to configure two directly-connected routers as shown. Which command sequence must the engineer configure on R2 so that the two routers become OSPF neighbors?</text:p>
      <text:p text:style-name="P1445">A. interface GigabitEthernet0/1<text:line-break/>ip ospf 1 area 0</text:p>
      <text:p text:style-name="P1446">B. interface GigabitEthernet0/1<text:line-break/>ip ospf 1 area 1</text:p>
      <text:p text:style-name="P1447">C. router ospf 1<text:line-break/>network 192.168.12.0 0.0.0.127 area 0</text:p>
      <text:p text:style-name="P1448">D. router ospf 1<text:line-break/>network 192.168.12.1 0.0.0.0 area 1</text:p>
      <text:p text:style-name="P1449"> </text:p>
      <text:p text:style-name="Normal"><text:span text:style-name="T1450">Answer:</text:span><text:span text:style-name="T1451"> B</text:span></text:p>
      <text:p text:style-name="Normal"><text:span text:style-name="T1452">Explanation</text:span></text:p>
      <text:p text:style-name="Normal"><text:span text:style-name="T1453">To establish OSPF neighbor between R1 &amp; R2, interface Gi0/1 of R2 must belong to the same area of interface Gi0/1 of R1 (area 1) and OSPF must be turned on on this interface via “ip ospf 1 area </text:span><text:span text:style-name="T1454">1</text:span><text:span text:style-name="T1455">” command or “network 192.168.12.</text:span><text:span text:style-name="T1456">2</text:span><text:span text:style-name="T1457"> 0.0.0.0 area 1″ command or “network 192.168.12.0 0.0.0.127 area </text:span><text:span text:style-name="T1458">1</text:span><text:span text:style-name="T1459">” command…</text:span></text:p>
      <text:p text:style-name="Normal"><text:span text:style-name="T1460">Question 12.</text:span><text:span text:style-name="T1461">88</text:span></text:p>
      <text:p text:style-name="P1462">Refer to the exhibit.</text:p>
      <text:p text:style-name="consolas">R1# show ip route</text:p>
      <text:p text:style-name="consolas">Codes: C - connected, S - static, I - IGRP, R - rip, M - mobile, B - BGP<text:s/></text:p>
      <text:p text:style-name="consolas"><text:s text:c="7"/>D - EIGRP, EX - EIGRP external, O - OSPF, IA - OSPF inter area<text:s/></text:p>
      <text:p text:style-name="consolas"><text:s text:c="7"/>N1 - OSPF NSSA external type 1, N2 - OSPF NSSA external type 2<text:s/></text:p>
      <text:p text:style-name="consolas"><text:s text:c="7"/>E1 - OSPF external type 1, E2 - OSPF external type 2, E - EGP<text:s/></text:p>
      <text:p text:style-name="consolas"><text:s text:c="7"/>i - IS-IS, L1 - IS-IS level-1, L2 - IS-IS level-2, * - candidate</text:p>
      <text:p text:style-name="consolas">default</text:p>
      <text:p text:style-name="consolas"><text:s text:c="7"/>U - per-user static route, o - ODR<text:s/></text:p>
      <text:soft-page-break/>
      <text:p text:style-name="consolas">Gateway of last resort is not set<text:s/></text:p>
      <text:p text:style-name="consolas">C <text:s text:c="3"/>10.0.0.0/8 is directly connected, Loopback0</text:p>
      <text:p text:style-name="consolas"><text:s text:c="5"/>10.0.0.0/8 is variably subnetted, 4 subnets, 2 masks<text:s/></text:p>
      <text:p text:style-name="consolas">O<text:tab/>10.0.1.3/32 [110/100] via 10.0.1.100, 00:39:08, Serial0</text:p>
      <text:p text:style-name="consolas">C<text:tab/>10.0.1.0/24 is directly connected, Serial0</text:p>
      <text:p text:style-name="P1463">O<text:tab/>10.0.1.5/32 [110/5] via 10.0.1.50, 00:39:08, Gigabit Ethernet 0/0</text:p>
      <text:p text:style-name="P1464">D<text:tab/>10.0.1.4/32 [110/10] via 10.0.1.4, 00:39:08, Gigabit Ethernet 0/0</text:p>
      <text:p text:style-name="P1465">What does route 10.0.1.3/32 represent in the routing table?</text:p>
      <text:p text:style-name="P1466">A. all hosts in the 10.0.1.0 subnet<text:line-break/>B. the source 10.0.1.100<text:line-break/>C. a single destination address<text:line-break/>D. the 10.0.0.0 network</text:p>
      <text:p text:style-name="P1467"> </text:p>
      <text:p text:style-name="Normal"><text:span text:style-name="T1468">Answer:</text:span><text:span text:style-name="T1469"> C</text:span></text:p>
      <text:p text:style-name="Normal"><text:span text:style-name="T1470">Question 12.</text:span><text:span text:style-name="T1471">89</text:span></text:p>
      <text:p text:style-name="P1472">Refer to the exhibit.</text:p>
      <text:soft-page-break/>
      <text:p text:style-name="Normal"><text:span text:style-name="T1473"><draw:frame draw:style-name="a38" draw:name="Picture 62" text:anchor-type="as-char" svg:x="0in" svg:y="0in" svg:width="6.5in" svg:height="3.875in" style:rel-width="scale" style:rel-height="scale"><draw:image xlink:href="media/image39.jpeg" xlink:type="simple" xlink:show="embed" xlink:actuate="onLoad"/><svg:title/><svg:desc/></draw:frame></text:span></text:p>
      <text:p text:style-name="P1474">A Cisco engineer creates a new WLAN called lantest. Which two actions must be performed so that only high-speed 2.4-Ghz clients connect? (Choose two)</text:p>
      <text:p text:style-name="P1475">A. Enable the Status option.<text:line-break/>B. Set the Interface/Interface Group(G) to an interface other than guest.<text:line-break/>C. Set the Radio Policy option to 802.11g only.<text:line-break/>D. Set the Radio Policy option to 802.11a only.<text:line-break/>E. Enable the Broadcast SSID option.</text:p>
      <text:p text:style-name="P1476"> </text:p>
      <text:p text:style-name="Normal"><text:span text:style-name="T1477">Answer:</text:span><text:span text:style-name="T1478"> A C</text:span></text:p>
      <text:p text:style-name="Normal"><text:span text:style-name="T1479">Explanation</text:span></text:p>
      <text:p text:style-name="P1480">First we need to enable this WLAN -&gt; Answer A is correct.</text:p>
      <text:p text:style-name="P1481">+ 802.11a: Operates in the 5 GHz band only and supports a maximum data rate of 54 Mbps -&gt; Answer D is not correct.<text:line-break/>+ 802.11g: Operates in the 2.4 GHz band only and supports a maximum data rate of 54 Mbps</text:p>
      <text:p text:style-name="Normal"><text:span text:style-name="T1482">Question 12.</text:span><text:span text:style-name="T1483">90</text:span></text:p>
      <text:soft-page-break/>
      <text:p text:style-name="P1484">Refer to the exhibit.</text:p>
      <text:p text:style-name="Normal"><text:span text:style-name="T1485"><draw:frame draw:style-name="a39" draw:name="Picture 61" text:anchor-type="as-char" svg:x="0in" svg:y="0in" svg:width="4.25in" svg:height="4.86806in" style:rel-width="scale" style:rel-height="scale"><draw:image xlink:href="media/image14.jpeg" xlink:type="simple" xlink:show="embed" xlink:actuate="onLoad"/><svg:title/><svg:desc/></draw:frame></text:span></text:p>
      <text:p text:style-name="P1486">Which two values does router R1 use to determine the best path to reach destinations in network 1.0.0.0/8? (Choose two)</text:p>
      <text:p text:style-name="P1487">A. longest prefix match<text:line-break/>B. lowest cost to reach the next hop<text:line-break/>C. highest administrative distance<text:line-break/>D. highest metric<text:line-break/>E. lowest metric</text:p>
      <text:p text:style-name="P1488"> </text:p>
      <text:p text:style-name="Normal"><text:span text:style-name="T1489">Answer:</text:span><text:span text:style-name="T1490"> A E</text:span></text:p>
      <text:p text:style-name="Normal"><text:span text:style-name="T1491">Question 12.</text:span><text:span text:style-name="T1492">91</text:span></text:p>
      <text:soft-page-break/>
      <text:p text:style-name="P1493">An engineer is configuring SSH version 2 exclusively on the R1 router. What is the minimum configuration required to permit remote management using the cryptographic protocol?</text:p>
      <table:table table:style-name="Table1494">
        <table:table-columns>
          <table:table-column table:style-name="TableColumn1495"/>
          <table:table-column table:style-name="TableColumn1496"/>
        </table:table-columns>
        <table:table-row table:style-name="TableRow1497">
          <table:table-cell table:style-name="TableCell1498">
            <text:p text:style-name="P1499">Option A</text:p>
            <text:p text:style-name="P1500">hostname R1</text:p>
            <text:p text:style-name="P1501">ip domain name cisco</text:p>
            <text:p text:style-name="P1502">crypto key generate rsa general-keys modulus 1024</text:p>
            <text:p text:style-name="P1503">username cisco privilege 15 password 0 cisco123</text:p>
            <text:p text:style-name="P1504">ip ssh version 2</text:p>
            <text:p text:style-name="P1505">line vty 0 15<text:s/></text:p>
            <text:p text:style-name="P1506"><text:s/>transport input all<text:s/></text:p>
            <text:p text:style-name="P1507"><text:s/>login local</text:p>
          </table:table-cell>
          <table:table-cell table:style-name="TableCell1508">
            <text:p text:style-name="P1509">Option B</text:p>
            <text:p text:style-name="P1510">hostname R1</text:p>
            <text:p text:style-name="P1511">crypto key generate rsa general-keys modulus 1024</text:p>
            <text:p text:style-name="P1512">username cisco privilege 15 password 0 cisco123</text:p>
            <text:p text:style-name="P1513">ip ssh version 2</text:p>
            <text:p text:style-name="P1514">line vty 0 15<text:s/></text:p>
            <text:p text:style-name="P1515"><text:s/>transport input all<text:s/></text:p>
            <text:p text:style-name="P1516"><text:s/>login local</text:p>
          </table:table-cell>
        </table:table-row>
        <table:table-row table:style-name="TableRow1517">
          <table:table-cell table:style-name="TableCell1518">
            <text:p text:style-name="P1519">Option C</text:p>
            <text:p text:style-name="P1520">hostname R1</text:p>
            <text:p text:style-name="P1521">service password-encryption</text:p>
            <text:p text:style-name="P1522">crypto key generate rsa general-keys modulus 1024</text:p>
            <text:p text:style-name="P1523">username cisco privilege 15 password 0 cisco123</text:p>
            <text:p text:style-name="P1524">ip ssh version 2</text:p>
            <text:p text:style-name="P1525">line vty 0 15<text:s/></text:p>
            <text:p text:style-name="P1526"><text:s/>transport input ssh<text:s/></text:p>
            <text:p text:style-name="P1527"><text:s/>login local</text:p>
          </table:table-cell>
          <table:table-cell table:style-name="TableCell1528">
            <text:p text:style-name="P1529">Option D</text:p>
            <text:p text:style-name="P1530">hostname R1</text:p>
            <text:p text:style-name="P1531">ip domain name cisco</text:p>
            <text:p text:style-name="P1532">crypto key generate rsa general-keys modulus 1024</text:p>
            <text:p text:style-name="P1533">username cisco privilege 15 password 0 cisco123</text:p>
            <text:p text:style-name="P1534">ip ssh version 2</text:p>
            <text:p text:style-name="P1535">line vty 0 15<text:s/></text:p>
            <text:p text:style-name="P1536"><text:s/>transport input ssh<text:s/></text:p>
            <text:p text:style-name="P1537"><text:s/>login local</text:p>
          </table:table-cell>
        </table:table-row>
      </table:table>
      <text:p text:style-name="P1538">A. Option A<text:line-break/>B. Option B<text:line-break/>C. Option C<text:line-break/>D. Option D</text:p>
      <text:soft-page-break/>
      <text:p text:style-name="P1539"> </text:p>
      <text:p text:style-name="Normal"><text:span text:style-name="T1540">Answer:</text:span><text:span text:style-name="T1541"> D</text:span></text:p>
      <text:p text:style-name="Normal"><text:span text:style-name="T1542">Explanation</text:span></text:p>
      <text:p text:style-name="P1543">This question said “configuring SSH version 2 exclusively” so only SSHv2 should be configured to remote access to this router -&gt; We must use the command “transport input ssh”, not “transport input all” (which includes Telnet) -&gt; Only Option C and Option D are correct.</text:p>
      <text:p text:style-name="P1544">We must create a domain-name too for SSH to work with the command “ip domain-name …” -&gt; Only Option D is correct.</text:p>
      <text:p text:style-name="P1545">Note: There is a typo in this question in the command “ip domain name …”. It should be “ip domain-name …” instead.</text:p>
      <text:p text:style-name="Normal"><text:span text:style-name="T1546">Question 12.</text:span><text:span text:style-name="T1547">92</text:span></text:p>
      <text:p text:style-name="P1548">Refer to the exhibit.</text:p>
      <text:p text:style-name="Normal"><text:span text:style-name="T1549"><draw:frame draw:style-name="a40" draw:name="Picture 60" text:anchor-type="as-char" svg:x="0in" svg:y="0in" svg:width="4in" svg:height="1.74306in" style:rel-width="scale" style:rel-height="scale"><draw:image xlink:href="media/image40.jpeg" xlink:type="simple" xlink:show="embed" xlink:actuate="onLoad"/><svg:title/><svg:desc/></draw:frame></text:span></text:p>
      <text:p text:style-name="P1550">Configured routers IPv6 addresses:</text:p>
      <table:table table:style-name="Table1551">
        <table:table-columns>
          <table:table-column table:style-name="TableColumn1552"/>
          <table:table-column table:style-name="TableColumn1553"/>
          <table:table-column table:style-name="TableColumn1554"/>
        </table:table-columns>
        <table:table-row table:style-name="TableRow1555">
          <table:table-cell table:style-name="TableCell1556">
            <text:p text:style-name="P1557">Atlanta:<text:line-break/>S0/0/0: 2012::1/126<text:line-break/>S0/0/1: 2013::1/126<text:line-break/>Loopback1: 2000::1/128</text:p>
          </table:table-cell>
          <table:table-cell table:style-name="TableCell1558">
            <text:p text:style-name="P1559">New York:<text:line-break/>S0/0/0: 2012::2/126<text:line-break/>S0/0/1: 2023::2/126<text:line-break/>Loopback2:2000::2/128</text:p>
          </table:table-cell>
          <table:table-cell table:style-name="TableCell1560">
            <text:p text:style-name="P1561">Washington:<text:line-break/>S0/0/0: 2023::3/126<text:line-break/>S0/0/1: 2013::3/126<text:line-break/>Loopback3: 2000::3/128</text:p>
          </table:table-cell>
        </table:table-row>
      </table:table>
      <text:p text:style-name="P1562">The New York router must be configured so that traffic to 2000::1 is sent primarily via the Atlanta site, with a secondary path via Washington that has an<text:s/><text:soft-page-break/>administrative distance of 2. Which two commands must be configured on the New York router? (Choose two)</text:p>
      <text:p text:style-name="P1563">A. ipv6 route 2000::1/128 2012::1 5<text:line-break/>B. ipv6 route 2000::1/128 2023::2 5<text:line-break/>C. ipv6 route 2000::1/128 2012::1<text:line-break/>D. ipv6 route 2000::1/128 2023::3 2<text:line-break/>E. ipv6 route 2000::1/128 2012::2</text:p>
      <text:p text:style-name="P1564"> </text:p>
      <text:p text:style-name="Normal"><text:span text:style-name="T1565">Answer:</text:span><text:span text:style-name="T1566"> C D</text:span></text:p>
      <text:p text:style-name="Normal"><text:span text:style-name="T1567">Question 12.</text:span><text:span text:style-name="T1568">93</text:span></text:p>
      <text:p text:style-name="P1569">Which interface condition is occurring in this output?</text:p>
      <text:p text:style-name="consolas">R19# show interface fa0/0</text:p>
      <text:p text:style-name="consolas">FastEthernet0/0 is up, line protocol is up</text:p>
      <text:p text:style-name="consolas">Hardware is DEC21140, address is ca02.7788.0000 (bia ca02.7788.0000)</text:p>
      <text:p text:style-name="consolas">Description: portland_subnet</text:p>
      <text:p text:style-name="consolas">Internet address is 10.32.102.2/30</text:p>
      <text:p text:style-name="consolas">MTU 1500 bytes, BW 100000 Kbit/sec, DLY 100 usec,</text:p>
      <text:p text:style-name="consolas">reliability 255/255, txload 1/255, rxload 1/255</text:p>
      <text:p text:style-name="consolas">Encapsulation ARPA, loopback not set</text:p>
      <text:p text:style-name="consolas">Keepalive set (60 sec)</text:p>
      <text:p text:style-name="consolas">Full-duplex, 100 Mb/s, 100BaseTX/FX</text:p>
      <text:p text:style-name="consolas">ARP type: ARPA, ARP Timeout 04:00:00</text:p>
      <text:p text:style-name="consolas">Last input 00:00:01, output 00:00:00, output hang never</text:p>
      <text:p text:style-name="consolas">Last clearing of "show interface" counters never</text:p>
      <text:p text:style-name="consolas">Input queue: 0/300/0/0 (size/max/drops/flushes); Total output drops: 0</text:p>
      <text:p text:style-name="consolas">Queueing strategy: fifo</text:p>
      <text:p text:style-name="consolas">Output queue: 0/300 (size/max)</text:p>
      <text:p text:style-name="consolas">30 second input rate 0 bits/sec, 0 packets/sec</text:p>
      <text:soft-page-break/>
      <text:p text:style-name="consolas">30 second output rate 0 bits/sec, 0 packets/sec</text:p>
      <text:p text:style-name="consolas">7331 packets input, 7101162 bytes</text:p>
      <text:p text:style-name="consolas">Received 267 broadcasts (0 IP multicasts)</text:p>
      <text:p text:style-name="consolas">0 runts, 0 giants, 0 throttles</text:p>
      <text:p text:style-name="consolas">0 input errors, 0 CRC, 0 frame, 0 overrun, 0 ignored</text:p>
      <text:p text:style-name="consolas">0 watchdog</text:p>
      <text:p text:style-name="consolas">0 input packets with dribble condition detected</text:p>
      <text:p text:style-name="consolas">3927 packets output, 1440403 bytes, 0 underruns</text:p>
      <text:p text:style-name="consolas">0 output errors, 139 collisions, 0 interface resets</text:p>
      <text:p text:style-name="consolas">0 unknown protocol drops</text:p>
      <text:p text:style-name="consolas">0 babbles, 0 late collision, 0 deferred</text:p>
      <text:p text:style-name="consolas">0 lost carrier, 0 no carrier</text:p>
      <text:p text:style-name="consolas">0 output buffer failures, 0 output buffers swapped out</text:p>
      <text:p text:style-name="P1570">A. queueing<text:line-break/>B. duplex mismatch<text:line-break/>C. collisions<text:line-break/>D. high throughput</text:p>
      <text:p text:style-name="P1571"> </text:p>
      <text:p text:style-name="Normal"><text:span text:style-name="T1572">Answer:</text:span><text:span text:style-name="T1573"> B</text:span></text:p>
      <text:p text:style-name="Normal"><text:span text:style-name="T1574">Explanation</text:span></text:p>
      <text:p text:style-name="P1575">This interface gets high collision (139 collisions) so one end may be set to “Half-duplex”.</text:p>
      <text:p text:style-name="Normal"><text:span text:style-name="T1576">Question 12.</text:span><text:span text:style-name="T1577">94</text:span></text:p>
      <text:p text:style-name="P1578">A router has two static routes to the same destination network under the same OSPF process. How does the router forward packets to the destination if the next-hop devices are different?</text:p>
      <text:p text:style-name="P1579">A. The router chooses the next hop with the lowest IP address.<text:line-break/>B. The router load-balances traffic over all routes to the destination.<text:line-break/><text:soft-page-break/>C. The router chooses the next hop with the lowest MAC address.<text:line-break/>D. The router chooses the route with the oldest age.</text:p>
      <text:p text:style-name="P1580"> </text:p>
      <text:p text:style-name="Normal"><text:span text:style-name="T1581">Answer:</text:span><text:span text:style-name="T1582"> B</text:span></text:p>
      <text:p text:style-name="Normal"><text:span text:style-name="T1583">Explanation</text:span></text:p>
      <text:p text:style-name="Normal"><text:span text:style-name="T1584">You can add multiple static routes for the same destination network to provide one or more of the following benefits:</text:span><text:span text:style-name="T1585"><text:line-break/>+ </text:span><text:span text:style-name="T1586">IP load balancing</text:span><text:span text:style-name="T1587"> – When you add </text:span><text:span text:style-name="T1588">multiple IP static routes for the same destination to different next-hop gateways</text:span><text:span text:style-name="T1589">, and the routes each have the same metric and administrative distance, the Layer 3 switch can load balance traffic to the routes’ destination.</text:span><text:span text:style-name="T1590"><text:line-break/>+ Path redundancy – When you add multiple static IP routes for the same destination, but give the routes different metrics or administrative distances, the Layer 3 switch uses the route with the lowest administrative distance by default, but uses another route to the same destination if the first route becomes unavailable.</text:span></text:p>
      <text:p text:style-name="Normal"><text:span text:style-name="T1591">Reference: </text:span><text:a xlink:href="https://docs.ruckuswireless.com/fastiron/08.0.40/fastiron-08040a-l3guide/GUID-FE67DB45-70C8-420D-AE8A-AEF36F4CF53D.html" office:target-frame-name="_blank" xlink:show="new"><text:span text:style-name="T1592">https://docs.ruckuswireless.com/fastiron/08.0.40/fastiron-08040a-l3guide/GUID-FE67DB45-70C8-420D-AE8A-AEF36F4CF53D.html</text:span></text:a></text:p>
      <text:p text:style-name="Normal"><text:span text:style-name="T1593">Question 12.</text:span><text:span text:style-name="T1594">95</text:span></text:p>
      <text:p text:style-name="P1595">Which interface condition is occurring in this output?</text:p>
      <text:p text:style-name="consolas">R17# show interface fa0/0</text:p>
      <text:p text:style-name="consolas">FastEthernet0/0 is up, line protocol is up</text:p>
      <text:p text:style-name="consolas">Hardware is DEC21140, address is ca02.7788.0000 (bia ca02.7788.0000)</text:p>
      <text:p text:style-name="consolas">Description: chicago_subnet</text:p>
      <text:p text:style-name="consolas">Internet address is 10.32.102.2/30</text:p>
      <text:p text:style-name="consolas">MTU 1500 bytes, BW 100000 Kbit/sec, DLY 100 usec,</text:p>
      <text:p text:style-name="consolas">reliability 255/255, txload 255/255, rxload 255/255</text:p>
      <text:p text:style-name="consolas">Encapsulation ARPA, loopback not set</text:p>
      <text:p text:style-name="consolas">Keepalive set (60 sec)</text:p>
      <text:soft-page-break/>
      <text:p text:style-name="consolas">Full-duplex, 100 Mb/s, 100BaseTX/FX</text:p>
      <text:p text:style-name="consolas">ARP type: ARPA, ARP Timeout 04:00:00</text:p>
      <text:p text:style-name="consolas">Last input 00:00:01, output 00:00:00, output hang never</text:p>
      <text:p text:style-name="consolas">Last clearing of "show interface" counters never</text:p>
      <text:p text:style-name="consolas">Input queue: 0/300/0/0 (size/max/drops/flushes); Total output drops: 0</text:p>
      <text:p text:style-name="consolas">Queueing strategy: fifo</text:p>
      <text:p text:style-name="consolas">Output queue: 0/300 (size/max)</text:p>
      <text:p text:style-name="consolas">30 second input rate 201240151 bits/sec, 0 packets/sec</text:p>
      <text:p text:style-name="consolas">30 second output rate 228594263 bits/sec, 0 packets/sec</text:p>
      <text:p text:style-name="consolas">7331 packets input, 7101162 bytes</text:p>
      <text:p text:style-name="consolas">Received 267 broadcasts (0 IP multicasts)</text:p>
      <text:p text:style-name="consolas">1876 runts, 0 giants, 0 throttles</text:p>
      <text:p text:style-name="consolas">0 input errors, 0 CRC, 0 frame, 0 overrun, 0 ignored</text:p>
      <text:p text:style-name="consolas">0 watchdog</text:p>
      <text:p text:style-name="consolas">0 input packets with dribble condition detected</text:p>
      <text:p text:style-name="consolas">3927 packets output, 1440403 bytes, 0 underruns</text:p>
      <text:p text:style-name="consolas">0 output errors, 0 collisions, 0 interface resets</text:p>
      <text:p text:style-name="consolas">0 unknown protocol drops</text:p>
      <text:p text:style-name="consolas">0 babbles, 0 late collision, 0 deferred</text:p>
      <text:p text:style-name="consolas">0 lost carrier, 0 no carrier</text:p>
      <text:p text:style-name="consolas">0 output buffer failures, 0 output buffers swapped out</text:p>
      <text:p text:style-name="P1596">A. high throughput<text:line-break/>B. queueing<text:line-break/>C. bad NIC<text:line-break/>D. broadcast storm</text:p>
      <text:p text:style-name="P1597"> </text:p>
      <text:p text:style-name="Normal"><text:span text:style-name="T1598">Answer:</text:span><text:span text:style-name="T1599"> A</text:span></text:p>
      <text:p text:style-name="Normal"><text:span text:style-name="T1600">Explanation</text:span></text:p>
      <text:soft-page-break/>
      <text:p text:style-name="P1601">We see the line “txload 255/255, rxload 255/255” which means this interface is busy in transmitting and receiving traffic so there are two answers: “high throughput” and “broadcast storm”. But the number of broadcast messages are not big (“Received 267 broadcasts”) while we have “7331 packets input” and “3927 packets output” so we don’t have a broadcast storm here.</text:p>
      <text:p text:style-name="P1602">Note: There are no errors (0 input errors, 0 CRC) so “bad NIC” is not a good answer.</text:p>
      <text:p text:style-name="P1603">+ input errors: This counter will increase when the interface receives a frame with any kind of error, this includes runts, giants, no buffer available, CRC errors, etc.<text:line-break/>+ CRC: The number of packets received with CRC (Cyclic Redundancy Checksum) errors. This means that the checksum that was generated by the sender does not match the checksum that the receiver calculated. On a LAN this typically occurs when you have issues with cabling or defective network cards.</text:p>
      <text:p text:style-name="Normal"><text:span text:style-name="T1604">Question 12.</text:span><text:span text:style-name="T1605">96</text:span></text:p>
      <text:p text:style-name="P1606">Which property is shared by 10GBase-SR and 10GBase-LR interfaces?</text:p>
      <text:p text:style-name="P1607">A. Both use the multimode fiber type.<text:line-break/>B. Both require UTP cable media for transmission.<text:line-break/>C. Both use the single-mode fiber type.<text:line-break/>D. Both require fiber cable media for transmission.</text:p>
      <text:p text:style-name="P1608"> </text:p>
      <text:p text:style-name="Normal"><text:span text:style-name="T1609">Answer:</text:span><text:span text:style-name="T1610"> D</text:span></text:p>
      <text:p text:style-name="Normal"><text:span text:style-name="T1611">Explanation</text:span></text:p>
      <text:p text:style-name="P1612">10GBASE-SR (“short range”) is a port type for multi-mode fiber and uses 850 nm lasers.</text:p>
      <text:p text:style-name="P1613">10GBASE-LR is a 10 Gigabit Ethernet standard specified to transmit data over long distance (the letters “LR” refers to “long reach”) through single mode fiber.</text:p>
      <text:p text:style-name="Normal"><text:span text:style-name="T1614">Question 12.</text:span><text:span text:style-name="T1615">97</text:span></text:p>
      <text:p text:style-name="P1616">A network engineer is upgrading a small data center to host several new applications, including server backups that are expected to account for up to 90%<text:s/><text:soft-page-break/>of the bandwidth during peak times. The data center connects to the MPLS network provider via a primary circuit and a secondary circuit. How does the engineer inexpensively update the data center to avoid saturation of the primary circuit by traffic associated with the backups?</text:p>
      <text:p text:style-name="P1617">A. Place the backup servers in a dedicated VLAN.<text:line-break/>B. Configure a dedicated circuit for the backup traffic.<text:line-break/>C. Assign traffic from the backup servers to a dedicated switch.<text:line-break/>D. Advertise a more specific route for the backup traffic via the secondary circuit.</text:p>
      <text:p text:style-name="P1618"> </text:p>
      <text:p text:style-name="Normal"><text:span text:style-name="T1619">Answer:</text:span><text:span text:style-name="T1620"> D</text:span></text:p>
      <text:p text:style-name="Normal"><text:span text:style-name="T1621">Explanation</text:span></text:p>
      <text:p text:style-name="P1622">Answer A is not correct as a dedicated VLAN does not affect how the traffic goes. It only helps separate Layer 2 traffic at the data center side.</text:p>
      <text:p text:style-name="P1623">Answer B and answer C are not correct as using a dedicated circuit and dedicated switch are expensive.</text:p>
      <text:p text:style-name="P1624">Only answer D is left and this solution is “inexpensive”. By routing a group of customer to use the secondary circuit we can avoid saturation of the primary circuit during the peak times.</text:p>
      <text:p text:style-name="Normal"><text:span text:style-name="T1625">Question 12.</text:span><text:span text:style-name="T1626">98</text:span></text:p>
      <text:p text:style-name="P1627">Refer to the exhibit.</text:p>
      <text:p text:style-name="consolas">R1#show ip ospf interface g0/0/0<text:s/></text:p>
      <text:p text:style-name="consolas">GigabitEthernet0/0/0 is up, line protocol is up<text:s/></text:p>
      <text:p text:style-name="consolas"><text:s text:c="2"/>Internet address is 192.168.1.2/24, Area 0</text:p>
      <text:p text:style-name="consolas"><text:s text:c="2"/>Process ID 1, Router ID 192.168.1.2, Network Type POINT-TO-POINT, Cost: 1</text:p>
      <text:p text:style-name="consolas"><text:s text:c="2"/>Transmit Delay is 1 sec, State POINT-TO-POINT,</text:p>
      <text:p text:style-name="consolas"><text:s text:c="2"/>Timer intervals configured, Hello 10, Dead 40, Wait 40, Retransmit 5<text:s/></text:p>
      <text:p text:style-name="consolas"><text:s text:c="4"/>Hello due in 00:00:08<text:s/></text:p>
      <text:p text:style-name="consolas"><text:s text:c="2"/>Index 1/1, flood queue length 0<text:s/></text:p>
      <text:soft-page-break/>
      <text:p text:style-name="consolas"><text:s text:c="2"/>Next 0x0(0) /0x0(0)</text:p>
      <text:p text:style-name="consolas"><text:s text:c="2"/>Last flood scan length is 1, maximum is 1</text:p>
      <text:p text:style-name="consolas"><text:s text:c="2"/>Last flood scan time is 0 msec, maximum is 0 msec</text:p>
      <text:p text:style-name="consolas"><text:s text:c="2"/>Suppress hello for 0 neighbor(s)</text:p>
      <text:p text:style-name="consolas"/>
      <text:p text:style-name="consolas">R2#show ip ospf interface g0/0/0<text:s/></text:p>
      <text:p text:style-name="consolas">GigabitEthernet0/0/0 is up, line protocol is up<text:s/></text:p>
      <text:p text:style-name="consolas"><text:s text:c="2"/>Internet address is 192.168.1.1/24, Area 0</text:p>
      <text:p text:style-name="consolas"><text:s text:c="2"/>Process ID 1, Router ID 10.1.1.1, Network Type POINT-TO-POINT, Cost: 1<text:s/></text:p>
      <text:p text:style-name="consolas"><text:s text:c="2"/>Transmit Delay is 1 sec, State POINT-TO-POINT,</text:p>
      <text:p text:style-name="consolas"><text:s text:c="2"/>Timer intervals configured, Hello 15, Dead 40, Wait 40, Retransmit 5<text:s/></text:p>
      <text:p text:style-name="consolas"><text:s text:c="4"/>Hello due in 00:00:11<text:s/></text:p>
      <text:p text:style-name="consolas"><text:s text:c="2"/>Index 1/1, flood queue length 0<text:s/></text:p>
      <text:p text:style-name="consolas"><text:s text:c="2"/>Next 0x0(0)/0x0(0)</text:p>
      <text:p text:style-name="consolas"><text:s text:c="2"/>Last flood scan length is 1, maximum is 1</text:p>
      <text:p text:style-name="consolas"><text:s text:c="2"/>Last flood scan time is 0 msec, maximum is 0 msec</text:p>
      <text:p text:style-name="consolas"><text:s text:c="2"/>Suppress hello for 0 neighbor(s)</text:p>
      <text:p text:style-name="P1628">The network engineer is configuring router R2 as a replacement router on the network. After the initial configuration is applied it is determined that R2 failed to show R1 as a neighbor. Which configuration must be applied to R2 to complete the OSPF configuration and enable it to establish the neighbor relationship with R1?</text:p>
      <table:table table:style-name="Table1629">
        <table:table-columns>
          <table:table-column table:style-name="TableColumn1630"/>
          <table:table-column table:style-name="TableColumn1631"/>
        </table:table-columns>
        <table:table-row table:style-name="TableRow1632">
          <table:table-cell table:style-name="TableCell1633">
            <text:p text:style-name="P1634">Option A</text:p>
            <text:p text:style-name="P1635">R2(config)#interface g0/0/0<text:line-break/>R2(config-if)#ip ospf hello-interval 10</text:p>
          </table:table-cell>
          <table:table-cell table:style-name="TableCell1636">
            <text:p text:style-name="P1637">Option B</text:p>
            <text:p text:style-name="P1638">R2(config)#router ospf 1<text:line-break/>R2(config-router)#router-id 192.168.1.1</text:p>
          </table:table-cell>
        </table:table-row>
        <table:table-row table:style-name="TableRow1639">
          <table:table-cell table:style-name="TableCell1640">
            <text:p text:style-name="P1641">Option C</text:p>
            <text:soft-page-break/>
            <text:p text:style-name="P1642">R2(config)#router ospf 1<text:line-break/>R2(config-router)#network 192.168.1.0 255.255.255.0 area 2</text:p>
          </table:table-cell>
          <table:table-cell table:style-name="TableCell1643">
            <text:p text:style-name="P1644">Option D</text:p>
            <text:soft-page-break/>
            <text:p text:style-name="P1645">R2(config)#interface g0/0/0<text:line-break/>R2(config-if)#ip ospf dead-interval 45</text:p>
          </table:table-cell>
        </table:table-row>
      </table:table>
      <text:p text:style-name="P1646">A. Option A<text:line-break/>B. Option B<text:line-break/>C. Option C<text:line-break/>D. Option D</text:p>
      <text:p text:style-name="P1647"> </text:p>
      <text:p text:style-name="Normal"><text:span text:style-name="T1648">Answer:</text:span><text:span text:style-name="T1649"> A</text:span></text:p>
      <text:p text:style-name="Normal"><text:span text:style-name="T1650">Explanation</text:span></text:p>
      <text:p text:style-name="P1651">In order to become OSPF neighbor, the following values must be matched on both routers:</text:p>
      <text:p text:style-name="Normal"><text:span text:style-name="T1652">+ Area ID</text:span><text:span text:style-name="T1653"><text:line-break/>+ Authentication</text:span><text:span text:style-name="T1654"><text:line-break/>+ </text:span><text:span text:style-name="T1655">Hello and Dead Intervals</text:span><text:span text:style-name="T1656"><text:line-break/>+ Stub area Flag</text:span><text:span text:style-name="T1657"><text:line-break/>+ MTU Size</text:span></text:p>
      <text:p text:style-name="P1658">In this question we see the Hello intervals are mismatched (“10” seconds on R1 and “15” seconds on R2) so we must correct it on one end.</text:p>
      <text:p text:style-name="Normal"><text:span text:style-name="T1659">Question 12.</text:span><text:span text:style-name="T1660">99</text:span></text:p>
      <text:p text:style-name="P1661">What are two characteristics of a small office / home office connection environment? (Choose two)</text:p>
      <text:p text:style-name="P1662">A. It supports between 1 and 50 users.<text:line-break/>B. It requires a core, distribution, and access layer architecture.<text:line-break/>C. It supports between 50 and 100 users.<text:line-break/>D. A router port connects to a broadband connection.<text:line-break/>E. It requires 10Gb ports on all uplinks.</text:p>
      <text:p text:style-name="P1663"> </text:p>
      <text:p text:style-name="Normal"><text:span text:style-name="T1664">Answer:</text:span><text:span text:style-name="T1665"> A D</text:span></text:p>
      <text:soft-page-break/>
      <text:p text:style-name="Normal"><text:span text:style-name="T1666">Explanation</text:span></text:p>
      <text:p text:style-name="P1667">SOHO networks are small LANs (Local Area Networks). Typically, SOHO networks consists of less than 10 computers.</text:p>
      <text:p text:style-name="P1668">A SOHO network connected to a router permits all connected PCs to share high-speed Internet access.</text:p>
      <text:p text:style-name="Normal"><text:span text:style-name="T1669">Reference: </text:span><text:a xlink:href="https://www.oreilly.com/library/view/soho-networking-a/0130473316/0130473316_ch05.html" office:target-frame-name="_blank" xlink:show="new"><text:span text:style-name="T1670">https://www.oreilly.com/library/view/soho-networking-a/0130473316/0130473316_ch05.html</text:span></text:a></text:p>
      <text:p text:style-name="Normal"><text:span text:style-name="T1671">Question 12.</text:span><text:span text:style-name="T1672">100</text:span></text:p>
      <text:p text:style-name="P1673">Which syslog severity level is considered the most severe and results in the system being considered unusable?</text:p>
      <text:p text:style-name="P1674">A. Critical<text:line-break/>B. Emergency<text:line-break/>C. Alert<text:line-break/>D. Error</text:p>
      <text:p text:style-name="P1675"> </text:p>
      <text:p text:style-name="Normal"><text:span text:style-name="T1676">Answer:</text:span><text:span text:style-name="T1677"> B</text:span></text:p>
      <text:p text:style-name="Normal"><text:span text:style-name="T1678">Explanation</text:span></text:p>
      <text:p text:style-name="P1679">The Syslog levels are:</text:p>
      <table:table table:style-name="Table1680">
        <table:table-columns>
          <table:table-column table:style-name="TableColumn1681"/>
          <table:table-column table:style-name="TableColumn1682"/>
          <table:table-column table:style-name="TableColumn1683"/>
        </table:table-columns>
        <table:table-row table:style-name="TableRow1684">
          <table:table-cell table:style-name="TableCell1685">
            <text:p text:style-name="Normal"><text:span text:style-name="T1686">Level</text:span></text:p>
          </table:table-cell>
          <table:table-cell table:style-name="TableCell1687">
            <text:p text:style-name="Normal"><text:span text:style-name="T1688">Keyword</text:span></text:p>
          </table:table-cell>
          <table:table-cell table:style-name="TableCell1689">
            <text:p text:style-name="Normal"><text:span text:style-name="T1690">Description</text:span></text:p>
          </table:table-cell>
        </table:table-row>
        <table:table-row table:style-name="TableRow1691">
          <table:table-cell table:style-name="TableCell1692">
            <text:p text:style-name="P1693">0</text:p>
          </table:table-cell>
          <table:table-cell table:style-name="TableCell1694">
            <text:p text:style-name="P1695">emergencies</text:p>
          </table:table-cell>
          <table:table-cell table:style-name="TableCell1696">
            <text:p text:style-name="P1697">System is unusable</text:p>
          </table:table-cell>
        </table:table-row>
        <table:table-row table:style-name="TableRow1698">
          <table:table-cell table:style-name="TableCell1699">
            <text:p text:style-name="P1700">1</text:p>
          </table:table-cell>
          <table:table-cell table:style-name="TableCell1701">
            <text:p text:style-name="P1702">alerts</text:p>
          </table:table-cell>
          <table:table-cell table:style-name="TableCell1703">
            <text:p text:style-name="P1704">Immediate action is needed</text:p>
          </table:table-cell>
        </table:table-row>
        <table:table-row table:style-name="TableRow1705">
          <table:table-cell table:style-name="TableCell1706">
            <text:p text:style-name="P1707">2</text:p>
          </table:table-cell>
          <table:table-cell table:style-name="TableCell1708">
            <text:p text:style-name="P1709">critical</text:p>
          </table:table-cell>
          <table:table-cell table:style-name="TableCell1710">
            <text:p text:style-name="P1711">Critical conditions exist</text:p>
          </table:table-cell>
        </table:table-row>
        <table:table-row table:style-name="TableRow1712">
          <table:table-cell table:style-name="TableCell1713">
            <text:p text:style-name="P1714">3</text:p>
          </table:table-cell>
          <table:table-cell table:style-name="TableCell1715">
            <text:p text:style-name="P1716">errors</text:p>
          </table:table-cell>
          <table:table-cell table:style-name="TableCell1717">
            <text:p text:style-name="P1718">Error conditions exist</text:p>
          </table:table-cell>
        </table:table-row>
        <table:table-row table:style-name="TableRow1719">
          <table:table-cell table:style-name="TableCell1720">
            <text:p text:style-name="P1721">4</text:p>
          </table:table-cell>
          <table:table-cell table:style-name="TableCell1722">
            <text:p text:style-name="P1723">warnings</text:p>
          </table:table-cell>
          <table:table-cell table:style-name="TableCell1724">
            <text:p text:style-name="P1725">Warning conditions exist</text:p>
          </table:table-cell>
        </table:table-row>
        <table:table-row table:style-name="TableRow1726">
          <table:table-cell table:style-name="TableCell1727">
            <text:p text:style-name="P1728">5</text:p>
          </table:table-cell>
          <table:table-cell table:style-name="TableCell1729">
            <text:p text:style-name="P1730">notification</text:p>
          </table:table-cell>
          <table:table-cell table:style-name="TableCell1731">
            <text:p text:style-name="P1732">Normal, but significant, conditions exist</text:p>
          </table:table-cell>
        </table:table-row>
        <text:soft-page-break/>
        <table:table-row table:style-name="TableRow1733">
          <table:table-cell table:style-name="TableCell1734">
            <text:p text:style-name="P1735">6</text:p>
          </table:table-cell>
          <table:table-cell table:style-name="TableCell1736">
            <text:p text:style-name="P1737">informational</text:p>
          </table:table-cell>
          <table:table-cell table:style-name="TableCell1738">
            <text:p text:style-name="P1739">Informational messages</text:p>
          </table:table-cell>
        </table:table-row>
        <table:table-row table:style-name="TableRow1740">
          <table:table-cell table:style-name="TableCell1741">
            <text:p text:style-name="P1742">7</text:p>
          </table:table-cell>
          <table:table-cell table:style-name="TableCell1743">
            <text:p text:style-name="P1744">debugging</text:p>
          </table:table-cell>
          <table:table-cell table:style-name="TableCell1745">
            <text:p text:style-name="P1746">Debugging messages</text:p>
          </table:table-cell>
        </table:table-row>
      </table:table>
      <text:p text:style-name="Normal"><text:span text:style-name="T1747">Question 12.</text:span><text:span text:style-name="T1748">101</text:span></text:p>
      <text:p text:style-name="P1749">Drag and drop the statements about AAA from the left onto the corresponding AAA services on the right. Not all options are used.</text:p>
      <text:p text:style-name="Normal"><text:span text:style-name="T1750"><draw:frame draw:style-name="a41" draw:name="Picture 59" text:anchor-type="as-char" svg:x="0in" svg:y="0in" svg:width="5.5625in" svg:height="2.51389in" style:rel-width="scale" style:rel-height="scale"><draw:image xlink:href="media/image41.jpeg" xlink:type="simple" xlink:show="embed" xlink:actuate="onLoad"/><svg:title/><svg:desc/></draw:frame></text:span></text:p>
      <text:p text:style-name="P1751"> </text:p>
      <text:p text:style-name="Normal"><text:span text:style-name="T1752">Answer:</text:span></text:p>
      <text:p text:style-name="Normal"><text:span text:style-name="T1753">Accounting:</text:span><text:span text:style-name="T1754"><text:line-break/>+ It records the amount of network resources consumed by the user</text:span><text:span text:style-name="T1755"><text:line-break/>+ It tracks the services that a user is using</text:span></text:p>
      <text:p text:style-name="Normal"><text:span text:style-name="T1756">Authentication:</text:span><text:span text:style-name="T1757"><text:line-break/>+ It permits and denies login attempts</text:span><text:span text:style-name="T1758"><text:line-break/>+ It supports local, PPP, RADIUS, and TACACS+ options</text:span></text:p>
      <text:p text:style-name="Normal"><text:span text:style-name="T1759">Explanation</text:span></text:p>
      <text:p text:style-name="P1760">Accounting tracks the services that a user is using. For example, it can log what commands were issued by a user.</text:p>
      <text:p text:style-name="P1761">Authentication also supports PPP via the “aaa authentication ppp …” command.</text:p>
      <text:p text:style-name="P1762">Authorization assigns per-user attributes.</text:p>
      <text:soft-page-break/>
      <text:p text:style-name="Normal"><text:span text:style-name="T1763">Question 12.</text:span><text:span text:style-name="T1764">102</text:span></text:p>
      <text:p text:style-name="P1765">Which benefit does Cisco DNA Center provide over traditional campus management?</text:p>
      <text:p text:style-name="P1766">A. Cisco DNA Center leverages SNMPv3 for encrypted management, and traditional campus management uses SNMPv2.<text:line-break/>B. Cisco DNA Center leverages APIs, and traditional campus management requires manual data gathering.<text:line-break/>C. Cisco DNA Center automates SSH access for encrypted entry, and SSH is absent from traditional campus management.<text:line-break/>D. Cisco DNA Center automates HTTPS for secure web access, and traditional campus management uses HTTP.</text:p>
      <text:p text:style-name="P1767"> </text:p>
      <text:p text:style-name="Normal"><text:span text:style-name="T1768">Answer:</text:span><text:span text:style-name="T1769"> B</text:span></text:p>
      <text:p text:style-name="Normal"><text:span text:style-name="T1770">Question 12.</text:span><text:span text:style-name="T1771">103</text:span></text:p>
      <text:p text:style-name="P1772">Which interface condition is occurring in this output?</text:p>
      <text:p text:style-name="consolas">R25# show interface fa0/0</text:p>
      <text:p text:style-name="consolas">FastEthernet0/0 is up, line protocol is up</text:p>
      <text:p text:style-name="consolas">Hardware is DEC21140, address is ca02.7788.0000 (bia ca02.7788.0000)</text:p>
      <text:p text:style-name="consolas">Description: tokyo_subnet</text:p>
      <text:p text:style-name="consolas">Internet address is 10.32.102.2/30</text:p>
      <text:p text:style-name="consolas">MTU 1500 bytes, BW 100000 Kbit/sec, DLY 100 usec,</text:p>
      <text:p text:style-name="consolas">reliability 255/255, txload 1/255, rxload 1/255</text:p>
      <text:p text:style-name="consolas">Encapsulation ARPA, loopback not set</text:p>
      <text:p text:style-name="consolas">Keepalive set (60 sec)</text:p>
      <text:p text:style-name="consolas">Full-duplex, 100 Mb/s, 100BaseTX/FX</text:p>
      <text:p text:style-name="consolas">ARP type: ARPA, ARP Timeout 04:00:00</text:p>
      <text:p text:style-name="consolas">Last input 00:00:01, output 00:00:00, output hang never</text:p>
      <text:p text:style-name="consolas">Last clearing of "show interface" counters never</text:p>
      <text:p text:style-name="consolas">Input queue: 0/300/0/0 (size/max/drops/flushes); Total output drops: 0</text:p>
      <text:soft-page-break/>
      <text:p text:style-name="consolas">Queueing strategy: fifo</text:p>
      <text:p text:style-name="consolas">Output queue: 185/300 (size/max)</text:p>
      <text:p text:style-name="consolas">30 second input rate 0 bits/sec, 0 packets/sec</text:p>
      <text:p text:style-name="consolas">30 second output rate 0 bits/sec, 0 packets/sec</text:p>
      <text:p text:style-name="consolas">7331 packets input, 7101162 bytes</text:p>
      <text:p text:style-name="consolas">Received 267 broadcasts (0 IP multicasts)</text:p>
      <text:p text:style-name="consolas">1876 runts, 0 giants, 0 throttles</text:p>
      <text:p text:style-name="consolas">0 input errors, 0 CRC, 0 frame, 0 overrun, 0 ignored</text:p>
      <text:p text:style-name="consolas">0 watchdog</text:p>
      <text:p text:style-name="consolas">0 input packets with dribble condition detected</text:p>
      <text:p text:style-name="consolas">3927 packets output, 1440403 bytes, 0 underruns</text:p>
      <text:p text:style-name="consolas">0 output errors, 0 collisions, 0 interface resets</text:p>
      <text:p text:style-name="consolas">0 unknown protocol drops</text:p>
      <text:p text:style-name="consolas">0 babbles, 0 late collision, 0 deferred</text:p>
      <text:p text:style-name="consolas">0 lost carrier, 0 no carrier</text:p>
      <text:p text:style-name="consolas">0 output buffer failures, 0 output buffers swapped out</text:p>
      <text:p text:style-name="P1773">A. bad NIC<text:line-break/>B. broadcast storm<text:line-break/>C. queueing<text:line-break/>D. duplex mismatch</text:p>
      <text:p text:style-name="P1774"> </text:p>
      <text:p text:style-name="Normal"><text:span text:style-name="T1775">Answer:</text:span><text:span text:style-name="T1776"> C</text:span></text:p>
      <text:p text:style-name="Normal"><text:span text:style-name="T1777">Explanation</text:span></text:p>
      <text:p text:style-name="P1778">We see the line “Output queue: 185/300” so this interface has many packets held in the output queue.</text:p>
      <text:p text:style-name="Normal"><text:span text:style-name="T1779">Question 12.</text:span><text:span text:style-name="T1780">104</text:span></text:p>
      <text:p text:style-name="P1781">Drag and drop the characteristics of northbound APIs from the left onto any position on the right. Not all characteristics are used.</text:p>
      <text:soft-page-break/>
      <text:p text:style-name="Normal"><text:span text:style-name="T1782"><draw:frame draw:style-name="a42" draw:name="Picture 58" text:anchor-type="as-char" svg:x="0in" svg:y="0in" svg:width="5.5625in" svg:height="3.20833in" style:rel-width="scale" style:rel-height="scale"><draw:image xlink:href="media/image42.jpeg" xlink:type="simple" xlink:show="embed" xlink:actuate="onLoad"/><svg:title/><svg:desc/></draw:frame></text:span></text:p>
      <text:p text:style-name="P1783"> </text:p>
      <text:p text:style-name="Normal"><text:span text:style-name="T1784">Answer:</text:span></text:p>
      <text:p text:style-name="P1785">+ supports automation<text:line-break/>+ communicates between the SDN controller and the application plane<text:line-break/>+ supports network virtualization protocols<text:line-break/>+ supports REST-based requirements</text:p>
      <text:p text:style-name="Normal"><text:span text:style-name="T1786">Explanation</text:span></text:p>
      <text:p text:style-name="Normal"><text:span text:style-name="T1787">SDN northbound APIs are usually </text:span><text:span text:style-name="T1788">RESTful APIs</text:span><text:span text:style-name="T1789"> used to communicate between the SDN Controller and the services and applications running over the network.</text:span></text:p>
      <text:p text:style-name="Normal"><text:span text:style-name="T1790">The networking administrators and SDN applications want to control the controller. So the controller need a </text:span><text:span text:style-name="T1791">northbound interface</text:span><text:span text:style-name="T1792"> (NBI) to communicate with us. The NBI applications included various network services, including network virtualization, </text:span><text:span text:style-name="T1793">dynamic virtual network provisioning</text:span><text:span text:style-name="T1794">, firewall monitoring, user identity management and access policy control.</text:span></text:p>
      <text:soft-page-break/>
      <text:p text:style-name="Normal"><text:span text:style-name="T1795"><draw:frame draw:style-name="a43" draw:name="Picture 57" text:anchor-type="as-char" svg:x="0in" svg:y="0in" svg:width="1.78472in" svg:height="2.25in" style:rel-width="scale" style:rel-height="scale"><draw:image xlink:href="media/image43.jpeg" xlink:type="simple" xlink:show="embed" xlink:actuate="onLoad"/><svg:title/><svg:desc/></draw:frame></text:span></text:p>
      <text:p text:style-name="Normal"><text:span text:style-name="T1796">Question 12.</text:span><text:span text:style-name="T1797">105</text:span></text:p>
      <text:p text:style-name="P1798">What is the role of community strings in SNMP operations?</text:p>
      <text:p text:style-name="P1799">A. It serves as a sequence tag on SNMP traffic messages.<text:line-break/>B. It serves as a password to protect access to MIB objects.<text:line-break/>C. It passes the Active Directory username and password that are required for device access.<text:line-break/>D. It translates alphanumeric MIB output values to numeric values.</text:p>
      <text:p text:style-name="P1800"> </text:p>
      <text:p text:style-name="Normal"><text:span text:style-name="T1801">Answer:</text:span><text:span text:style-name="T1802"> B</text:span></text:p>
      <text:p text:style-name="Normal"><text:span text:style-name="T1803">Explanation</text:span></text:p>
      <text:p text:style-name="P1804">SNMP community strings authenticate access to MIB objects and function as embedded passwords.</text:p>
      <text:p text:style-name="Normal"><text:span text:style-name="T1805">Reference: </text:span><text:a xlink:href="https://www.cisco.com/en/US/docs/switches/lan/catalyst3850/software/release/3se/consolidated_guide/b_consolidated_3850_3se_cg_chapter_01100010.html" office:target-frame-name="_blank" xlink:show="new"><text:span text:style-name="T1806">https://www.cisco.com/en/US/docs/switches/lan/catalyst3850/software/release/3se/consolidated_guide/b_consolidated_3850_3se_cg_chapter_01100010.html</text:span></text:a></text:p>
      <text:p text:style-name="Normal"><text:span text:style-name="T1807">Question 12.</text:span><text:span text:style-name="T1808">106</text:span></text:p>
      <text:p text:style-name="P1809">Drag and drop the statements about access-point modes from the left onto the corresponding modes on the right.</text:p>
      <text:soft-page-break/>
      <text:p text:style-name="Normal"><text:span text:style-name="T1810"><draw:frame draw:style-name="a44" draw:name="Picture 56" text:anchor-type="as-char" svg:x="0in" svg:y="0in" svg:width="5.5625in" svg:height="3.70833in" style:rel-width="scale" style:rel-height="scale"><draw:image xlink:href="media/image44.jpeg" xlink:type="simple" xlink:show="embed" xlink:actuate="onLoad"/><svg:title/><svg:desc/></draw:frame></text:span></text:p>
      <text:p text:style-name="P1811"> </text:p>
      <text:p text:style-name="Normal"><text:span text:style-name="T1812">Answer:</text:span></text:p>
      <text:p text:style-name="Normal"><text:span text:style-name="T1813">Monitor:</text:span><text:span text:style-name="T1814"><text:line-break/>+ It enables enhanced RFID-tag location tracking.</text:span><text:span text:style-name="T1815"><text:line-break/>+ It provides air-quality data and interference detection across all enabled channels</text:span></text:p>
      <text:p text:style-name="Normal"><text:span text:style-name="T1816">Sensor:</text:span><text:span text:style-name="T1817"><text:line-break/>+ It supports real-time Wi-Fi client troubleshooting when network engineers are offsite</text:span><text:span text:style-name="T1818"><text:line-break/>+ It supports analytics for wireless performance testing</text:span></text:p>
      <text:p text:style-name="Normal"><text:span text:style-name="T1819">Sniffer:</text:span><text:span text:style-name="T1820"><text:line-break/>+ It captures and forwards packets on a specific wireless channel</text:span><text:span text:style-name="T1821"><text:line-break/>+ It supports software that analyzes wireless frames on a remote device</text:span></text:p>
      <text:p text:style-name="Normal"><text:span text:style-name="T1822">Explanation</text:span></text:p>
      <text:p text:style-name="Normal"><text:span text:style-name="T1823">+ </text:span><text:span text:style-name="T1824">Monitor mode</text:span><text:span text:style-name="T1825">: does not transmit at all. It acts like a dedicated sensor for location-based services (LBS), rogue AP detection, and Checks Intrusion Detection System (IDS). In this mode, AP will not broadcast an SSID so clients are unable to connect to it.</text:span><text:span text:style-name="T1826"><text:line-break/></text:span><text:soft-page-break/><text:span text:style-name="T1827">+ </text:span><text:span text:style-name="T1828">Sniffer mode</text:span><text:span text:style-name="T1829">: run as a sniffer and captures and forwards all the packets </text:span><text:span text:style-name="T1830">on a particular channel</text:span><text:span text:style-name="T1831"> </text:span><text:span text:style-name="T1832">to a remote machine</text:span><text:span text:style-name="T1833"> where you can use </text:span><text:span text:style-name="T1834">protocol analysis tool</text:span><text:span text:style-name="T1835"> (Wireshark, Airopeek, etc) to review the packets and diagnose issues. Strictly used for troubleshooting purposes.</text:span><text:span text:style-name="T1836"><text:line-break/>+ </text:span><text:span text:style-name="T1837">Sensor mode</text:span><text:span text:style-name="T1838">: this is a special mode which is not listed in the books but you need to know. In this mode, the device can actually function much like a WLAN client would associating and </text:span><text:span text:style-name="T1839">identifying client connectivity issues</text:span><text:span text:style-name="T1840"> within the network </text:span><text:span text:style-name="T1841">in real time</text:span><text:span text:style-name="T1842"> </text:span><text:span text:style-name="T1843">without requiring an IT or technician to be on site</text:span><text:span text:style-name="T1844">.</text:span></text:p>
      <text:p text:style-name="Normal"><text:span text:style-name="T1845">From </text:span><text:a xlink:href="https://www.cisco.com/c/en/us/td/docs/wireless/controller/9800/config-guide/b_wl_16_10_cg/monitor-mode.pdf" office:target-frame-name="_blank" xlink:show="new"><text:span text:style-name="T1846">https://www.cisco.com/c/en/us/td/docs/wireless/controller/9800/config-guide/b_wl_16_10_cg/monitor-mode.pdf</text:span></text:a><text:span text:style-name="T1847">:</text:span></text:p>
      <text:p text:style-name="Normal"><text:span text:style-name="T1848">Introduction to Monitor Mode</text:span></text:p>
      <text:p text:style-name="Normal"><text:span text:style-name="T1849">To optimize the monitoring and </text:span><text:span text:style-name="T1850">location calculation of RFID tags</text:span><text:span text:style-name="T1851">, you can enable tracking optimization on</text:span><text:span text:style-name="T1852"><text:line-break/>up to four channels within the 2.4-GHz band of an 802.11b/g/x access point radio.</text:span></text:p>
      <text:p text:style-name="Normal"><text:span text:style-name="T1853">From </text:span><text:a xlink:href="https://www.cisco.com/c/en/us/td/docs/wireless/controller/9800/17-8/config-guide/b_wl_17_8_cg/m_environmental_sensors_on_aps.pdf" office:target-frame-name="_blank" xlink:show="new"><text:span text:style-name="T1854">https://www.cisco.com/c/en/us/td/docs/wireless/controller/9800/17-8/config-guide/b_wl_17_8_cg/m_environmental_sensors_on_aps.pdf</text:span></text:a><text:span text:style-name="T1855">:</text:span></text:p>
      <text:p text:style-name="Normal"><text:span text:style-name="T1856">The Environmental Sensors in Access Points feature helps you collect real-time environmental data, such as,</text:span><text:span text:style-name="T1857"><text:line-break/></text:span><text:span text:style-name="T1858">air quality</text:span><text:span text:style-name="T1859">, temperature, and humidity, from the environmental sensors. The advantage of sensor mode is to allow the AP to use its own radio (as a client) to </text:span><text:span text:style-name="T1860">test the</text:span><text:span text:style-name="T1861"> quality and </text:span><text:span text:style-name="T1862">performance of the network</text:span><text:span text:style-name="T1863"> at any time.</text:span></text:p>
      <text:p text:style-name="Normal"><text:span text:style-name="T1864">Reference: </text:span><text:a xlink:href="https://www.cisco.com/c/en/us/td/docs/wireless/controller/technotes/8-6/b_Cisco_Aironet_Sensor_Deployment_Guide.html" office:target-frame-name="_blank" xlink:show="new"><text:span text:style-name="T1865">https://www.cisco.com/c/en/us/td/docs/wireless/controller/technotes/8-6/b_Cisco_Aironet_Sensor_Deployment_Guide.html</text:span></text:a></text:p>
      <text:p text:style-name="Normal"><text:span text:style-name="T1866">Monitor</text:span><text:span text:style-name="T1867"> – When Cisco CleanAir is enabled in monitor mode, the </text:span><text:span text:style-name="T1868">access point provides air quality and interference detection reports</text:span><text:span text:style-name="T1869"> for all monitored channels.</text:span></text:p>
      <text:p text:style-name="Normal"><text:span text:style-name="T1870">Reference: </text:span><text:a xlink:href="https://www.cisco.com/en/US/docs/switches/lan/catalyst3650/software/release/3se/consolidated_guide/configuration_guide/b_consolidated_3850_3se_cg_chapter_011011.html" office:target-frame-name="_blank" xlink:show="new"><text:span text:style-name="T1871">https://www.cisco.com/en/US/docs/switches/lan/catalyst3650/software/release/3se/consolidated_guide/configuration_guide/b_consolidated_3850_3se_cg_chapter_011011.html</text:span></text:a></text:p>
      <text:p text:style-name="Normal"><text:span text:style-name="T1872">Question 12.</text:span><text:span text:style-name="T1873">107</text:span></text:p>
      <text:p text:style-name="P1874">Refer to the exhibit.</text:p>
      <text:soft-page-break/>
      <text:p text:style-name="Normal"><text:span text:style-name="T1875"><draw:frame draw:style-name="a45" draw:name="Picture 55" text:anchor-type="as-char" svg:x="0in" svg:y="0in" svg:width="4.50694in" svg:height="2.49306in" style:rel-width="scale" style:rel-height="scale"><draw:image xlink:href="media/image45.jpeg" xlink:type="simple" xlink:show="embed" xlink:actuate="onLoad"/><svg:title/><svg:desc/></draw:frame></text:span></text:p>
      <text:p text:style-name="P1876">Router1#show ip route</text:p>
      <text:p text:style-name="P1877">Gateway of last resort is 10.10.11.2 to network 0.0.0.0</text:p>
      <text:p text:style-name="P1878"><text:s text:c="4"/>209.165.200.0/27 is subnetted, 1 subnets<text:s/></text:p>
      <text:p text:style-name="P1879">B <text:s text:c="4"/>209.165.200.224 [20/0] via 10.10.12.2, 03:32:14</text:p>
      <text:p text:style-name="P1880"><text:s text:c="4"/>209.165.201.0/27 is subnetted, 1 subnets<text:s/></text:p>
      <text:p text:style-name="P1881">B <text:s text:c="4"/>209.165.201.0 [20/0] via 10.10.12.2, 02:26:53</text:p>
      <text:p text:style-name="P1882"><text:s text:c="4"/>209.165.202.0/27 is subnetted, 1 subnets<text:s/></text:p>
      <text:p text:style-name="P1883">B <text:s text:c="4"/>209.165.202.128 [20/0] via 10.10.12.2, 02:46:03</text:p>
      <text:p text:style-name="P1884"><text:s text:c="4"/>10.0.0.0/8 is variably subnetted, 10 subnets, 4 masks<text:s/></text:p>
      <text:p text:style-name="P1885">O <text:s text:c="4"/>10.10.13.0/25 [110/2] via 10.10.10.1, 00:00:04, GigabitEthernet0/0</text:p>
      <text:p text:style-name="P1886">O <text:s text:c="4"/>10.10.13.128/28 [110/2] via 10.10.10.5, 00:00:12, GigabitEthernet0/1</text:p>
      <text:p text:style-name="P1887">O <text:s text:c="4"/>10.10.13.144/28 [110/2] via 10.10.10.9, 00:01:57, GigabitEthernet0/2</text:p>
      <text:p text:style-name="P1888">O <text:s text:c="4"/>10.10.13.160/29 [110/2] via 10.10.10.5, 00:00:12, GigabitEthernet0/1</text:p>
      <text:p text:style-name="P1889">O <text:s text:c="4"/>10.10.13.208/29 [110/2] via 10.10.10.13, 00:01:57, GigabitEthernet0/3</text:p>
      <text:p text:style-name="P1890">S* <text:s/>0.0.0.0/0 [1/0] via 10.10.11.2</text:p>
      <text:p text:style-name="P1891">Drag and drop the destination IPs from the left onto the paths to reach those destinations on the right.</text:p>
      <text:soft-page-break/>
      <text:p text:style-name="Normal"><text:span text:style-name="T1892"><draw:frame draw:style-name="a46" draw:name="Picture 54" text:anchor-type="as-char" svg:x="0in" svg:y="0in" svg:width="4.60417in" svg:height="2.72917in" style:rel-width="scale" style:rel-height="scale"><draw:image xlink:href="media/image46.jpeg" xlink:type="simple" xlink:show="embed" xlink:actuate="onLoad"/><svg:title/><svg:desc/></draw:frame></text:span></text:p>
      <text:p text:style-name="P1893"> </text:p>
      <text:p text:style-name="Normal"><text:span text:style-name="T1894">Answer:</text:span></text:p>
      <text:p text:style-name="P1895">+ Router 2: 10.10.13.126<text:line-break/>+ Router 3: 10.10.13.129<text:line-break/>+ Router 4: 10.10.13.150<text:line-break/>+ Router 5: 10.10.13.209<text:line-break/>+ Internet cloud: 1.1.1.1<text:line-break/>+ MPLS cloud: 209.165.200.30</text:p>
      <text:p text:style-name="Normal"><text:span text:style-name="T1896">Explanation</text:span></text:p>
      <text:p text:style-name="P1897">Maybe there was a typo for this question for the match “MPLS cloud: 209.165.200.30”. The output is not correct as 209.165.200.0/27 does not include 209.165.200.224/27. But we still choose the best answer for this choice and it is 209.165.200.224/27 for destination IP 209.165.200.30.</text:p>
      <text:p text:style-name="Normal"><text:span text:style-name="T1898">Question 12.</text:span><text:span text:style-name="T1899">108</text:span></text:p>
      <text:p text:style-name="P1900">Drag and drop the IPv6 address descriptions from the left onto the IPv6 address types on the right. Not all options are used.</text:p>
      <text:soft-page-break/>
      <text:p text:style-name="Normal"><text:span text:style-name="T1901"><draw:frame draw:style-name="a47" draw:name="Picture 53" text:anchor-type="as-char" svg:x="0in" svg:y="0in" svg:width="6.45833in" svg:height="2.90972in" style:rel-width="scale" style:rel-height="scale"><draw:image xlink:href="media/image47.jpeg" xlink:type="simple" xlink:show="embed" xlink:actuate="onLoad"/><svg:title/><svg:desc/></draw:frame></text:span></text:p>
      <text:p text:style-name="P1902"> </text:p>
      <text:p text:style-name="Normal"><text:span text:style-name="T1903">Answer:</text:span></text:p>
      <text:p text:style-name="Normal"><text:span text:style-name="T1904">Unique Local Addresses</text:span><text:span text:style-name="T1905"><text:line-break/>+ IPv6 addresses that begin with FD</text:span><text:span text:style-name="T1906"><text:line-break/>+ may be used by multiple organizations at the same time</text:span><text:span text:style-name="T1907"><text:line-break/>+ private IPv6 addresses</text:span></text:p>
      <text:p text:style-name="Normal"><text:span text:style-name="T1908">Link-Local Addresses</text:span><text:span text:style-name="T1909"><text:line-break/>+ serve as next-hop addresses</text:span><text:span text:style-name="T1910"><text:line-break/>+ unable to serve as destination addresses</text:span></text:p>
      <text:p text:style-name="Normal"><text:span text:style-name="T1911">Explanation</text:span></text:p>
      <text:p text:style-name="P1912">Unique local address (or Site-local address) are analogous to IPv4’s private address classes. They start with FC00::/7 (for used in private networks) -&gt; The first octet can be FC or FD. However when you implement this you have to set the L-bit (the right-most bit of the first octet) to 1 which means that the first two digits will be FD.</text:p>
      <text:p text:style-name="P1913">FF02::5 is a multicast address (not a link-local address). It only has a link-local scope (an IPv6 router never forwards this type of traffic beyond the local link) so this IPv6 address does not belong to “link-local addresses”.</text:p>
      <text:soft-page-break/>
      <text:p text:style-name="Normal"><text:span text:style-name="T1914">You can use either Global Unicast IPv6 address or Link-Local IPv6 address as </text:span><text:span text:style-name="T1915">the next hop address</text:span><text:span text:style-name="T1916">. However, if you provide the Link-Local IPv6 address as the next hop address, you need to provide the interface number also.</text:span></text:p>
      <text:p text:style-name="Normal"><text:span text:style-name="T1917">Refefence: </text:span><text:a xlink:href="https://www.omnisecu.com/cisco-certified-network-associate-ccna/how-to-configure-ipv6-static-routes-in-cisco-routers.php" office:target-frame-name="_blank" xlink:show="new"><text:span text:style-name="T1918">https://www.omnisecu.com/cisco-certified-network-associate-ccna/how-to-configure-ipv6-static-routes-in-cisco-routers.php</text:span></text:a></text:p>
      <text:p text:style-name="Normal"><text:span text:style-name="T1919">Question 12.</text:span><text:span text:style-name="T1920">109</text:span><text:span text:style-name="T1921"><text:s/>(similar to an old question)</text:span></text:p>
      <text:p text:style-name="P1922">How will Link Aggregation be implemented on a Cisco Wireless LAN Controller?</text:p>
      <text:p text:style-name="P1923">A. To pass client traffic, two or more ports must be configured<text:line-break/>B. The EtherChannel must be configured in “mode active”<text:line-break/>C. When enabled, the WLC bandwidth drops to 500 Mbps<text:line-break/>D. One functional physical port is needed to pass client traffic</text:p>
      <text:p text:style-name="P1924"> </text:p>
      <text:p text:style-name="Normal"><text:span text:style-name="T1925">Answer: </text:span><text:span text:style-name="T1926">D</text:span></text:p>
      <text:p text:style-name="Normal"><text:span text:style-name="T1927">Explanation</text:span></text:p>
      <text:p text:style-name="P1928">Link aggregation (LAG) is a partial implementation of the 802.3ad port aggregation standard. It bundles all of the controller’s distribution system ports into a single 802.3ad port channel.</text:p>
      <text:p text:style-name="P1929">Restriction for Link aggregation:</text:p>
      <text:p text:style-name="Normal"><text:span text:style-name="T1930">+ LAG requires the EtherChannel to be configured for ‘mode on’ on both the controller and the Catalyst switch -&gt; Answer B is not correct.</text:span><text:span text:style-name="T1931"><text:line-break/>+ If the recommended load-balancing method cannot be configured on the Catalyst switch, </text:span><text:span text:style-name="T1932">then configure the LAG connection as a single member link</text:span><text:span text:style-name="T1933"> or disable LAG on the controller -&gt; Answer A is not correct while answer D is correct.</text:span></text:p>
      <text:p text:style-name="Normal"><text:span text:style-name="T1934">Reference: </text:span><text:a xlink:href="https://www.cisco.com/c/en/us/td/docs/wireless/controller/7-5/configuration-guide/b_cg75/b_cg75_chapter_0100010.html" office:target-frame-name="_blank" xlink:show="new"><text:span text:style-name="T1935">https://www.cisco.com/c/en/us/td/docs/wireless/controller/7-5/configuration-guide/b_cg75/b_cg75_chapter_0100010.html</text:span></text:a></text:p>
      <text:p text:style-name="Normal"><text:span text:style-name="T1936">Question 12.</text:span><text:span text:style-name="T1937">110</text:span><text:span text:style-name="T1938"><text:s/>(similar to an old question)</text:span></text:p>
      <text:p text:style-name="P1939">Refer to the exhibit.</text:p>
      <table:table table:style-name="Table1940">
        <table:table-columns>
          <table:table-column table:style-name="TableColumn1941"/>
        </table:table-columns>
        <table:table-row table:style-name="TableRow1942">
          <table:table-cell table:style-name="TableCell1943">
            <text:soft-page-break/>
            <text:p text:style-name="P1944">Switch(config)#hostname R1<text:line-break/>R1(config)#interface FastEthernet0/1<text:line-break/>R1(config-if)#no switchport<text:line-break/>R1(config-if)#ip address 10.100.20.42 255.255.255.0<text:line-break/>R1(config-if)#line vty 0 4<text:line-break/>R1(config-line)#login</text:p>
          </table:table-cell>
        </table:table-row>
      </table:table>
      <text:p text:style-name="P1945">An engineer booted a new switch and applied this configuration via the console port. Which additional configuration must be applied to allow administrators to authenticate directly to global configuration mode via Telnet using a local username and password?</text:p>
      <text:p text:style-name="P1946">A.<text:line-break/>R1(config)#username admin<text:line-break/>R1(config-if)#line vty 0 4<text:line-break/>R1(config-line)#password p@ss1234</text:p>
      <text:p text:style-name="P1947">B.<text:line-break/>R1(config)#username admin<text:line-break/>R1(config-if)#line vty 0 4<text:line-break/>R1(config-line)#password p@ss1234<text:line-break/>R1(config-line)#transport input telnet</text:p>
      <text:p text:style-name="P1948">C.<text:line-break/>R1(config)#username admin secret p@ss1234<text:line-break/>R1(config-if)#line vty 0 4<text:line-break/>R1(config-line)#login local<text:line-break/>R1(config)#enable secret p@ss1234</text:p>
      <text:p text:style-name="P1949">D.<text:line-break/>R1(config)#username admin privilege 15 secret p@ss1234<text:line-break/>R1(config-if)#line vty 0 4<text:line-break/>R1(config-line)#login local</text:p>
      <text:p text:style-name="P1950"> </text:p>
      <text:p text:style-name="Normal"><text:span text:style-name="T1951">Answer:</text:span><text:span text:style-name="T1952"> D</text:span></text:p>
      <text:p text:style-name="Normal"><text:span text:style-name="T1953">Question 12.</text:span><text:span text:style-name="T1954">111</text:span></text:p>
      <text:soft-page-break/>
      <text:p text:style-name="P1955">What is the definition of backdoor malware?</text:p>
      <text:p text:style-name="P1956">A. malicious program that is used to launch other malicious programs<text:line-break/>B. malicious code that infects a user machine and then uses that machine to send spam<text:line-break/>C. malicious code with the main purpose of downloading other malicious code<text:line-break/>D. malicious code that is installed onto a computer to allow access by an unauthorized user</text:p>
      <text:p text:style-name="P1957"> </text:p>
      <text:p text:style-name="Normal"><text:span text:style-name="T1958">Answer:</text:span><text:span text:style-name="T1959"> D</text:span></text:p>
      <text:p text:style-name="Normal"><text:span text:style-name="T1960">Explanation</text:span></text:p>
      <text:p text:style-name="P1961">A backdoor is a malware type that negates normal authentication procedures to access a system.</text:p>
      <text:p text:style-name="Normal"><text:span text:style-name="T1962">Reference: </text:span><text:a xlink:href="https://www.imperva.com/learn/application-security/backdoor-shell-attack/" office:target-frame-name="_blank" xlink:show="new"><text:span text:style-name="T1963">https://www.imperva.com/learn/application-security/backdoor-shell-attack/</text:span></text:a></text:p>
      <text:p text:style-name="Normal"><text:span text:style-name="T1964">Question 12.</text:span><text:span text:style-name="T1965">112</text:span></text:p>
      <text:p text:style-name="P1966">Refer to the exhibit.</text:p>
      <text:p text:style-name="Normal"><text:span text:style-name="T1967"><draw:frame draw:style-name="a48" draw:name="Picture 52" text:anchor-type="as-char" svg:x="0in" svg:y="0in" svg:width="3.15278in" svg:height="2.13889in" style:rel-width="scale" style:rel-height="scale"><draw:image xlink:href="media/image48.jpeg" xlink:type="simple" xlink:show="embed" xlink:actuate="onLoad"/><svg:title/><svg:desc/></draw:frame></text:span></text:p>
      <text:p text:style-name="P1968">Host A switch interface is configured in VLAN 2. Host D sends a unicast packet destined for the IP address of host A.</text:p>
      <text:p text:style-name="consolas">Sw1#show mac-address table</text:p>
      <text:p text:style-name="consolas"><text:s text:c="4"/>Mac Address Table</text:p>
      <text:p text:style-name="consolas">-----------------------------</text:p>
      <text:soft-page-break/>
      <text:p text:style-name="consolas">Vlan <text:s text:c="2"/>Mac Address <text:s text:c="4"/>Type <text:s text:c="3"/>Ports</text:p>
      <text:p text:style-name="consolas">---- <text:s text:c="2"/>----------- <text:s text:c="4"/>------- ----</text:p>
      <text:p text:style-name="P1969">2 <text:s text:c="5"/>000c.859c.bb7b <text:s/>DYNAMIC e0/1</text:p>
      <text:p text:style-name="P1970">3 <text:s text:c="5"/>000c.85dc.bb7b <text:s/>DYNAMIC e0/1</text:p>
      <text:p text:style-name="P1971">2 <text:s text:c="5"/>0010.11dc.3e91 <text:s/>DYNAMIC e0/2</text:p>
      <text:p text:style-name="P1972">3 <text:s text:c="5"/>0010.11dC.3e91 <text:s/>DYNAMIC e0/2</text:p>
      <text:p text:style-name="P1973">2 <text:s text:c="5"/>0044.42d9.c693 <text:s/>DYNAMIC e0/3</text:p>
      <text:p text:style-name="consolas">Sw1#</text:p>
      <text:p text:style-name="P1974">What does the switch do when it receives the frame from host D?</text:p>
      <text:p text:style-name="P1975">A. It floods the frame out of every port except the source port.<text:line-break/>B. It shuts down the source port and places It in err-disable mode.<text:line-break/>C. It drops the frame from the MAC table of the switch.<text:line-break/>D. It creates a broadcast storm.</text:p>
      <text:p text:style-name="P1976"> </text:p>
      <text:p text:style-name="Normal"><text:span text:style-name="T1977">Answer:</text:span><text:span text:style-name="T1978"> A</text:span></text:p>
      <text:p text:style-name="Normal"><text:span text:style-name="T1979">Explanation</text:span></text:p>
      <text:p text:style-name="P1980">HostA MAC address and port have not been learned in the switch MAC address table so the switch will flood the frame out of all ports except the source port where it received the frame.</text:p>
      <text:p text:style-name="Normal"><text:span text:style-name="T1981">Question 12.</text:span><text:span text:style-name="T1982">113</text:span></text:p>
      <text:p text:style-name="P1983">Which functionality is provided by the console connection on a Cisco WLC?</text:p>
      <text:p text:style-name="P1984">A. secure In-band connectivity for device administration<text:line-break/>B. out-of-band management<text:line-break/>C. HTTP-based GUI connectivity<text:line-break/>D. unencrypted in-band connectivity for file transfers</text:p>
      <text:p text:style-name="P1985"> </text:p>
      <text:p text:style-name="Normal"><text:span text:style-name="T1986">Answer:</text:span><text:span text:style-name="T1987"> B</text:span></text:p>
      <text:p text:style-name="Normal"><text:span text:style-name="T1988">Explanation</text:span></text:p>
      <text:soft-page-break/>
      <text:p text:style-name="P1989">The console port is used for out-of-band management, system recovery, and early boot operations.</text:p>
      <text:p text:style-name="Normal"><text:span text:style-name="T1990">Question 12.</text:span><text:span text:style-name="T1991">114</text:span></text:p>
      <text:p text:style-name="P1992">Refer to the exhibit.</text:p>
      <text:p text:style-name="Normal"><text:span text:style-name="T1993"><draw:frame draw:style-name="a49" draw:name="Picture 51" text:anchor-type="as-char" svg:x="0in" svg:y="0in" svg:width="5.42361in" svg:height="3.375in" style:rel-width="scale" style:rel-height="scale"><draw:image xlink:href="media/image49.jpeg" xlink:type="simple" xlink:show="embed" xlink:actuate="onLoad"/><svg:title/><svg:desc/></draw:frame></text:span></text:p>
      <text:p text:style-name="consolas">R1# show ip route</text:p>
      <text:p text:style-name="consolas">C <text:s text:c="2"/>1.0.0.0/8 is directly connected, Loopback0</text:p>
      <text:p text:style-name="consolas"><text:s text:c="4"/>10.0.0.0/8 is variably subnetted, 4 subnets, 2 masks<text:s/></text:p>
      <text:p text:style-name="consolas">O<text:tab/>10.10.10.3/32 [110/100] via 10.10.10.3, 00:39:08, Gigabitethernet0/3</text:p>
      <text:p text:style-name="consolas">C<text:tab/>10.10.10.0/24 is directly connected, Gigabitethernet0/0</text:p>
      <text:p text:style-name="P1994">O<text:tab/>10.10.10.2/32 [110/5] via 10.10.10.2, 00:39:08, Gigabitethernet0/2</text:p>
      <text:p text:style-name="P1995">R<text:tab/>10.10.10.4/32 [120/10] via 10.10.10.4, 00:39:08, Gigabitethernet0/4</text:p>
      <text:p text:style-name="P1996">Which next-hop IP address has the least desirable metric when sourced from R1?</text:p>
      <text:p text:style-name="P1997">A. 10.10.10.4<text:line-break/>B. 10.10.10.2<text:line-break/>C. 10.10.10.5<text:line-break/>D. 10.10.10.3</text:p>
      <text:p text:style-name="P1998"> </text:p>
      <text:soft-page-break/>
      <text:p text:style-name="Normal"><text:span text:style-name="T1999">Answer:</text:span><text:span text:style-name="T2000"> D</text:span></text:p>
      <text:p text:style-name="Normal"><text:span text:style-name="T2001">Explanation</text:span></text:p>
      <text:p text:style-name="P2002">This question asks about “metric”, not Administrative Distance so we have to compare the second parameter in the square brackets. In this case “100” is the “least desirable metric” and it belongs to 10.10.10.3 (R3).</text:p>
      <text:p text:style-name="P20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ccnaquestionsnumber" style:display-name="ccnaquestionsnumber" style:family="text" style:parent-style-name="DefaultParagraphFont"/>
    <style:style style:name="ccnacorrectanswers" style:display-name="ccnacorrectanswers" style:family="text" style:parent-style-name="DefaultParagraphFont"/>
    <style:style style:name="ccnaexplanation" style:display-name="ccnaexplanation"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ph" style:display-name="ph" style:family="text" style:parent-style-name="DefaultParagraphFont"/>
    <style:style style:name="keyword" style:display-name="keyword"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fontstyle0" style:display-name="fontstyle0"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inkandbold" style:display-name="pinkandbold"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fontstyle2" style:display-name="fontstyle2" style:family="text" style:parent-style-name="DefaultParagraphFont"/>
    <style:style style:name="fontstyle3" style:display-name="fontstyle3" style:family="text" style:parent-style-name="DefaultParagraphFont"/>
    <style:style style:name="UnresolvedMention" style:display-name="Unresolved Mention" style:family="text" style:parent-style-name="DefaultParagraphFont">
      <style:text-properties fo:color="#605E5C" fo:background-color="#E1DFDD"/>
    </style:style>
    <style:style style:name="Cauhoi" style:display-name="Cauhoi" style:family="paragraph" style:parent-style-name="Normal" style:list-style-name="LFO1">
      <style:text-properties style:font-name="Times New Roman" style:font-name-complex="Times New Roman" fo:font-weight="bold" style:font-weight-asian="bold" style:font-weight-complex="bold" fo:font-size="14pt" style:font-size-asian="14pt" style:font-size-complex="14pt" fo:hyphenate="false"/>
    </style:style>
    <style:style style:name="consolas" style:display-name="consolas" style:family="paragraph" style:parent-style-name="Normal">
      <style:text-properties style:font-name="Consolas" style:font-name-complex="Times New Roman" fo:font-size="11pt" style:font-size-asian="11pt" style:font-size-complex="11pt" fo:hyphenate="false"/>
    </style:style>
    <style:style style:name="consolasChar" style:display-name="consolas Char" style:family="text" style:parent-style-name="DefaultParagraphFont">
      <style:text-properties style:font-name="Consolas" style:font-name-complex="Times New Roman"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style>
    <text:list-style style:name="LFO1">
      <text:list-level-style-number text:level="1" text:style-name="WW_CharLFO1LVL1" style:num-prefix="Question 12."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Question 12.%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ang Ngoc Lien D24CC01</meta:initial-creator>
    <dc:creator>Hoang Ngoc Lien D24CC01</dc:creator>
    <meta:creation-date>2026-05-06T09:59:00Z</meta:creation-date>
    <dc:date>2026-05-06T14:34:00Z</dc:date>
    <meta:template xlink:href="Normal.dotm" xlink:type="simple"/>
    <meta:editing-cycles>2</meta:editing-cycles>
    <meta:editing-duration>PT13320S</meta:editing-duration>
    <meta:document-statistic meta:page-count="107" meta:paragraph-count="202" meta:word-count="15108" meta:character-count="101024" meta:row-count="717" meta:non-whitespace-character-count="86118"/>
  </office:meta>
</office:document-meta>
</file>